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0.409in" style:rel-column-width="3870*"/>
    </style:style>
    <style:style style:name="Table81.B" style:family="table-column">
      <style:table-column-properties style:column-width="1.7563in" style:rel-column-width="16620*"/>
    </style:style>
    <style:style style:name="Table81.C" style:family="table-column">
      <style:table-column-properties style:column-width="4.7597in" style:rel-column-width="45045*"/>
    </style:style>
    <style:style style:name="Table81.1" style:family="table-row">
      <style:table-row-properties style:min-row-height="0.2903in"/>
    </style:style>
    <style:style style:name="Table8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382in" fo:border="0.5pt solid #000000">
        <style:background-image/>
      </style:table-cell-properties>
    </style:style>
    <style:style style:name="Table81.A2" style:family="table-cell">
      <style:table-cell-properties fo:padding="0.0382in" fo:border-left="0.5pt solid #000000" fo:border-right="none" fo:border-top="none" fo:border-bottom="0.5pt solid #000000"/>
    </style:style>
    <style:style style:name="Table81.B2" style:family="table-cell">
      <style:table-cell-properties fo:padding="0.0382in" fo:border-left="0.5pt solid #000000" fo:border-right="none" fo:border-top="none" fo:border-bottom="0.5pt solid #000000"/>
    </style:style>
    <style:style style:name="Table8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2528in"/>
    </style:style>
    <style:style style:name="Table81.A3" style:family="table-cell">
      <style:table-cell-properties fo:padding="0.0382in" fo:border-left="0.5pt solid #000000" fo:border-right="none" fo:border-top="none" fo:border-bottom="0.5pt solid #000000"/>
    </style:style>
    <style:style style:name="Table81.B3" style:family="table-cell">
      <style:table-cell-properties fo:padding="0.0382in" fo:border-left="0.5pt solid #000000" fo:border-right="none" fo:border-top="none" fo:border-bottom="0.5pt solid #000000"/>
    </style:style>
    <style:style style:name="Table8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0.4389in" style:rel-column-width="4153*"/>
    </style:style>
    <style:style style:name="Table82.B" style:family="table-column">
      <style:table-column-properties style:column-width="3.4972in" style:rel-column-width="33096*"/>
    </style:style>
    <style:style style:name="Table82.C" style:family="table-column">
      <style:table-column-properties style:column-width="2.9889in" style:rel-column-width="28286*"/>
    </style:style>
    <style:style style:name="Table8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382in" fo:border="0.5pt solid #000000">
        <style:background-image/>
      </style:table-cell-properties>
    </style:style>
    <style:style style:name="Table82.A2" style:family="table-cell">
      <style:table-cell-properties fo:padding="0.0382in" fo:border-left="0.5pt solid #000000" fo:border-right="none" fo:border-top="none" fo:border-bottom="0.5pt solid #000000"/>
    </style:style>
    <style:style style:name="Table82.B2" style:family="table-cell">
      <style:table-cell-properties fo:padding="0.0382in" fo:border-left="0.5pt solid #000000" fo:border-right="none" fo:border-top="none" fo:border-bottom="0.5pt solid #000000"/>
    </style:style>
    <style:style style:name="Table8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3" style:family="table-cell">
      <style:table-cell-properties fo:padding="0.0382in" fo:border-left="0.5pt solid #000000" fo:border-right="none" fo:border-top="none" fo:border-bottom="0.5pt solid #000000"/>
    </style:style>
    <style:style style:name="Table82.B3" style:family="table-cell">
      <style:table-cell-properties fo:padding="0.0382in" fo:border-left="0.5pt solid #000000" fo:border-right="none" fo:border-top="none" fo:border-bottom="0.5pt solid #000000"/>
    </style:style>
    <style:style style:name="Table8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4" style:family="table-cell">
      <style:table-cell-properties fo:padding="0.0382in" fo:border-left="0.5pt solid #000000" fo:border-right="none" fo:border-top="none" fo:border-bottom="0.5pt solid #000000"/>
    </style:style>
    <style:style style:name="Table82.B4" style:family="table-cell">
      <style:table-cell-properties fo:padding="0.0382in" fo:border-left="0.5pt solid #000000" fo:border-right="none" fo:border-top="none" fo:border-bottom="0.5pt solid #000000"/>
    </style:style>
    <style:style style:name="Table8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5" style:family="table-cell">
      <style:table-cell-properties fo:padding="0.0382in" fo:border-left="0.5pt solid #000000" fo:border-right="none" fo:border-top="none" fo:border-bottom="0.5pt solid #000000"/>
    </style:style>
    <style:style style:name="Table82.B5" style:family="table-cell">
      <style:table-cell-properties fo:padding="0.0382in" fo:border-left="0.5pt solid #000000" fo:border-right="none" fo:border-top="none" fo:border-bottom="0.5pt solid #000000"/>
    </style:style>
    <style:style style:name="Table8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6" style:family="table-cell">
      <style:table-cell-properties fo:padding="0.0382in" fo:border-left="0.5pt solid #000000" fo:border-right="none" fo:border-top="none" fo:border-bottom="0.5pt solid #000000"/>
    </style:style>
    <style:style style:name="Table82.B6" style:family="table-cell">
      <style:table-cell-properties fo:padding="0.0382in" fo:border-left="0.5pt solid #000000" fo:border-right="none" fo:border-top="none" fo:border-bottom="0.5pt solid #000000"/>
    </style:style>
    <style:style style:name="Table8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7" style:family="table-cell">
      <style:table-cell-properties fo:padding="0.0382in" fo:border-left="0.5pt solid #000000" fo:border-right="none" fo:border-top="none" fo:border-bottom="0.5pt solid #000000"/>
    </style:style>
    <style:style style:name="Table82.B7" style:family="table-cell">
      <style:table-cell-properties fo:padding="0.0382in" fo:border-left="0.5pt solid #000000" fo:border-right="none" fo:border-top="none" fo:border-bottom="0.5pt solid #000000"/>
    </style:style>
    <style:style style:name="Table8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0.409in" style:rel-column-width="3870*"/>
    </style:style>
    <style:style style:name="Table83.B" style:family="table-column">
      <style:table-column-properties style:column-width="1.3396in" style:rel-column-width="12677*"/>
    </style:style>
    <style:style style:name="Table83.C" style:family="table-column">
      <style:table-column-properties style:column-width="1.3542in" style:rel-column-width="12815*"/>
    </style:style>
    <style:style style:name="Table83.D" style:family="table-column">
      <style:table-column-properties style:column-width="3.8222in" style:rel-column-width="36173*"/>
    </style:style>
    <style:style style:name="Table83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382in" fo:border="0.5pt solid #000000">
        <style:background-image/>
      </style:table-cell-properties>
    </style:style>
    <style:style style:name="Table83.A2" style:family="table-cell">
      <style:table-cell-properties fo:padding="0.0382in" fo:border-left="0.5pt solid #000000" fo:border-right="none" fo:border-top="none" fo:border-bottom="0.5pt solid #000000"/>
    </style:style>
    <style:style style:name="Table83.B2" style:family="table-cell">
      <style:table-cell-properties fo:padding="0.0382in" fo:border-left="0.5pt solid #000000" fo:border-right="none" fo:border-top="none" fo:border-bottom="0.5pt solid #000000"/>
    </style:style>
    <style:style style:name="Table83.C2" style:family="table-cell">
      <style:table-cell-properties fo:padding="0.0382in" fo:border-left="0.5pt solid #000000" fo:border-right="none" fo:border-top="none" fo:border-bottom="0.5pt solid #000000"/>
    </style:style>
    <style:style style:name="Table8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3" style:family="table-cell">
      <style:table-cell-properties fo:padding="0.0382in" fo:border-left="0.5pt solid #000000" fo:border-right="none" fo:border-top="none" fo:border-bottom="0.5pt solid #000000"/>
    </style:style>
    <style:style style:name="Table83.B3" style:family="table-cell">
      <style:table-cell-properties fo:padding="0.0382in" fo:border-left="0.5pt solid #000000" fo:border-right="none" fo:border-top="none" fo:border-bottom="0.5pt solid #000000"/>
    </style:style>
    <style:style style:name="Table83.C3" style:family="table-cell">
      <style:table-cell-properties fo:padding="0.0382in" fo:border-left="0.5pt solid #000000" fo:border-right="none" fo:border-top="none" fo:border-bottom="0.5pt solid #000000"/>
    </style:style>
    <style:style style:name="Table8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4" style:family="table-cell">
      <style:table-cell-properties fo:padding="0.0382in" fo:border-left="0.5pt solid #000000" fo:border-right="none" fo:border-top="none" fo:border-bottom="0.5pt solid #000000"/>
    </style:style>
    <style:style style:name="Table83.B4" style:family="table-cell">
      <style:table-cell-properties fo:padding="0.0382in" fo:border-left="0.5pt solid #000000" fo:border-right="none" fo:border-top="none" fo:border-bottom="0.5pt solid #000000"/>
    </style:style>
    <style:style style:name="Table83.C4" style:family="table-cell">
      <style:table-cell-properties fo:padding="0.0382in" fo:border-left="0.5pt solid #000000" fo:border-right="none" fo:border-top="none" fo:border-bottom="0.5pt solid #000000"/>
    </style:style>
    <style:style style:name="Table8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5" style:family="table-cell">
      <style:table-cell-properties fo:padding="0.0382in" fo:border-left="0.5pt solid #000000" fo:border-right="none" fo:border-top="none" fo:border-bottom="0.5pt solid #000000"/>
    </style:style>
    <style:style style:name="Table83.B5" style:family="table-cell">
      <style:table-cell-properties fo:padding="0.0382in" fo:border-left="0.5pt solid #000000" fo:border-right="none" fo:border-top="none" fo:border-bottom="0.5pt solid #000000"/>
    </style:style>
    <style:style style:name="Table83.C5" style:family="table-cell">
      <style:table-cell-properties fo:padding="0.0382in" fo:border-left="0.5pt solid #000000" fo:border-right="none" fo:border-top="none" fo:border-bottom="0.5pt solid #000000"/>
    </style:style>
    <style:style style:name="Table8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6" style:family="table-cell">
      <style:table-cell-properties fo:padding="0.0382in" fo:border-left="0.5pt solid #000000" fo:border-right="none" fo:border-top="none" fo:border-bottom="0.5pt solid #000000"/>
    </style:style>
    <style:style style:name="Table83.B6" style:family="table-cell">
      <style:table-cell-properties fo:padding="0.0382in" fo:border-left="0.5pt solid #000000" fo:border-right="none" fo:border-top="none" fo:border-bottom="0.5pt solid #000000"/>
    </style:style>
    <style:style style:name="Table83.C6" style:family="table-cell">
      <style:table-cell-properties fo:padding="0.0382in" fo:border-left="0.5pt solid #000000" fo:border-right="none" fo:border-top="none" fo:border-bottom="0.5pt solid #000000"/>
    </style:style>
    <style:style style:name="Table8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6.875in" fo:margin-left="0.0535in" table:align="left"/>
    </style:style>
    <style:style style:name="Table16.A" style:family="table-column">
      <style:table-column-properties style:column-width="6.875in"/>
    </style:style>
    <style:style style:name="Table16.A1" style:family="table-cell">
      <style:table-cell-properties fo:padding="0.0382in" fo:border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925in" style:rel-column-width="65535*"/>
    </style:style>
    <style:style style:name="Table30.A1" style:family="table-cell">
      <style:table-cell-properties fo:padding="0.0382in" fo:border="0.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925in" style:rel-column-width="65535*"/>
    </style:style>
    <style:style style:name="Table32.A1" style:family="table-cell">
      <style:table-cell-properties fo:padding="0.0382in" fo:border="0.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6.925in" style:rel-column-width="65535*"/>
    </style:style>
    <style:style style:name="Table33.A1" style:family="table-cell">
      <style:table-cell-properties fo:padding="0.0382in" fo:border="0.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925in" style:rel-column-width="65535*"/>
    </style:style>
    <style:style style:name="Table34.A1" style:family="table-cell">
      <style:table-cell-properties fo:padding="0.0382in" fo:border="0.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925in" style:rel-column-width="65535*"/>
    </style:style>
    <style:style style:name="Table35.A1" style:family="table-cell">
      <style:table-cell-properties fo:padding="0.0382in" fo:border="0.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6.925in" style:rel-column-width="65535*"/>
    </style:style>
    <style:style style:name="Table36.A1" style:family="table-cell">
      <style:table-cell-properties fo:padding="0.0382in" fo:border="0.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925in" style:rel-column-width="65535*"/>
    </style:style>
    <style:style style:name="Table37.A1" style:family="table-cell">
      <style:table-cell-properties fo:padding="0.0382in" fo:border="0.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padding="0.0382in" fo:border="0.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925in" style:rel-column-width="65535*"/>
    </style:style>
    <style:style style:name="Table39.A1" style:family="table-cell">
      <style:table-cell-properties fo:padding="0.0382in" fo:border="0.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fo:padding="0.0382in" fo:border="0.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925in" style:rel-column-width="65535*"/>
    </style:style>
    <style:style style:name="Table41.A1" style:family="table-cell">
      <style:table-cell-properties fo:padding="0.0382in" fo:border="0.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6.925in" style:rel-column-width="65535*"/>
    </style:style>
    <style:style style:name="Table42.A1" style:family="table-cell">
      <style:table-cell-properties fo:padding="0.0382in" fo:border="0.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925in" style:rel-column-width="65535*"/>
    </style:style>
    <style:style style:name="Table43.A1" style:family="table-cell">
      <style:table-cell-properties fo:padding="0.0382in" fo:border="0.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925in" style:rel-column-width="65535*"/>
    </style:style>
    <style:style style:name="Table44.A1" style:family="table-cell">
      <style:table-cell-properties fo:padding="0.0382in" fo:border="0.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925in" style:rel-column-width="65535*"/>
    </style:style>
    <style:style style:name="Table45.A1" style:family="table-cell">
      <style:table-cell-properties fo:padding="0.0382in" fo:border="0.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925in" style:rel-column-width="65535*"/>
    </style:style>
    <style:style style:name="Table46.A1" style:family="table-cell">
      <style:table-cell-properties fo:padding="0.0382in" fo:border="0.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925in" style:rel-column-width="65535*"/>
    </style:style>
    <style:style style:name="Table47.A1" style:family="table-cell">
      <style:table-cell-properties fo:padding="0.0382in" fo:border="0.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6.925in" style:rel-column-width="65535*"/>
    </style:style>
    <style:style style:name="Table48.A1" style:family="table-cell">
      <style:table-cell-properties fo:padding="0.0382in" fo:border="0.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6.925in" style:rel-column-width="65535*"/>
    </style:style>
    <style:style style:name="Table49.A1" style:family="table-cell">
      <style:table-cell-properties fo:padding="0.0382in" fo:border="0.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6.925in" style:rel-column-width="65535*"/>
    </style:style>
    <style:style style:name="Table50.A1" style:family="table-cell">
      <style:table-cell-properties fo:padding="0.0382in" fo:border="0.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6.925in" style:rel-column-width="65535*"/>
    </style:style>
    <style:style style:name="Table51.A1" style:family="table-cell">
      <style:table-cell-properties fo:padding="0.0382in" fo:border="0.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6.925in" style:rel-column-width="65535*"/>
    </style:style>
    <style:style style:name="Table52.A1" style:family="table-cell">
      <style:table-cell-properties fo:padding="0.0382in" fo:border="0.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6.925in" style:rel-column-width="65535*"/>
    </style:style>
    <style:style style:name="Table53.A1" style:family="table-cell">
      <style:table-cell-properties fo:padding="0.0382in" fo:border="0.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6.925in" style:rel-column-width="65535*"/>
    </style:style>
    <style:style style:name="Table54.A1" style:family="table-cell">
      <style:table-cell-properties fo:padding="0.0382in" fo:border="0.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6.925in" style:rel-column-width="65535*"/>
    </style:style>
    <style:style style:name="Table55.A1" style:family="table-cell">
      <style:table-cell-properties fo:padding="0.0382in" fo:border="0.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6.925in" style:rel-column-width="65535*"/>
    </style:style>
    <style:style style:name="Table56.A1" style:family="table-cell">
      <style:table-cell-properties fo:padding="0.0382in" fo:border="0.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6.925in" style:rel-column-width="65535*"/>
    </style:style>
    <style:style style:name="Table57.A1" style:family="table-cell">
      <style:table-cell-properties fo:padding="0.0382in" fo:border="0.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6.925in" style:rel-column-width="65535*"/>
    </style:style>
    <style:style style:name="Table58.A1" style:family="table-cell">
      <style:table-cell-properties fo:padding="0.0382in" fo:border="0.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6.925in" style:rel-column-width="65535*"/>
    </style:style>
    <style:style style:name="Table59.A1" style:family="table-cell">
      <style:table-cell-properties fo:padding="0.0382in" fo:border="0.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6.925in" style:rel-column-width="65535*"/>
    </style:style>
    <style:style style:name="Table60.A1" style:family="table-cell">
      <style:table-cell-properties fo:padding="0.0382in" fo:border="0.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6.925in" style:rel-column-width="65535*"/>
    </style:style>
    <style:style style:name="Table61.A1" style:family="table-cell">
      <style:table-cell-properties fo:padding="0.0382in" fo:border="0.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6.925in" style:rel-column-width="65535*"/>
    </style:style>
    <style:style style:name="Table62.A1" style:family="table-cell">
      <style:table-cell-properties fo:padding="0.0382in" fo:border="0.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6.925in" style:rel-column-width="65535*"/>
    </style:style>
    <style:style style:name="Table63.A1" style:family="table-cell">
      <style:table-cell-properties fo:padding="0.0382in" fo:border="0.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6.925in" style:rel-column-width="65535*"/>
    </style:style>
    <style:style style:name="Table64.A1" style:family="table-cell">
      <style:table-cell-properties fo:padding="0.0382in" fo:border="0.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6.925in" style:rel-column-width="65535*"/>
    </style:style>
    <style:style style:name="Table65.A1" style:family="table-cell">
      <style:table-cell-properties fo:padding="0.0382in" fo:border="0.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6.925in" style:rel-column-width="65535*"/>
    </style:style>
    <style:style style:name="Table66.A1" style:family="table-cell">
      <style:table-cell-properties fo:padding="0.0382in" fo:border="0.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6.925in" style:rel-column-width="65535*"/>
    </style:style>
    <style:style style:name="Table67.A1" style:family="table-cell">
      <style:table-cell-properties fo:padding="0.0382in" fo:border="0.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6.925in" style:rel-column-width="65535*"/>
    </style:style>
    <style:style style:name="Table68.A1" style:family="table-cell">
      <style:table-cell-properties fo:padding="0.0382in" fo:border="0.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6.925in" style:rel-column-width="65535*"/>
    </style:style>
    <style:style style:name="Table69.A1" style:family="table-cell">
      <style:table-cell-properties fo:padding="0.0382in" fo:border="0.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6.925in" style:rel-column-width="65535*"/>
    </style:style>
    <style:style style:name="Table70.A1" style:family="table-cell">
      <style:table-cell-properties fo:padding="0.0382in" fo:border="0.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6.925in" style:rel-column-width="65535*"/>
    </style:style>
    <style:style style:name="Table71.A1" style:family="table-cell">
      <style:table-cell-properties fo:padding="0.0382in" fo:border="0.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6.925in" style:rel-column-width="65535*"/>
    </style:style>
    <style:style style:name="Table72.A1" style:family="table-cell">
      <style:table-cell-properties fo:padding="0.0382in" fo:border="0.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6.925in" style:rel-column-width="65535*"/>
    </style:style>
    <style:style style:name="Table73.A1" style:family="table-cell">
      <style:table-cell-properties fo:padding="0.0382in" fo:border="0.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6.925in" style:rel-column-width="65535*"/>
    </style:style>
    <style:style style:name="Table74.A1" style:family="table-cell">
      <style:table-cell-properties fo:padding="0.0382in" fo:border="0.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6.925in" style:rel-column-width="65535*"/>
    </style:style>
    <style:style style:name="Table75.A1" style:family="table-cell">
      <style:table-cell-properties fo:padding="0.0382in" fo:border="0.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6.925in" style:rel-column-width="65535*"/>
    </style:style>
    <style:style style:name="Table76.A1" style:family="table-cell">
      <style:table-cell-properties fo:padding="0.0382in" fo:border="0.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6.925in" style:rel-column-width="65535*"/>
    </style:style>
    <style:style style:name="Table77.A1" style:family="table-cell">
      <style:table-cell-properties fo:padding="0.0382in" fo:border="0.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6.925in" style:rel-column-width="65535*"/>
    </style:style>
    <style:style style:name="Table78.A1" style:family="table-cell">
      <style:table-cell-properties fo:padding="0.0382in" fo:border="0.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6.925in" style:rel-column-width="65535*"/>
    </style:style>
    <style:style style:name="Table79.A1" style:family="table-cell">
      <style:table-cell-properties fo:padding="0.0382in" fo:border="0.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6.925in" style:rel-column-width="65535*"/>
    </style:style>
    <style:style style:name="Table80.A1" style:family="table-cell">
      <style:table-cell-properties fo:padding="0.0382in" fo:border="0.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6.925in" style:rel-column-width="65535*"/>
    </style:style>
    <style:style style:name="Table84.A1" style:family="table-cell">
      <style:table-cell-properties fo:padding="0.0382in" fo:border="0.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6.925in" style:rel-column-width="65535*"/>
    </style:style>
    <style:style style:name="Table85.A1" style:family="table-cell">
      <style:table-cell-properties fo:padding="0.0382in" fo:border="0.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6.925in" style:rel-column-width="65535*"/>
    </style:style>
    <style:style style:name="Table86.A1" style:family="table-cell">
      <style:table-cell-properties fo:padding="0.0382in" fo:border="0.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6.925in" style:rel-column-width="65535*"/>
    </style:style>
    <style:style style:name="Table87.A1" style:family="table-cell">
      <style:table-cell-properties fo:padding="0.0382in" fo:border="0.5pt solid #000000"/>
    </style:style>
    <style:style style:name="Table88" style:family="table">
      <style:table-properties style:width="6.925in" table:align="margins"/>
    </style:style>
    <style:style style:name="Table88.A" style:family="table-column">
      <style:table-column-properties style:column-width="6.925in" style:rel-column-width="65535*"/>
    </style:style>
    <style:style style:name="Table88.A1" style:family="table-cell">
      <style:table-cell-properties fo:padding="0.0382in" fo:border="0.5pt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6.925in" style:rel-column-width="65535*"/>
    </style:style>
    <style:style style:name="Table89.A1" style:family="table-cell">
      <style:table-cell-properties fo:padding="0.0382in" fo:border="0.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6.925in" style:rel-column-width="65535*"/>
    </style:style>
    <style:style style:name="Table90.A1" style:family="table-cell">
      <style:table-cell-properties fo:padding="0.0382in" fo:border="0.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6.925in" style:rel-column-width="65535*"/>
    </style:style>
    <style:style style:name="Table91.A1" style:family="table-cell">
      <style:table-cell-properties fo:padding="0.0382in" fo:border="0.5pt solid #000000"/>
    </style:style>
    <style:style style:name="Table92" style:family="table">
      <style:table-properties style:width="6.925in" table:align="margins"/>
    </style:style>
    <style:style style:name="Table92.A" style:family="table-column">
      <style:table-column-properties style:column-width="6.925in" style:rel-column-width="65535*"/>
    </style:style>
    <style:style style:name="Table92.A1" style:family="table-cell">
      <style:table-cell-properties fo:padding="0.0382in" fo:border="0.5pt solid #000000"/>
    </style:style>
    <style:style style:name="Table93" style:family="table">
      <style:table-properties style:width="6.925in" table:align="margins"/>
    </style:style>
    <style:style style:name="Table93.A" style:family="table-column">
      <style:table-column-properties style:column-width="6.925in" style:rel-column-width="65535*"/>
    </style:style>
    <style:style style:name="Table93.A1" style:family="table-cell">
      <style:table-cell-properties fo:padding="0.0382in" fo:border="0.5pt solid #000000"/>
    </style:style>
    <style:style style:name="Table94" style:family="table">
      <style:table-properties style:width="6.925in" table:align="margins"/>
    </style:style>
    <style:style style:name="Table94.A" style:family="table-column">
      <style:table-column-properties style:column-width="6.925in" style:rel-column-width="65535*"/>
    </style:style>
    <style:style style:name="Table94.A1" style:family="table-cell">
      <style:table-cell-properties fo:padding="0.0382in" fo:border="0.5pt solid #000000"/>
    </style:style>
    <style:style style:name="Table95" style:family="table">
      <style:table-properties style:width="6.925in" table:align="margins"/>
    </style:style>
    <style:style style:name="Table95.A" style:family="table-column">
      <style:table-column-properties style:column-width="6.925in" style:rel-column-width="65535*"/>
    </style:style>
    <style:style style:name="Table95.A1" style:family="table-cell">
      <style:table-cell-properties fo:padding="0.0382in" fo:border="0.5pt solid #000000"/>
    </style:style>
    <style:style style:name="Table96" style:family="table">
      <style:table-properties style:width="6.925in" table:align="margins"/>
    </style:style>
    <style:style style:name="Table96.A" style:family="table-column">
      <style:table-column-properties style:column-width="6.925in" style:rel-column-width="65535*"/>
    </style:style>
    <style:style style:name="Table96.A1" style:family="table-cell">
      <style:table-cell-properties fo:padding="0.0382in" fo:border="0.5pt solid #000000"/>
    </style:style>
    <style:style style:name="Table97" style:family="table">
      <style:table-properties style:width="6.925in" table:align="margins"/>
    </style:style>
    <style:style style:name="Table97.A" style:family="table-column">
      <style:table-column-properties style:column-width="6.925in" style:rel-column-width="65535*"/>
    </style:style>
    <style:style style:name="Table97.A1" style:family="table-cell">
      <style:table-cell-properties fo:padding="0.0382in" fo:border="0.5pt solid #000000"/>
    </style:style>
    <style:style style:name="Table98" style:family="table">
      <style:table-properties style:width="6.925in" table:align="margins"/>
    </style:style>
    <style:style style:name="Table98.A" style:family="table-column">
      <style:table-column-properties style:column-width="6.925in" style:rel-column-width="65535*"/>
    </style:style>
    <style:style style:name="Table98.A1" style:family="table-cell">
      <style:table-cell-properties fo:padding="0.0382in" fo:border="0.5pt solid #000000"/>
    </style:style>
    <style:style style:name="Table99" style:family="table">
      <style:table-properties style:width="6.875in" fo:margin-left="0.0535in" table:align="left"/>
    </style:style>
    <style:style style:name="Table99.A" style:family="table-column">
      <style:table-column-properties style:column-width="6.875in"/>
    </style:style>
    <style:style style:name="Table99.A1" style:family="table-cell">
      <style:table-cell-properties fo:padding="0.0382in" fo:border="0.5pt solid #000000"/>
    </style:style>
    <style:style style:name="Table100" style:family="table">
      <style:table-properties style:width="6.925in" table:align="margins"/>
    </style:style>
    <style:style style:name="Table100.A" style:family="table-column">
      <style:table-column-properties style:column-width="6.925in" style:rel-column-width="65535*"/>
    </style:style>
    <style:style style:name="Table100.A1" style:family="table-cell">
      <style:table-cell-properties fo:padding="0.0382in" fo:border="0.5pt solid #000000"/>
    </style:style>
    <style:style style:name="Table101" style:family="table">
      <style:table-properties style:width="6.925in" table:align="margins"/>
    </style:style>
    <style:style style:name="Table101.A" style:family="table-column">
      <style:table-column-properties style:column-width="6.925in" style:rel-column-width="65535*"/>
    </style:style>
    <style:style style:name="Table101.A1" style:family="table-cell">
      <style:table-cell-properties fo:padding="0.0382in" fo:border="0.5pt solid #000000"/>
    </style:style>
    <style:style style:name="Table102" style:family="table">
      <style:table-properties style:width="6.925in" table:align="margins"/>
    </style:style>
    <style:style style:name="Table102.A" style:family="table-column">
      <style:table-column-properties style:column-width="6.925in" style:rel-column-width="65535*"/>
    </style:style>
    <style:style style:name="Table102.A1" style:family="table-cell">
      <style:table-cell-properties fo:padding="0.0382in" fo:border="0.5pt solid #000000"/>
    </style:style>
    <style:style style:name="Table103" style:family="table">
      <style:table-properties style:width="6.925in" table:align="margins"/>
    </style:style>
    <style:style style:name="Table103.A" style:family="table-column">
      <style:table-column-properties style:column-width="6.925in" style:rel-column-width="65535*"/>
    </style:style>
    <style:style style:name="Table103.A1" style:family="table-cell">
      <style:table-cell-properties fo:padding="0.0382in" fo:border="0.5pt solid #000000"/>
    </style:style>
    <style:style style:name="Table104" style:family="table">
      <style:table-properties style:width="6.925in" table:align="margins"/>
    </style:style>
    <style:style style:name="Table104.A" style:family="table-column">
      <style:table-column-properties style:column-width="6.925in" style:rel-column-width="65535*"/>
    </style:style>
    <style:style style:name="Table104.A1" style:family="table-cell">
      <style:table-cell-properties fo:padding="0.0382in" fo:border="0.5pt solid #000000"/>
    </style:style>
    <style:style style:name="Table105" style:family="table">
      <style:table-properties style:width="6.925in" table:align="margins"/>
    </style:style>
    <style:style style:name="Table105.A" style:family="table-column">
      <style:table-column-properties style:column-width="6.925in" style:rel-column-width="65535*"/>
    </style:style>
    <style:style style:name="Table105.A1" style:family="table-cell">
      <style:table-cell-properties fo:padding="0.0382in" fo:border="0.5pt solid #000000"/>
    </style:style>
    <style:style style:name="Table106" style:family="table">
      <style:table-properties style:width="6.925in" table:align="margins"/>
    </style:style>
    <style:style style:name="Table106.A" style:family="table-column">
      <style:table-column-properties style:column-width="6.925in" style:rel-column-width="65535*"/>
    </style:style>
    <style:style style:name="Table106.A1" style:family="table-cell">
      <style:table-cell-properties fo:padding="0.0382in" fo:border="0.5pt solid #000000"/>
    </style:style>
    <style:style style:name="Table107" style:family="table">
      <style:table-properties style:width="6.925in" table:align="margins"/>
    </style:style>
    <style:style style:name="Table107.A" style:family="table-column">
      <style:table-column-properties style:column-width="6.925in" style:rel-column-width="65535*"/>
    </style:style>
    <style:style style:name="Table107.A1" style:family="table-cell">
      <style:table-cell-properties fo:padding="0.0382in" fo:border="0.5pt solid #000000"/>
    </style:style>
    <style:style style:name="Table108" style:family="table">
      <style:table-properties style:width="6.925in" table:align="margins"/>
    </style:style>
    <style:style style:name="Table108.A" style:family="table-column">
      <style:table-column-properties style:column-width="6.925in" style:rel-column-width="65535*"/>
    </style:style>
    <style:style style:name="Table108.A1" style:family="table-cell">
      <style:table-cell-properties fo:padding="0.0382in" fo:border="0.5pt solid #000000"/>
    </style:style>
    <style:style style:name="Table109" style:family="table">
      <style:table-properties style:width="6.925in" table:align="margins"/>
    </style:style>
    <style:style style:name="Table109.A" style:family="table-column">
      <style:table-column-properties style:column-width="6.925in" style:rel-column-width="65535*"/>
    </style:style>
    <style:style style:name="Table109.A1" style:family="table-cell">
      <style:table-cell-properties fo:padding="0.0382in" fo:border="0.5pt solid #000000"/>
    </style:style>
    <style:style style:name="Table110" style:family="table">
      <style:table-properties style:width="6.925in" table:align="margins"/>
    </style:style>
    <style:style style:name="Table110.A" style:family="table-column">
      <style:table-column-properties style:column-width="6.925in" style:rel-column-width="65535*"/>
    </style:style>
    <style:style style:name="Table110.A1" style:family="table-cell">
      <style:table-cell-properties fo:padding="0.0382in" fo:border="0.5pt solid #000000"/>
    </style:style>
    <style:style style:name="Table111" style:family="table">
      <style:table-properties style:width="6.925in" table:align="margins"/>
    </style:style>
    <style:style style:name="Table111.A" style:family="table-column">
      <style:table-column-properties style:column-width="6.925in" style:rel-column-width="65535*"/>
    </style:style>
    <style:style style:name="Table111.A1" style:family="table-cell">
      <style:table-cell-properties fo:padding="0.0382in" fo:border="0.5pt solid #000000"/>
    </style:style>
    <style:style style:name="Table112" style:family="table">
      <style:table-properties style:width="6.925in" table:align="margins"/>
    </style:style>
    <style:style style:name="Table112.A" style:family="table-column">
      <style:table-column-properties style:column-width="6.925in" style:rel-column-width="65535*"/>
    </style:style>
    <style:style style:name="Table112.A1" style:family="table-cell">
      <style:table-cell-properties fo:padding="0.0382in" fo:border="0.5pt solid #000000"/>
    </style:style>
    <style:style style:name="Table113" style:family="table">
      <style:table-properties style:width="6.925in" table:align="margins"/>
    </style:style>
    <style:style style:name="Table113.A" style:family="table-column">
      <style:table-column-properties style:column-width="6.925in" style:rel-column-width="65535*"/>
    </style:style>
    <style:style style:name="Table113.A1" style:family="table-cell">
      <style:table-cell-properties fo:padding="0.0382in" fo:border="0.5pt solid #000000"/>
    </style:style>
    <style:style style:name="Table114" style:family="table">
      <style:table-properties style:width="6.925in" table:align="margins"/>
    </style:style>
    <style:style style:name="Table114.A" style:family="table-column">
      <style:table-column-properties style:column-width="6.925in" style:rel-column-width="65535*"/>
    </style:style>
    <style:style style:name="Table114.A1" style:family="table-cell">
      <style:table-cell-properties fo:padding="0.0382in" fo:border="0.5pt solid #000000"/>
    </style:style>
    <style:style style:name="Table115" style:family="table">
      <style:table-properties style:width="6.875in" fo:margin-left="0.0535in" table:align="left"/>
    </style:style>
    <style:style style:name="Table115.A" style:family="table-column">
      <style:table-column-properties style:column-width="6.875in"/>
    </style:style>
    <style:style style:name="Table115.A1" style:family="table-cell">
      <style:table-cell-properties fo:padding="0.0382in" fo:border="0.5pt solid #000000"/>
    </style:style>
    <style:style style:name="Table116" style:family="table">
      <style:table-properties style:width="6.925in" table:align="margins"/>
    </style:style>
    <style:style style:name="Table116.A" style:family="table-column">
      <style:table-column-properties style:column-width="6.925in" style:rel-column-width="65535*"/>
    </style:style>
    <style:style style:name="Table116.A1" style:family="table-cell">
      <style:table-cell-properties fo:padding="0.0382in" fo:border="0.5pt solid #000000"/>
    </style:style>
    <style:style style:name="Table117" style:family="table">
      <style:table-properties style:width="6.925in" table:align="margins"/>
    </style:style>
    <style:style style:name="Table117.A" style:family="table-column">
      <style:table-column-properties style:column-width="6.925in" style:rel-column-width="65535*"/>
    </style:style>
    <style:style style:name="Table117.A1" style:family="table-cell">
      <style:table-cell-properties fo:padding="0.0382in" fo:border="0.5pt solid #000000"/>
    </style:style>
    <style:style style:name="Table118" style:family="table">
      <style:table-properties style:width="6.925in" table:align="margins"/>
    </style:style>
    <style:style style:name="Table118.A" style:family="table-column">
      <style:table-column-properties style:column-width="6.925in" style:rel-column-width="65535*"/>
    </style:style>
    <style:style style:name="Table118.A1" style:family="table-cell">
      <style:table-cell-properties fo:padding="0.0382in" fo:border="0.5pt solid #000000"/>
    </style:style>
    <style:style style:name="Table119" style:family="table">
      <style:table-properties style:width="6.925in" table:align="margins"/>
    </style:style>
    <style:style style:name="Table119.A" style:family="table-column">
      <style:table-column-properties style:column-width="6.925in" style:rel-column-width="65535*"/>
    </style:style>
    <style:style style:name="Table119.A1" style:family="table-cell">
      <style:table-cell-properties fo:padding="0.0382in" fo:border="0.5pt solid #000000"/>
    </style:style>
    <style:style style:name="Table120" style:family="table">
      <style:table-properties style:width="6.925in" table:align="margins"/>
    </style:style>
    <style:style style:name="Table120.A" style:family="table-column">
      <style:table-column-properties style:column-width="6.925in" style:rel-column-width="65535*"/>
    </style:style>
    <style:style style:name="Table120.A1" style:family="table-cell">
      <style:table-cell-properties fo:padding="0.0382in" fo:border="0.5pt solid #000000"/>
    </style:style>
    <style:style style:name="Table121" style:family="table">
      <style:table-properties style:width="6.925in" table:align="margins"/>
    </style:style>
    <style:style style:name="Table121.A" style:family="table-column">
      <style:table-column-properties style:column-width="6.925in" style:rel-column-width="65535*"/>
    </style:style>
    <style:style style:name="Table121.A1" style:family="table-cell">
      <style:table-cell-properties fo:padding="0.0382in" fo:border="0.5pt solid #000000"/>
    </style:style>
    <style:style style:name="Table122" style:family="table">
      <style:table-properties style:width="6.925in" table:align="margins"/>
    </style:style>
    <style:style style:name="Table122.A" style:family="table-column">
      <style:table-column-properties style:column-width="6.925in" style:rel-column-width="65535*"/>
    </style:style>
    <style:style style:name="Table122.A1" style:family="table-cell">
      <style:table-cell-properties fo:padding="0.0382in" fo:border="0.5pt solid #000000"/>
    </style:style>
    <style:style style:name="Table123" style:family="table">
      <style:table-properties style:width="6.925in" table:align="margins"/>
    </style:style>
    <style:style style:name="Table123.A" style:family="table-column">
      <style:table-column-properties style:column-width="6.925in" style:rel-column-width="65535*"/>
    </style:style>
    <style:style style:name="Table123.A1" style:family="table-cell">
      <style:table-cell-properties fo:padding="0.0382in" fo:border="0.5pt solid #000000"/>
    </style:style>
    <style:style style:name="Table124" style:family="table">
      <style:table-properties style:width="6.925in" table:align="margins"/>
    </style:style>
    <style:style style:name="Table124.A" style:family="table-column">
      <style:table-column-properties style:column-width="6.925in" style:rel-column-width="65535*"/>
    </style:style>
    <style:style style:name="Table124.A1" style:family="table-cell">
      <style:table-cell-properties fo:padding="0.0382in" fo:border="0.5pt solid #000000"/>
    </style:style>
    <style:style style:name="Table125" style:family="table">
      <style:table-properties style:width="6.925in" table:align="margins"/>
    </style:style>
    <style:style style:name="Table125.A" style:family="table-column">
      <style:table-column-properties style:column-width="6.925in" style:rel-column-width="65535*"/>
    </style:style>
    <style:style style:name="Table125.A1" style:family="table-cell">
      <style:table-cell-properties fo:padding="0.0382in" fo:border="0.5pt solid #000000"/>
    </style:style>
    <style:style style:name="Table126" style:family="table">
      <style:table-properties style:width="6.925in" table:align="margins"/>
    </style:style>
    <style:style style:name="Table126.A" style:family="table-column">
      <style:table-column-properties style:column-width="6.925in" style:rel-column-width="65535*"/>
    </style:style>
    <style:style style:name="Table126.A1" style:family="table-cell">
      <style:table-cell-properties fo:padding="0.0382in" fo:border="0.5pt solid #000000"/>
    </style:style>
    <style:style style:name="Table127" style:family="table">
      <style:table-properties style:width="6.925in" table:align="margins"/>
    </style:style>
    <style:style style:name="Table127.A" style:family="table-column">
      <style:table-column-properties style:column-width="6.925in" style:rel-column-width="65535*"/>
    </style:style>
    <style:style style:name="Table127.A1" style:family="table-cell">
      <style:table-cell-properties fo:padding="0.0382in" fo:border="0.5pt solid #000000"/>
    </style:style>
    <style:style style:name="Table128" style:family="table">
      <style:table-properties style:width="6.925in" table:align="margins"/>
    </style:style>
    <style:style style:name="Table128.A" style:family="table-column">
      <style:table-column-properties style:column-width="6.925in" style:rel-column-width="65535*"/>
    </style:style>
    <style:style style:name="Table128.A1" style:family="table-cell">
      <style:table-cell-properties fo:padding="0.0382in" fo:border="0.5pt solid #000000"/>
    </style:style>
    <style:style style:name="Table129" style:family="table">
      <style:table-properties style:width="6.925in" table:align="margins"/>
    </style:style>
    <style:style style:name="Table129.A" style:family="table-column">
      <style:table-column-properties style:column-width="6.925in" style:rel-column-width="65535*"/>
    </style:style>
    <style:style style:name="Table129.A1" style:family="table-cell">
      <style:table-cell-properties fo:padding="0.0382in" fo:border="0.5pt solid #000000"/>
    </style:style>
    <style:style style:name="Table130" style:family="table">
      <style:table-properties style:width="6.925in" table:align="margins"/>
    </style:style>
    <style:style style:name="Table130.A" style:family="table-column">
      <style:table-column-properties style:column-width="6.925in" style:rel-column-width="65535*"/>
    </style:style>
    <style:style style:name="Table130.A1" style:family="table-cell">
      <style:table-cell-properties fo:padding="0.0382in" fo:border="0.5pt solid #000000"/>
    </style:style>
    <style:style style:name="Table131" style:family="table">
      <style:table-properties style:width="6.875in" fo:margin-left="0.0535in" table:align="left"/>
    </style:style>
    <style:style style:name="Table131.A" style:family="table-column">
      <style:table-column-properties style:column-width="6.875in"/>
    </style:style>
    <style:style style:name="Table131.A1" style:family="table-cell">
      <style:table-cell-properties fo:padding="0.0382in" fo:border="0.5pt solid #000000"/>
    </style:style>
    <style:style style:name="Table132" style:family="table">
      <style:table-properties style:width="6.925in" table:align="margins"/>
    </style:style>
    <style:style style:name="Table132.A" style:family="table-column">
      <style:table-column-properties style:column-width="6.925in" style:rel-column-width="65535*"/>
    </style:style>
    <style:style style:name="Table132.A1" style:family="table-cell">
      <style:table-cell-properties fo:padding="0.0382in" fo:border="0.5pt solid #000000"/>
    </style:style>
    <style:style style:name="Table133" style:family="table">
      <style:table-properties style:width="6.925in" table:align="margins"/>
    </style:style>
    <style:style style:name="Table133.A" style:family="table-column">
      <style:table-column-properties style:column-width="6.925in" style:rel-column-width="65535*"/>
    </style:style>
    <style:style style:name="Table133.A1" style:family="table-cell">
      <style:table-cell-properties fo:padding="0.0382in" fo:border="0.5pt solid #000000"/>
    </style:style>
    <style:style style:name="Table134" style:family="table">
      <style:table-properties style:width="6.925in" table:align="margins"/>
    </style:style>
    <style:style style:name="Table134.A" style:family="table-column">
      <style:table-column-properties style:column-width="6.925in" style:rel-column-width="65535*"/>
    </style:style>
    <style:style style:name="Table134.A1" style:family="table-cell">
      <style:table-cell-properties fo:padding="0.0382in" fo:border="0.5pt solid #000000"/>
    </style:style>
    <style:style style:name="Table135" style:family="table">
      <style:table-properties style:width="6.925in" table:align="margins"/>
    </style:style>
    <style:style style:name="Table135.A" style:family="table-column">
      <style:table-column-properties style:column-width="6.925in" style:rel-column-width="65535*"/>
    </style:style>
    <style:style style:name="Table135.A1" style:family="table-cell">
      <style:table-cell-properties fo:padding="0.0382in" fo:border="0.5pt solid #000000"/>
    </style:style>
    <style:style style:name="Table136" style:family="table">
      <style:table-properties style:width="6.925in" table:align="margins"/>
    </style:style>
    <style:style style:name="Table136.A" style:family="table-column">
      <style:table-column-properties style:column-width="6.925in" style:rel-column-width="65535*"/>
    </style:style>
    <style:style style:name="Table136.A1" style:family="table-cell">
      <style:table-cell-properties fo:padding="0.0382in" fo:border="0.5pt solid #000000"/>
    </style:style>
    <style:style style:name="Table137" style:family="table">
      <style:table-properties style:width="6.925in" table:align="margins"/>
    </style:style>
    <style:style style:name="Table137.A" style:family="table-column">
      <style:table-column-properties style:column-width="6.925in" style:rel-column-width="65535*"/>
    </style:style>
    <style:style style:name="Table137.A1" style:family="table-cell">
      <style:table-cell-properties fo:padding="0.0382in" fo:border="0.5pt solid #000000"/>
    </style:style>
    <style:style style:name="Table138" style:family="table">
      <style:table-properties style:width="6.925in" table:align="margins"/>
    </style:style>
    <style:style style:name="Table138.A" style:family="table-column">
      <style:table-column-properties style:column-width="6.925in" style:rel-column-width="65535*"/>
    </style:style>
    <style:style style:name="Table138.A1" style:family="table-cell">
      <style:table-cell-properties fo:padding="0.0382in" fo:border="0.5pt solid #000000"/>
    </style:style>
    <style:style style:name="Table139" style:family="table">
      <style:table-properties style:width="6.925in" table:align="margins"/>
    </style:style>
    <style:style style:name="Table139.A" style:family="table-column">
      <style:table-column-properties style:column-width="6.925in" style:rel-column-width="65535*"/>
    </style:style>
    <style:style style:name="Table139.A1" style:family="table-cell">
      <style:table-cell-properties fo:padding="0.0382in" fo:border="0.5pt solid #000000"/>
    </style:style>
    <style:style style:name="Table140" style:family="table">
      <style:table-properties style:width="6.925in" table:align="margins"/>
    </style:style>
    <style:style style:name="Table140.A" style:family="table-column">
      <style:table-column-properties style:column-width="6.925in" style:rel-column-width="65535*"/>
    </style:style>
    <style:style style:name="Table140.A1" style:family="table-cell">
      <style:table-cell-properties fo:padding="0.0382in" fo:border="0.5pt solid #000000"/>
    </style:style>
    <style:style style:name="Table141" style:family="table">
      <style:table-properties style:width="6.925in" table:align="margins"/>
    </style:style>
    <style:style style:name="Table141.A" style:family="table-column">
      <style:table-column-properties style:column-width="6.925in" style:rel-column-width="65535*"/>
    </style:style>
    <style:style style:name="Table141.A1" style:family="table-cell">
      <style:table-cell-properties fo:padding="0.0382in" fo:border="0.5pt solid #000000"/>
    </style:style>
    <style:style style:name="Table142" style:family="table">
      <style:table-properties style:width="6.925in" table:align="margins"/>
    </style:style>
    <style:style style:name="Table142.A" style:family="table-column">
      <style:table-column-properties style:column-width="6.925in" style:rel-column-width="65535*"/>
    </style:style>
    <style:style style:name="Table142.A1" style:family="table-cell">
      <style:table-cell-properties fo:padding="0.0382in" fo:border="0.5pt solid #000000"/>
    </style:style>
    <style:style style:name="Table143" style:family="table">
      <style:table-properties style:width="6.925in" table:align="margins"/>
    </style:style>
    <style:style style:name="Table143.A" style:family="table-column">
      <style:table-column-properties style:column-width="6.925in" style:rel-column-width="65535*"/>
    </style:style>
    <style:style style:name="Table143.A1" style:family="table-cell">
      <style:table-cell-properties fo:padding="0.0382in" fo:border="0.5pt solid #000000"/>
    </style:style>
    <style:style style:name="Table144" style:family="table">
      <style:table-properties style:width="6.925in" table:align="margins"/>
    </style:style>
    <style:style style:name="Table144.A" style:family="table-column">
      <style:table-column-properties style:column-width="6.925in" style:rel-column-width="65535*"/>
    </style:style>
    <style:style style:name="Table144.A1" style:family="table-cell">
      <style:table-cell-properties fo:padding="0.0382in" fo:border="0.5pt solid #000000"/>
    </style:style>
    <style:style style:name="Table145" style:family="table">
      <style:table-properties style:width="6.925in" table:align="margins"/>
    </style:style>
    <style:style style:name="Table145.A" style:family="table-column">
      <style:table-column-properties style:column-width="6.925in" style:rel-column-width="65535*"/>
    </style:style>
    <style:style style:name="Table145.A1" style:family="table-cell">
      <style:table-cell-properties fo:padding="0.0382in" fo:border="0.5pt solid #000000"/>
    </style:style>
    <style:style style:name="Table146" style:family="table">
      <style:table-properties style:width="6.925in" table:align="margins"/>
    </style:style>
    <style:style style:name="Table146.A" style:family="table-column">
      <style:table-column-properties style:column-width="6.925in" style:rel-column-width="65535*"/>
    </style:style>
    <style:style style:name="Table146.A1" style:family="table-cell">
      <style:table-cell-properties fo:padding="0.0382in" fo:border="0.5pt solid #000000"/>
    </style:style>
    <style:style style:name="Table147" style:family="table">
      <style:table-properties style:width="6.875in" fo:margin-left="0.0535in" table:align="left"/>
    </style:style>
    <style:style style:name="Table147.A" style:family="table-column">
      <style:table-column-properties style:column-width="6.875in"/>
    </style:style>
    <style:style style:name="Table147.A1" style:family="table-cell">
      <style:table-cell-properties fo:padding="0.0382in" fo:border="0.5pt solid #000000"/>
    </style:style>
    <style:style style:name="Table148" style:family="table">
      <style:table-properties style:width="6.925in" table:align="margins"/>
    </style:style>
    <style:style style:name="Table148.A" style:family="table-column">
      <style:table-column-properties style:column-width="6.925in" style:rel-column-width="65535*"/>
    </style:style>
    <style:style style:name="Table148.A1" style:family="table-cell">
      <style:table-cell-properties fo:padding="0.0382in" fo:border="0.5pt solid #000000"/>
    </style:style>
    <style:style style:name="Table149" style:family="table">
      <style:table-properties style:width="6.925in" table:align="margins"/>
    </style:style>
    <style:style style:name="Table149.A" style:family="table-column">
      <style:table-column-properties style:column-width="6.925in" style:rel-column-width="65535*"/>
    </style:style>
    <style:style style:name="Table149.A1" style:family="table-cell">
      <style:table-cell-properties fo:padding="0.0382in" fo:border="0.5pt solid #000000"/>
    </style:style>
    <style:style style:name="Table150" style:family="table">
      <style:table-properties style:width="6.925in" table:align="margins"/>
    </style:style>
    <style:style style:name="Table150.A" style:family="table-column">
      <style:table-column-properties style:column-width="6.925in" style:rel-column-width="65535*"/>
    </style:style>
    <style:style style:name="Table150.A1" style:family="table-cell">
      <style:table-cell-properties fo:padding="0.0382in" fo:border="0.5pt solid #000000"/>
    </style:style>
    <style:style style:name="Table151" style:family="table">
      <style:table-properties style:width="6.925in" table:align="margins"/>
    </style:style>
    <style:style style:name="Table151.A" style:family="table-column">
      <style:table-column-properties style:column-width="6.925in" style:rel-column-width="65535*"/>
    </style:style>
    <style:style style:name="Table151.A1" style:family="table-cell">
      <style:table-cell-properties fo:padding="0.0382in" fo:border="0.5pt solid #000000"/>
    </style:style>
    <style:style style:name="Table152" style:family="table">
      <style:table-properties style:width="6.925in" table:align="margins"/>
    </style:style>
    <style:style style:name="Table152.A" style:family="table-column">
      <style:table-column-properties style:column-width="6.925in" style:rel-column-width="65535*"/>
    </style:style>
    <style:style style:name="Table152.A1" style:family="table-cell">
      <style:table-cell-properties fo:padding="0.0382in" fo:border="0.5pt solid #000000"/>
    </style:style>
    <style:style style:name="Table153" style:family="table">
      <style:table-properties style:width="6.925in" table:align="margins"/>
    </style:style>
    <style:style style:name="Table153.A" style:family="table-column">
      <style:table-column-properties style:column-width="6.925in" style:rel-column-width="65535*"/>
    </style:style>
    <style:style style:name="Table153.A1" style:family="table-cell">
      <style:table-cell-properties fo:padding="0.0382in" fo:border="0.5pt solid #000000"/>
    </style:style>
    <style:style style:name="Table154" style:family="table">
      <style:table-properties style:width="6.925in" table:align="margins"/>
    </style:style>
    <style:style style:name="Table154.A" style:family="table-column">
      <style:table-column-properties style:column-width="6.925in" style:rel-column-width="65535*"/>
    </style:style>
    <style:style style:name="Table154.A1" style:family="table-cell">
      <style:table-cell-properties fo:padding="0.0382in" fo:border="0.5pt solid #000000"/>
    </style:style>
    <style:style style:name="Table155" style:family="table">
      <style:table-properties style:width="6.925in" table:align="margins"/>
    </style:style>
    <style:style style:name="Table155.A" style:family="table-column">
      <style:table-column-properties style:column-width="6.925in" style:rel-column-width="65535*"/>
    </style:style>
    <style:style style:name="Table155.A1" style:family="table-cell">
      <style:table-cell-properties fo:padding="0.0382in" fo:border="0.5pt solid #000000"/>
    </style:style>
    <style:style style:name="Table156" style:family="table">
      <style:table-properties style:width="6.925in" table:align="margins"/>
    </style:style>
    <style:style style:name="Table156.A" style:family="table-column">
      <style:table-column-properties style:column-width="6.925in" style:rel-column-width="65535*"/>
    </style:style>
    <style:style style:name="Table156.A1" style:family="table-cell">
      <style:table-cell-properties fo:padding="0.0382in" fo:border="0.5pt solid #000000"/>
    </style:style>
    <style:style style:name="Table157" style:family="table">
      <style:table-properties style:width="6.925in" table:align="margins"/>
    </style:style>
    <style:style style:name="Table157.A" style:family="table-column">
      <style:table-column-properties style:column-width="6.925in" style:rel-column-width="65535*"/>
    </style:style>
    <style:style style:name="Table157.A1" style:family="table-cell">
      <style:table-cell-properties fo:padding="0.0382in" fo:border="0.5pt solid #000000"/>
    </style:style>
    <style:style style:name="Table158" style:family="table">
      <style:table-properties style:width="6.925in" table:align="margins"/>
    </style:style>
    <style:style style:name="Table158.A" style:family="table-column">
      <style:table-column-properties style:column-width="6.925in" style:rel-column-width="65535*"/>
    </style:style>
    <style:style style:name="Table158.A1" style:family="table-cell">
      <style:table-cell-properties fo:padding="0.0382in" fo:border="0.5pt solid #000000"/>
    </style:style>
    <style:style style:name="Table159" style:family="table">
      <style:table-properties style:width="6.925in" table:align="margins"/>
    </style:style>
    <style:style style:name="Table159.A" style:family="table-column">
      <style:table-column-properties style:column-width="6.925in" style:rel-column-width="65535*"/>
    </style:style>
    <style:style style:name="Table159.A1" style:family="table-cell">
      <style:table-cell-properties fo:padding="0.0382in" fo:border="0.5pt solid #000000"/>
    </style:style>
    <style:style style:name="Table160" style:family="table">
      <style:table-properties style:width="6.925in" table:align="margins"/>
    </style:style>
    <style:style style:name="Table160.A" style:family="table-column">
      <style:table-column-properties style:column-width="6.925in" style:rel-column-width="65535*"/>
    </style:style>
    <style:style style:name="Table160.A1" style:family="table-cell">
      <style:table-cell-properties fo:padding="0.0382in" fo:border="0.5pt solid #000000"/>
    </style:style>
    <style:style style:name="Table161" style:family="table">
      <style:table-properties style:width="6.925in" table:align="margins"/>
    </style:style>
    <style:style style:name="Table161.A" style:family="table-column">
      <style:table-column-properties style:column-width="6.925in" style:rel-column-width="65535*"/>
    </style:style>
    <style:style style:name="Table161.A1" style:family="table-cell">
      <style:table-cell-properties fo:padding="0.0382in" fo:border="0.5pt solid #000000"/>
    </style:style>
    <style:style style:name="Table162" style:family="table">
      <style:table-properties style:width="6.925in" table:align="margins"/>
    </style:style>
    <style:style style:name="Table162.A" style:family="table-column">
      <style:table-column-properties style:column-width="6.925in" style:rel-column-width="65535*"/>
    </style:style>
    <style:style style:name="Table162.A1" style:family="table-cell">
      <style:table-cell-properties fo:padding="0.0382in" fo:border="0.5pt solid #000000"/>
    </style:style>
    <style:style style:name="Table163" style:family="table">
      <style:table-properties style:width="6.875in" fo:margin-left="0.0535in" table:align="left"/>
    </style:style>
    <style:style style:name="Table163.A" style:family="table-column">
      <style:table-column-properties style:column-width="6.875in"/>
    </style:style>
    <style:style style:name="Table163.A1" style:family="table-cell">
      <style:table-cell-properties fo:padding="0.0382in" fo:border="0.5pt solid #000000"/>
    </style:style>
    <style:style style:name="Table164" style:family="table">
      <style:table-properties style:width="6.925in" table:align="margins"/>
    </style:style>
    <style:style style:name="Table164.A" style:family="table-column">
      <style:table-column-properties style:column-width="6.925in" style:rel-column-width="65535*"/>
    </style:style>
    <style:style style:name="Table164.A1" style:family="table-cell">
      <style:table-cell-properties fo:padding="0.0382in" fo:border="0.5pt solid #000000"/>
    </style:style>
    <style:style style:name="Table165" style:family="table">
      <style:table-properties style:width="6.925in" table:align="margins"/>
    </style:style>
    <style:style style:name="Table165.A" style:family="table-column">
      <style:table-column-properties style:column-width="6.925in" style:rel-column-width="65535*"/>
    </style:style>
    <style:style style:name="Table165.A1" style:family="table-cell">
      <style:table-cell-properties fo:padding="0.0382in" fo:border="0.5pt solid #000000"/>
    </style:style>
    <style:style style:name="Table166" style:family="table">
      <style:table-properties style:width="6.925in" table:align="margins"/>
    </style:style>
    <style:style style:name="Table166.A" style:family="table-column">
      <style:table-column-properties style:column-width="6.925in" style:rel-column-width="65535*"/>
    </style:style>
    <style:style style:name="Table166.A1" style:family="table-cell">
      <style:table-cell-properties fo:padding="0.0382in" fo:border="0.5pt solid #000000"/>
    </style:style>
    <style:style style:name="Table167" style:family="table">
      <style:table-properties style:width="6.925in" table:align="margins"/>
    </style:style>
    <style:style style:name="Table167.A" style:family="table-column">
      <style:table-column-properties style:column-width="6.925in" style:rel-column-width="65535*"/>
    </style:style>
    <style:style style:name="Table167.A1" style:family="table-cell">
      <style:table-cell-properties fo:padding="0.0382in" fo:border="0.5pt solid #000000"/>
    </style:style>
    <style:style style:name="Table168" style:family="table">
      <style:table-properties style:width="6.925in" table:align="margins"/>
    </style:style>
    <style:style style:name="Table168.A" style:family="table-column">
      <style:table-column-properties style:column-width="6.925in" style:rel-column-width="65535*"/>
    </style:style>
    <style:style style:name="Table168.A1" style:family="table-cell">
      <style:table-cell-properties fo:padding="0.0382in" fo:border="0.5pt solid #000000"/>
    </style:style>
    <style:style style:name="Table169" style:family="table">
      <style:table-properties style:width="6.925in" table:align="margins"/>
    </style:style>
    <style:style style:name="Table169.A" style:family="table-column">
      <style:table-column-properties style:column-width="6.925in" style:rel-column-width="65535*"/>
    </style:style>
    <style:style style:name="Table169.A1" style:family="table-cell">
      <style:table-cell-properties fo:padding="0.0382in" fo:border="0.5pt solid #000000"/>
    </style:style>
    <style:style style:name="Table170" style:family="table">
      <style:table-properties style:width="6.925in" table:align="margins"/>
    </style:style>
    <style:style style:name="Table170.A" style:family="table-column">
      <style:table-column-properties style:column-width="6.925in" style:rel-column-width="65535*"/>
    </style:style>
    <style:style style:name="Table170.A1" style:family="table-cell">
      <style:table-cell-properties fo:padding="0.0382in" fo:border="0.5pt solid #000000"/>
    </style:style>
    <style:style style:name="Table171" style:family="table">
      <style:table-properties style:width="6.925in" table:align="margins"/>
    </style:style>
    <style:style style:name="Table171.A" style:family="table-column">
      <style:table-column-properties style:column-width="6.925in" style:rel-column-width="65535*"/>
    </style:style>
    <style:style style:name="Table171.A1" style:family="table-cell">
      <style:table-cell-properties fo:padding="0.0382in" fo:border="0.5pt solid #000000"/>
    </style:style>
    <style:style style:name="Table172" style:family="table">
      <style:table-properties style:width="6.925in" table:align="margins"/>
    </style:style>
    <style:style style:name="Table172.A" style:family="table-column">
      <style:table-column-properties style:column-width="6.925in" style:rel-column-width="65535*"/>
    </style:style>
    <style:style style:name="Table172.A1" style:family="table-cell">
      <style:table-cell-properties fo:padding="0.0382in" fo:border="0.5pt solid #000000"/>
    </style:style>
    <style:style style:name="Table173" style:family="table">
      <style:table-properties style:width="6.925in" table:align="margins"/>
    </style:style>
    <style:style style:name="Table173.A" style:family="table-column">
      <style:table-column-properties style:column-width="6.925in" style:rel-column-width="65535*"/>
    </style:style>
    <style:style style:name="Table173.A1" style:family="table-cell">
      <style:table-cell-properties fo:padding="0.0382in" fo:border="0.5pt solid #000000"/>
    </style:style>
    <style:style style:name="Table174" style:family="table">
      <style:table-properties style:width="6.925in" table:align="margins"/>
    </style:style>
    <style:style style:name="Table174.A" style:family="table-column">
      <style:table-column-properties style:column-width="6.925in" style:rel-column-width="65535*"/>
    </style:style>
    <style:style style:name="Table174.A1" style:family="table-cell">
      <style:table-cell-properties fo:padding="0.0382in" fo:border="0.5pt solid #000000"/>
    </style:style>
    <style:style style:name="Table175" style:family="table">
      <style:table-properties style:width="6.925in" table:align="margins"/>
    </style:style>
    <style:style style:name="Table175.A" style:family="table-column">
      <style:table-column-properties style:column-width="6.925in" style:rel-column-width="65535*"/>
    </style:style>
    <style:style style:name="Table175.A1" style:family="table-cell">
      <style:table-cell-properties fo:padding="0.0382in" fo:border="0.5pt solid #000000"/>
    </style:style>
    <style:style style:name="Table176" style:family="table">
      <style:table-properties style:width="6.925in" table:align="margins"/>
    </style:style>
    <style:style style:name="Table176.A" style:family="table-column">
      <style:table-column-properties style:column-width="6.925in" style:rel-column-width="65535*"/>
    </style:style>
    <style:style style:name="Table176.A1" style:family="table-cell">
      <style:table-cell-properties fo:padding="0.0382in" fo:border="0.5pt solid #000000"/>
    </style:style>
    <style:style style:name="Table177" style:family="table">
      <style:table-properties style:width="6.925in" table:align="margins"/>
    </style:style>
    <style:style style:name="Table177.A" style:family="table-column">
      <style:table-column-properties style:column-width="6.925in" style:rel-column-width="65535*"/>
    </style:style>
    <style:style style:name="Table177.A1" style:family="table-cell">
      <style:table-cell-properties fo:padding="0.0382in" fo:border="0.5pt solid #000000"/>
    </style:style>
    <style:style style:name="Table178" style:family="table">
      <style:table-properties style:width="6.925in" table:align="margins"/>
    </style:style>
    <style:style style:name="Table178.A" style:family="table-column">
      <style:table-column-properties style:column-width="6.925in" style:rel-column-width="65535*"/>
    </style:style>
    <style:style style:name="Table178.A1" style:family="table-cell">
      <style:table-cell-properties fo:padding="0.0382in" fo:border="0.5pt solid #000000"/>
    </style:style>
    <style:style style:name="Table179" style:family="table">
      <style:table-properties style:width="6.875in" fo:margin-left="0.0535in" table:align="left"/>
    </style:style>
    <style:style style:name="Table179.A" style:family="table-column">
      <style:table-column-properties style:column-width="6.875in"/>
    </style:style>
    <style:style style:name="Table179.A1" style:family="table-cell">
      <style:table-cell-properties fo:padding="0.0382in" fo:border="0.5pt solid #000000"/>
    </style:style>
    <style:style style:name="Table180" style:family="table">
      <style:table-properties style:width="6.925in" table:align="margins"/>
    </style:style>
    <style:style style:name="Table180.A" style:family="table-column">
      <style:table-column-properties style:column-width="6.925in" style:rel-column-width="65535*"/>
    </style:style>
    <style:style style:name="Table180.A1" style:family="table-cell">
      <style:table-cell-properties fo:padding="0.0382in" fo:border="0.5pt solid #000000"/>
    </style:style>
    <style:style style:name="Table181" style:family="table">
      <style:table-properties style:width="6.925in" table:align="margins"/>
    </style:style>
    <style:style style:name="Table181.A" style:family="table-column">
      <style:table-column-properties style:column-width="6.925in" style:rel-column-width="65535*"/>
    </style:style>
    <style:style style:name="Table181.A1" style:family="table-cell">
      <style:table-cell-properties fo:padding="0.0382in" fo:border="0.5pt solid #000000"/>
    </style:style>
    <style:style style:name="Table182" style:family="table">
      <style:table-properties style:width="6.925in" table:align="margins"/>
    </style:style>
    <style:style style:name="Table182.A" style:family="table-column">
      <style:table-column-properties style:column-width="6.925in" style:rel-column-width="65535*"/>
    </style:style>
    <style:style style:name="Table182.A1" style:family="table-cell">
      <style:table-cell-properties fo:padding="0.0382in" fo:border="0.5pt solid #000000"/>
    </style:style>
    <style:style style:name="Table183" style:family="table">
      <style:table-properties style:width="6.925in" table:align="margins"/>
    </style:style>
    <style:style style:name="Table183.A" style:family="table-column">
      <style:table-column-properties style:column-width="6.925in" style:rel-column-width="65535*"/>
    </style:style>
    <style:style style:name="Table183.A1" style:family="table-cell">
      <style:table-cell-properties fo:padding="0.0382in" fo:border="0.5pt solid #000000"/>
    </style:style>
    <style:style style:name="Table184" style:family="table">
      <style:table-properties style:width="6.925in" table:align="margins"/>
    </style:style>
    <style:style style:name="Table184.A" style:family="table-column">
      <style:table-column-properties style:column-width="6.925in" style:rel-column-width="65535*"/>
    </style:style>
    <style:style style:name="Table184.A1" style:family="table-cell">
      <style:table-cell-properties fo:padding="0.0382in" fo:border="0.5pt solid #000000"/>
    </style:style>
    <style:style style:name="Table185" style:family="table">
      <style:table-properties style:width="6.925in" table:align="margins"/>
    </style:style>
    <style:style style:name="Table185.A" style:family="table-column">
      <style:table-column-properties style:column-width="6.925in" style:rel-column-width="65535*"/>
    </style:style>
    <style:style style:name="Table185.A1" style:family="table-cell">
      <style:table-cell-properties fo:padding="0.0382in" fo:border="0.5pt solid #000000"/>
    </style:style>
    <style:style style:name="Table186" style:family="table">
      <style:table-properties style:width="6.925in" table:align="margins"/>
    </style:style>
    <style:style style:name="Table186.A" style:family="table-column">
      <style:table-column-properties style:column-width="6.925in" style:rel-column-width="65535*"/>
    </style:style>
    <style:style style:name="Table186.A1" style:family="table-cell">
      <style:table-cell-properties fo:padding="0.0382in" fo:border="0.5pt solid #000000"/>
    </style:style>
    <style:style style:name="Table187" style:family="table">
      <style:table-properties style:width="6.925in" table:align="margins"/>
    </style:style>
    <style:style style:name="Table187.A" style:family="table-column">
      <style:table-column-properties style:column-width="6.925in" style:rel-column-width="65535*"/>
    </style:style>
    <style:style style:name="Table187.A1" style:family="table-cell">
      <style:table-cell-properties fo:padding="0.0382in" fo:border="0.5pt solid #000000"/>
    </style:style>
    <style:style style:name="Table188" style:family="table">
      <style:table-properties style:width="6.925in" table:align="margins"/>
    </style:style>
    <style:style style:name="Table188.A" style:family="table-column">
      <style:table-column-properties style:column-width="6.925in" style:rel-column-width="65535*"/>
    </style:style>
    <style:style style:name="Table188.A1" style:family="table-cell">
      <style:table-cell-properties fo:padding="0.0382in" fo:border="0.5pt solid #000000"/>
    </style:style>
    <style:style style:name="Table189" style:family="table">
      <style:table-properties style:width="6.925in" table:align="margins"/>
    </style:style>
    <style:style style:name="Table189.A" style:family="table-column">
      <style:table-column-properties style:column-width="6.925in" style:rel-column-width="65535*"/>
    </style:style>
    <style:style style:name="Table189.A1" style:family="table-cell">
      <style:table-cell-properties fo:padding="0.0382in" fo:border="0.5pt solid #000000"/>
    </style:style>
    <style:style style:name="Table190" style:family="table">
      <style:table-properties style:width="6.925in" table:align="margins"/>
    </style:style>
    <style:style style:name="Table190.A" style:family="table-column">
      <style:table-column-properties style:column-width="6.925in" style:rel-column-width="65535*"/>
    </style:style>
    <style:style style:name="Table190.A1" style:family="table-cell">
      <style:table-cell-properties fo:padding="0.0382in" fo:border="0.5pt solid #000000"/>
    </style:style>
    <style:style style:name="Table191" style:family="table">
      <style:table-properties style:width="6.925in" table:align="margins"/>
    </style:style>
    <style:style style:name="Table191.A" style:family="table-column">
      <style:table-column-properties style:column-width="6.925in" style:rel-column-width="65535*"/>
    </style:style>
    <style:style style:name="Table191.A1" style:family="table-cell">
      <style:table-cell-properties fo:padding="0.0382in" fo:border="0.5pt solid #000000"/>
    </style:style>
    <style:style style:name="Table192" style:family="table">
      <style:table-properties style:width="6.925in" table:align="margins"/>
    </style:style>
    <style:style style:name="Table192.A" style:family="table-column">
      <style:table-column-properties style:column-width="6.925in" style:rel-column-width="65535*"/>
    </style:style>
    <style:style style:name="Table192.A1" style:family="table-cell">
      <style:table-cell-properties fo:padding="0.0382in" fo:border="0.5pt solid #000000"/>
    </style:style>
    <style:style style:name="Table193" style:family="table">
      <style:table-properties style:width="6.925in" table:align="margins"/>
    </style:style>
    <style:style style:name="Table193.A" style:family="table-column">
      <style:table-column-properties style:column-width="6.925in" style:rel-column-width="65535*"/>
    </style:style>
    <style:style style:name="Table193.A1" style:family="table-cell">
      <style:table-cell-properties fo:padding="0.0382in" fo:border="0.5pt solid #000000"/>
    </style:style>
    <style:style style:name="Table194" style:family="table">
      <style:table-properties style:width="6.925in" table:align="margins"/>
    </style:style>
    <style:style style:name="Table194.A" style:family="table-column">
      <style:table-column-properties style:column-width="6.925in" style:rel-column-width="65535*"/>
    </style:style>
    <style:style style:name="Table194.A1" style:family="table-cell">
      <style:table-cell-properties fo:padding="0.0382in" fo:border="0.5pt solid #000000"/>
    </style:style>
    <style:style style:name="Table195" style:family="table">
      <style:table-properties style:width="6.875in" fo:margin-left="0.0535in" table:align="left"/>
    </style:style>
    <style:style style:name="Table195.A" style:family="table-column">
      <style:table-column-properties style:column-width="6.875in"/>
    </style:style>
    <style:style style:name="Table195.A1" style:family="table-cell">
      <style:table-cell-properties fo:padding="0.0382in" fo:border="0.5pt solid #000000"/>
    </style:style>
    <style:style style:name="Table196" style:family="table">
      <style:table-properties style:width="6.925in" table:align="margins"/>
    </style:style>
    <style:style style:name="Table196.A" style:family="table-column">
      <style:table-column-properties style:column-width="6.925in" style:rel-column-width="65535*"/>
    </style:style>
    <style:style style:name="Table196.A1" style:family="table-cell">
      <style:table-cell-properties fo:padding="0.0382in" fo:border="0.5pt solid #000000"/>
    </style:style>
    <style:style style:name="Table197" style:family="table">
      <style:table-properties style:width="6.925in" table:align="margins"/>
    </style:style>
    <style:style style:name="Table197.A" style:family="table-column">
      <style:table-column-properties style:column-width="6.925in" style:rel-column-width="65535*"/>
    </style:style>
    <style:style style:name="Table197.A1" style:family="table-cell">
      <style:table-cell-properties fo:padding="0.0382in" fo:border="0.5pt solid #000000"/>
    </style:style>
    <style:style style:name="Table198" style:family="table">
      <style:table-properties style:width="6.925in" table:align="margins"/>
    </style:style>
    <style:style style:name="Table198.A" style:family="table-column">
      <style:table-column-properties style:column-width="6.925in" style:rel-column-width="65535*"/>
    </style:style>
    <style:style style:name="Table198.A1" style:family="table-cell">
      <style:table-cell-properties fo:padding="0.0382in" fo:border="0.5pt solid #000000"/>
    </style:style>
    <style:style style:name="Table199" style:family="table">
      <style:table-properties style:width="6.925in" table:align="margins"/>
    </style:style>
    <style:style style:name="Table199.A" style:family="table-column">
      <style:table-column-properties style:column-width="6.925in" style:rel-column-width="65535*"/>
    </style:style>
    <style:style style:name="Table199.A1" style:family="table-cell">
      <style:table-cell-properties fo:padding="0.0382in" fo:border="0.5pt solid #000000"/>
    </style:style>
    <style:style style:name="Table200" style:family="table">
      <style:table-properties style:width="6.925in" table:align="margins"/>
    </style:style>
    <style:style style:name="Table200.A" style:family="table-column">
      <style:table-column-properties style:column-width="6.925in" style:rel-column-width="65535*"/>
    </style:style>
    <style:style style:name="Table200.A1" style:family="table-cell">
      <style:table-cell-properties fo:padding="0.0382in" fo:border="0.5pt solid #000000"/>
    </style:style>
    <style:style style:name="Table201" style:family="table">
      <style:table-properties style:width="6.925in" table:align="margins"/>
    </style:style>
    <style:style style:name="Table201.A" style:family="table-column">
      <style:table-column-properties style:column-width="6.925in" style:rel-column-width="65535*"/>
    </style:style>
    <style:style style:name="Table201.A1" style:family="table-cell">
      <style:table-cell-properties fo:padding="0.0382in" fo:border="0.5pt solid #000000"/>
    </style:style>
    <style:style style:name="Table202" style:family="table">
      <style:table-properties style:width="6.925in" table:align="margins"/>
    </style:style>
    <style:style style:name="Table202.A" style:family="table-column">
      <style:table-column-properties style:column-width="6.925in" style:rel-column-width="65535*"/>
    </style:style>
    <style:style style:name="Table202.A1" style:family="table-cell">
      <style:table-cell-properties fo:padding="0.0382in" fo:border="0.5pt solid #000000"/>
    </style:style>
    <style:style style:name="Table203" style:family="table">
      <style:table-properties style:width="6.925in" table:align="margins"/>
    </style:style>
    <style:style style:name="Table203.A" style:family="table-column">
      <style:table-column-properties style:column-width="6.925in" style:rel-column-width="65535*"/>
    </style:style>
    <style:style style:name="Table203.A1" style:family="table-cell">
      <style:table-cell-properties fo:padding="0.0382in" fo:border="0.5pt solid #000000"/>
    </style:style>
    <style:style style:name="Table204" style:family="table">
      <style:table-properties style:width="6.925in" table:align="margins"/>
    </style:style>
    <style:style style:name="Table204.A" style:family="table-column">
      <style:table-column-properties style:column-width="6.925in" style:rel-column-width="65535*"/>
    </style:style>
    <style:style style:name="Table204.A1" style:family="table-cell">
      <style:table-cell-properties fo:padding="0.0382in" fo:border="0.5pt solid #000000"/>
    </style:style>
    <style:style style:name="Table205" style:family="table">
      <style:table-properties style:width="6.925in" table:align="margins"/>
    </style:style>
    <style:style style:name="Table205.A" style:family="table-column">
      <style:table-column-properties style:column-width="6.925in" style:rel-column-width="65535*"/>
    </style:style>
    <style:style style:name="Table205.A1" style:family="table-cell">
      <style:table-cell-properties fo:padding="0.0382in" fo:border="0.5pt solid #000000"/>
    </style:style>
    <style:style style:name="Table206" style:family="table">
      <style:table-properties style:width="6.925in" table:align="margins"/>
    </style:style>
    <style:style style:name="Table206.A" style:family="table-column">
      <style:table-column-properties style:column-width="6.925in" style:rel-column-width="65535*"/>
    </style:style>
    <style:style style:name="Table206.A1" style:family="table-cell">
      <style:table-cell-properties fo:padding="0.0382in" fo:border="0.5pt solid #000000"/>
    </style:style>
    <style:style style:name="Table207" style:family="table">
      <style:table-properties style:width="6.925in" table:align="margins"/>
    </style:style>
    <style:style style:name="Table207.A" style:family="table-column">
      <style:table-column-properties style:column-width="6.925in" style:rel-column-width="65535*"/>
    </style:style>
    <style:style style:name="Table207.A1" style:family="table-cell">
      <style:table-cell-properties fo:padding="0.0382in" fo:border="0.5pt solid #000000"/>
    </style:style>
    <style:style style:name="Table208" style:family="table">
      <style:table-properties style:width="6.925in" table:align="margins"/>
    </style:style>
    <style:style style:name="Table208.A" style:family="table-column">
      <style:table-column-properties style:column-width="6.925in" style:rel-column-width="65535*"/>
    </style:style>
    <style:style style:name="Table208.A1" style:family="table-cell">
      <style:table-cell-properties fo:padding="0.0382in" fo:border="0.5pt solid #000000"/>
    </style:style>
    <style:style style:name="Table209" style:family="table">
      <style:table-properties style:width="6.925in" table:align="margins"/>
    </style:style>
    <style:style style:name="Table209.A" style:family="table-column">
      <style:table-column-properties style:column-width="6.925in" style:rel-column-width="65535*"/>
    </style:style>
    <style:style style:name="Table209.A1" style:family="table-cell">
      <style:table-cell-properties fo:padding="0.0382in" fo:border="0.5pt solid #000000"/>
    </style:style>
    <style:style style:name="Table210" style:family="table">
      <style:table-properties style:width="6.925in" table:align="margins"/>
    </style:style>
    <style:style style:name="Table210.A" style:family="table-column">
      <style:table-column-properties style:column-width="6.925in" style:rel-column-width="65535*"/>
    </style:style>
    <style:style style:name="Table210.A1" style:family="table-cell">
      <style:table-cell-properties fo:padding="0.0382in" fo:border="0.5pt solid #000000"/>
    </style:style>
    <style:style style:name="Table211" style:family="table">
      <style:table-properties style:width="6.875in" fo:margin-left="0.0535in" table:align="left"/>
    </style:style>
    <style:style style:name="Table211.A" style:family="table-column">
      <style:table-column-properties style:column-width="6.875in"/>
    </style:style>
    <style:style style:name="Table211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officeooo:rsid="07b689c9" officeooo:paragraph-rsid="07b689c9"/>
    </style:style>
    <style:style style:name="P18" style:family="paragraph" style:parent-style-name="Table_20_Contents">
      <style:text-properties officeooo:rsid="07b5b2b0" officeooo:paragraph-rsid="07b5b2b0"/>
    </style:style>
    <style:style style:name="P19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20" style:family="paragraph" style:parent-style-name="Table_20_Contents">
      <style:text-properties officeooo:rsid="079fe1f2" officeooo:paragraph-rsid="079fe1f2"/>
    </style:style>
    <style:style style:name="P21" style:family="paragraph" style:parent-style-name="Table_20_Contents">
      <style:text-properties officeooo:rsid="07b5b2b0" officeooo:paragraph-rsid="07a71aba"/>
    </style:style>
    <style:style style:name="P22" style:family="paragraph" style:parent-style-name="Heading_20_1">
      <style:text-properties style:font-name="Liberation Sans" fo:font-size="18.2000007629395pt" fo:font-weight="bold" officeooo:rsid="078b3673" officeooo:paragraph-rsid="078b3673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3" style:family="paragraph" style:parent-style-name="Heading_20_2">
      <style:text-properties officeooo:paragraph-rsid="078b3673"/>
    </style:style>
    <style:style style:name="P24" style:family="paragraph" style:parent-style-name="Text_20_body">
      <style:text-properties officeooo:paragraph-rsid="078bff70"/>
    </style:style>
    <style:style style:name="P25" style:family="paragraph" style:parent-style-name="Table_20_Contents">
      <style:text-properties style:font-name="Cascadia Code Light"/>
    </style:style>
    <style:style style:name="P26" style:family="paragraph" style:parent-style-name="Text_20_body">
      <style:text-properties officeooo:paragraph-rsid="078b3673"/>
    </style:style>
    <style:style style:name="P27" style:family="paragraph" style:parent-style-name="Table_20_Contents">
      <style:text-properties style:font-name="Cascadia Code Light" officeooo:paragraph-rsid="078b3673"/>
    </style:style>
    <style:style style:name="P28" style:family="paragraph" style:parent-style-name="Heading_20_2">
      <style:text-properties officeooo:paragraph-rsid="078b70a3"/>
    </style:style>
    <style:style style:name="P29" style:family="paragraph" style:parent-style-name="Text_20_body">
      <style:text-properties officeooo:paragraph-rsid="078b70a3"/>
    </style:style>
    <style:style style:name="P30" style:family="paragraph" style:parent-style-name="Table_20_Contents">
      <style:text-properties style:font-name="Cascadia Code Light" officeooo:paragraph-rsid="078b70a3"/>
    </style:style>
    <style:style style:name="P31" style:family="paragraph" style:parent-style-name="Table_20_Contents">
      <style:text-properties style:font-name="Cascadia Code Light" officeooo:paragraph-rsid="078bff70"/>
    </style:style>
    <style:style style:name="P32" style:family="paragraph" style:parent-style-name="Text_20_body">
      <style:text-properties officeooo:paragraph-rsid="078d4d60"/>
    </style:style>
    <style:style style:name="P33" style:family="paragraph" style:parent-style-name="Text_20_body">
      <style:text-properties officeooo:paragraph-rsid="078c4a89"/>
    </style:style>
    <style:style style:name="P34" style:family="paragraph" style:parent-style-name="Table_20_Contents">
      <style:text-properties style:font-name="Cascadia Code Light" officeooo:paragraph-rsid="078c4a89"/>
    </style:style>
    <style:style style:name="P35" style:family="paragraph" style:parent-style-name="Table_20_Contents">
      <style:text-properties style:font-name="Cascadia Code Light" officeooo:paragraph-rsid="078d4d60"/>
    </style:style>
    <style:style style:name="P36" style:family="paragraph" style:parent-style-name="Text_20_body">
      <style:text-properties officeooo:paragraph-rsid="078df697"/>
    </style:style>
    <style:style style:name="P37" style:family="paragraph" style:parent-style-name="Table_20_Contents">
      <style:text-properties style:font-name="Cascadia Code Light" officeooo:paragraph-rsid="078df697"/>
    </style:style>
    <style:style style:name="P38" style:family="paragraph" style:parent-style-name="Heading_20_1">
      <style:text-properties style:font-name="Liberation Sans" fo:font-size="18.2000007629395pt" fo:font-weight="bold" officeooo:rsid="07926796" officeooo:paragraph-rsid="07926796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39" style:family="paragraph" style:parent-style-name="Heading_20_2">
      <style:text-properties officeooo:paragraph-rsid="07926796"/>
    </style:style>
    <style:style style:name="P40" style:family="paragraph" style:parent-style-name="Text_20_body">
      <style:text-properties officeooo:paragraph-rsid="07926796"/>
    </style:style>
    <style:style style:name="P41" style:family="paragraph" style:parent-style-name="Table_20_Contents">
      <style:text-properties style:font-name="Cascadia Code Light" officeooo:paragraph-rsid="07926796"/>
    </style:style>
    <style:style style:name="P42" style:family="paragraph" style:parent-style-name="Heading_20_1">
      <style:text-properties style:font-name="Liberation Sans" fo:font-size="18.2000007629395pt" fo:font-weight="bold" officeooo:rsid="07944898" officeooo:paragraph-rsid="07944898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43" style:family="paragraph" style:parent-style-name="Heading_20_2">
      <style:text-properties officeooo:paragraph-rsid="07944898"/>
    </style:style>
    <style:style style:name="P44" style:family="paragraph" style:parent-style-name="Text_20_body">
      <style:text-properties officeooo:paragraph-rsid="07944898"/>
    </style:style>
    <style:style style:name="P45" style:family="paragraph" style:parent-style-name="Table_20_Contents">
      <style:text-properties style:font-name="Cascadia Code Light" officeooo:paragraph-rsid="07944898"/>
    </style:style>
    <style:style style:name="P46" style:family="paragraph" style:parent-style-name="Heading_20_1">
      <style:text-properties style:font-name="Liberation Sans" fo:font-size="18.2000007629395pt" fo:font-weight="bold" officeooo:rsid="0795b08a" officeooo:paragraph-rsid="0795b08a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47" style:family="paragraph" style:parent-style-name="Heading_20_2">
      <style:text-properties officeooo:paragraph-rsid="0795b08a"/>
    </style:style>
    <style:style style:name="P48" style:family="paragraph" style:parent-style-name="Text_20_body">
      <style:text-properties officeooo:paragraph-rsid="0795b08a"/>
    </style:style>
    <style:style style:name="P49" style:family="paragraph" style:parent-style-name="Table_20_Contents">
      <style:text-properties style:font-name="Cascadia Code Light" officeooo:paragraph-rsid="0795b08a"/>
    </style:style>
    <style:style style:name="P50" style:family="paragraph" style:parent-style-name="Table_20_Contents">
      <style:text-properties style:font-name="Cascadia Code Light" officeooo:paragraph-rsid="0795fb3e"/>
    </style:style>
    <style:style style:name="P51" style:family="paragraph" style:parent-style-name="Heading_20_1">
      <style:text-properties style:font-name="Liberation Sans" fo:font-size="18.2000007629395pt" fo:font-weight="bold" officeooo:rsid="07978106" officeooo:paragraph-rsid="07978106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52" style:family="paragraph" style:parent-style-name="Heading_20_2">
      <style:text-properties officeooo:paragraph-rsid="07978106"/>
    </style:style>
    <style:style style:name="P53" style:family="paragraph" style:parent-style-name="Text_20_body">
      <style:text-properties officeooo:paragraph-rsid="07978106"/>
    </style:style>
    <style:style style:name="P54" style:family="paragraph" style:parent-style-name="Table_20_Contents">
      <style:text-properties style:font-name="Cascadia Code Light" officeooo:paragraph-rsid="07978106"/>
    </style:style>
    <style:style style:name="P55" style:family="paragraph" style:parent-style-name="Heading_20_1">
      <style:text-properties style:font-name="Liberation Sans" fo:font-size="18.2000007629395pt" fo:font-weight="bold" officeooo:rsid="07a3385a" officeooo:paragraph-rsid="07a3385a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56" style:family="paragraph" style:parent-style-name="Heading_20_2">
      <style:text-properties officeooo:paragraph-rsid="07a3385a"/>
    </style:style>
    <style:style style:name="P57" style:family="paragraph" style:parent-style-name="Text_20_body">
      <style:text-properties officeooo:paragraph-rsid="07a3385a"/>
    </style:style>
    <style:style style:name="P58" style:family="paragraph" style:parent-style-name="Table_20_Contents">
      <style:text-properties style:font-name="Cascadia Code Light" officeooo:paragraph-rsid="07a3385a"/>
    </style:style>
    <style:style style:name="P59" style:family="paragraph" style:parent-style-name="Heading_20_1">
      <style:text-properties style:font-name="Liberation Sans" fo:font-size="18.2000007629395pt" fo:font-weight="bold" officeooo:rsid="07a3385a" officeooo:paragraph-rsid="07a4a1f5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60" style:family="paragraph" style:parent-style-name="Heading_20_2">
      <style:text-properties officeooo:paragraph-rsid="07a4a1f5"/>
    </style:style>
    <style:style style:name="P61" style:family="paragraph" style:parent-style-name="Text_20_body">
      <style:text-properties officeooo:paragraph-rsid="07a4a1f5"/>
    </style:style>
    <style:style style:name="P62" style:family="paragraph" style:parent-style-name="Table_20_Contents">
      <style:text-properties style:font-name="Cascadia Code Light" officeooo:paragraph-rsid="07a4a1f5"/>
    </style:style>
    <style:style style:name="P63" style:family="paragraph" style:parent-style-name="Heading_20_1">
      <style:text-properties style:font-name="Liberation Sans" fo:font-size="18.2000007629395pt" fo:font-weight="bold" officeooo:rsid="07adf615" officeooo:paragraph-rsid="07adf615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64" style:family="paragraph" style:parent-style-name="Heading_20_2">
      <style:text-properties officeooo:paragraph-rsid="07adf615"/>
    </style:style>
    <style:style style:name="P65" style:family="paragraph" style:parent-style-name="Text_20_body">
      <style:text-properties officeooo:paragraph-rsid="07adf615"/>
    </style:style>
    <style:style style:name="P66" style:family="paragraph" style:parent-style-name="Table_20_Contents">
      <style:text-properties style:font-name="Cascadia Code Light" officeooo:paragraph-rsid="07adf615"/>
    </style:style>
    <style:style style:name="P67" style:family="paragraph" style:parent-style-name="Heading_20_1">
      <style:text-properties style:font-name="Liberation Sans" fo:font-size="18.2000007629395pt" fo:font-weight="bold" officeooo:rsid="07aedf4f" officeooo:paragraph-rsid="07aedf4f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68" style:family="paragraph" style:parent-style-name="Heading_20_2">
      <style:text-properties officeooo:paragraph-rsid="07aedf4f"/>
    </style:style>
    <style:style style:name="P69" style:family="paragraph" style:parent-style-name="Text_20_body">
      <style:text-properties officeooo:paragraph-rsid="07aedf4f"/>
    </style:style>
    <style:style style:name="P70" style:family="paragraph" style:parent-style-name="Table_20_Contents">
      <style:text-properties style:font-name="Cascadia Code Light" officeooo:paragraph-rsid="07aedf4f"/>
    </style:style>
    <style:style style:name="P71" style:family="paragraph" style:parent-style-name="Heading_20_1">
      <style:text-properties style:font-name="Liberation Sans" fo:font-size="18.2000007629395pt" fo:font-weight="bold" officeooo:rsid="07afc066" officeooo:paragraph-rsid="07afc066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72" style:family="paragraph" style:parent-style-name="Heading_20_1">
      <style:text-properties style:font-name="Liberation Sans" fo:font-size="18.2000007629395pt" fo:font-weight="bold" officeooo:rsid="07adf615" officeooo:paragraph-rsid="07aedf4f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73" style:family="paragraph" style:parent-style-name="Text_20_body">
      <style:text-properties officeooo:paragraph-rsid="07afc066"/>
    </style:style>
    <style:style style:name="P74" style:family="paragraph" style:parent-style-name="Heading_20_1">
      <style:text-properties style:font-name="Liberation Sans" fo:font-size="18.2000007629395pt" fo:font-weight="bold" officeooo:rsid="07b2a1d8" officeooo:paragraph-rsid="07b2a1d8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officeooo:rsid="078b3673"/>
    </style:style>
    <style:style style:name="T6" style:family="text">
      <style:text-properties style:font-name="Liberation Sans" officeooo:rsid="078bff70"/>
    </style:style>
    <style:style style:name="T7" style:family="text">
      <style:text-properties fo:font-weight="normal" officeooo:rsid="078bff70" style:font-weight-asian="normal" style:font-weight-complex="normal"/>
    </style:style>
    <style:style style:name="T8" style:family="text">
      <style:text-properties style:font-name="Liberation Sans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78b70a3"/>
    </style:style>
    <style:style style:name="T11" style:family="text">
      <style:text-properties officeooo:rsid="078bff70"/>
    </style:style>
    <style:style style:name="T12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13" style:family="text">
      <style:text-properties fo:font-weight="normal" officeooo:rsid="078c4a89" style:font-weight-asian="normal" style:font-weight-complex="normal"/>
    </style:style>
    <style:style style:name="T14" style:family="text">
      <style:text-properties officeooo:rsid="078c4a89"/>
    </style:style>
    <style:style style:name="T15" style:family="text">
      <style:text-properties fo:font-weight="normal" officeooo:rsid="078d4d60" style:font-weight-asian="normal" style:font-weight-complex="normal"/>
    </style:style>
    <style:style style:name="T16" style:family="text">
      <style:text-properties fo:font-weight="normal" officeooo:rsid="078d4d60" style:font-weight-asian="normal" style:language-complex="fa" style:country-complex="IR" style:font-weight-complex="normal"/>
    </style:style>
    <style:style style:name="T17" style:family="text">
      <style:text-properties fo:font-weight="normal" officeooo:rsid="078df697" style:font-weight-asian="normal" style:language-complex="fa" style:country-complex="IR" style:font-weight-complex="normal"/>
    </style:style>
    <style:style style:name="T18" style:family="text">
      <style:text-properties fo:font-weight="normal" officeooo:rsid="078bff70" style:font-weight-asian="normal" style:language-complex="fa" style:country-complex="IR" style:font-weight-complex="normal"/>
    </style:style>
    <style:style style:name="T19" style:family="text">
      <style:text-properties officeooo:rsid="078d4d60"/>
    </style:style>
    <style:style style:name="T20" style:family="text">
      <style:text-properties fo:font-weight="normal" officeooo:rsid="078df697" style:font-weight-asian="normal" style:font-weight-complex="normal"/>
    </style:style>
    <style:style style:name="T21" style:family="text">
      <style:text-properties fo:font-weight="normal" officeooo:rsid="07926796" style:font-weight-asian="normal" style:font-weight-complex="normal"/>
    </style:style>
    <style:style style:name="T22" style:family="text">
      <style:text-properties fo:font-weight="normal" officeooo:rsid="0793b706" style:font-weight-asian="normal" style:font-weight-complex="normal"/>
    </style:style>
    <style:style style:name="T23" style:family="text">
      <style:text-properties officeooo:rsid="0793b706"/>
    </style:style>
    <style:style style:name="T24" style:family="text">
      <style:text-properties fo:font-weight="normal" officeooo:rsid="07944898" style:font-weight-asian="normal" style:font-weight-complex="normal"/>
    </style:style>
    <style:style style:name="T25" style:family="text">
      <style:text-properties fo:font-weight="normal" officeooo:rsid="0795b08a" style:font-weight-asian="normal" style:font-weight-complex="normal"/>
    </style:style>
    <style:style style:name="T26" style:family="text">
      <style:text-properties fo:font-weight="normal" officeooo:rsid="0795fb3e" style:font-weight-asian="normal" style:font-weight-complex="normal"/>
    </style:style>
    <style:style style:name="T27" style:family="text">
      <style:text-properties officeooo:rsid="0795fb3e"/>
    </style:style>
    <style:style style:name="T28" style:family="text">
      <style:text-properties officeooo:rsid="07aad1ae"/>
    </style:style>
    <style:style style:name="T29" style:family="text">
      <style:text-properties fo:font-weight="normal" officeooo:rsid="07978106" style:font-weight-asian="normal" style:font-weight-complex="normal"/>
    </style:style>
    <style:style style:name="T30" style:family="text">
      <style:text-properties fo:font-weight="normal" officeooo:rsid="07aad1ae" style:font-weight-asian="normal" style:font-weight-complex="normal"/>
    </style:style>
    <style:style style:name="T31" style:family="text">
      <style:text-properties fo:font-weight="normal" officeooo:rsid="07990f0b" style:font-weight-asian="normal" style:font-weight-complex="normal"/>
    </style:style>
    <style:style style:name="T32" style:family="text">
      <style:text-properties fo:font-weight="normal" officeooo:rsid="07a3385a" style:font-weight-asian="normal" style:font-weight-complex="normal"/>
    </style:style>
    <style:style style:name="T33" style:family="text">
      <style:text-properties fo:font-weight="normal" officeooo:rsid="07a4a1f5" style:font-weight-asian="normal" style:font-weight-complex="normal"/>
    </style:style>
    <style:style style:name="T34" style:family="text">
      <style:text-properties fo:font-weight="normal" officeooo:rsid="07a3feef" style:font-weight-asian="normal" style:font-weight-complex="normal"/>
    </style:style>
    <style:style style:name="T35" style:family="text">
      <style:text-properties officeooo:rsid="07a4a1f5"/>
    </style:style>
    <style:style style:name="T36" style:family="text">
      <style:text-properties fo:font-weight="normal" officeooo:rsid="07adf615" style:font-weight-asian="normal" style:font-weight-complex="normal"/>
    </style:style>
    <style:style style:name="T37" style:family="text">
      <style:text-properties fo:font-weight="normal" officeooo:rsid="07aedf4f" style:font-weight-asian="normal" style:font-weight-complex="normal"/>
    </style:style>
    <style:style style:name="T38" style:family="text">
      <style:text-properties fo:font-weight="normal" officeooo:rsid="07afc066" style:font-weight-asian="normal" style:font-weight-complex="normal"/>
    </style:style>
    <style:style style:name="T39" style:family="text">
      <style:text-properties fo:font-weight="normal" officeooo:rsid="07b2a1d8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2&#10;&#10;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Basic Data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4"/>
      <text:p text:style-name="P5">Document Version: <text:user-field-get text:name="DocumentVersion">1.2

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6-07-01T02:40:59.193693450" text:fixed="true">July 1, 2026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5</text:a></text:p>
          <text:p text:style-name="P8"><text:a xlink:type="simple" xlink:href="#__RefHeading___Toc2750_3019299338" text:style-name="Index_20_Link" text:visited-style-name="Index_20_Link">1.1 Status Codes<text:tab/>5</text:a></text:p>
          <text:p text:style-name="P8"><text:a xlink:type="simple" xlink:href="#__RefHeading___Toc2528_3019299338" text:style-name="Index_20_Link" text:visited-style-name="Index_20_Link">1.2 Statuses<text:tab/>5</text:a></text:p>
          <text:p text:style-name="P8"><text:a xlink:type="simple" xlink:href="#__RefHeading___Toc2530_3019299338" text:style-name="Index_20_Link" text:visited-style-name="Index_20_Link">1.3 Successful Messages<text:tab/>5</text:a></text:p>
          <text:p text:style-name="P8"><text:a xlink:type="simple" xlink:href="#__RefHeading___Toc255_2732334432" text:style-name="Index_20_Link" text:visited-style-name="Index_20_Link">1.4 Format of Response<text:tab/>5</text:a></text:p>
          <text:p text:style-name="P7"><text:a xlink:type="simple" xlink:href="#__RefHeading___Toc227_771010674" text:style-name="Index_20_Link" text:visited-style-name="Index_20_Link">2 Education Level<text:tab/>6</text:a></text:p>
          <text:p text:style-name="P8"><text:a xlink:type="simple" xlink:href="#__RefHeading___Toc908_3206075736" text:style-name="Index_20_Link" text:visited-style-name="Index_20_Link">2.1 Add<text:tab/>6</text:a></text:p>
          <text:p text:style-name="P8"><text:a xlink:type="simple" xlink:href="#__RefHeading___Toc2081_720390006%20Copy%201" text:style-name="Index_20_Link" text:visited-style-name="Index_20_Link">2.2 Update<text:tab/>6</text:a></text:p>
          <text:p text:style-name="P8"><text:a xlink:type="simple" xlink:href="#__RefHeading___Toc908_3206075736%20Copy%201" text:style-name="Index_20_Link" text:visited-style-name="Index_20_Link">2.3 Delete<text:tab/>7</text:a></text:p>
          <text:p text:style-name="P8"><text:a xlink:type="simple" xlink:href="#__RefHeading___Toc2079_720390006" text:style-name="Index_20_Link" text:visited-style-name="Index_20_Link">2.4 Active<text:tab/>7</text:a></text:p>
          <text:p text:style-name="P8"><text:a xlink:type="simple" xlink:href="#__RefHeading___Toc2083_720390006" text:style-name="Index_20_Link" text:visited-style-name="Index_20_Link">2.5 Inactive<text:tab/>8</text:a></text:p>
          <text:p text:style-name="P8"><text:a xlink:type="simple" xlink:href="#__RefHeading___Toc2085_720390006" text:style-name="Index_20_Link" text:visited-style-name="Index_20_Link">2.6 Fetch Specific Record<text:tab/>8</text:a></text:p>
          <text:p text:style-name="P8"><text:a xlink:type="simple" xlink:href="#__RefHeading___Toc702_3019299338" text:style-name="Index_20_Link" text:visited-style-name="Index_20_Link">2.7 Get All Records<text:tab/>9</text:a></text:p>
          <text:p text:style-name="P8"><text:a xlink:type="simple" xlink:href="#__RefHeading___Toc704_3019299338" text:style-name="Index_20_Link" text:visited-style-name="Index_20_Link">2.8 Get Combo List<text:tab/>10</text:a></text:p>
          <text:p text:style-name="P7"><text:a xlink:type="simple" xlink:href="#__RefHeading___Toc227_771010674%20Copy%201" text:style-name="Index_20_Link" text:visited-style-name="Index_20_Link">3 Priority<text:tab/>11</text:a></text:p>
          <text:p text:style-name="P8"><text:a xlink:type="simple" xlink:href="#__RefHeading___Toc908_3206075736%20Copy%202" text:style-name="Index_20_Link" text:visited-style-name="Index_20_Link">3.1 Add<text:tab/>11</text:a></text:p>
          <text:p text:style-name="P8"><text:a xlink:type="simple" xlink:href="#__RefHeading___Toc2081_720390006%20Copy%201%20Copy%201" text:style-name="Index_20_Link" text:visited-style-name="Index_20_Link">3.2 Update<text:tab/>11</text:a></text:p>
          <text:p text:style-name="P8"><text:a xlink:type="simple" xlink:href="#__RefHeading___Toc908_3206075736%20Copy%201%20Copy%201" text:style-name="Index_20_Link" text:visited-style-name="Index_20_Link">3.3 Delete<text:tab/>12</text:a></text:p>
          <text:p text:style-name="P8"><text:a xlink:type="simple" xlink:href="#__RefHeading___Toc2079_720390006%20Copy%201" text:style-name="Index_20_Link" text:visited-style-name="Index_20_Link">3.4 Active<text:tab/>13</text:a></text:p>
          <text:p text:style-name="P8"><text:a xlink:type="simple" xlink:href="#__RefHeading___Toc2083_720390006%20Copy%201" text:style-name="Index_20_Link" text:visited-style-name="Index_20_Link">3.5 Inactive<text:tab/>13</text:a></text:p>
          <text:p text:style-name="P8"><text:a xlink:type="simple" xlink:href="#__RefHeading___Toc2085_720390006%20Copy%201" text:style-name="Index_20_Link" text:visited-style-name="Index_20_Link">3.6 Fetch Specific Record<text:tab/>14</text:a></text:p>
          <text:p text:style-name="P8"><text:a xlink:type="simple" xlink:href="#__RefHeading___Toc702_3019299338%20Copy%201" text:style-name="Index_20_Link" text:visited-style-name="Index_20_Link">3.7 Get All Records<text:tab/>14</text:a></text:p>
          <text:p text:style-name="P8"><text:a xlink:type="simple" xlink:href="#__RefHeading___Toc704_3019299338%20Copy%201" text:style-name="Index_20_Link" text:visited-style-name="Index_20_Link">3.8 Get Combo List<text:tab/>15</text:a></text:p>
          <text:p text:style-name="P7"><text:a xlink:type="simple" xlink:href="#__RefHeading___Toc227_771010674%20Copy%201%20Copy%201" text:style-name="Index_20_Link" text:visited-style-name="Index_20_Link">4 Issue Type<text:tab/>16</text:a></text:p>
          <text:p text:style-name="P8"><text:a xlink:type="simple" xlink:href="#__RefHeading___Toc908_3206075736%20Copy%202%20Copy%201" text:style-name="Index_20_Link" text:visited-style-name="Index_20_Link">4.1 Add<text:tab/>16</text:a></text:p>
          <text:p text:style-name="P8"><text:a xlink:type="simple" xlink:href="#__RefHeading___Toc2081_720390006%20Copy%201%20Copy%201%20Copy%201" text:style-name="Index_20_Link" text:visited-style-name="Index_20_Link">4.2 Update<text:tab/>17</text:a></text:p>
          <text:p text:style-name="P8"><text:a xlink:type="simple" xlink:href="#__RefHeading___Toc908_3206075736%20Copy%201%20Copy%201%20Copy%201" text:style-name="Index_20_Link" text:visited-style-name="Index_20_Link">4.3 Delete<text:tab/>17</text:a></text:p>
          <text:p text:style-name="P8"><text:a xlink:type="simple" xlink:href="#__RefHeading___Toc2079_720390006%20Copy%201%20Copy%201" text:style-name="Index_20_Link" text:visited-style-name="Index_20_Link">4.4 Active<text:tab/>18</text:a></text:p>
          <text:p text:style-name="P8"><text:a xlink:type="simple" xlink:href="#__RefHeading___Toc2083_720390006%20Copy%201%20Copy%201" text:style-name="Index_20_Link" text:visited-style-name="Index_20_Link">4.5 Inactive<text:tab/>18</text:a></text:p>
          <text:p text:style-name="P8"><text:a xlink:type="simple" xlink:href="#__RefHeading___Toc2085_720390006%20Copy%201%20Copy%201" text:style-name="Index_20_Link" text:visited-style-name="Index_20_Link">4.6 Fetch Specific Record<text:tab/>19</text:a></text:p>
          <text:p text:style-name="P8"><text:a xlink:type="simple" xlink:href="#__RefHeading___Toc702_3019299338%20Copy%201%20Copy%201" text:style-name="Index_20_Link" text:visited-style-name="Index_20_Link">4.7 Get All Records<text:tab/>20</text:a></text:p>
          <text:p text:style-name="P8"><text:a xlink:type="simple" xlink:href="#__RefHeading___Toc704_3019299338%20Copy%201%20Copy%201" text:style-name="Index_20_Link" text:visited-style-name="Index_20_Link">4.8 Get Combo List<text:tab/>20</text:a></text:p>
          <text:p text:style-name="P7"><text:a xlink:type="simple" xlink:href="#__RefHeading___Toc227_771010674%20Copy%201%20Copy%202" text:style-name="Index_20_Link" text:visited-style-name="Index_20_Link">5 Status<text:tab/>21</text:a></text:p>
          <text:p text:style-name="P8"><text:a xlink:type="simple" xlink:href="#__RefHeading___Toc908_3206075736%20Copy%202%20Copy%202" text:style-name="Index_20_Link" text:visited-style-name="Index_20_Link">5.1 Add<text:tab/>21</text:a></text:p>
          <text:p text:style-name="P8"><text:a xlink:type="simple" xlink:href="#__RefHeading___Toc2081_720390006%20Copy%201%20Copy%201%20Copy%202" text:style-name="Index_20_Link" text:visited-style-name="Index_20_Link">5.2 Update<text:tab/>22</text:a></text:p>
          <text:p text:style-name="P8"><text:a xlink:type="simple" xlink:href="#__RefHeading___Toc908_3206075736%20Copy%201%20Copy%201%20Copy%202" text:style-name="Index_20_Link" text:visited-style-name="Index_20_Link">5.3 Delete<text:tab/>22</text:a></text:p>
          <text:p text:style-name="P8"><text:a xlink:type="simple" xlink:href="#__RefHeading___Toc2079_720390006%20Copy%201%20Copy%202" text:style-name="Index_20_Link" text:visited-style-name="Index_20_Link">5.4 Active<text:tab/>23</text:a></text:p>
          <text:p text:style-name="P8"><text:a xlink:type="simple" xlink:href="#__RefHeading___Toc2083_720390006%20Copy%201%20Copy%202" text:style-name="Index_20_Link" text:visited-style-name="Index_20_Link">5.5 Inactive<text:tab/>23</text:a></text:p>
          <text:p text:style-name="P8"><text:a xlink:type="simple" xlink:href="#__RefHeading___Toc2085_720390006%20Copy%201%20Copy%202" text:style-name="Index_20_Link" text:visited-style-name="Index_20_Link">5.6 Fetch Specific Record<text:tab/>24</text:a></text:p>
          <text:p text:style-name="P8"><text:a xlink:type="simple" xlink:href="#__RefHeading___Toc702_3019299338%20Copy%201%20Copy%202" text:style-name="Index_20_Link" text:visited-style-name="Index_20_Link">5.7 Get All Records<text:tab/>25</text:a></text:p>
          <text:p text:style-name="P8"><text:a xlink:type="simple" xlink:href="#__RefHeading___Toc704_3019299338%20Copy%201%20Copy%202" text:style-name="Index_20_Link" text:visited-style-name="Index_20_Link">5.8 Get Combo List<text:tab/>26</text:a></text:p>
          <text:p text:style-name="P7"><text:a xlink:type="simple" xlink:href="#__RefHeading___Toc227_771010674%20Copy%201%20Copy%202%20Copy%201" text:style-name="Index_20_Link" text:visited-style-name="Index_20_Link"><text:soft-page-break/>6 Resolution<text:tab/>26</text:a></text:p>
          <text:p text:style-name="P8"><text:a xlink:type="simple" xlink:href="#__RefHeading___Toc908_3206075736%20Copy%202%20Copy%202%20Copy%201" text:style-name="Index_20_Link" text:visited-style-name="Index_20_Link">6.1 Add<text:tab/>26</text:a></text:p>
          <text:p text:style-name="P8"><text:a xlink:type="simple" xlink:href="#__RefHeading___Toc2081_720390006%20Copy%201%20Copy%201%20Copy%202%20Copy%201" text:style-name="Index_20_Link" text:visited-style-name="Index_20_Link">6.2 Update<text:tab/>27</text:a></text:p>
          <text:p text:style-name="P8"><text:a xlink:type="simple" xlink:href="#__RefHeading___Toc908_3206075736%20Copy%201%20Copy%201%20Copy%202%20Copy%201" text:style-name="Index_20_Link" text:visited-style-name="Index_20_Link">6.3 Delete<text:tab/>28</text:a></text:p>
          <text:p text:style-name="P8"><text:a xlink:type="simple" xlink:href="#__RefHeading___Toc2079_720390006%20Copy%201%20Copy%202%20Copy%201" text:style-name="Index_20_Link" text:visited-style-name="Index_20_Link">6.4 Active<text:tab/>28</text:a></text:p>
          <text:p text:style-name="P8"><text:a xlink:type="simple" xlink:href="#__RefHeading___Toc2083_720390006%20Copy%201%20Copy%202%20Copy%201" text:style-name="Index_20_Link" text:visited-style-name="Index_20_Link">6.5 Inactive<text:tab/>29</text:a></text:p>
          <text:p text:style-name="P8"><text:a xlink:type="simple" xlink:href="#__RefHeading___Toc2085_720390006%20Copy%201%20Copy%202%20Copy%201" text:style-name="Index_20_Link" text:visited-style-name="Index_20_Link">6.6 Fetch Specific Record<text:tab/>29</text:a></text:p>
          <text:p text:style-name="P8"><text:a xlink:type="simple" xlink:href="#__RefHeading___Toc702_3019299338%20Copy%201%20Copy%202%20Copy%201" text:style-name="Index_20_Link" text:visited-style-name="Index_20_Link">6.7 Get All Records<text:tab/>30</text:a></text:p>
          <text:p text:style-name="P8"><text:a xlink:type="simple" xlink:href="#__RefHeading___Toc704_3019299338%20Copy%201%20Copy%202%20Copy%201" text:style-name="Index_20_Link" text:visited-style-name="Index_20_Link">6.8 Get Combo List<text:tab/>31</text:a></text:p>
          <text:p text:style-name="P7"><text:a xlink:type="simple" xlink:href="#__RefHeading___Toc227_771010674%20Copy%202" text:style-name="Index_20_Link" text:visited-style-name="Index_20_Link">7 Meeting Type<text:tab/>31</text:a></text:p>
          <text:p text:style-name="P8"><text:a xlink:type="simple" xlink:href="#__RefHeading___Toc908_3206075736%20Copy%203" text:style-name="Index_20_Link" text:visited-style-name="Index_20_Link">7.1 Add<text:tab/>31</text:a></text:p>
          <text:p text:style-name="P8"><text:a xlink:type="simple" xlink:href="#__RefHeading___Toc2081_720390006%20Copy%201%20Copy%202" text:style-name="Index_20_Link" text:visited-style-name="Index_20_Link">7.2 Update<text:tab/>32</text:a></text:p>
          <text:p text:style-name="P8"><text:a xlink:type="simple" xlink:href="#__RefHeading___Toc908_3206075736%20Copy%201%20Copy%202" text:style-name="Index_20_Link" text:visited-style-name="Index_20_Link">7.3 Delete<text:tab/>33</text:a></text:p>
          <text:p text:style-name="P8"><text:a xlink:type="simple" xlink:href="#__RefHeading___Toc2079_720390006%20Copy%202" text:style-name="Index_20_Link" text:visited-style-name="Index_20_Link">7.4 Active<text:tab/>33</text:a></text:p>
          <text:p text:style-name="P8"><text:a xlink:type="simple" xlink:href="#__RefHeading___Toc2083_720390006%20Copy%202" text:style-name="Index_20_Link" text:visited-style-name="Index_20_Link">7.5 Inactive<text:tab/>34</text:a></text:p>
          <text:p text:style-name="P8"><text:a xlink:type="simple" xlink:href="#__RefHeading___Toc2085_720390006%20Copy%202" text:style-name="Index_20_Link" text:visited-style-name="Index_20_Link">7.6 Fetch Specific Record<text:tab/>34</text:a></text:p>
          <text:p text:style-name="P8"><text:a xlink:type="simple" xlink:href="#__RefHeading___Toc702_3019299338%20Copy%202" text:style-name="Index_20_Link" text:visited-style-name="Index_20_Link">7.7 Get All Records<text:tab/>35</text:a></text:p>
          <text:p text:style-name="P8"><text:a xlink:type="simple" xlink:href="#__RefHeading___Toc704_3019299338%20Copy%202" text:style-name="Index_20_Link" text:visited-style-name="Index_20_Link">7.8 Get Combo List<text:tab/>36</text:a></text:p>
          <text:p text:style-name="P7"><text:a xlink:type="simple" xlink:href="#__RefHeading___Toc227_771010674%20Copy%202%20Copy%201" text:style-name="Index_20_Link" text:visited-style-name="Index_20_Link">8 Document Type<text:tab/>37</text:a></text:p>
          <text:p text:style-name="P8"><text:a xlink:type="simple" xlink:href="#__RefHeading___Toc908_3206075736%20Copy%203%20Copy%201" text:style-name="Index_20_Link" text:visited-style-name="Index_20_Link">8.1 Add<text:tab/>37</text:a></text:p>
          <text:p text:style-name="P8"><text:a xlink:type="simple" xlink:href="#__RefHeading___Toc2081_720390006%20Copy%201%20Copy%202%20Copy%201" text:style-name="Index_20_Link" text:visited-style-name="Index_20_Link">8.2 Update<text:tab/>37</text:a></text:p>
          <text:p text:style-name="P8"><text:a xlink:type="simple" xlink:href="#__RefHeading___Toc908_3206075736%20Copy%201%20Copy%202%20Copy%201" text:style-name="Index_20_Link" text:visited-style-name="Index_20_Link">8.3 Delete<text:tab/>38</text:a></text:p>
          <text:p text:style-name="P8"><text:a xlink:type="simple" xlink:href="#__RefHeading___Toc2079_720390006%20Copy%202%20Copy%201" text:style-name="Index_20_Link" text:visited-style-name="Index_20_Link">8.4 Active<text:tab/>38</text:a></text:p>
          <text:p text:style-name="P8"><text:a xlink:type="simple" xlink:href="#__RefHeading___Toc2083_720390006%20Copy%202%20Copy%201" text:style-name="Index_20_Link" text:visited-style-name="Index_20_Link">8.5 Inactive<text:tab/>39</text:a></text:p>
          <text:p text:style-name="P8"><text:a xlink:type="simple" xlink:href="#__RefHeading___Toc2085_720390006%20Copy%202%20Copy%201" text:style-name="Index_20_Link" text:visited-style-name="Index_20_Link">8.6 Fetch Specific Record<text:tab/>39</text:a></text:p>
          <text:p text:style-name="P8"><text:a xlink:type="simple" xlink:href="#__RefHeading___Toc702_3019299338%20Copy%202%20Copy%201" text:style-name="Index_20_Link" text:visited-style-name="Index_20_Link">8.7 Get All Records<text:tab/>40</text:a></text:p>
          <text:p text:style-name="P8"><text:a xlink:type="simple" xlink:href="#__RefHeading___Toc704_3019299338%20Copy%202%20Copy%201" text:style-name="Index_20_Link" text:visited-style-name="Index_20_Link">8.8 Get Combo List<text:tab/>41</text:a></text:p>
          <text:p text:style-name="P7"><text:a xlink:type="simple" xlink:href="#__RefHeading___Toc227_771010674%20Copy%202%20Copy%201%20Copy%201" text:style-name="Index_20_Link" text:visited-style-name="Index_20_Link">9 File Extension<text:tab/>42</text:a></text:p>
          <text:p text:style-name="P8"><text:a xlink:type="simple" xlink:href="#__RefHeading___Toc908_3206075736%20Copy%203%20Copy%201%20Copy%201" text:style-name="Index_20_Link" text:visited-style-name="Index_20_Link">9.1 Add<text:tab/>42</text:a></text:p>
          <text:p text:style-name="P8"><text:a xlink:type="simple" xlink:href="#__RefHeading___Toc2081_720390006%20Copy%201%20Copy%202%20Copy%201%20Copy%201" text:style-name="Index_20_Link" text:visited-style-name="Index_20_Link">9.2 Update<text:tab/>42</text:a></text:p>
          <text:p text:style-name="P8"><text:a xlink:type="simple" xlink:href="#__RefHeading___Toc908_3206075736%20Copy%201%20Copy%202%20Copy%201%20Copy%201" text:style-name="Index_20_Link" text:visited-style-name="Index_20_Link">9.3 Delete<text:tab/>43</text:a></text:p>
          <text:p text:style-name="P8"><text:a xlink:type="simple" xlink:href="#__RefHeading___Toc2079_720390006%20Copy%202%20Copy%201%20Copy%201" text:style-name="Index_20_Link" text:visited-style-name="Index_20_Link">9.4 Active<text:tab/>43</text:a></text:p>
          <text:p text:style-name="P8"><text:a xlink:type="simple" xlink:href="#__RefHeading___Toc2083_720390006%20Copy%202%20Copy%201%20Copy%201" text:style-name="Index_20_Link" text:visited-style-name="Index_20_Link">9.5 Inactive<text:tab/>44</text:a></text:p>
          <text:p text:style-name="P8"><text:a xlink:type="simple" xlink:href="#__RefHeading___Toc2085_720390006%20Copy%202%20Copy%201%20Copy%201" text:style-name="Index_20_Link" text:visited-style-name="Index_20_Link">9.6 Fetch Specific Record<text:tab/>44</text:a></text:p>
          <text:p text:style-name="P8"><text:a xlink:type="simple" xlink:href="#__RefHeading___Toc702_3019299338%20Copy%202%20Copy%201%20Copy%201" text:style-name="Index_20_Link" text:visited-style-name="Index_20_Link">9.7 Get All Records<text:tab/>45</text:a></text:p>
          <text:p text:style-name="P8"><text:a xlink:type="simple" xlink:href="#__RefHeading___Toc704_3019299338%20Copy%202%20Copy%201%20Copy%201" text:style-name="Index_20_Link" text:visited-style-name="Index_20_Link">9.8 Get Combo List<text:tab/>46</text:a></text:p>
          <text:p text:style-name="P7"><text:a xlink:type="simple" xlink:href="#__RefHeading___Toc227_771010674%20Copy%202%20Copy%201%20Copy%201%20Copy%201" text:style-name="Index_20_Link" text:visited-style-name="Index_20_Link">10 Contract Type<text:tab/>47</text:a></text:p>
          <text:p text:style-name="P8"><text:a xlink:type="simple" xlink:href="#__RefHeading___Toc908_3206075736%20Copy%203%20Copy%201%20Copy%201%20Copy%201" text:style-name="Index_20_Link" text:visited-style-name="Index_20_Link">10.1 Add<text:tab/>47</text:a></text:p>
          <text:p text:style-name="P8"><text:a xlink:type="simple" xlink:href="#__RefHeading___Toc2081_720390006%20Copy%201%20Copy%202%20Copy%201%20Copy%201%20Copy%201" text:style-name="Index_20_Link" text:visited-style-name="Index_20_Link">10.2 Update<text:tab/>47</text:a></text:p>
          <text:p text:style-name="P8"><text:a xlink:type="simple" xlink:href="#__RefHeading___Toc908_3206075736%20Copy%201%20Copy%202%20Copy%201%20Copy%201%20Copy%201" text:style-name="Index_20_Link" text:visited-style-name="Index_20_Link">10.3 Delete<text:tab/>48</text:a></text:p>
          <text:p text:style-name="P8"><text:a xlink:type="simple" xlink:href="#__RefHeading___Toc2079_720390006%20Copy%202%20Copy%201%20Copy%201%20Copy%201" text:style-name="Index_20_Link" text:visited-style-name="Index_20_Link">10.4 Active<text:tab/>48</text:a></text:p>
          <text:p text:style-name="P8"><text:a xlink:type="simple" xlink:href="#__RefHeading___Toc2083_720390006%20Copy%202%20Copy%201%20Copy%201%20Copy%201" text:style-name="Index_20_Link" text:visited-style-name="Index_20_Link">10.5 Inactive<text:tab/>49</text:a></text:p>
          <text:p text:style-name="P8"><text:a xlink:type="simple" xlink:href="#__RefHeading___Toc2085_720390006%20Copy%202%20Copy%201%20Copy%201%20Copy%201" text:style-name="Index_20_Link" text:visited-style-name="Index_20_Link">10.6 Fetch Specific Record<text:tab/>49</text:a></text:p>
          <text:p text:style-name="P8"><text:a xlink:type="simple" xlink:href="#__RefHeading___Toc702_3019299338%20Copy%202%20Copy%201%20Copy%201%20Copy%201" text:style-name="Index_20_Link" text:visited-style-name="Index_20_Link">10.7 Get All Records<text:tab/>50</text:a></text:p>
          <text:p text:style-name="P8"><text:a xlink:type="simple" xlink:href="#__RefHeading___Toc704_3019299338%20Copy%202%20Copy%201%20Copy%201%20Copy%201" text:style-name="Index_20_Link" text:visited-style-name="Index_20_Link"><text:soft-page-break/>10.8 Get Combo List<text:tab/>51</text:a></text:p>
          <text:p text:style-name="P7"><text:a xlink:type="simple" xlink:href="#__RefHeading___Toc227_771010674%20Copy%202%20Copy%201%20Copy%201%20Copy%202" text:style-name="Index_20_Link" text:visited-style-name="Index_20_Link">11 Test Approval<text:tab/>52</text:a></text:p>
          <text:p text:style-name="P8"><text:a xlink:type="simple" xlink:href="#__RefHeading___Toc908_3206075736%20Copy%203%20Copy%201%20Copy%201%20Copy%202" text:style-name="Index_20_Link" text:visited-style-name="Index_20_Link">11.1 Add<text:tab/>52</text:a></text:p>
          <text:p text:style-name="P8"><text:a xlink:type="simple" xlink:href="#__RefHeading___Toc2081_720390006%20Copy%201%20Copy%202%20Copy%201%20Copy%201%20Copy%202" text:style-name="Index_20_Link" text:visited-style-name="Index_20_Link">11.2 Update<text:tab/>52</text:a></text:p>
          <text:p text:style-name="P8"><text:a xlink:type="simple" xlink:href="#__RefHeading___Toc908_3206075736%20Copy%201%20Copy%202%20Copy%201%20Copy%201%20Copy%202" text:style-name="Index_20_Link" text:visited-style-name="Index_20_Link">11.3 Delete<text:tab/>53</text:a></text:p>
          <text:p text:style-name="P8"><text:a xlink:type="simple" xlink:href="#__RefHeading___Toc2079_720390006%20Copy%202%20Copy%201%20Copy%201%20Copy%202" text:style-name="Index_20_Link" text:visited-style-name="Index_20_Link">11.4 Active<text:tab/>53</text:a></text:p>
          <text:p text:style-name="P8"><text:a xlink:type="simple" xlink:href="#__RefHeading___Toc2083_720390006%20Copy%202%20Copy%201%20Copy%201%20Copy%202" text:style-name="Index_20_Link" text:visited-style-name="Index_20_Link">11.5 Inactive<text:tab/>54</text:a></text:p>
          <text:p text:style-name="P8"><text:a xlink:type="simple" xlink:href="#__RefHeading___Toc2085_720390006%20Copy%202%20Copy%201%20Copy%201%20Copy%202" text:style-name="Index_20_Link" text:visited-style-name="Index_20_Link">11.6 Fetch Specific Record<text:tab/>55</text:a></text:p>
          <text:p text:style-name="P8"><text:a xlink:type="simple" xlink:href="#__RefHeading___Toc702_3019299338%20Copy%202%20Copy%201%20Copy%201%20Copy%202" text:style-name="Index_20_Link" text:visited-style-name="Index_20_Link">11.7 Get All Records<text:tab/>55</text:a></text:p>
          <text:p text:style-name="P8"><text:a xlink:type="simple" xlink:href="#__RefHeading___Toc704_3019299338%20Copy%202%20Copy%201%20Copy%201%20Copy%202" text:style-name="Index_20_Link" text:visited-style-name="Index_20_Link">11.8 Get Combo List<text:tab/>56</text:a></text:p>
          <text:p text:style-name="P7"><text:a xlink:type="simple" xlink:href="#__RefHeading___Toc227_771010674%20Copy%202%20Copy%201%20Copy%201%20Copy%203" text:style-name="Index_20_Link" text:visited-style-name="Index_20_Link">12 Test Complexity Level<text:tab/>57</text:a></text:p>
          <text:p text:style-name="P8"><text:a xlink:type="simple" xlink:href="#__RefHeading___Toc908_3206075736%20Copy%203%20Copy%201%20Copy%201%20Copy%203" text:style-name="Index_20_Link" text:visited-style-name="Index_20_Link">12.1 Add<text:tab/>57</text:a></text:p>
          <text:p text:style-name="P8"><text:a xlink:type="simple" xlink:href="#__RefHeading___Toc2081_720390006%20Copy%201%20Copy%202%20Copy%201%20Copy%201%20Copy%203" text:style-name="Index_20_Link" text:visited-style-name="Index_20_Link">12.2 Update<text:tab/>57</text:a></text:p>
          <text:p text:style-name="P8"><text:a xlink:type="simple" xlink:href="#__RefHeading___Toc908_3206075736%20Copy%201%20Copy%202%20Copy%201%20Copy%201%20Copy%203" text:style-name="Index_20_Link" text:visited-style-name="Index_20_Link">12.3 Delete<text:tab/>58</text:a></text:p>
          <text:p text:style-name="P8"><text:a xlink:type="simple" xlink:href="#__RefHeading___Toc2079_720390006%20Copy%202%20Copy%201%20Copy%201%20Copy%203" text:style-name="Index_20_Link" text:visited-style-name="Index_20_Link">12.4 Active<text:tab/>59</text:a></text:p>
          <text:p text:style-name="P8"><text:a xlink:type="simple" xlink:href="#__RefHeading___Toc2083_720390006%20Copy%202%20Copy%201%20Copy%201%20Copy%203" text:style-name="Index_20_Link" text:visited-style-name="Index_20_Link">12.5 Inactive<text:tab/>59</text:a></text:p>
          <text:p text:style-name="P8"><text:a xlink:type="simple" xlink:href="#__RefHeading___Toc2085_720390006%20Copy%202%20Copy%201%20Copy%201%20Copy%203" text:style-name="Index_20_Link" text:visited-style-name="Index_20_Link">12.6 Fetch Specific Record<text:tab/>60</text:a></text:p>
          <text:p text:style-name="P8"><text:a xlink:type="simple" xlink:href="#__RefHeading___Toc702_3019299338%20Copy%202%20Copy%201%20Copy%201%20Copy%203" text:style-name="Index_20_Link" text:visited-style-name="Index_20_Link">12.7 Get All Records<text:tab/>60</text:a></text:p>
          <text:p text:style-name="P8"><text:a xlink:type="simple" xlink:href="#__RefHeading___Toc704_3019299338%20Copy%202%20Copy%201%20Copy%201%20Copy%203" text:style-name="Index_20_Link" text:visited-style-name="Index_20_Link">12.8 Get Combo List<text:tab/>61</text:a></text:p>
          <text:p text:style-name="P7"><text:a xlink:type="simple" xlink:href="#__RefHeading___Toc227_771010674%20Copy%202%20Copy%201%20Copy%201%20Copy%204" text:style-name="Index_20_Link" text:visited-style-name="Index_20_Link">13 Time Unit<text:tab/>62</text:a></text:p>
          <text:p text:style-name="P8"><text:a xlink:type="simple" xlink:href="#__RefHeading___Toc908_3206075736%20Copy%203%20Copy%201%20Copy%201%20Copy%204" text:style-name="Index_20_Link" text:visited-style-name="Index_20_Link">13.1 Add<text:tab/>62</text:a></text:p>
          <text:p text:style-name="P8"><text:a xlink:type="simple" xlink:href="#__RefHeading___Toc2081_720390006%20Copy%201%20Copy%202%20Copy%201%20Copy%201%20Copy%204" text:style-name="Index_20_Link" text:visited-style-name="Index_20_Link">13.2 Update<text:tab/>63</text:a></text:p>
          <text:p text:style-name="P8"><text:a xlink:type="simple" xlink:href="#__RefHeading___Toc908_3206075736%20Copy%201%20Copy%202%20Copy%201%20Copy%201%20Copy%204" text:style-name="Index_20_Link" text:visited-style-name="Index_20_Link">13.3 Delete<text:tab/>63</text:a></text:p>
          <text:p text:style-name="P8"><text:a xlink:type="simple" xlink:href="#__RefHeading___Toc2079_720390006%20Copy%202%20Copy%201%20Copy%201%20Copy%204" text:style-name="Index_20_Link" text:visited-style-name="Index_20_Link">13.4 Active<text:tab/>64</text:a></text:p>
          <text:p text:style-name="P8"><text:a xlink:type="simple" xlink:href="#__RefHeading___Toc2083_720390006%20Copy%202%20Copy%201%20Copy%201%20Copy%204" text:style-name="Index_20_Link" text:visited-style-name="Index_20_Link">13.5 Inactive<text:tab/>64</text:a></text:p>
          <text:p text:style-name="P8"><text:a xlink:type="simple" xlink:href="#__RefHeading___Toc2085_720390006%20Copy%202%20Copy%201%20Copy%201%20Copy%204" text:style-name="Index_20_Link" text:visited-style-name="Index_20_Link">13.6 Fetch Specific Record<text:tab/>65</text:a></text:p>
          <text:p text:style-name="P8"><text:a xlink:type="simple" xlink:href="#__RefHeading___Toc702_3019299338%20Copy%202%20Copy%201%20Copy%201%20Copy%204" text:style-name="Index_20_Link" text:visited-style-name="Index_20_Link">13.7 Get All Records<text:tab/>66</text:a></text:p>
          <text:p text:style-name="P8"><text:a xlink:type="simple" xlink:href="#__RefHeading___Toc704_3019299338%20Copy%202%20Copy%201%20Copy%201%20Copy%204" text:style-name="Index_20_Link" text:visited-style-name="Index_20_Link">13.8 Get Combo List<text:tab/>66</text:a></text:p>
          <text:p text:style-name="P7"><text:a xlink:type="simple" xlink:href="#__RefHeading___Toc227_771010674%20Copy%202%20Copy%201%20Copy%201%20Copy%205" text:style-name="Index_20_Link" text:visited-style-name="Index_20_Link">14 Currency<text:tab/>67</text:a></text:p>
          <text:p text:style-name="P8"><text:a xlink:type="simple" xlink:href="#__RefHeading___Toc908_3206075736%20Copy%203%20Copy%201%20Copy%201%20Copy%205" text:style-name="Index_20_Link" text:visited-style-name="Index_20_Link">14.1 Add<text:tab/>67</text:a></text:p>
          <text:p text:style-name="P8"><text:a xlink:type="simple" xlink:href="#__RefHeading___Toc2081_720390006%20Copy%201%20Copy%202%20Copy%201%20Copy%201%20Copy%205" text:style-name="Index_20_Link" text:visited-style-name="Index_20_Link">14.2 Update<text:tab/>68</text:a></text:p>
          <text:p text:style-name="P8"><text:a xlink:type="simple" xlink:href="#__RefHeading___Toc908_3206075736%20Copy%201%20Copy%202%20Copy%201%20Copy%201%20Copy%205" text:style-name="Index_20_Link" text:visited-style-name="Index_20_Link">14.3 Delete<text:tab/>68</text:a></text:p>
          <text:p text:style-name="P8"><text:a xlink:type="simple" xlink:href="#__RefHeading___Toc2079_720390006%20Copy%202%20Copy%201%20Copy%201%20Copy%205" text:style-name="Index_20_Link" text:visited-style-name="Index_20_Link">14.4 Active<text:tab/>69</text:a></text:p>
          <text:p text:style-name="P8"><text:a xlink:type="simple" xlink:href="#__RefHeading___Toc2083_720390006%20Copy%202%20Copy%201%20Copy%201%20Copy%205" text:style-name="Index_20_Link" text:visited-style-name="Index_20_Link">14.5 Inactive<text:tab/>69</text:a></text:p>
          <text:p text:style-name="P8"><text:a xlink:type="simple" xlink:href="#__RefHeading___Toc2085_720390006%20Copy%202%20Copy%201%20Copy%201%20Copy%205" text:style-name="Index_20_Link" text:visited-style-name="Index_20_Link">14.6 Fetch Specific Record<text:tab/>70</text:a></text:p>
          <text:p text:style-name="P8"><text:a xlink:type="simple" xlink:href="#__RefHeading___Toc702_3019299338%20Copy%202%20Copy%201%20Copy%201%20Copy%205" text:style-name="Index_20_Link" text:visited-style-name="Index_20_Link">14.7 Get All Records<text:tab/>71</text:a></text:p>
          <text:p text:style-name="P8"><text:a xlink:type="simple" xlink:href="#__RefHeading___Toc704_3019299338%20Copy%202%20Copy%201%20Copy%201%20Copy%205" text:style-name="Index_20_Link" text:visited-style-name="Index_20_Link">14.8 Get Combo List<text:tab/>71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  <table:table-row>
          <table:table-cell table:style-name="Table82.A7" office:value-type="string">
            <text:p text:style-name="P17">6</text:p>
          </table:table-cell>
          <table:table-cell table:style-name="Table82.B7" office:value-type="string">
            <text:p text:style-name="P13">The data is returned successfully.</text:p>
          </table:table-cell>
          <table:table-cell table:style-name="Table82.C7" office:value-type="string">
            <text:p text:style-name="P18">Fetching Data (Specific Row or All Rows)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>
          <table:table-cell table:style-name="Table83.A1" office:value-type="string">
            <text:p text:style-name="P19">No</text:p>
          </table:table-cell>
          <table:table-cell table:style-name="Table83.A1" office:value-type="string">
            <text:p text:style-name="P19">Property Name</text:p>
          </table:table-cell>
          <table:table-cell table:style-name="Table83.A1" office:value-type="string">
            <text:p text:style-name="P19">Data Type</text:p>
          </table:table-cell>
          <table:table-cell table:style-name="Table83.D1" office:value-type="string">
            <text:p text:style-name="P19">Description</text:p>
          </table:table-cell>
        </table:table-row>
        <table:table-row>
          <table:table-cell table:style-name="Table83.A2" office:value-type="string">
            <text:p text:style-name="P20">1</text:p>
          </table:table-cell>
          <table:table-cell table:style-name="Table83.B2" office:value-type="string">
            <text:p text:style-name="P20">status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21">HTTP Status Code</text:p>
          </table:table-cell>
        </table:table-row>
        <table:table-row>
          <table:table-cell table:style-name="Table83.A2" office:value-type="string">
            <text:p text:style-name="P20">2</text:p>
          </table:table-cell>
          <table:table-cell table:style-name="Table83.B2" office:value-type="string">
            <text:p text:style-name="P20">status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It presented in section 1.1.</text:p>
          </table:table-cell>
        </table:table-row>
        <table:table-row>
          <table:table-cell table:style-name="Table83.A2" office:value-type="string">
            <text:p text:style-name="P20">3</text:p>
          </table:table-cell>
          <table:table-cell table:style-name="Table83.B2" office:value-type="string">
            <text:p text:style-name="P20">message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Successful (section 1.2) and error message.</text:p>
          </table:table-cell>
        </table:table-row>
        <table:table-row>
          <table:table-cell table:style-name="Table83.A2" office:value-type="string">
            <text:p text:style-name="P20">4</text:p>
          </table:table-cell>
          <table:table-cell table:style-name="Table83.B2" office:value-type="string">
            <text:p text:style-name="P20">error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20">Error code based on “System Error List” document.</text:p>
          </table:table-cell>
        </table:table-row>
        <table:table-row>
          <table:table-cell table:style-name="Table83.A2" office:value-type="string">
            <text:p text:style-name="P20">5</text:p>
          </table:table-cell>
          <table:table-cell table:style-name="Table83.B2" office:value-type="string">
            <text:p text:style-name="P20">data</text:p>
          </table:table-cell>
          <table:table-cell table:style-name="Table83.C2" office:value-type="string">
            <text:p text:style-name="P20">object</text:p>
          </table:table-cell>
          <table:table-cell table:style-name="Table83.D2" office:value-type="string">
            <text:p text:style-name="P20">To return data objects and properties.</text:p>
          </table:table-cell>
        </table:table-row>
      </table:table>
      <text:p text:style-name="Text_20_body"/>
      <text:h text:style-name="P22" text:outline-level="1"><text:bookmark-start text:name="__RefHeading___Toc227_771010674"/><text:soft-page-break/>Education Level<text:bookmark-end text:name="__RefHeading___Toc227_771010674"/></text:h>
      <text:h text:style-name="P23" text:outline-level="2"><text:bookmark-start text:name="__RefHeading___Toc908_3206075736"/><text:span text:style-name="Strong_20_Emphasis"><text:span text:style-name="T5">Add</text:span></text:span><text:bookmark-end text:name="__RefHeading___Toc908_3206075736"/></text:h>
      <text:p text:style-name="P24"><text:span text:style-name="Strong_20_Emphasis"><text:span text:style-name="T6">Description</text:span></text:span></text:p>
      <text:p text:style-name="P24"><text:span text:style-name="Strong_20_Emphasis"><text:span text:style-name="T7">This API adds a record of “education level” into the basic data.</text:span></text:span></text:p>
      <text:p text:style-name="Text_20_body"><text:span text:style-name="Strong_20_Emphasis"><text:span text:style-name="T8">Request CURL Sample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5">curl --request POST \</text:p>
            <text:p text:style-name="P25"><text:s text:c="2"/>--url 'https://[maindomian]/api/basic/educationLevel' \</text:p>
            <text:p text:style-name="P25"><text:s text:c="2"/>--header 'Authorization: Bearer [JWT token]' \</text:p>
            <text:p text:style-name="P25"><text:s text:c="2"/>--header 'content-type: application/json' \</text:p>
            <text:p text:style-name="P25"><text:s text:c="2"/>--data '{"code":"123","title":"test","decription":"test"}'</text:p>
          </table:table-cell>
        </table:table-row>
      </table:table>
      <text:p text:style-name="P26"><text:span text:style-name="Strong_20_Emphasis"><text:span text:style-name="T9"/></text:span></text:p>
      <text:p text:style-name="Text_20_body"><text:span text:style-name="Strong_20_Emphasis"><text:span text:style-name="T8">Response Sample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7">{</text:p>
            <text:p text:style-name="P27"><text:tab/>"statusCode" : 200,</text:p>
            <text:p text:style-name="P27"><text:tab/>"status" : "success",</text:p>
            <text:p text:style-name="P27"><text:tab/>"message" : "The record is added successfully."</text:p>
            <text:p text:style-name="P27"><text:tab/>"errorCode": 0,</text:p>
            <text:p text:style-name="P27"><text:tab/>"data": {</text:p>
            <text:p text:style-name="P27"><text:tab/><text:tab/>"id": 123</text:p>
            <text:p text:style-name="P27"><text:tab/>}</text:p>
            <text:p text:style-name="P27">}</text:p>
          </table:table-cell>
        </table:table-row>
      </table:table>
      <text:p text:style-name="P26"><text:span text:style-name="Strong_20_Emphasis"/></text:p>
      <text:h text:style-name="P28" text:outline-level="2"><text:bookmark-start text:name="__RefHeading___Toc2081_720390006 Copy 1"/><text:span text:style-name="Strong_20_Emphasis"><text:span text:style-name="T10">Update</text:span></text:span><text:bookmark-end text:name="__RefHeading___Toc2081_720390006 Copy 1"/></text:h>
      <text:p text:style-name="P24"><text:span text:style-name="Strong_20_Emphasis"><text:span text:style-name="T6">Description</text:span></text:span></text:p>
      <text:p text:style-name="P24"><text:span text:style-name="Strong_20_Emphasis"><text:span text:style-name="T7">This API updates a specific record of “education level” in the basic data.</text:span></text:span></text:p>
      <text:p text:style-name="P29"><text:span text:style-name="Strong_20_Emphasis"><text:span text:style-name="T8">Request CURL Sample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0">curl --request PUT \</text:p>
            <text:p text:style-name="P30"><text:s text:c="2"/>--url 'https://[maindomian]/api/basic/educationLevel/[id]' \</text:p>
            <text:p text:style-name="P30"><text:s text:c="2"/>--header 'Authorization: Bearer [JWT token]' \</text:p>
            <text:p text:style-name="P30"><text:s text:c="2"/>--header 'content-type: application/json' \</text:p>
            <text:p text:style-name="P30"><text:s text:c="2"/>--data '{"code":"123","title":"test","decription":"test"}'</text:p>
          </table:table-cell>
        </table:table-row>
      </table:table>
      <text:p text:style-name="P29"><text:span text:style-name="Strong_20_Emphasis"><text:span text:style-name="T9"/></text:span></text:p>
      <text:p text:style-name="P29"><text:soft-page-break/><text:span text:style-name="Strong_20_Emphasis"><text:span text:style-name="T8">Response Sample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0">updated</text:span> successfully."</text:p>
            <text:p text:style-name="P30"><text:tab/>"errorCode" : 0,</text:p>
            <text:p text:style-name="P30"><text:tab/>"data" : <text:span text:style-name="T11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908_3206075736 Copy 1"/><text:span text:style-name="Strong_20_Emphasis"><text:span text:style-name="T10">Delete</text:span></text:span><text:bookmark-end text:name="__RefHeading___Toc908_3206075736 Copy 1"/></text:h>
      <text:p text:style-name="P24"><text:span text:style-name="Strong_20_Emphasis"><text:span text:style-name="T6">Description</text:span></text:span></text:p>
      <text:p text:style-name="P24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education level” from the basic data.</text:span></text:span></text:p>
      <text:p text:style-name="P24"><text:span text:style-name="Strong_20_Emphasis"><text:span text:style-name="T8">Request CURL Sample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1">curl --request DELETE \</text:p>
            <text:p text:style-name="P31"><text:s text:c="2"/>--url 'https://[maindomian]/api/basic/educationLevel/[id]' \</text:p>
            <text:p text:style-name="P31"><text:s text:c="2"/>--header 'Authorization: Bearer [JWT token]' \</text:p>
            <text:p text:style-name="P31"><text:s text:c="2"/>--header 'content-type: application/json'</text:p>
          </table:table-cell>
        </table:table-row>
      </table:table>
      <text:p text:style-name="P24"><text:span text:style-name="Strong_20_Emphasis"><text:span text:style-name="T9"/></text:span></text:p>
      <text:p text:style-name="P24"><text:span text:style-name="Strong_20_Emphasis"><text:span text:style-name="T8">Response Sample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1">{</text:p>
            <text:p text:style-name="P31"><text:tab/>"statusCode" : 200,</text:p>
            <text:p text:style-name="P31"><text:tab/>"status" : "success",</text:p>
            <text:p text:style-name="P31"><text:tab/>"message" : "The record is <text:span text:style-name="T11">deleted</text:span> successfully."</text:p>
            <text:p text:style-name="P31"><text:tab/>"errorCode" : 0,</text:p>
            <text:p text:style-name="P31"><text:tab/>"data" : <text:span text:style-name="T11">null</text:span></text:p>
            <text:p text:style-name="P31">}</text:p>
          </table:table-cell>
        </table:table-row>
      </table:table>
      <text:p text:style-name="P24"><text:span text:style-name="Strong_20_Emphasis"/></text:p>
      <text:h text:style-name="P28" text:outline-level="2"><text:bookmark-start text:name="__RefHeading___Toc2079_720390006"/><text:span text:style-name="Strong_20_Emphasis"><text:span text:style-name="T10">Active</text:span></text:span><text:bookmark-end text:name="__RefHeading___Toc2079_720390006"/></text:h>
      <text:p text:style-name="P24"><text:span text:style-name="Strong_20_Emphasis"><text:span text:style-name="T6">Description</text:span></text:span></text:p>
      <text:p text:style-name="P24"><text:span text:style-name="Strong_20_Emphasis"><text:span text:style-name="T7">This API actives a specific record of “education level” in the basic data.</text:span></text:span></text:p>
      <text:p text:style-name="P24"><text:span text:style-name="Strong_20_Emphasis"><text:span text:style-name="T8">Request CURL Sample</text:span></text:span></text:p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31">curl --request PUT \</text:p>
            <text:p text:style-name="P31"><text:s text:c="2"/>--url 'https://[maindomian]/api/basic/educationLevel/active/[id]' \</text:p>
            <text:p text:style-name="P31"><text:s text:c="2"/>--header 'Authorization: Bearer [JWT token]'</text:p>
          </table:table-cell>
        </table:table-row>
      </table:table>
      <text:p text:style-name="P24"><text:span text:style-name="Strong_20_Emphasis"><text:span text:style-name="T9"/></text:span></text:p>
      <text:p text:style-name="P24"><text:span text:style-name="Strong_20_Emphasis"><text:span text:style-name="T8">Response Sample</text:span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1">{</text:p>
            <text:p text:style-name="P31"><text:tab/>"statusCode" : 200,</text:p>
            <text:p text:style-name="P31"><text:tab/>"status" : "success",</text:p>
            <text:p text:style-name="P31"><text:tab/>"message" : "The record is <text:span text:style-name="T11">activated</text:span> successfully."</text:p>
            <text:p text:style-name="P31"><text:tab/>"errorCode" : 0,</text:p>
            <text:p text:style-name="P31"><text:tab/>"data" : <text:span text:style-name="T11">null</text:span></text:p>
            <text:p text:style-name="P31">}</text:p>
          </table:table-cell>
        </table:table-row>
      </table:table>
      <text:p text:style-name="P24"><text:span text:style-name="Strong_20_Emphasis"/></text:p>
      <text:h text:style-name="P28" text:outline-level="2"><text:bookmark-start text:name="__RefHeading___Toc2083_720390006"/><text:span text:style-name="Strong_20_Emphasis"><text:span text:style-name="T10">Inactive</text:span></text:span><text:bookmark-end text:name="__RefHeading___Toc2083_720390006"/></text:h>
      <text:p text:style-name="P32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education level” in the basic data.</text:span></text:span></text:p>
      <text:p text:style-name="P33"><text:span text:style-name="Strong_20_Emphasis"><text:span text:style-name="T8">Request CURL Sample</text:span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4">curl --request PUT \</text:p>
            <text:p text:style-name="P34"><text:s text:c="2"/>--url 'https://[maindomian]/api/basic/educationLevel/inactive/[id]' \</text:p>
            <text:p text:style-name="P34"><text:s text:c="2"/>--header 'Authorization: Bearer [JWT token]'</text:p>
          </table:table-cell>
        </table:table-row>
      </table:table>
      <text:p text:style-name="P33"><text:span text:style-name="Strong_20_Emphasis"><text:span text:style-name="T9"/></text:span></text:p>
      <text:p text:style-name="P33"><text:span text:style-name="Strong_20_Emphasis"><text:span text:style-name="T8">Response Sample</text:span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record is <text:span text:style-name="T14">in</text:span><text:span text:style-name="T11">activated</text:span> successfully."</text:p>
            <text:p text:style-name="P34"><text:tab/>"errorCode" : 0,</text:p>
            <text:p text:style-name="P34"><text:tab/>"data" : <text:span text:style-name="T11">null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28" text:outline-level="2"><text:bookmark-start text:name="__RefHeading___Toc2085_720390006"/><text:span text:style-name="Strong_20_Emphasis"><text:span text:style-name="T10">Fetch Specific Record</text:span></text:span><text:bookmark-end text:name="__RefHeading___Toc2085_720390006"/></text:h>
      <text:p text:style-name="P32"><text:span text:style-name="Strong_20_Emphasis"><text:span text:style-name="T6">Description</text:span></text:span></text:p>
      <text:p text:style-name="P32"><text:soft-page-break/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education level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32"><text:span text:style-name="Strong_20_Emphasis"><text:span text:style-name="T8">Request CURL Sample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5">curl --request GET \</text:p>
            <text:p text:style-name="P35"><text:s text:c="2"/>--url 'https://[maindomian]/api/basic/educationLevel/[id]' \</text:p>
            <text:p text:style-name="P35"><text:s text:c="2"/>--header 'Authorization: Bearer [JWT token]'</text:p>
          </table:table-cell>
        </table:table-row>
      </table:table>
      <text:p text:style-name="P32"><text:span text:style-name="Strong_20_Emphasis"><text:span text:style-name="T9"/></text:span></text:p>
      <text:p text:style-name="P32"><text:span text:style-name="Strong_20_Emphasis"><text:span text:style-name="T8">Response Sample</text:span>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5">{</text:p>
            <text:p text:style-name="P35"><text:tab/>"statusCode" : 200,</text:p>
            <text:p text:style-name="P35"><text:tab/>"status" : "success",</text:p>
            <text:p text:style-name="P35"><text:tab/>"message" : "The data is returned successfully.",</text:p>
            <text:p text:style-name="P35"><text:tab/>"errorCode" : 0,</text:p>
            <text:p text:style-name="P35"><text:tab/>"data" : {</text:p>
            <text:p text:style-name="P35"><text:tab/><text:tab/>"id" : 16621244611384550112, </text:p>
            <text:p text:style-name="P35"><text:tab/><text:tab/>"title" : "test",</text:p>
            <text:p text:style-name="P35"><text:tab/><text:tab/>"code" : "123",</text:p>
            <text:p text:style-name="P35"><text:tab/><text:tab/>"description" : "test",</text:p>
            <text:p text:style-name="P35"><text:tab/><text:tab/>"createdAt" : "2025-8-25 12:00:00",</text:p>
            <text:p text:style-name="P35"><text:tab/><text:tab/>"createdBy" : "John Davis" </text:p>
            <text:p text:style-name="P35"><text:tab/>}</text:p>
            <text:p text:style-name="P35">}</text:p>
          </table:table-cell>
        </table:table-row>
      </table:table>
      <text:p text:style-name="P32"><text:span text:style-name="Strong_20_Emphasis"/></text:p>
      <text:h text:style-name="P28" text:outline-level="2"><text:bookmark-start text:name="__RefHeading___Toc702_3019299338"/><text:span text:style-name="Strong_20_Emphasis"><text:span text:style-name="T10">Get All Records</text:span></text:span><text:bookmark-end text:name="__RefHeading___Toc702_3019299338"/></text:h>
      <text:p text:style-name="P32"><text:span text:style-name="Strong_20_Emphasis"><text:span text:style-name="T6">Description</text:span></text:span></text:p>
      <text:p text:style-name="P32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education level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32"><text:span text:style-name="Strong_20_Emphasis"><text:span text:style-name="T8">Request CURL Sample</text:span>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5">curl --request GET \</text:p>
            <text:p text:style-name="P35"><text:s text:c="2"/>--url 'https://[maindomian]/api/basic/educationLevel/getAll?title=test&amp;code=123&amp;description=test&amp;offset=0&amp;limit=15&amp;sort_by=desc%28fieldName%29' \</text:p>
            <text:p text:style-name="P35"><text:s text:c="2"/>--header 'Authorization: Bearer [JWT token]'</text:p>
          </table:table-cell>
        </table:table-row>
      </table:table>
      <text:p text:style-name="P32"><text:span text:style-name="Strong_20_Emphasis"><text:span text:style-name="T9"/></text:span></text:p>
      <text:p text:style-name="P32"><text:span text:style-name="Strong_20_Emphasis"><text:span text:style-name="T8">Response Sample</text:span></text:span></text:p>
      <table:table table:name="Table14" table:style-name="Table14">
        <table:table-column table:style-name="Table14.A"/>
        <text:soft-page-break/>
        <table:table-row>
          <table:table-cell table:style-name="Table14.A1" office:value-type="string">
            <text:p text:style-name="P35">{</text:p>
            <text:p text:style-name="P35"><text:tab/>"statusCode" : 200,</text:p>
            <text:p text:style-name="P35"><text:tab/>"status" : "success",</text:p>
            <text:p text:style-name="P35"><text:tab/>"message" : "The data is returned successfully.",</text:p>
            <text:p text:style-name="P35"><text:tab/>"errorCode" : 0,</text:p>
            <text:p text:style-name="P35"><text:tab/>"data" : <text:span text:style-name="T19">[</text:span>{</text:p>
            <text:p text:style-name="P35"><text:tab/><text:tab/>"id" : 16621244611384550112, </text:p>
            <text:p text:style-name="P35"><text:tab/><text:tab/>"title" : "test",</text:p>
            <text:p text:style-name="P35"><text:tab/><text:tab/>"code" : "123",</text:p>
            <text:p text:style-name="P35"><text:tab/><text:tab/>"description" : "test",</text:p>
            <text:p text:style-name="P35"><text:tab/><text:tab/>"createdAt" : "2025-8-25 12:00:00",</text:p>
            <text:p text:style-name="P35"><text:tab/><text:tab/>"createdBy" : "John Davis" </text:p>
            <text:p text:style-name="P35"><text:tab/>}<text:span text:style-name="T19">]</text:span></text:p>
            <text:p text:style-name="P35">}</text:p>
          </table:table-cell>
        </table:table-row>
      </table:table>
      <text:p text:style-name="P32"><text:span text:style-name="Strong_20_Emphasis"/></text:p>
      <text:h text:style-name="P28" text:outline-level="2"><text:bookmark-start text:name="__RefHeading___Toc704_3019299338"/><text:span text:style-name="Strong_20_Emphasis"><text:span text:style-name="T10">Get Combo List</text:span></text:span><text:bookmark-end text:name="__RefHeading___Toc704_3019299338"/></text:h>
      <text:p text:style-name="P36"><text:span text:style-name="Strong_20_Emphasis"><text:span text:style-name="T6">Description</text:span></text:span></text:p>
      <text:p text:style-name="P36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0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education level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0">to use in combo or list form components</text:span></text:span><text:span text:style-name="Strong_20_Emphasis"><text:span text:style-name="T7">.</text:span></text:span></text:p>
      <text:p text:style-name="P36"><text:span text:style-name="Strong_20_Emphasis"><text:span text:style-name="T8">Request CURL Sample</text:span>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7">curl --request GET \</text:p>
            <text:p text:style-name="P37"><text:s text:c="2"/>--url 'https://[maindomian]/api/basic/educationLevel/getComboList' \</text:p>
            <text:p text:style-name="P37"><text:s text:c="2"/>--header 'Authorization: Bearer [JWT token]'</text:p>
          </table:table-cell>
        </table:table-row>
      </table:table>
      <text:p text:style-name="P36"><text:span text:style-name="Strong_20_Emphasis"><text:span text:style-name="T9"/></text:span></text:p>
      <text:p text:style-name="P36"><text:span text:style-name="Strong_20_Emphasis"><text:span text:style-name="T8">Response Sample</text:span>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7">{</text:p>
            <text:p text:style-name="P37"><text:tab/>"statusCode" : 200,</text:p>
            <text:p text:style-name="P37"><text:tab/>"status" : "success",</text:p>
            <text:p text:style-name="P37"><text:tab/>"message" : "The data is returned successfully.",</text:p>
            <text:p text:style-name="P37"><text:tab/>"errorCode" : 0,</text:p>
            <text:p text:style-name="P37"><text:tab/>"data" : <text:span text:style-name="T19">[</text:span>{</text:p>
            <text:p text:style-name="P37"><text:tab/><text:tab/>"id" : 16621244611384550112, </text:p>
            <text:p text:style-name="P37"><text:tab/><text:tab/>"title" : "test",</text:p>
            <text:p text:style-name="P37"><text:tab/><text:tab/>"code" : "123"</text:p>
            <text:p text:style-name="P37"><text:tab/>}<text:span text:style-name="T19">]</text:span></text:p>
            <text:p text:style-name="P37">}</text:p>
          </table:table-cell>
        </table:table-row>
      </table:table>
      <text:p text:style-name="P36"><text:soft-page-break/><text:span text:style-name="Strong_20_Emphasis"/></text:p>
      <text:h text:style-name="P38" text:outline-level="1"><text:bookmark-start text:name="__RefHeading___Toc227_771010674 Copy 1"/>Priority<text:bookmark-end text:name="__RefHeading___Toc227_771010674 Copy 1"/></text:h>
      <text:h text:style-name="P39" text:outline-level="2"><text:bookmark-start text:name="__RefHeading___Toc908_3206075736 Copy 2"/><text:span text:style-name="Strong_20_Emphasis"><text:span text:style-name="T5">Add</text:span></text:span><text:bookmark-end text:name="__RefHeading___Toc908_3206075736 Copy 2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adds a record of “</text:span></text:span><text:span text:style-name="Strong_20_Emphasis"><text:span text:style-name="T21">priority</text:span></text:span><text:span text:style-name="Strong_20_Emphasis"><text:span text:style-name="T7">” into the basic data.</text:span></text:span></text:p>
      <text:p text:style-name="P40"><text:span text:style-name="Strong_20_Emphasis"><text:span text:style-name="T8">Request CURL Sample</text:span>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41">curl --request POST \</text:p>
            <text:p text:style-name="P41"><text:s text:c="2"/>--url 'https://[maindomian]/api/basic/priority' \</text:p>
            <text:p text:style-name="P41"><text:s text:c="2"/>--header 'Authorization: Bearer [JWT token]' \</text:p>
            <text:p text:style-name="P41"><text:s text:c="2"/>--header 'content-type: application/json' \</text:p>
            <text:p text:style-name="P41"><text:s text:c="2"/>--data '{"code":"123","title":"test","color":"#FF0000","ordering":1,"decription":"test"}'</text:p>
          </table:table-cell>
        </table:table-row>
      </table:table>
      <text:p text:style-name="P40"><text:span text:style-name="Strong_20_Emphasis"><text:span text:style-name="T9"/></text:span></text:p>
      <text:p text:style-name="P40"><text:span text:style-name="Strong_20_Emphasis"><text:span text:style-name="T8">Response Sample</text:span>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added successfully."</text:p>
            <text:p text:style-name="P41"><text:tab/>"errorCode": 0,</text:p>
            <text:p text:style-name="P41"><text:tab/>"data": {</text:p>
            <text:p text:style-name="P41"><text:tab/><text:tab/>"id": 123</text:p>
            <text:p text:style-name="P41"><text:tab/>}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2081_720390006 Copy 1 Copy 1"/><text:span text:style-name="Strong_20_Emphasis"><text:span text:style-name="T10">Update</text:span></text:span><text:bookmark-end text:name="__RefHeading___Toc2081_720390006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updates a specific record of “</text:span></text:span><text:span text:style-name="Strong_20_Emphasis"><text:span text:style-name="T21">priority</text:span></text:span><text:span text:style-name="Strong_20_Emphasis"><text:span text:style-name="T7">” in the basic data.</text:span></text:span></text:p>
      <text:p text:style-name="P40"><text:span text:style-name="Strong_20_Emphasis"><text:span text:style-name="T8">Request CURL Sample</text:span>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41">curl --request PUT \</text:p>
            <text:p text:style-name="P41"><text:s text:c="2"/>--url 'https://[maindomian]/api/basic/priority/[id]' \</text:p>
            <text:p text:style-name="P41"><text:soft-page-break/><text:s text:c="2"/>--header 'Authorization: Bearer [JWT token]' \</text:p>
            <text:p text:style-name="P41"><text:s text:c="2"/>--header 'content-type: application/json' \</text:p>
            <text:p text:style-name="P41"><text:s text:c="2"/>--data '{"code":"123","title":"test","color":"#FF0000","ordering":1,"decription":"test"}'</text:p>
          </table:table-cell>
        </table:table-row>
      </table:table>
      <text:p text:style-name="P40"><text:span text:style-name="Strong_20_Emphasis"><text:span text:style-name="T9"/></text:span></text:p>
      <text:p text:style-name="P40"><text:span text:style-name="Strong_20_Emphasis"><text:span text:style-name="T8">Response Sample</text:span>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<text:span text:style-name="T10">updated</text:span> successfully."</text:p>
            <text:p text:style-name="P41"><text:tab/>"errorCode" : 0,</text:p>
            <text:p text:style-name="P41"><text:tab/>"data" : <text:span text:style-name="T11">null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908_3206075736 Copy 1 Copy 1"/><text:span text:style-name="Strong_20_Emphasis"><text:span text:style-name="T10">Delete</text:span></text:span><text:bookmark-end text:name="__RefHeading___Toc908_3206075736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21">priority</text:span></text:span><text:span text:style-name="Strong_20_Emphasis"><text:span text:style-name="T7">” from the basic data.</text:span></text:span></text:p>
      <text:p text:style-name="P40"><text:span text:style-name="Strong_20_Emphasis"><text:span text:style-name="T8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41">curl --request DELETE \</text:p>
            <text:p text:style-name="P41"><text:s text:c="2"/>--url 'https://[maindomian]/api/basic/priority/[id]' \</text:p>
            <text:p text:style-name="P41"><text:s text:c="2"/>--header 'Authorization: Bearer [JWT token]'</text:p>
          </table:table-cell>
        </table:table-row>
      </table:table>
      <text:p text:style-name="P40"><text:span text:style-name="Strong_20_Emphasis"><text:span text:style-name="T9"/></text:span></text:p>
      <text:p text:style-name="P40"><text:span text:style-name="Strong_20_Emphasis"><text:span text:style-name="T8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<text:span text:style-name="T11">deleted</text:span> successfully."</text:p>
            <text:p text:style-name="P41"><text:tab/>"errorCode" : 0,</text:p>
            <text:p text:style-name="P41"><text:tab/>"data" : <text:span text:style-name="T11">null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2079_720390006 Copy 1"/><text:soft-page-break/><text:span text:style-name="Strong_20_Emphasis"><text:span text:style-name="T10">Active</text:span></text:span><text:bookmark-end text:name="__RefHeading___Toc2079_720390006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actives a specific record of “</text:span></text:span><text:span text:style-name="Strong_20_Emphasis"><text:span text:style-name="T21">priority</text:span></text:span><text:span text:style-name="Strong_20_Emphasis"><text:span text:style-name="T7">” in the basic data.</text:span></text:span></text:p>
      <text:p text:style-name="P40"><text:span text:style-name="Strong_20_Emphasis"><text:span text:style-name="T8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41">curl --request PUT \</text:p>
            <text:p text:style-name="P41"><text:s text:c="2"/>--url 'https://[maindomian]/api/basic/priority/active/[id]' \</text:p>
            <text:p text:style-name="P41"><text:s text:c="2"/>--header 'Authorization: Bearer [JWT token]'</text:p>
          </table:table-cell>
        </table:table-row>
      </table:table>
      <text:p text:style-name="P40"><text:span text:style-name="Strong_20_Emphasis"><text:span text:style-name="T9"/></text:span></text:p>
      <text:p text:style-name="P40"><text:span text:style-name="Strong_20_Emphasis"><text:span text:style-name="T8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<text:span text:style-name="T11">activated</text:span> successfully."</text:p>
            <text:p text:style-name="P41"><text:tab/>"errorCode" : 0,</text:p>
            <text:p text:style-name="P41"><text:tab/>"data" : <text:span text:style-name="T11">null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2083_720390006 Copy 1"/><text:span text:style-name="Strong_20_Emphasis"><text:span text:style-name="T10">Inactive</text:span></text:span><text:bookmark-end text:name="__RefHeading___Toc2083_720390006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21">priority</text:span></text:span><text:span text:style-name="Strong_20_Emphasis"><text:span text:style-name="T7">” in the basic data.</text:span></text:span></text:p>
      <text:p text:style-name="P40"><text:span text:style-name="Strong_20_Emphasis"><text:span text:style-name="T8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41">curl --request PUT \</text:p>
            <text:p text:style-name="P41"><text:s text:c="2"/>--url 'https://[maindomian]/api/basic/priority/inactive/[id]' \</text:p>
            <text:p text:style-name="P41"><text:s text:c="2"/>--header 'Authorization: Bearer [JWT token]'</text:p>
          </table:table-cell>
        </table:table-row>
      </table:table>
      <text:p text:style-name="P40"><text:span text:style-name="Strong_20_Emphasis"><text:span text:style-name="T9"/></text:span></text:p>
      <text:p text:style-name="P40"><text:span text:style-name="Strong_20_Emphasis"><text:span text:style-name="T8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<text:span text:style-name="T14">in</text:span><text:span text:style-name="T11">activated</text:span> successfully."</text:p>
            <text:p text:style-name="P41"><text:tab/>"errorCode" : 0,</text:p>
            <text:p text:style-name="P41"><text:tab/>"data" : <text:span text:style-name="T11">null</text:span></text:p>
            <text:p text:style-name="P41"><text:soft-page-break/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2085_720390006 Copy 1"/><text:span text:style-name="Strong_20_Emphasis"><text:span text:style-name="T10">Fetch Specific Record</text:span></text:span><text:bookmark-end text:name="__RefHeading___Toc2085_720390006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21">priority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40"><text:span text:style-name="Strong_20_Emphasis"><text:span text:style-name="T8">Request CURL Sample</text:span>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41">curl --request GET \</text:p>
            <text:p text:style-name="P41"><text:s text:c="2"/>--url 'https://[maindomian]/api/basic/priority/[id]' \</text:p>
            <text:p text:style-name="P41"><text:s text:c="2"/>--header 'Authorization: Bearer [JWT token]'</text:p>
          </table:table-cell>
        </table:table-row>
      </table:table>
      <text:p text:style-name="P40"><text:span text:style-name="Strong_20_Emphasis"><text:span text:style-name="T9"/></text:span></text:p>
      <text:p text:style-name="P40"><text:span text:style-name="Strong_20_Emphasis"><text:span text:style-name="T8">Response Sample</text:span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data is returned successfully.",</text:p>
            <text:p text:style-name="P41"><text:tab/>"errorCode" : 0,</text:p>
            <text:p text:style-name="P41"><text:tab/>"data" : {</text:p>
            <text:p text:style-name="P41"><text:tab/><text:tab/>"id" : 16621244611384550112, </text:p>
            <text:p text:style-name="P41"><text:tab/><text:tab/>"title" : "test",</text:p>
            <text:p text:style-name="P41"><text:tab/><text:tab/>"code" : "123",</text:p>
            <text:p text:style-name="P41"><text:tab/><text:tab/>"color" : "FFFFFF",</text:p>
            <text:p text:style-name="P41"><text:tab/><text:tab/>"ordering" : 1,</text:p>
            <text:p text:style-name="P41"><text:tab/><text:tab/>"description" : "test",</text:p>
            <text:p text:style-name="P41"><text:tab/><text:tab/>"createdAt" : "2025-8-25 12:00:00",</text:p>
            <text:p text:style-name="P41"><text:tab/><text:tab/>"createdBy" : "John Davis" </text:p>
            <text:p text:style-name="P41"><text:tab/>}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702_3019299338 Copy 1"/><text:span text:style-name="Strong_20_Emphasis"><text:span text:style-name="T10">Get All Records</text:span></text:span><text:bookmark-end text:name="__RefHeading___Toc702_3019299338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22">priority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40"><text:span text:style-name="Strong_20_Emphasis"><text:span text:style-name="T8">Request CURL Sample</text:span></text:span></text:p>
      <table:table table:name="Table29" table:style-name="Table29">
        <table:table-column table:style-name="Table29.A"/>
        <text:soft-page-break/>
        <table:table-row>
          <table:table-cell table:style-name="Table29.A1" office:value-type="string">
            <text:p text:style-name="P41">curl --request GET \</text:p>
            <text:p text:style-name="P41"><text:s text:c="2"/>--url 'https://[maindomian]/api/basic/priority/getAll?title=test&amp;code=123&amp;description=test&amp;color=FFFFFF&amp;ordering=1&amp;offset=0&amp;limit=15&amp;sort_by=desc%28fieldName%29' \</text:p>
            <text:p text:style-name="P41"><text:s text:c="2"/>--header 'Authorization: Bearer [JWT token]'</text:p>
          </table:table-cell>
        </table:table-row>
      </table:table>
      <text:p text:style-name="P40"><text:span text:style-name="Strong_20_Emphasis"><text:span text:style-name="T9"/></text:span></text:p>
      <text:p text:style-name="P40"><text:span text:style-name="Strong_20_Emphasis"><text:span text:style-name="T8">Response Sample</text:span>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data is returned successfully.",</text:p>
            <text:p text:style-name="P41"><text:tab/>"errorCode" : 0,</text:p>
            <text:p text:style-name="P41"><text:tab/>"data" : <text:span text:style-name="T23">[</text:span>{</text:p>
            <text:p text:style-name="P41"><text:tab/><text:tab/>"id" : 16621244611384550112, </text:p>
            <text:p text:style-name="P41"><text:tab/><text:tab/>"title" : "test",</text:p>
            <text:p text:style-name="P41"><text:tab/><text:tab/>"code" : "123",</text:p>
            <text:p text:style-name="P41"><text:tab/><text:tab/>"color" : "FFFFFF",</text:p>
            <text:p text:style-name="P41"><text:tab/><text:tab/>"ordering" : 1,</text:p>
            <text:p text:style-name="P41"><text:tab/><text:tab/>"description" : "test",</text:p>
            <text:p text:style-name="P41"><text:tab/><text:tab/>"createdAt" : "2025-8-25 12:00:00",</text:p>
            <text:p text:style-name="P41"><text:tab/><text:tab/>"createdBy" : "John Davis" </text:p>
            <text:p text:style-name="P41"><text:tab/>}<text:span text:style-name="T23">]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704_3019299338 Copy 1"/><text:span text:style-name="Strong_20_Emphasis"><text:span text:style-name="T10">Get Combo List</text:span></text:span><text:bookmark-end text:name="__RefHeading___Toc704_3019299338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0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22">priority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0">to use in combo or list form components</text:span></text:span><text:span text:style-name="Strong_20_Emphasis"><text:span text:style-name="T7">.</text:span></text:span></text:p>
      <text:p text:style-name="P40"><text:span text:style-name="Strong_20_Emphasis"><text:span text:style-name="T8">Request CURL Sample</text:span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41">curl --request GET \</text:p>
            <text:p text:style-name="P41"><text:s text:c="2"/>--url 'https://[maindomian]/api/basic/priority/getComboList' \</text:p>
            <text:p text:style-name="P41"><text:s text:c="2"/>--header 'Authorization: Bearer [JWT token]'</text:p>
          </table:table-cell>
        </table:table-row>
      </table:table>
      <text:p text:style-name="P40"><text:span text:style-name="Strong_20_Emphasis"><text:span text:style-name="T9"/></text:span></text:p>
      <text:p text:style-name="P40"><text:span text:style-name="Strong_20_Emphasis"><text:span text:style-name="T8">Response Sample</text:span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41">{</text:p>
            <text:p text:style-name="P41"><text:soft-page-break/><text:tab/>"statusCode" : 200,</text:p>
            <text:p text:style-name="P41"><text:tab/>"status" : "success",</text:p>
            <text:p text:style-name="P41"><text:tab/>"message" : "The data is returned successfully.",</text:p>
            <text:p text:style-name="P41"><text:tab/>"errorCode" : 0,</text:p>
            <text:p text:style-name="P41"><text:tab/>"data" : <text:span text:style-name="T19">[</text:span>{</text:p>
            <text:p text:style-name="P41"><text:tab/><text:tab/>"id" : 16621244611384550112, </text:p>
            <text:p text:style-name="P41"><text:tab/><text:tab/>"title" : "test",</text:p>
            <text:p text:style-name="P41"><text:tab/><text:tab/>"code" : "123"</text:p>
            <text:p text:style-name="P41"><text:tab/>}<text:span text:style-name="T19">]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42" text:outline-level="1"><text:bookmark-start text:name="__RefHeading___Toc227_771010674 Copy 1 Copy 1"/>Issue Type<text:bookmark-end text:name="__RefHeading___Toc227_771010674 Copy 1 Copy 1"/></text:h>
      <text:h text:style-name="P43" text:outline-level="2"><text:bookmark-start text:name="__RefHeading___Toc908_3206075736 Copy 2 Copy 1"/><text:span text:style-name="Strong_20_Emphasis"><text:span text:style-name="T5">Add</text:span></text:span><text:bookmark-end text:name="__RefHeading___Toc908_3206075736 Copy 2 Copy 1"/></text:h>
      <text:p text:style-name="P44"><text:span text:style-name="Strong_20_Emphasis"><text:span text:style-name="T6">Description</text:span></text:span></text:p>
      <text:p text:style-name="P44"><text:span text:style-name="Strong_20_Emphasis"><text:span text:style-name="T7">This API adds a record of “</text:span></text:span><text:span text:style-name="Strong_20_Emphasis"><text:span text:style-name="T24">issue type</text:span></text:span><text:span text:style-name="Strong_20_Emphasis"><text:span text:style-name="T7">” into the basic data.</text:span></text:span></text:p>
      <text:p text:style-name="P44"><text:span text:style-name="Strong_20_Emphasis"><text:span text:style-name="T8">Request CURL Sample</text:span>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45">curl --request POST \</text:p>
            <text:p text:style-name="P45"><text:s text:c="2"/>--url 'https://[maindomian]/api/basic/issueType' \</text:p>
            <text:p text:style-name="P45"><text:s text:c="2"/>--header 'Authorization: Bearer [JWT token]' \</text:p>
            <text:p text:style-name="P45"><text:s text:c="2"/>--header 'content-type: application/json' \</text:p>
            <text:p text:style-name="P45"><text:s text:c="2"/>--data '{"code":"123","title":"test","color":"#FFFFFF","iconAddress":"http://127.0.0.0.1/icons/icon1.png","decription":"test"}'</text:p>
          </table:table-cell>
        </table:table-row>
      </table:table>
      <text:p text:style-name="P44"><text:span text:style-name="Strong_20_Emphasis"><text:span text:style-name="T9"/></text:span></text:p>
      <text:p text:style-name="P44"><text:span text:style-name="Strong_20_Emphasis"><text:span text:style-name="T8">Response Sample</text:span>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45">{</text:p>
            <text:p text:style-name="P45"><text:tab/>"statusCode" : 200,</text:p>
            <text:p text:style-name="P45"><text:tab/>"status" : "success",</text:p>
            <text:p text:style-name="P45"><text:tab/>"message" : "The record is added successfully."</text:p>
            <text:p text:style-name="P45"><text:tab/>"errorCode": 0,</text:p>
            <text:p text:style-name="P45"><text:tab/>"data": {</text:p>
            <text:p text:style-name="P45"><text:tab/><text:tab/>"id": 123</text:p>
            <text:p text:style-name="P45"><text:tab/>}</text:p>
            <text:p text:style-name="P45">}</text:p>
          </table:table-cell>
        </table:table-row>
      </table:table>
      <text:p text:style-name="P44"><text:span text:style-name="Strong_20_Emphasis"/></text:p>
      <text:h text:style-name="P43" text:outline-level="2"><text:bookmark-start text:name="__RefHeading___Toc2081_720390006 Copy 1 Copy 1 Copy 1"/><text:soft-page-break/><text:span text:style-name="Strong_20_Emphasis"><text:span text:style-name="T10">Update</text:span></text:span><text:bookmark-end text:name="__RefHeading___Toc2081_720390006 Copy 1 Copy 1 Copy 1"/></text:h>
      <text:p text:style-name="P44"><text:span text:style-name="Strong_20_Emphasis"><text:span text:style-name="T6">Description</text:span></text:span></text:p>
      <text:p text:style-name="P44"><text:span text:style-name="Strong_20_Emphasis"><text:span text:style-name="T7">This API updates a specific record of “</text:span></text:span><text:span text:style-name="Strong_20_Emphasis"><text:span text:style-name="T24">issue type</text:span></text:span><text:span text:style-name="Strong_20_Emphasis"><text:span text:style-name="T7">” in the basic data.</text:span></text:span></text:p>
      <text:p text:style-name="P44"><text:span text:style-name="Strong_20_Emphasis"><text:span text:style-name="T8">Request CURL Sample</text:span>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45">curl --request PUT \</text:p>
            <text:p text:style-name="P45"><text:s text:c="2"/>--url 'https://[maindomian]/api/basic/issueType/[id]' \</text:p>
            <text:p text:style-name="P45"><text:s text:c="2"/>--header 'Authorization: Bearer [JWT token]' \</text:p>
            <text:p text:style-name="P45"><text:s text:c="2"/>--header 'content-type: application/json' \</text:p>
            <text:p text:style-name="P45"><text:s text:c="2"/>--data '{"code":"123","title":"test","color":"#FFFFFF","iconAddress":"http://127.0.0.0.1/icons/icon1.png","decription":"test"}'</text:p>
          </table:table-cell>
        </table:table-row>
      </table:table>
      <text:p text:style-name="P44"><text:span text:style-name="Strong_20_Emphasis"><text:span text:style-name="T9"/></text:span></text:p>
      <text:p text:style-name="P44"><text:span text:style-name="Strong_20_Emphasis"><text:span text:style-name="T8">Response Sample</text:span>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45">{</text:p>
            <text:p text:style-name="P45"><text:tab/>"statusCode" : 200,</text:p>
            <text:p text:style-name="P45"><text:tab/>"status" : "success",</text:p>
            <text:p text:style-name="P45"><text:tab/>"message" : "The record is <text:span text:style-name="T10">updated</text:span> successfully."</text:p>
            <text:p text:style-name="P45"><text:tab/>"errorCode" : 0,</text:p>
            <text:p text:style-name="P45"><text:tab/>"data" : <text:span text:style-name="T11">null</text:span></text:p>
            <text:p text:style-name="P45">}</text:p>
          </table:table-cell>
        </table:table-row>
      </table:table>
      <text:p text:style-name="P44"><text:span text:style-name="Strong_20_Emphasis"/></text:p>
      <text:h text:style-name="P43" text:outline-level="2"><text:bookmark-start text:name="__RefHeading___Toc908_3206075736 Copy 1 Copy 1 Copy 1"/><text:span text:style-name="Strong_20_Emphasis"><text:span text:style-name="T10">Delete</text:span></text:span><text:bookmark-end text:name="__RefHeading___Toc908_3206075736 Copy 1 Copy 1 Copy 1"/></text:h>
      <text:p text:style-name="P44"><text:span text:style-name="Strong_20_Emphasis"><text:span text:style-name="T6">Description</text:span></text:span></text:p>
      <text:p text:style-name="P44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24">issue type</text:span></text:span><text:span text:style-name="Strong_20_Emphasis"><text:span text:style-name="T7">” from the basic data.</text:span></text:span></text:p>
      <text:p text:style-name="P44"><text:span text:style-name="Strong_20_Emphasis"><text:span text:style-name="T8">Request CURL Sample</text:span>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5">curl --request DELETE \</text:p>
            <text:p text:style-name="P45"><text:s text:c="2"/>--url 'https://[maindomian]/api/basic/issueType/[id]' \</text:p>
            <text:p text:style-name="P45"><text:s text:c="2"/>--header 'Authorization: Bearer [JWT token]'</text:p>
          </table:table-cell>
        </table:table-row>
      </table:table>
      <text:p text:style-name="P44"><text:span text:style-name="Strong_20_Emphasis"><text:span text:style-name="T9"/></text:span></text:p>
      <text:p text:style-name="P44"><text:span text:style-name="Strong_20_Emphasis"><text:span text:style-name="T8">Response Sample</text:span>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45">{</text:p>
            <text:p text:style-name="P45"><text:tab/>"statusCode" : 200,</text:p>
            <text:p text:style-name="P45"><text:soft-page-break/><text:tab/>"status" : "success",</text:p>
            <text:p text:style-name="P45"><text:tab/>"message" : "The record is <text:span text:style-name="T11">deleted</text:span> successfully."</text:p>
            <text:p text:style-name="P45"><text:tab/>"errorCode" : 0,</text:p>
            <text:p text:style-name="P45"><text:tab/>"data" : <text:span text:style-name="T11">null</text:span></text:p>
            <text:p text:style-name="P45">}</text:p>
          </table:table-cell>
        </table:table-row>
      </table:table>
      <text:p text:style-name="P44"><text:span text:style-name="Strong_20_Emphasis"/></text:p>
      <text:h text:style-name="P43" text:outline-level="2"><text:bookmark-start text:name="__RefHeading___Toc2079_720390006 Copy 1 Copy 1"/><text:span text:style-name="Strong_20_Emphasis"><text:span text:style-name="T10">Active</text:span></text:span><text:bookmark-end text:name="__RefHeading___Toc2079_720390006 Copy 1 Copy 1"/></text:h>
      <text:p text:style-name="P44"><text:span text:style-name="Strong_20_Emphasis"><text:span text:style-name="T6">Description</text:span></text:span></text:p>
      <text:p text:style-name="P44"><text:span text:style-name="Strong_20_Emphasis"><text:span text:style-name="T7">This API actives a specific record of “</text:span></text:span><text:span text:style-name="Strong_20_Emphasis"><text:span text:style-name="T24">issue type</text:span></text:span><text:span text:style-name="Strong_20_Emphasis"><text:span text:style-name="T7">” in the basic data.</text:span></text:span></text:p>
      <text:p text:style-name="P44"><text:span text:style-name="Strong_20_Emphasis"><text:span text:style-name="T8">Request CURL Sample</text:span>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45">curl --request PUT \</text:p>
            <text:p text:style-name="P45"><text:s text:c="2"/>--url 'https://[maindomian]/api/basic/issueType/active/[id]' \</text:p>
            <text:p text:style-name="P45"><text:s text:c="2"/>--header 'Authorization: Bearer [JWT token]'</text:p>
          </table:table-cell>
        </table:table-row>
      </table:table>
      <text:p text:style-name="P44"><text:span text:style-name="Strong_20_Emphasis"><text:span text:style-name="T9"/></text:span></text:p>
      <text:p text:style-name="P44"><text:span text:style-name="Strong_20_Emphasis"><text:span text:style-name="T8">Response Sample</text:span>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45">{</text:p>
            <text:p text:style-name="P45"><text:tab/>"statusCode" : 200,</text:p>
            <text:p text:style-name="P45"><text:tab/>"status" : "success",</text:p>
            <text:p text:style-name="P45"><text:tab/>"message" : "The record is <text:span text:style-name="T11">activated</text:span> successfully."</text:p>
            <text:p text:style-name="P45"><text:tab/>"errorCode" : 0,</text:p>
            <text:p text:style-name="P45"><text:tab/>"data" : <text:span text:style-name="T11">null</text:span></text:p>
            <text:p text:style-name="P45">}</text:p>
          </table:table-cell>
        </table:table-row>
      </table:table>
      <text:p text:style-name="P44"><text:span text:style-name="Strong_20_Emphasis"/></text:p>
      <text:h text:style-name="P43" text:outline-level="2"><text:bookmark-start text:name="__RefHeading___Toc2083_720390006 Copy 1 Copy 1"/><text:span text:style-name="Strong_20_Emphasis"><text:span text:style-name="T10">Inactive</text:span></text:span><text:bookmark-end text:name="__RefHeading___Toc2083_720390006 Copy 1 Copy 1"/></text:h>
      <text:p text:style-name="P44"><text:span text:style-name="Strong_20_Emphasis"><text:span text:style-name="T6">Description</text:span></text:span></text:p>
      <text:p text:style-name="P44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24">issue type</text:span></text:span><text:span text:style-name="Strong_20_Emphasis"><text:span text:style-name="T7">” in the basic data.</text:span></text:span></text:p>
      <text:p text:style-name="P44"><text:span text:style-name="Strong_20_Emphasis"><text:span text:style-name="T8">Request CURL Sample</text:span>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45">curl --request PUT \</text:p>
            <text:p text:style-name="P45"><text:s text:c="2"/>--url 'https://[maindomian]/api/basic/issueType/inactive/[id]' \</text:p>
            <text:p text:style-name="P45"><text:s text:c="2"/>--header 'Authorization: Bearer [JWT token]'</text:p>
          </table:table-cell>
        </table:table-row>
      </table:table>
      <text:p text:style-name="P44"><text:span text:style-name="Strong_20_Emphasis"><text:span text:style-name="T9"/></text:span></text:p>
      <text:p text:style-name="P44"><text:soft-page-break/><text:span text:style-name="Strong_20_Emphasis"><text:span text:style-name="T8">Response Sample</text:span></text:span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45">{</text:p>
            <text:p text:style-name="P45"><text:tab/>"statusCode" : 200,</text:p>
            <text:p text:style-name="P45"><text:tab/>"status" : "success",</text:p>
            <text:p text:style-name="P45"><text:tab/>"message" : "The record is <text:span text:style-name="T14">in</text:span><text:span text:style-name="T11">activated</text:span> successfully."</text:p>
            <text:p text:style-name="P45"><text:tab/>"errorCode" : 0,</text:p>
            <text:p text:style-name="P45"><text:tab/>"data" : <text:span text:style-name="T11">null</text:span></text:p>
            <text:p text:style-name="P45">}</text:p>
          </table:table-cell>
        </table:table-row>
      </table:table>
      <text:p text:style-name="P44"><text:span text:style-name="Strong_20_Emphasis"/></text:p>
      <text:h text:style-name="P43" text:outline-level="2"><text:bookmark-start text:name="__RefHeading___Toc2085_720390006 Copy 1 Copy 1"/><text:span text:style-name="Strong_20_Emphasis"><text:span text:style-name="T10">Fetch Specific Record</text:span></text:span><text:bookmark-end text:name="__RefHeading___Toc2085_720390006 Copy 1 Copy 1"/></text:h>
      <text:p text:style-name="P44"><text:span text:style-name="Strong_20_Emphasis"><text:span text:style-name="T6">Description</text:span></text:span></text:p>
      <text:p text:style-name="P44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24">issue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44"><text:span text:style-name="Strong_20_Emphasis"><text:span text:style-name="T8">Request CURL Sample</text:span>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45">curl --request GET \</text:p>
            <text:p text:style-name="P45"><text:s text:c="2"/>--url 'https://[maindomian]/api/basic/issueType/[id]' \</text:p>
            <text:p text:style-name="P45"><text:s text:c="2"/>--header 'Authorization: Bearer [JWT token]'</text:p>
          </table:table-cell>
        </table:table-row>
      </table:table>
      <text:p text:style-name="P44"><text:span text:style-name="Strong_20_Emphasis"><text:span text:style-name="T9"/></text:span></text:p>
      <text:p text:style-name="P44"><text:span text:style-name="Strong_20_Emphasis"><text:span text:style-name="T8">Response Sample</text:span>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45">{</text:p>
            <text:p text:style-name="P45"><text:tab/>"statusCode" : 200,</text:p>
            <text:p text:style-name="P45"><text:tab/>"status" : "success",</text:p>
            <text:p text:style-name="P45"><text:tab/>"message" : "The data is returned successfully.",</text:p>
            <text:p text:style-name="P45"><text:tab/>"errorCode" : 0,</text:p>
            <text:p text:style-name="P45"><text:tab/>"data" : {</text:p>
            <text:p text:style-name="P45"><text:tab/><text:tab/>"id" : 16621244611384550112, </text:p>
            <text:p text:style-name="P45"><text:tab/><text:tab/>"title" : "test",</text:p>
            <text:p text:style-name="P45"><text:tab/><text:tab/>"code" : "123",</text:p>
            <text:p text:style-name="P45"><text:tab/><text:tab/>"color" : "FFFFFF",</text:p>
            <text:p text:style-name="P45"><text:tab/><text:tab/>"description" : "test",</text:p>
            <text:p text:style-name="P45"><text:tab/><text:tab/>"createdAt" : "2025-8-25 12:00:00",</text:p>
            <text:p text:style-name="P45"><text:tab/><text:tab/>"createdBy" : "John Davis" </text:p>
            <text:p text:style-name="P45"><text:tab/>}</text:p>
            <text:p text:style-name="P45">}</text:p>
          </table:table-cell>
        </table:table-row>
      </table:table>
      <text:p text:style-name="P44"><text:span text:style-name="Strong_20_Emphasis"/></text:p>
      <text:h text:style-name="P43" text:outline-level="2"><text:bookmark-start text:name="__RefHeading___Toc702_3019299338 Copy 1 Copy 1"/><text:soft-page-break/><text:span text:style-name="Strong_20_Emphasis"><text:span text:style-name="T10">Get All Records</text:span></text:span><text:bookmark-end text:name="__RefHeading___Toc702_3019299338 Copy 1 Copy 1"/></text:h>
      <text:p text:style-name="P44"><text:span text:style-name="Strong_20_Emphasis"><text:span text:style-name="T6">Description</text:span></text:span></text:p>
      <text:p text:style-name="P44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24">issue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44"><text:span text:style-name="Strong_20_Emphasis"><text:span text:style-name="T8">Request CURL Sample</text:span>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45">curl --request GET \</text:p>
            <text:p text:style-name="P45"><text:s text:c="2"/>--url 'https://[maindomian]/api/basic/issueType/getAll?title=test&amp;code=123&amp;color=FFFFFF&amp;description=test&amp;offset=0&amp;limit=15&amp;sort_by=desc%28fieldName%29' \</text:p>
            <text:p text:style-name="P45"><text:s text:c="2"/>--header 'Authorization: Bearer [JWT token]'</text:p>
          </table:table-cell>
        </table:table-row>
      </table:table>
      <text:p text:style-name="P44"><text:span text:style-name="Strong_20_Emphasis"><text:span text:style-name="T9"/></text:span></text:p>
      <text:p text:style-name="P44"><text:span text:style-name="Strong_20_Emphasis"><text:span text:style-name="T8">Response Sample</text:span>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45">{</text:p>
            <text:p text:style-name="P45"><text:tab/>"statusCode" : 200,</text:p>
            <text:p text:style-name="P45"><text:tab/>"status" : "success",</text:p>
            <text:p text:style-name="P45"><text:tab/>"message" : "The data is returned successfully.",</text:p>
            <text:p text:style-name="P45"><text:tab/>"errorCode" : 0,</text:p>
            <text:p text:style-name="P45"><text:tab/>"data" : <text:span text:style-name="T23">[</text:span>{</text:p>
            <text:p text:style-name="P45"><text:tab/><text:tab/>"id" : 16621244611384550112, </text:p>
            <text:p text:style-name="P45"><text:tab/><text:tab/>"title" : "test",</text:p>
            <text:p text:style-name="P45"><text:tab/><text:tab/>"code" : "123",</text:p>
            <text:p text:style-name="P45"><text:tab/><text:tab/>"color" : "FFFFFF",</text:p>
            <text:p text:style-name="P45"><text:tab/><text:tab/>"description" : "test",</text:p>
            <text:p text:style-name="P45"><text:tab/><text:tab/>"createdAt" : "2025-8-25 12:00:00",</text:p>
            <text:p text:style-name="P45"><text:tab/><text:tab/>"createdBy" : "John Davis" </text:p>
            <text:p text:style-name="P45"><text:tab/>}<text:span text:style-name="T23">]</text:span></text:p>
            <text:p text:style-name="P45">}</text:p>
          </table:table-cell>
        </table:table-row>
      </table:table>
      <text:p text:style-name="P44"><text:span text:style-name="Strong_20_Emphasis"/></text:p>
      <text:h text:style-name="P43" text:outline-level="2"><text:bookmark-start text:name="__RefHeading___Toc704_3019299338 Copy 1 Copy 1"/><text:span text:style-name="Strong_20_Emphasis"><text:span text:style-name="T10">Get Combo List</text:span></text:span><text:bookmark-end text:name="__RefHeading___Toc704_3019299338 Copy 1 Copy 1"/></text:h>
      <text:p text:style-name="P44"><text:span text:style-name="Strong_20_Emphasis"><text:span text:style-name="T6">Description</text:span></text:span></text:p>
      <text:p text:style-name="P44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0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24">issue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0">to use in combo or list form components</text:span></text:span><text:span text:style-name="Strong_20_Emphasis"><text:span text:style-name="T7">.</text:span></text:span></text:p>
      <text:p text:style-name="P44"><text:span text:style-name="Strong_20_Emphasis"><text:span text:style-name="T8">Request CURL Sample</text:span></text:span>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45">curl --request GET \</text:p>
            <text:p text:style-name="P45"><text:s text:c="2"/>--url 'https://[maindomian]/api/basic/issueType/getComboList' \</text:p>
            <text:p text:style-name="P45"><text:soft-page-break/><text:s text:c="2"/>--header 'Authorization: Bearer [JWT token]'</text:p>
          </table:table-cell>
        </table:table-row>
      </table:table>
      <text:p text:style-name="P44"><text:span text:style-name="Strong_20_Emphasis"><text:span text:style-name="T9"/></text:span></text:p>
      <text:p text:style-name="P44"><text:span text:style-name="Strong_20_Emphasis"><text:span text:style-name="T8">Response Sample</text:span></text:span>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5">{</text:p>
            <text:p text:style-name="P45"><text:tab/>"statusCode" : 200,</text:p>
            <text:p text:style-name="P45"><text:tab/>"status" : "success",</text:p>
            <text:p text:style-name="P45"><text:tab/>"message" : "The data is returned successfully.",</text:p>
            <text:p text:style-name="P45"><text:tab/>"errorCode" : 0,</text:p>
            <text:p text:style-name="P45"><text:tab/>"data" : <text:span text:style-name="T19">[</text:span>{</text:p>
            <text:p text:style-name="P45"><text:tab/><text:tab/>"id" : 16621244611384550112, </text:p>
            <text:p text:style-name="P45"><text:tab/><text:tab/>"title" : "test",</text:p>
            <text:p text:style-name="P45"><text:tab/><text:tab/>"code" : "123"</text:p>
            <text:p text:style-name="P45"><text:tab/>}<text:span text:style-name="T19">]</text:span></text:p>
            <text:p text:style-name="P45">}</text:p>
          </table:table-cell>
        </table:table-row>
      </table:table>
      <text:p text:style-name="P44"><text:span text:style-name="Strong_20_Emphasis"/></text:p>
      <text:h text:style-name="P46" text:outline-level="1"><text:bookmark-start text:name="__RefHeading___Toc227_771010674 Copy 1 Copy 2"/>Status<text:bookmark-end text:name="__RefHeading___Toc227_771010674 Copy 1 Copy 2"/></text:h>
      <text:h text:style-name="P47" text:outline-level="2"><text:bookmark-start text:name="__RefHeading___Toc908_3206075736 Copy 2 Copy 2"/><text:span text:style-name="Strong_20_Emphasis"><text:span text:style-name="T5">Add</text:span></text:span><text:bookmark-end text:name="__RefHeading___Toc908_3206075736 Copy 2 Copy 2"/></text:h>
      <text:p text:style-name="P48"><text:span text:style-name="Strong_20_Emphasis"><text:span text:style-name="T6">Description</text:span></text:span></text:p>
      <text:p text:style-name="P48"><text:span text:style-name="Strong_20_Emphasis"><text:span text:style-name="T7">This API adds a record of “</text:span></text:span><text:span text:style-name="Strong_20_Emphasis"><text:span text:style-name="T25">status</text:span></text:span><text:span text:style-name="Strong_20_Emphasis"><text:span text:style-name="T7">” into the basic data.</text:span></text:span></text:p>
      <text:p text:style-name="P48"><text:span text:style-name="Strong_20_Emphasis"><text:span text:style-name="T8">Request CURL Sample</text:span></text:span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49">curl --request POST \</text:p>
            <text:p text:style-name="P49"><text:s text:c="2"/>--url 'https://[maindomian]/api/basic/status' \</text:p>
            <text:p text:style-name="P49"><text:s text:c="2"/>--header 'Authorization: Bearer [JWT token]' \</text:p>
            <text:p text:style-name="P49"><text:s text:c="2"/>--header 'content-type: application/json' \</text:p>
            <text:p text:style-name="P49"><text:s text:c="2"/>--data '{"code":"123","title":"test","color":"#FFFFFF","statusEffect":"To Do | In Progress | Done","decription":"test"}'</text:p>
          </table:table-cell>
        </table:table-row>
      </table:table>
      <text:p text:style-name="P48"><text:span text:style-name="Strong_20_Emphasis"><text:span text:style-name="T9"/></text:span></text:p>
      <text:p text:style-name="P48"><text:span text:style-name="Strong_20_Emphasis"><text:span text:style-name="T8">Response Sample</text:span></text:span>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49">{</text:p>
            <text:p text:style-name="P49"><text:tab/>"statusCode" : 200,</text:p>
            <text:p text:style-name="P49"><text:tab/>"status" : "success",</text:p>
            <text:p text:style-name="P49"><text:tab/>"message" : "The record is added successfully."</text:p>
            <text:p text:style-name="P49"><text:soft-page-break/><text:tab/>"errorCode": 0,</text:p>
            <text:p text:style-name="P49"><text:tab/>"data": {</text:p>
            <text:p text:style-name="P49"><text:tab/><text:tab/>"id": 123</text:p>
            <text:p text:style-name="P49"><text:tab/>}</text:p>
            <text:p text:style-name="P49">}</text:p>
          </table:table-cell>
        </table:table-row>
      </table:table>
      <text:p text:style-name="P48"><text:span text:style-name="Strong_20_Emphasis"/></text:p>
      <text:h text:style-name="P47" text:outline-level="2"><text:bookmark-start text:name="__RefHeading___Toc2081_720390006 Copy 1 Copy 1 Copy 2"/><text:span text:style-name="Strong_20_Emphasis"><text:span text:style-name="T10">Update</text:span></text:span><text:bookmark-end text:name="__RefHeading___Toc2081_720390006 Copy 1 Copy 1 Copy 2"/></text:h>
      <text:p text:style-name="P48"><text:span text:style-name="Strong_20_Emphasis"><text:span text:style-name="T6">Description</text:span></text:span></text:p>
      <text:p text:style-name="P48"><text:span text:style-name="Strong_20_Emphasis"><text:span text:style-name="T7">This API updates a specific record of “</text:span></text:span><text:span text:style-name="Strong_20_Emphasis"><text:span text:style-name="T25">status</text:span></text:span><text:span text:style-name="Strong_20_Emphasis"><text:span text:style-name="T7">” in the basic data.</text:span></text:span></text:p>
      <text:p text:style-name="P48"><text:span text:style-name="Strong_20_Emphasis"><text:span text:style-name="T8">Request CURL Sample</text:span></text:span>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49">curl --request PUT \</text:p>
            <text:p text:style-name="P49"><text:s text:c="2"/>--url 'https://[maindomian]/api/basic/status/[id]' \</text:p>
            <text:p text:style-name="P49"><text:s text:c="2"/>--header 'Authorization: Bearer [JWT token]' \</text:p>
            <text:p text:style-name="P49"><text:s text:c="2"/>--header 'content-type: application/json' \</text:p>
            <text:p text:style-name="P49"><text:s text:c="2"/>--data '{"code":"123","title":"test","color":"#FFFFFF","statusEffect":"To Do | In Progress | Done","decription":"test"}'</text:p>
          </table:table-cell>
        </table:table-row>
      </table:table>
      <text:p text:style-name="P48"><text:span text:style-name="Strong_20_Emphasis"><text:span text:style-name="T9"/></text:span></text:p>
      <text:p text:style-name="P48"><text:span text:style-name="Strong_20_Emphasis"><text:span text:style-name="T8">Response Sample</text:span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49">{</text:p>
            <text:p text:style-name="P49"><text:tab/>"statusCode" : 200,</text:p>
            <text:p text:style-name="P49"><text:tab/>"status" : "success",</text:p>
            <text:p text:style-name="P49"><text:tab/>"message" : "The record is <text:span text:style-name="T10">updated</text:span> successfully."</text:p>
            <text:p text:style-name="P49"><text:tab/>"errorCode" : 0,</text:p>
            <text:p text:style-name="P49"><text:tab/>"data" : <text:span text:style-name="T11">null</text:span></text:p>
            <text:p text:style-name="P49">}</text:p>
          </table:table-cell>
        </table:table-row>
      </table:table>
      <text:p text:style-name="P48"><text:span text:style-name="Strong_20_Emphasis"/></text:p>
      <text:h text:style-name="P47" text:outline-level="2"><text:bookmark-start text:name="__RefHeading___Toc908_3206075736 Copy 1 Copy 1 Copy 2"/><text:span text:style-name="Strong_20_Emphasis"><text:span text:style-name="T10">Delete</text:span></text:span><text:bookmark-end text:name="__RefHeading___Toc908_3206075736 Copy 1 Copy 1 Copy 2"/></text:h>
      <text:p text:style-name="P48"><text:span text:style-name="Strong_20_Emphasis"><text:span text:style-name="T6">Description</text:span></text:span></text:p>
      <text:p text:style-name="P48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25">status</text:span></text:span><text:span text:style-name="Strong_20_Emphasis"><text:span text:style-name="T7">” from the basic data.</text:span></text:span></text:p>
      <text:p text:style-name="P48"><text:span text:style-name="Strong_20_Emphasis"><text:span text:style-name="T8">Request CURL Sample</text:span></text:span>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49">curl --request DELETE \</text:p>
            <text:p text:style-name="P49"><text:soft-page-break/><text:s text:c="2"/>--url 'https://[maindomian]/api/basic/status/[id]' \</text:p>
            <text:p text:style-name="P49"><text:s text:c="2"/>--header 'Authorization: Bearer [JWT token]'</text:p>
          </table:table-cell>
        </table:table-row>
      </table:table>
      <text:p text:style-name="P48"><text:span text:style-name="Strong_20_Emphasis"><text:span text:style-name="T9"/></text:span></text:p>
      <text:p text:style-name="P48"><text:span text:style-name="Strong_20_Emphasis"><text:span text:style-name="T8">Response Sample</text:span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49">{</text:p>
            <text:p text:style-name="P49"><text:tab/>"statusCode" : 200,</text:p>
            <text:p text:style-name="P49"><text:tab/>"status" : "success",</text:p>
            <text:p text:style-name="P49"><text:tab/>"message" : "The record is <text:span text:style-name="T11">deleted</text:span> successfully."</text:p>
            <text:p text:style-name="P49"><text:tab/>"errorCode" : 0,</text:p>
            <text:p text:style-name="P49"><text:tab/>"data" : <text:span text:style-name="T11">null</text:span></text:p>
            <text:p text:style-name="P49">}</text:p>
          </table:table-cell>
        </table:table-row>
      </table:table>
      <text:p text:style-name="P48"><text:span text:style-name="Strong_20_Emphasis"/></text:p>
      <text:h text:style-name="P47" text:outline-level="2"><text:bookmark-start text:name="__RefHeading___Toc2079_720390006 Copy 1 Copy 2"/><text:span text:style-name="Strong_20_Emphasis"><text:span text:style-name="T10">Active</text:span></text:span><text:bookmark-end text:name="__RefHeading___Toc2079_720390006 Copy 1 Copy 2"/></text:h>
      <text:p text:style-name="P48"><text:span text:style-name="Strong_20_Emphasis"><text:span text:style-name="T6">Description</text:span></text:span></text:p>
      <text:p text:style-name="P48"><text:span text:style-name="Strong_20_Emphasis"><text:span text:style-name="T7">This API actives a specific record of “</text:span></text:span><text:span text:style-name="Strong_20_Emphasis"><text:span text:style-name="T25">status</text:span></text:span><text:span text:style-name="Strong_20_Emphasis"><text:span text:style-name="T7">” in the basic data.</text:span></text:span></text:p>
      <text:p text:style-name="P48"><text:span text:style-name="Strong_20_Emphasis"><text:span text:style-name="T8">Request CURL Sample</text:span></text:span>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49">curl --request PUT \</text:p>
            <text:p text:style-name="P49"><text:s text:c="2"/>--url 'https://[maindomian]/api/basic/status/active/[id]' \</text:p>
            <text:p text:style-name="P49"><text:s text:c="2"/>--header 'Authorization: Bearer [JWT token]'</text:p>
          </table:table-cell>
        </table:table-row>
      </table:table>
      <text:p text:style-name="P48"><text:span text:style-name="Strong_20_Emphasis"><text:span text:style-name="T9"/></text:span></text:p>
      <text:p text:style-name="P48"><text:span text:style-name="Strong_20_Emphasis"><text:span text:style-name="T8">Response Sample</text:span></text:span>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49">{</text:p>
            <text:p text:style-name="P49"><text:tab/>"statusCode" : 200,</text:p>
            <text:p text:style-name="P49"><text:tab/>"status" : "success",</text:p>
            <text:p text:style-name="P49"><text:tab/>"message" : "The record is <text:span text:style-name="T11">activated</text:span> successfully."</text:p>
            <text:p text:style-name="P49"><text:tab/>"errorCode" : 0,</text:p>
            <text:p text:style-name="P49"><text:tab/>"data" : <text:span text:style-name="T11">null</text:span></text:p>
            <text:p text:style-name="P49">}</text:p>
          </table:table-cell>
        </table:table-row>
      </table:table>
      <text:p text:style-name="P48"><text:span text:style-name="Strong_20_Emphasis"/></text:p>
      <text:h text:style-name="P47" text:outline-level="2"><text:bookmark-start text:name="__RefHeading___Toc2083_720390006 Copy 1 Copy 2"/><text:span text:style-name="Strong_20_Emphasis"><text:span text:style-name="T10">Inactive</text:span></text:span><text:bookmark-end text:name="__RefHeading___Toc2083_720390006 Copy 1 Copy 2"/></text:h>
      <text:p text:style-name="P48"><text:span text:style-name="Strong_20_Emphasis"><text:span text:style-name="T6">Description</text:span></text:span></text:p>
      <text:p text:style-name="P48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25">status</text:span></text:span><text:span text:style-name="Strong_20_Emphasis"><text:span text:style-name="T7">” in the basic data.</text:span></text:span></text:p>
      <text:p text:style-name="P48"><text:soft-page-break/><text:span text:style-name="Strong_20_Emphasis"><text:span text:style-name="T8">Request CURL Sample</text:span></text:span></text:p>
      <table:table table:name="Table57" table:style-name="Table57">
        <table:table-column table:style-name="Table57.A"/>
        <table:table-row>
          <table:table-cell table:style-name="Table57.A1" office:value-type="string">
            <text:p text:style-name="P49">curl --request PUT \</text:p>
            <text:p text:style-name="P49"><text:s text:c="2"/>--url 'https://[maindomian]/api/basic/status/inactive/[id]' \</text:p>
            <text:p text:style-name="P49"><text:s text:c="2"/>--header 'Authorization: Bearer [JWT token]'</text:p>
          </table:table-cell>
        </table:table-row>
      </table:table>
      <text:p text:style-name="P48"><text:span text:style-name="Strong_20_Emphasis"><text:span text:style-name="T9"/></text:span></text:p>
      <text:p text:style-name="P48"><text:span text:style-name="Strong_20_Emphasis"><text:span text:style-name="T8">Response Sample</text:span></text:span>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49">{</text:p>
            <text:p text:style-name="P49"><text:tab/>"statusCode" : 200,</text:p>
            <text:p text:style-name="P49"><text:tab/>"status" : "success",</text:p>
            <text:p text:style-name="P49"><text:tab/>"message" : "The record is <text:span text:style-name="T14">in</text:span><text:span text:style-name="T11">activated</text:span> successfully."</text:p>
            <text:p text:style-name="P49"><text:tab/>"errorCode" : 0,</text:p>
            <text:p text:style-name="P49"><text:tab/>"data" : <text:span text:style-name="T11">null</text:span></text:p>
            <text:p text:style-name="P49">}</text:p>
          </table:table-cell>
        </table:table-row>
      </table:table>
      <text:p text:style-name="P48"><text:span text:style-name="Strong_20_Emphasis"/></text:p>
      <text:h text:style-name="P47" text:outline-level="2"><text:bookmark-start text:name="__RefHeading___Toc2085_720390006 Copy 1 Copy 2"/><text:span text:style-name="Strong_20_Emphasis"><text:span text:style-name="T10">Fetch Specific Record</text:span></text:span><text:bookmark-end text:name="__RefHeading___Toc2085_720390006 Copy 1 Copy 2"/></text:h>
      <text:p text:style-name="P48"><text:span text:style-name="Strong_20_Emphasis"><text:span text:style-name="T6">Description</text:span></text:span></text:p>
      <text:p text:style-name="P48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26">status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48"><text:span text:style-name="Strong_20_Emphasis"><text:span text:style-name="T8">Request CURL Sample</text:span></text:span>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49">curl --request GET \</text:p>
            <text:p text:style-name="P49"><text:s text:c="2"/>--url 'https://[maindomian]/api/basic/status/[id]' \</text:p>
            <text:p text:style-name="P49"><text:s text:c="2"/>--header 'Authorization: Bearer [JWT token]'</text:p>
          </table:table-cell>
        </table:table-row>
      </table:table>
      <text:p text:style-name="P48"><text:span text:style-name="Strong_20_Emphasis"><text:span text:style-name="T9"/></text:span></text:p>
      <text:p text:style-name="P48"><text:span text:style-name="Strong_20_Emphasis"><text:span text:style-name="T8">Response Sample</text:span></text:span>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9">{</text:p>
            <text:p text:style-name="P49"><text:tab/>"statusCode" : 200,</text:p>
            <text:p text:style-name="P49"><text:tab/>"status" : "success",</text:p>
            <text:p text:style-name="P49"><text:tab/>"message" : "The data is returned successfully.",</text:p>
            <text:p text:style-name="P49"><text:tab/>"errorCode" : 0,</text:p>
            <text:p text:style-name="P49"><text:tab/>"data" : {</text:p>
            <text:p text:style-name="P49"><text:tab/><text:tab/>"id" : 16621244611384550112, </text:p>
            <text:p text:style-name="P49"><text:tab/><text:tab/>"title" : "test",</text:p>
            <text:p text:style-name="P49"><text:tab/><text:tab/>"code" : "123",</text:p>
            <text:p text:style-name="P49"><text:tab/><text:tab/>"color" : "FFFFFF",</text:p>
            <text:p text:style-name="P50"><text:tab/><text:tab/>"statusEffect" : "<text:span text:style-name="T27">In Progress</text:span>",</text:p>
            <text:p text:style-name="P49"><text:soft-page-break/><text:tab/><text:tab/>"description" : "test",</text:p>
            <text:p text:style-name="P49"><text:tab/><text:tab/>"createdAt" : "2025-8-25 12:00:00",</text:p>
            <text:p text:style-name="P49"><text:tab/><text:tab/>"createdBy" : "John Davis" </text:p>
            <text:p text:style-name="P49"><text:tab/>}</text:p>
            <text:p text:style-name="P49">}</text:p>
          </table:table-cell>
        </table:table-row>
      </table:table>
      <text:p text:style-name="P48"><text:span text:style-name="Strong_20_Emphasis"/></text:p>
      <text:h text:style-name="P47" text:outline-level="2"><text:bookmark-start text:name="__RefHeading___Toc702_3019299338 Copy 1 Copy 2"/><text:span text:style-name="Strong_20_Emphasis"><text:span text:style-name="T10">Get All Records</text:span></text:span><text:bookmark-end text:name="__RefHeading___Toc702_3019299338 Copy 1 Copy 2"/></text:h>
      <text:p text:style-name="P48"><text:span text:style-name="Strong_20_Emphasis"><text:span text:style-name="T6">Description</text:span></text:span></text:p>
      <text:p text:style-name="P48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26">status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48"><text:span text:style-name="Strong_20_Emphasis"><text:span text:style-name="T8">Request CURL Sample</text:span></text:span></text:p>
      <table:table table:name="Table61" table:style-name="Table61">
        <table:table-column table:style-name="Table61.A"/>
        <table:table-row>
          <table:table-cell table:style-name="Table61.A1" office:value-type="string">
            <text:p text:style-name="P49">curl --request GET \</text:p>
            <text:p text:style-name="P49"><text:s text:c="2"/>--url 'https://[maindomian]/api/basic/status/getAll?title=test&amp;code=123&amp;color=FFFFFF&amp;statusEffect=To+Do%2FIn+Progress%2FDone&amp;description=test&amp;offset=0&amp;limit=15&amp;sort_by=desc%28fieldName%29' \</text:p>
            <text:p text:style-name="P49"><text:s text:c="2"/>--header 'Authorization: Bearer [JWT token]'</text:p>
          </table:table-cell>
        </table:table-row>
      </table:table>
      <text:p text:style-name="P48"><text:span text:style-name="Strong_20_Emphasis"><text:span text:style-name="T9"/></text:span></text:p>
      <text:p text:style-name="P48"><text:span text:style-name="Strong_20_Emphasis"><text:span text:style-name="T8">Response Sample</text:span></text:span>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49">{</text:p>
            <text:p text:style-name="P49"><text:tab/>"statusCode" : 200,</text:p>
            <text:p text:style-name="P49"><text:tab/>"status" : "success",</text:p>
            <text:p text:style-name="P49"><text:tab/>"message" : "The data is returned successfully.",</text:p>
            <text:p text:style-name="P49"><text:tab/>"errorCode" : 0,</text:p>
            <text:p text:style-name="P49"><text:tab/>"data" : <text:span text:style-name="T23">[</text:span>{</text:p>
            <text:p text:style-name="P49"><text:tab/><text:tab/>"id" : 16621244611384550112, </text:p>
            <text:p text:style-name="P49"><text:tab/><text:tab/>"title" : "test",</text:p>
            <text:p text:style-name="P49"><text:tab/><text:tab/>"code" : "123",</text:p>
            <text:p text:style-name="P49"><text:tab/><text:tab/>"color" : "FFFFFF",</text:p>
            <text:p text:style-name="P50"><text:tab/><text:tab/>"statusEffect" : "<text:span text:style-name="T27">In Progress</text:span>",</text:p>
            <text:p text:style-name="P49"><text:tab/><text:tab/>"description" : "test",</text:p>
            <text:p text:style-name="P49"><text:tab/><text:tab/>"createdAt" : "2025-8-25 12:00:00",</text:p>
            <text:p text:style-name="P49"><text:tab/><text:tab/>"createdBy" : "John Davis" </text:p>
            <text:p text:style-name="P49"><text:tab/>}<text:span text:style-name="T23">]</text:span></text:p>
            <text:p text:style-name="P49">}</text:p>
          </table:table-cell>
        </table:table-row>
      </table:table>
      <text:p text:style-name="P48"><text:span text:style-name="Strong_20_Emphasis"/></text:p>
      <text:h text:style-name="P47" text:outline-level="2"><text:bookmark-start text:name="__RefHeading___Toc704_3019299338 Copy 1 Copy 2"/><text:soft-page-break/><text:span text:style-name="Strong_20_Emphasis"><text:span text:style-name="T10">Get Combo List</text:span></text:span><text:bookmark-end text:name="__RefHeading___Toc704_3019299338 Copy 1 Copy 2"/></text:h>
      <text:p text:style-name="P48"><text:span text:style-name="Strong_20_Emphasis"><text:span text:style-name="T6">Description</text:span></text:span></text:p>
      <text:p text:style-name="P48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0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26">status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0">to use in combo or list form components</text:span></text:span><text:span text:style-name="Strong_20_Emphasis"><text:span text:style-name="T7">.</text:span></text:span></text:p>
      <text:p text:style-name="P48"><text:span text:style-name="Strong_20_Emphasis"><text:span text:style-name="T8">Request CURL Sample</text:span></text:span>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49">curl --request GET \</text:p>
            <text:p text:style-name="P49"><text:s text:c="2"/>--url 'https://[maindomian]/api/basic/status/getComboList' \</text:p>
            <text:p text:style-name="P49"><text:s text:c="2"/>--header 'Authorization: Bearer [JWT token]'</text:p>
          </table:table-cell>
        </table:table-row>
      </table:table>
      <text:p text:style-name="P48"><text:span text:style-name="Strong_20_Emphasis"><text:span text:style-name="T9"/></text:span></text:p>
      <text:p text:style-name="P48"><text:span text:style-name="Strong_20_Emphasis"><text:span text:style-name="T8">Response Sample</text:span></text:span>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49">{</text:p>
            <text:p text:style-name="P49"><text:tab/>"statusCode" : 200,</text:p>
            <text:p text:style-name="P49"><text:tab/>"status" : "success",</text:p>
            <text:p text:style-name="P49"><text:tab/>"message" : "The data is returned successfully.",</text:p>
            <text:p text:style-name="P49"><text:tab/>"errorCode" : 0,</text:p>
            <text:p text:style-name="P49"><text:tab/>"data" : <text:span text:style-name="T19">[</text:span>{</text:p>
            <text:p text:style-name="P49"><text:tab/><text:tab/>"id" : 16621244611384550112, </text:p>
            <text:p text:style-name="P49"><text:tab/><text:tab/>"title" : "test",</text:p>
            <text:p text:style-name="P49"><text:tab/><text:tab/>"code" : "123"</text:p>
            <text:p text:style-name="P49"><text:tab/>}<text:span text:style-name="T19">]</text:span></text:p>
            <text:p text:style-name="P49">}</text:p>
          </table:table-cell>
        </table:table-row>
      </table:table>
      <text:p text:style-name="P48"><text:span text:style-name="Strong_20_Emphasis"/></text:p>
      <text:h text:style-name="P51" text:outline-level="1"><text:bookmark-start text:name="__RefHeading___Toc227_771010674 Copy 1 Copy 2 Copy 1"/>Resol<text:span text:style-name="T28">u</text:span>tion<text:bookmark-end text:name="__RefHeading___Toc227_771010674 Copy 1 Copy 2 Copy 1"/></text:h>
      <text:h text:style-name="P52" text:outline-level="2"><text:bookmark-start text:name="__RefHeading___Toc908_3206075736 Copy 2 Copy 2 Copy 1"/><text:span text:style-name="Strong_20_Emphasis"><text:span text:style-name="T5">Add</text:span></text:span><text:bookmark-end text:name="__RefHeading___Toc908_3206075736 Copy 2 Copy 2 Copy 1"/></text:h>
      <text:p text:style-name="P53"><text:span text:style-name="Strong_20_Emphasis"><text:span text:style-name="T6">Description</text:span></text:span></text:p>
      <text:p text:style-name="P53"><text:span text:style-name="Strong_20_Emphasis"><text:span text:style-name="T7">This API adds a record of “</text:span></text:span><text:span text:style-name="Strong_20_Emphasis"><text:span text:style-name="T29">resol</text:span></text:span><text:span text:style-name="Strong_20_Emphasis"><text:span text:style-name="T30">u</text:span></text:span><text:span text:style-name="Strong_20_Emphasis"><text:span text:style-name="T29">tion</text:span></text:span><text:span text:style-name="Strong_20_Emphasis"><text:span text:style-name="T7">” into the basic data.</text:span></text:span></text:p>
      <text:p text:style-name="P53"><text:span text:style-name="Strong_20_Emphasis"><text:span text:style-name="T8">Request CURL Sample</text:span></text:span></text:p>
      <table:table table:name="Table65" table:style-name="Table65">
        <table:table-column table:style-name="Table65.A"/>
        <table:table-row>
          <table:table-cell table:style-name="Table65.A1" office:value-type="string">
            <text:p text:style-name="P54">curl --request POST \</text:p>
            <text:p text:style-name="P54"><text:s text:c="2"/>--url 'https://[maindomian]/api/basic/resolution' \</text:p>
            <text:p text:style-name="P54"><text:s text:c="2"/>--header 'Authorization: Bearer [JWT token]' \</text:p>
            <text:p text:style-name="P54"><text:s text:c="2"/>--header 'content-type: application/json' \</text:p>
            <text:p text:style-name="P54"><text:s text:c="2"/>--data <text:soft-page-break/>'{"code":"123","title":"test","color":"#FFFFFF","isResolved":true,"decription":"test"}'</text:p>
          </table:table-cell>
        </table:table-row>
      </table:table>
      <text:p text:style-name="P53"><text:span text:style-name="Strong_20_Emphasis"><text:span text:style-name="T9"/></text:span></text:p>
      <text:p text:style-name="P53"><text:span text:style-name="Strong_20_Emphasis"><text:span text:style-name="T8">Response Sample</text:span></text:span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4">{</text:p>
            <text:p text:style-name="P54"><text:tab/>"statusCode" : 200,</text:p>
            <text:p text:style-name="P54"><text:tab/>"status" : "success",</text:p>
            <text:p text:style-name="P54"><text:tab/>"message" : "The record is added successfully."</text:p>
            <text:p text:style-name="P54"><text:tab/>"errorCode": 0,</text:p>
            <text:p text:style-name="P54"><text:tab/>"data": {</text:p>
            <text:p text:style-name="P54"><text:tab/><text:tab/>"id": 123</text:p>
            <text:p text:style-name="P54"><text:tab/>}</text:p>
            <text:p text:style-name="P54">}</text:p>
          </table:table-cell>
        </table:table-row>
      </table:table>
      <text:p text:style-name="P53"><text:span text:style-name="Strong_20_Emphasis"/></text:p>
      <text:h text:style-name="P52" text:outline-level="2"><text:bookmark-start text:name="__RefHeading___Toc2081_720390006 Copy 1 Copy 1 Copy 2 Copy 1"/><text:span text:style-name="Strong_20_Emphasis"><text:span text:style-name="T10">Update</text:span></text:span><text:bookmark-end text:name="__RefHeading___Toc2081_720390006 Copy 1 Copy 1 Copy 2 Copy 1"/></text:h>
      <text:p text:style-name="P53"><text:span text:style-name="Strong_20_Emphasis"><text:span text:style-name="T6">Description</text:span></text:span></text:p>
      <text:p text:style-name="P53"><text:span text:style-name="Strong_20_Emphasis"><text:span text:style-name="T7">This API updates a specific record of “</text:span></text:span><text:span text:style-name="Strong_20_Emphasis"><text:span text:style-name="T29">resol</text:span></text:span><text:span text:style-name="Strong_20_Emphasis"><text:span text:style-name="T30">u</text:span></text:span><text:span text:style-name="Strong_20_Emphasis"><text:span text:style-name="T29">tion</text:span></text:span><text:span text:style-name="Strong_20_Emphasis"><text:span text:style-name="T7">” in the basic data.</text:span></text:span></text:p>
      <text:p text:style-name="P53"><text:span text:style-name="Strong_20_Emphasis"><text:span text:style-name="T8">Request CURL Sample</text:span></text:span>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54">curl --request PUT \</text:p>
            <text:p text:style-name="P54"><text:s text:c="2"/>--url 'https://[maindomian]/api/basic/resolution/[id]' \</text:p>
            <text:p text:style-name="P54"><text:s text:c="2"/>--header 'Authorization: Bearer [JWT token]' \</text:p>
            <text:p text:style-name="P54"><text:s text:c="2"/>--header 'content-type: application/json' \</text:p>
            <text:p text:style-name="P54"><text:s text:c="2"/>--data '{"code":"123","title":"test","color":"#FFFFFF","isResolved":true,"decription":"test"}'</text:p>
          </table:table-cell>
        </table:table-row>
      </table:table>
      <text:p text:style-name="P53"><text:span text:style-name="Strong_20_Emphasis"><text:span text:style-name="T9"/></text:span></text:p>
      <text:p text:style-name="P53"><text:span text:style-name="Strong_20_Emphasis"><text:span text:style-name="T8">Response Sample</text:span></text:span>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54">{</text:p>
            <text:p text:style-name="P54"><text:tab/>"statusCode" : 200,</text:p>
            <text:p text:style-name="P54"><text:tab/>"status" : "success",</text:p>
            <text:p text:style-name="P54"><text:tab/>"message" : "The record is <text:span text:style-name="T10">updated</text:span> successfully."</text:p>
            <text:p text:style-name="P54"><text:tab/>"errorCode" : 0,</text:p>
            <text:p text:style-name="P54"><text:tab/>"data" : <text:span text:style-name="T11">null</text:span></text:p>
            <text:p text:style-name="P54">}</text:p>
          </table:table-cell>
        </table:table-row>
      </table:table>
      <text:p text:style-name="P53"><text:span text:style-name="Strong_20_Emphasis"/></text:p>
      <text:h text:style-name="P52" text:outline-level="2"><text:bookmark-start text:name="__RefHeading___Toc908_3206075736 Copy 1 Copy 1 Copy 2 Copy 1"/><text:soft-page-break/><text:span text:style-name="Strong_20_Emphasis"><text:span text:style-name="T10">Delete</text:span></text:span><text:bookmark-end text:name="__RefHeading___Toc908_3206075736 Copy 1 Copy 1 Copy 2 Copy 1"/></text:h>
      <text:p text:style-name="P53"><text:span text:style-name="Strong_20_Emphasis"><text:span text:style-name="T6">Description</text:span></text:span></text:p>
      <text:p text:style-name="P53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29">resol</text:span></text:span><text:span text:style-name="Strong_20_Emphasis"><text:span text:style-name="T30">u</text:span></text:span><text:span text:style-name="Strong_20_Emphasis"><text:span text:style-name="T29">tion</text:span></text:span><text:span text:style-name="Strong_20_Emphasis"><text:span text:style-name="T7">” from the basic data.</text:span></text:span></text:p>
      <text:p text:style-name="P53"><text:span text:style-name="Strong_20_Emphasis"><text:span text:style-name="T8">Request CURL Sample</text:span></text:span>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54">curl --request DELETE \</text:p>
            <text:p text:style-name="P54"><text:s text:c="2"/>--url 'https://[maindomian]/api/basic/resolution/[id]' \</text:p>
            <text:p text:style-name="P54"><text:s text:c="2"/>--header 'Authorization: Bearer [JWT token]'</text:p>
          </table:table-cell>
        </table:table-row>
      </table:table>
      <text:p text:style-name="P53"><text:span text:style-name="Strong_20_Emphasis"><text:span text:style-name="T9"/></text:span></text:p>
      <text:p text:style-name="P53"><text:span text:style-name="Strong_20_Emphasis"><text:span text:style-name="T8">Response Sample</text:span></text:span>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54">{</text:p>
            <text:p text:style-name="P54"><text:tab/>"statusCode" : 200,</text:p>
            <text:p text:style-name="P54"><text:tab/>"status" : "success",</text:p>
            <text:p text:style-name="P54"><text:tab/>"message" : "The record is <text:span text:style-name="T11">deleted</text:span> successfully."</text:p>
            <text:p text:style-name="P54"><text:tab/>"errorCode" : 0,</text:p>
            <text:p text:style-name="P54"><text:tab/>"data" : <text:span text:style-name="T11">null</text:span></text:p>
            <text:p text:style-name="P54">}</text:p>
          </table:table-cell>
        </table:table-row>
      </table:table>
      <text:p text:style-name="P53"><text:span text:style-name="Strong_20_Emphasis"/></text:p>
      <text:h text:style-name="P52" text:outline-level="2"><text:bookmark-start text:name="__RefHeading___Toc2079_720390006 Copy 1 Copy 2 Copy 1"/><text:span text:style-name="Strong_20_Emphasis"><text:span text:style-name="T10">Active</text:span></text:span><text:bookmark-end text:name="__RefHeading___Toc2079_720390006 Copy 1 Copy 2 Copy 1"/></text:h>
      <text:p text:style-name="P53"><text:span text:style-name="Strong_20_Emphasis"><text:span text:style-name="T6">Description</text:span></text:span></text:p>
      <text:p text:style-name="P53"><text:span text:style-name="Strong_20_Emphasis"><text:span text:style-name="T7">This API actives a specific record of “</text:span></text:span><text:span text:style-name="Strong_20_Emphasis"><text:span text:style-name="T29">resol</text:span></text:span><text:span text:style-name="Strong_20_Emphasis"><text:span text:style-name="T30">u</text:span></text:span><text:span text:style-name="Strong_20_Emphasis"><text:span text:style-name="T29">tion</text:span></text:span><text:span text:style-name="Strong_20_Emphasis"><text:span text:style-name="T7">” in the basic data.</text:span></text:span></text:p>
      <text:p text:style-name="P53"><text:span text:style-name="Strong_20_Emphasis"><text:span text:style-name="T8">Request CURL Sample</text:span></text:span>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P54">curl --request PUT \</text:p>
            <text:p text:style-name="P54"><text:s text:c="2"/>--url 'https://[maindomian]/api/basic/resolution/active/[id]' \</text:p>
            <text:p text:style-name="P54"><text:s text:c="2"/>--header 'Authorization: Bearer [JWT token]'</text:p>
          </table:table-cell>
        </table:table-row>
      </table:table>
      <text:p text:style-name="P53"><text:span text:style-name="Strong_20_Emphasis"><text:span text:style-name="T9"/></text:span></text:p>
      <text:p text:style-name="P53"><text:span text:style-name="Strong_20_Emphasis"><text:span text:style-name="T8">Response Sample</text:span></text:span>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54">{</text:p>
            <text:p text:style-name="P54"><text:tab/>"statusCode" : 200,</text:p>
            <text:p text:style-name="P54"><text:tab/>"status" : "success",</text:p>
            <text:p text:style-name="P54"><text:tab/>"message" : "The record is <text:span text:style-name="T11">activated</text:span> successfully."</text:p>
            <text:p text:style-name="P54"><text:tab/>"errorCode" : 0,</text:p>
            <text:p text:style-name="P54"><text:tab/>"data" : <text:span text:style-name="T11">null</text:span></text:p>
            <text:p text:style-name="P54"><text:soft-page-break/>}</text:p>
          </table:table-cell>
        </table:table-row>
      </table:table>
      <text:p text:style-name="P53"><text:span text:style-name="Strong_20_Emphasis"/></text:p>
      <text:h text:style-name="P52" text:outline-level="2"><text:bookmark-start text:name="__RefHeading___Toc2083_720390006 Copy 1 Copy 2 Copy 1"/><text:span text:style-name="Strong_20_Emphasis"><text:span text:style-name="T10">Inactive</text:span></text:span><text:bookmark-end text:name="__RefHeading___Toc2083_720390006 Copy 1 Copy 2 Copy 1"/></text:h>
      <text:p text:style-name="P53"><text:span text:style-name="Strong_20_Emphasis"><text:span text:style-name="T6">Description</text:span></text:span></text:p>
      <text:p text:style-name="P53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29">resol</text:span></text:span><text:span text:style-name="Strong_20_Emphasis"><text:span text:style-name="T30">u</text:span></text:span><text:span text:style-name="Strong_20_Emphasis"><text:span text:style-name="T29">tion</text:span></text:span><text:span text:style-name="Strong_20_Emphasis"><text:span text:style-name="T7">” in the basic data.</text:span></text:span></text:p>
      <text:p text:style-name="P53"><text:span text:style-name="Strong_20_Emphasis"><text:span text:style-name="T8">Request CURL Sample</text:span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54">curl --request PUT \</text:p>
            <text:p text:style-name="P54"><text:s text:c="2"/>--url 'https://[maindomian]/api/basic/resolution/inactive/[id]' \</text:p>
            <text:p text:style-name="P54"><text:s text:c="2"/>--header 'Authorization: Bearer [JWT token]'</text:p>
          </table:table-cell>
        </table:table-row>
      </table:table>
      <text:p text:style-name="P53"><text:span text:style-name="Strong_20_Emphasis"><text:span text:style-name="T9"/></text:span></text:p>
      <text:p text:style-name="P53"><text:span text:style-name="Strong_20_Emphasis"><text:span text:style-name="T8">Response Sample</text:span></text:span>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54">{</text:p>
            <text:p text:style-name="P54"><text:tab/>"statusCode" : 200,</text:p>
            <text:p text:style-name="P54"><text:tab/>"status" : "success",</text:p>
            <text:p text:style-name="P54"><text:tab/>"message" : "The record is <text:span text:style-name="T14">in</text:span><text:span text:style-name="T11">activated</text:span> successfully."</text:p>
            <text:p text:style-name="P54"><text:tab/>"errorCode" : 0,</text:p>
            <text:p text:style-name="P54"><text:tab/>"data" : <text:span text:style-name="T11">null</text:span></text:p>
            <text:p text:style-name="P54">}</text:p>
          </table:table-cell>
        </table:table-row>
      </table:table>
      <text:p text:style-name="P53"><text:span text:style-name="Strong_20_Emphasis"/></text:p>
      <text:h text:style-name="P52" text:outline-level="2"><text:bookmark-start text:name="__RefHeading___Toc2085_720390006 Copy 1 Copy 2 Copy 1"/><text:span text:style-name="Strong_20_Emphasis"><text:span text:style-name="T10">Fetch Specific Record</text:span></text:span><text:bookmark-end text:name="__RefHeading___Toc2085_720390006 Copy 1 Copy 2 Copy 1"/></text:h>
      <text:p text:style-name="P53"><text:span text:style-name="Strong_20_Emphasis"><text:span text:style-name="T6">Description</text:span></text:span></text:p>
      <text:p text:style-name="P53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29">resol</text:span></text:span><text:span text:style-name="Strong_20_Emphasis"><text:span text:style-name="T30">u</text:span></text:span><text:span text:style-name="Strong_20_Emphasis"><text:span text:style-name="T29">tion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53"><text:span text:style-name="Strong_20_Emphasis"><text:span text:style-name="T8">Request CURL Sample</text:span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54">curl --request GET \</text:p>
            <text:p text:style-name="P54"><text:s text:c="2"/>--url 'https://[maindomian]/api/basic/resolution/[id]' \</text:p>
            <text:p text:style-name="P54"><text:s text:c="2"/>--header 'Authorization: Bearer [JWT token]'</text:p>
          </table:table-cell>
        </table:table-row>
      </table:table>
      <text:p text:style-name="P53"><text:span text:style-name="Strong_20_Emphasis"><text:span text:style-name="T9"/></text:span></text:p>
      <text:p text:style-name="P53"><text:span text:style-name="Strong_20_Emphasis"><text:span text:style-name="T8">Response Sample</text:span></text:span></text:p>
      <table:table table:name="Table76" table:style-name="Table76">
        <table:table-column table:style-name="Table76.A"/>
        <table:table-row>
          <table:table-cell table:style-name="Table76.A1" office:value-type="string">
            <text:p text:style-name="P54">{</text:p>
            <text:p text:style-name="P54"><text:tab/>"statusCode" : 200,</text:p>
            <text:p text:style-name="P54"><text:soft-page-break/><text:tab/>"status" : "success",</text:p>
            <text:p text:style-name="P54"><text:tab/>"message" : "The data is returned successfully.",</text:p>
            <text:p text:style-name="P54"><text:tab/>"errorCode" : 0,</text:p>
            <text:p text:style-name="P54"><text:tab/>"data" : {</text:p>
            <text:p text:style-name="P54"><text:tab/><text:tab/>"id" : 16621244611384550112, </text:p>
            <text:p text:style-name="P54"><text:tab/><text:tab/>"title" : "test",</text:p>
            <text:p text:style-name="P54"><text:tab/><text:tab/>"code" : "123",</text:p>
            <text:p text:style-name="P54"><text:tab/><text:tab/>"color" : "FFFFFF",</text:p>
            <text:p text:style-name="P54"><text:tab/><text:tab/>"isResolved" : true,</text:p>
            <text:p text:style-name="P54"><text:tab/><text:tab/>"description" : "test",</text:p>
            <text:p text:style-name="P54"><text:tab/><text:tab/>"createdAt" : "2025-8-25 12:00:00",</text:p>
            <text:p text:style-name="P54"><text:tab/><text:tab/>"createdBy" : "John Davis" </text:p>
            <text:p text:style-name="P54"><text:tab/>}</text:p>
            <text:p text:style-name="P54">}</text:p>
          </table:table-cell>
        </table:table-row>
      </table:table>
      <text:p text:style-name="P53"><text:span text:style-name="Strong_20_Emphasis"/></text:p>
      <text:h text:style-name="P52" text:outline-level="2"><text:bookmark-start text:name="__RefHeading___Toc702_3019299338 Copy 1 Copy 2 Copy 1"/><text:span text:style-name="Strong_20_Emphasis"><text:span text:style-name="T10">Get All Records</text:span></text:span><text:bookmark-end text:name="__RefHeading___Toc702_3019299338 Copy 1 Copy 2 Copy 1"/></text:h>
      <text:p text:style-name="P53"><text:span text:style-name="Strong_20_Emphasis"><text:span text:style-name="T6">Description</text:span></text:span></text:p>
      <text:p text:style-name="P53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29">resol</text:span></text:span><text:span text:style-name="Strong_20_Emphasis"><text:span text:style-name="T30">u</text:span></text:span><text:span text:style-name="Strong_20_Emphasis"><text:span text:style-name="T29">tion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53"><text:span text:style-name="Strong_20_Emphasis"><text:span text:style-name="T8">Request CURL Sample</text:span></text:span></text:p>
      <table:table table:name="Table77" table:style-name="Table77">
        <table:table-column table:style-name="Table77.A"/>
        <table:table-row>
          <table:table-cell table:style-name="Table77.A1" office:value-type="string">
            <text:p text:style-name="P54">curl --request GET \</text:p>
            <text:p text:style-name="P54"><text:s text:c="2"/>--url 'https://[maindomian]/api/basic/resolution/getAll?title=test&amp;code=123&amp;color=FFFFFF&amp;isResolved=true%2Ffalse&amp;description=test&amp;offset=0&amp;limit=15&amp;sort_by=desc%28fieldName%29' \</text:p>
            <text:p text:style-name="P54"><text:s text:c="2"/>--header 'Authorization: Bearer [JWT token]'</text:p>
          </table:table-cell>
        </table:table-row>
      </table:table>
      <text:p text:style-name="P53"><text:span text:style-name="Strong_20_Emphasis"><text:span text:style-name="T9"/></text:span></text:p>
      <text:p text:style-name="P53"><text:span text:style-name="Strong_20_Emphasis"><text:span text:style-name="T8">Response Sample</text:span></text:span>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54">{</text:p>
            <text:p text:style-name="P54"><text:tab/>"statusCode" : 200,</text:p>
            <text:p text:style-name="P54"><text:tab/>"status" : "success",</text:p>
            <text:p text:style-name="P54"><text:tab/>"message" : "The data is returned successfully.",</text:p>
            <text:p text:style-name="P54"><text:tab/>"errorCode" : 0,</text:p>
            <text:p text:style-name="P54"><text:tab/>"data" : <text:span text:style-name="T23">[</text:span>{</text:p>
            <text:p text:style-name="P54"><text:tab/><text:tab/>"id" : 16621244611384550112, </text:p>
            <text:p text:style-name="P54"><text:tab/><text:tab/>"title" : "test",</text:p>
            <text:p text:style-name="P54"><text:tab/><text:tab/>"code" : "123",</text:p>
            <text:p text:style-name="P54"><text:tab/><text:tab/>"color" : "FFFFFF",</text:p>
            <text:p text:style-name="P54"><text:soft-page-break/><text:tab/><text:tab/>"isResolved" : true,</text:p>
            <text:p text:style-name="P54"><text:tab/><text:tab/>"description" : "test",</text:p>
            <text:p text:style-name="P54"><text:tab/><text:tab/>"createdAt" : "2025-8-25 12:00:00",</text:p>
            <text:p text:style-name="P54"><text:tab/><text:tab/>"createdBy" : "John Davis" </text:p>
            <text:p text:style-name="P54"><text:tab/>}<text:span text:style-name="T23">]</text:span></text:p>
            <text:p text:style-name="P54">}</text:p>
          </table:table-cell>
        </table:table-row>
      </table:table>
      <text:p text:style-name="P53"><text:span text:style-name="Strong_20_Emphasis"/></text:p>
      <text:h text:style-name="P52" text:outline-level="2"><text:bookmark-start text:name="__RefHeading___Toc704_3019299338 Copy 1 Copy 2 Copy 1"/><text:span text:style-name="Strong_20_Emphasis"><text:span text:style-name="T10">Get Combo List</text:span></text:span><text:bookmark-end text:name="__RefHeading___Toc704_3019299338 Copy 1 Copy 2 Copy 1"/></text:h>
      <text:p text:style-name="P53"><text:span text:style-name="Strong_20_Emphasis"><text:span text:style-name="T6">Description</text:span></text:span></text:p>
      <text:p text:style-name="P53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0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1">resol</text:span></text:span><text:span text:style-name="Strong_20_Emphasis"><text:span text:style-name="T30">u</text:span></text:span><text:span text:style-name="Strong_20_Emphasis"><text:span text:style-name="T31">tion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0">to use in combo or list form components</text:span></text:span><text:span text:style-name="Strong_20_Emphasis"><text:span text:style-name="T7">.</text:span></text:span></text:p>
      <text:p text:style-name="P53"><text:span text:style-name="Strong_20_Emphasis"><text:span text:style-name="T8">Request CURL Sample</text:span></text:span>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54">curl --request GET \</text:p>
            <text:p text:style-name="P54"><text:s text:c="2"/>--url 'https://[maindomian]/api/basic/resolution/getComboList' \</text:p>
            <text:p text:style-name="P54"><text:s text:c="2"/>--header 'Authorization: Bearer [JWT token]'</text:p>
          </table:table-cell>
        </table:table-row>
      </table:table>
      <text:p text:style-name="P53"><text:span text:style-name="Strong_20_Emphasis"><text:span text:style-name="T9"/></text:span></text:p>
      <text:p text:style-name="P53"><text:span text:style-name="Strong_20_Emphasis"><text:span text:style-name="T8">Response Sample</text:span></text:span>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P54">{</text:p>
            <text:p text:style-name="P54"><text:tab/>"statusCode" : 200,</text:p>
            <text:p text:style-name="P54"><text:tab/>"status" : "success",</text:p>
            <text:p text:style-name="P54"><text:tab/>"message" : "The data is returned successfully.",</text:p>
            <text:p text:style-name="P54"><text:tab/>"errorCode" : 0,</text:p>
            <text:p text:style-name="P54"><text:tab/>"data" : <text:span text:style-name="T19">[</text:span>{</text:p>
            <text:p text:style-name="P54"><text:tab/><text:tab/>"id" : 16621244611384550112, </text:p>
            <text:p text:style-name="P54"><text:tab/><text:tab/>"title" : "test",</text:p>
            <text:p text:style-name="P54"><text:tab/><text:tab/>"code" : "123"</text:p>
            <text:p text:style-name="P54"><text:tab/>}<text:span text:style-name="T19">]</text:span></text:p>
            <text:p text:style-name="P54">}</text:p>
          </table:table-cell>
        </table:table-row>
      </table:table>
      <text:p text:style-name="P53"><text:span text:style-name="Strong_20_Emphasis"/></text:p>
      <text:h text:style-name="P55" text:outline-level="1"><text:bookmark-start text:name="__RefHeading___Toc227_771010674 Copy 2"/>Meeting Type<text:bookmark-end text:name="__RefHeading___Toc227_771010674 Copy 2"/></text:h>
      <text:h text:style-name="P56" text:outline-level="2"><text:bookmark-start text:name="__RefHeading___Toc908_3206075736 Copy 3"/><text:span text:style-name="Strong_20_Emphasis"><text:span text:style-name="T5">Add</text:span></text:span><text:bookmark-end text:name="__RefHeading___Toc908_3206075736 Copy 3"/></text:h>
      <text:p text:style-name="P57"><text:span text:style-name="Strong_20_Emphasis"><text:span text:style-name="T6">Description</text:span></text:span></text:p>
      <text:p text:style-name="P57"><text:soft-page-break/><text:span text:style-name="Strong_20_Emphasis"><text:span text:style-name="T7">This API adds a record of “</text:span></text:span><text:span text:style-name="Strong_20_Emphasis"><text:span text:style-name="T32">meeting type</text:span></text:span><text:span text:style-name="Strong_20_Emphasis"><text:span text:style-name="T7">” into the basic data.</text:span></text:span></text:p>
      <text:p text:style-name="P57"><text:span text:style-name="Strong_20_Emphasis"><text:span text:style-name="T8">Request CURL Sample</text:span></text:span></text:p>
      <table:table table:name="Table84" table:style-name="Table84">
        <table:table-column table:style-name="Table84.A"/>
        <table:table-row>
          <table:table-cell table:style-name="Table84.A1" office:value-type="string">
            <text:p text:style-name="P58">curl --request POST \</text:p>
            <text:p text:style-name="P58"><text:s text:c="2"/>--url 'https://[maindomian]/api/basic/meetingType' \</text:p>
            <text:p text:style-name="P58"><text:s text:c="2"/>--header 'Authorization: Bearer [JWT token]' \</text:p>
            <text:p text:style-name="P58"><text:s text:c="2"/>--header 'content-type: application/json' \</text:p>
            <text:p text:style-name="P58"><text:s text:c="2"/>--data '{"code":"[code]","title":"[title]","decription":"[description (optional)]"}'</text:p>
          </table:table-cell>
        </table:table-row>
      </table:table>
      <text:p text:style-name="P57"><text:span text:style-name="Strong_20_Emphasis"><text:span text:style-name="T9"/></text:span></text:p>
      <text:p text:style-name="P57"><text:span text:style-name="Strong_20_Emphasis"><text:span text:style-name="T8">Response Sample</text:span></text:span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58">{</text:p>
            <text:p text:style-name="P58"><text:tab/>"statusCode" : 200,</text:p>
            <text:p text:style-name="P58"><text:tab/>"status" : "success",</text:p>
            <text:p text:style-name="P58"><text:tab/>"message" : "The record is added successfully."</text:p>
            <text:p text:style-name="P58"><text:tab/>"errorCode": 0,</text:p>
            <text:p text:style-name="P58"><text:tab/>"data": {</text:p>
            <text:p text:style-name="P58"><text:tab/><text:tab/>"id": 123</text:p>
            <text:p text:style-name="P58"><text:tab/>}</text:p>
            <text:p text:style-name="P58">}</text:p>
          </table:table-cell>
        </table:table-row>
      </table:table>
      <text:p text:style-name="P57"><text:span text:style-name="Strong_20_Emphasis"/></text:p>
      <text:h text:style-name="P56" text:outline-level="2"><text:bookmark-start text:name="__RefHeading___Toc2081_720390006 Copy 1 Copy 2"/><text:span text:style-name="Strong_20_Emphasis"><text:span text:style-name="T10">Update</text:span></text:span><text:bookmark-end text:name="__RefHeading___Toc2081_720390006 Copy 1 Copy 2"/></text:h>
      <text:p text:style-name="P57"><text:span text:style-name="Strong_20_Emphasis"><text:span text:style-name="T6">Description</text:span></text:span></text:p>
      <text:p text:style-name="P57"><text:span text:style-name="Strong_20_Emphasis"><text:span text:style-name="T7">This API updates a specific record of “</text:span></text:span><text:span text:style-name="Strong_20_Emphasis"><text:span text:style-name="T32">meeting type</text:span></text:span><text:span text:style-name="Strong_20_Emphasis"><text:span text:style-name="T7">” in the basic data.</text:span></text:span></text:p>
      <text:p text:style-name="P57"><text:span text:style-name="Strong_20_Emphasis"><text:span text:style-name="T8">Request CURL Sample</text:span></text:span>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58">curl --request PUT \</text:p>
            <text:p text:style-name="P58"><text:s text:c="2"/>--url 'https://[maindomian]/api/basic/meetingType/[id]' \</text:p>
            <text:p text:style-name="P58"><text:s text:c="2"/>--header 'Authorization: Bearer [JWT token]' \</text:p>
            <text:p text:style-name="P58"><text:s text:c="2"/>--header 'content-type: application/json' \</text:p>
            <text:p text:style-name="P58"><text:s text:c="2"/>--data '{"code":"[code]","title":"[title]","decription":"[description (optional)]"}'</text:p>
          </table:table-cell>
        </table:table-row>
      </table:table>
      <text:p text:style-name="P57"><text:span text:style-name="Strong_20_Emphasis"><text:span text:style-name="T9"/></text:span></text:p>
      <text:p text:style-name="P57"><text:span text:style-name="Strong_20_Emphasis"><text:span text:style-name="T8">Response Sample</text:span></text:span></text:p>
      <table:table table:name="Table87" table:style-name="Table87">
        <table:table-column table:style-name="Table87.A"/>
        <text:soft-page-break/>
        <table:table-row>
          <table:table-cell table:style-name="Table87.A1" office:value-type="string">
            <text:p text:style-name="P58">{</text:p>
            <text:p text:style-name="P58"><text:tab/>"statusCode" : 200,</text:p>
            <text:p text:style-name="P58"><text:tab/>"status" : "success",</text:p>
            <text:p text:style-name="P58"><text:tab/>"message" : "The record is <text:span text:style-name="T10">updated</text:span> successfully."</text:p>
            <text:p text:style-name="P58"><text:tab/>"errorCode" : 0,</text:p>
            <text:p text:style-name="P58"><text:tab/>"data" : <text:span text:style-name="T11">null</text:span></text:p>
            <text:p text:style-name="P58">}</text:p>
          </table:table-cell>
        </table:table-row>
      </table:table>
      <text:p text:style-name="P57"><text:span text:style-name="Strong_20_Emphasis"/></text:p>
      <text:h text:style-name="P56" text:outline-level="2"><text:bookmark-start text:name="__RefHeading___Toc908_3206075736 Copy 1 Copy 2"/><text:span text:style-name="Strong_20_Emphasis"><text:span text:style-name="T10">Delete</text:span></text:span><text:bookmark-end text:name="__RefHeading___Toc908_3206075736 Copy 1 Copy 2"/></text:h>
      <text:p text:style-name="P57"><text:span text:style-name="Strong_20_Emphasis"><text:span text:style-name="T6">Description</text:span></text:span></text:p>
      <text:p text:style-name="P57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32">meeting type</text:span></text:span><text:span text:style-name="Strong_20_Emphasis"><text:span text:style-name="T7">” from the basic data.</text:span></text:span></text:p>
      <text:p text:style-name="P57"><text:span text:style-name="Strong_20_Emphasis"><text:span text:style-name="T8">Request CURL Sample</text:span></text:span>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58">curl --request DELETE \</text:p>
            <text:p text:style-name="P58"><text:s text:c="2"/>--url 'https://[maindomian]/api/basic/meetingType/[id]' \</text:p>
            <text:p text:style-name="P58"><text:s text:c="2"/>--header 'Authorization: Bearer [JWT token]'</text:p>
          </table:table-cell>
        </table:table-row>
      </table:table>
      <text:p text:style-name="P57"><text:span text:style-name="Strong_20_Emphasis"><text:span text:style-name="T9"/></text:span></text:p>
      <text:p text:style-name="P57"><text:span text:style-name="Strong_20_Emphasis"><text:span text:style-name="T8">Response Sample</text:span></text:span></text:p>
      <table:table table:name="Table89" table:style-name="Table89">
        <table:table-column table:style-name="Table89.A"/>
        <table:table-row>
          <table:table-cell table:style-name="Table89.A1" office:value-type="string">
            <text:p text:style-name="P58">{</text:p>
            <text:p text:style-name="P58"><text:tab/>"statusCode" : 200,</text:p>
            <text:p text:style-name="P58"><text:tab/>"status" : "success",</text:p>
            <text:p text:style-name="P58"><text:tab/>"message" : "The record is <text:span text:style-name="T11">deleted</text:span> successfully."</text:p>
            <text:p text:style-name="P58"><text:tab/>"errorCode" : 0,</text:p>
            <text:p text:style-name="P58"><text:tab/>"data" : <text:span text:style-name="T11">null</text:span></text:p>
            <text:p text:style-name="P58">}</text:p>
          </table:table-cell>
        </table:table-row>
      </table:table>
      <text:p text:style-name="P57"><text:span text:style-name="Strong_20_Emphasis"/></text:p>
      <text:h text:style-name="P56" text:outline-level="2"><text:bookmark-start text:name="__RefHeading___Toc2079_720390006 Copy 2"/><text:span text:style-name="Strong_20_Emphasis"><text:span text:style-name="T10">Active</text:span></text:span><text:bookmark-end text:name="__RefHeading___Toc2079_720390006 Copy 2"/></text:h>
      <text:p text:style-name="P57"><text:span text:style-name="Strong_20_Emphasis"><text:span text:style-name="T6">Description</text:span></text:span></text:p>
      <text:p text:style-name="P57"><text:span text:style-name="Strong_20_Emphasis"><text:span text:style-name="T7">This API actives a specific record of “</text:span></text:span><text:span text:style-name="Strong_20_Emphasis"><text:span text:style-name="T32">meeting </text:span></text:span><text:span text:style-name="Strong_20_Emphasis"><text:span text:style-name="T33">type</text:span></text:span><text:span text:style-name="Strong_20_Emphasis"><text:span text:style-name="T7">” in the basic data.</text:span></text:span></text:p>
      <text:p text:style-name="P57"><text:span text:style-name="Strong_20_Emphasis"><text:span text:style-name="T8">Request CURL Sample</text:span></text:span></text:p>
      <table:table table:name="Table90" table:style-name="Table90">
        <table:table-column table:style-name="Table90.A"/>
        <table:table-row>
          <table:table-cell table:style-name="Table90.A1" office:value-type="string">
            <text:p text:style-name="P58">curl --request PUT \</text:p>
            <text:p text:style-name="P58"><text:s text:c="2"/>--url 'https://[maindomian]/api/basic/meetingType/active/[id]' \</text:p>
            <text:p text:style-name="P58"><text:s text:c="2"/>--header 'Authorization: Bearer [JWT token]'</text:p>
          </table:table-cell>
        </table:table-row>
      </table:table>
      <text:p text:style-name="P57"><text:soft-page-break/><text:span text:style-name="Strong_20_Emphasis"><text:span text:style-name="T9"/></text:span></text:p>
      <text:p text:style-name="P57"><text:span text:style-name="Strong_20_Emphasis"><text:span text:style-name="T8">Response Sample</text:span></text:span></text:p>
      <table:table table:name="Table91" table:style-name="Table91">
        <table:table-column table:style-name="Table91.A"/>
        <table:table-row>
          <table:table-cell table:style-name="Table91.A1" office:value-type="string">
            <text:p text:style-name="P58">{</text:p>
            <text:p text:style-name="P58"><text:tab/>"statusCode" : 200,</text:p>
            <text:p text:style-name="P58"><text:tab/>"status" : "success",</text:p>
            <text:p text:style-name="P58"><text:tab/>"message" : "The record is <text:span text:style-name="T11">activated</text:span> successfully."</text:p>
            <text:p text:style-name="P58"><text:tab/>"errorCode" : 0,</text:p>
            <text:p text:style-name="P58"><text:tab/>"data" : <text:span text:style-name="T11">null</text:span></text:p>
            <text:p text:style-name="P58">}</text:p>
          </table:table-cell>
        </table:table-row>
      </table:table>
      <text:p text:style-name="P57"><text:span text:style-name="Strong_20_Emphasis"/></text:p>
      <text:h text:style-name="P56" text:outline-level="2"><text:bookmark-start text:name="__RefHeading___Toc2083_720390006 Copy 2"/><text:span text:style-name="Strong_20_Emphasis"><text:span text:style-name="T10">Inactive</text:span></text:span><text:bookmark-end text:name="__RefHeading___Toc2083_720390006 Copy 2"/></text:h>
      <text:p text:style-name="P57"><text:span text:style-name="Strong_20_Emphasis"><text:span text:style-name="T6">Description</text:span></text:span></text:p>
      <text:p text:style-name="P57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32">meeting type</text:span></text:span><text:span text:style-name="Strong_20_Emphasis"><text:span text:style-name="T7">” in the basic data.</text:span></text:span></text:p>
      <text:p text:style-name="P57"><text:span text:style-name="Strong_20_Emphasis"><text:span text:style-name="T8">Request CURL Sample</text:span></text:span></text:p>
      <table:table table:name="Table92" table:style-name="Table92">
        <table:table-column table:style-name="Table92.A"/>
        <table:table-row>
          <table:table-cell table:style-name="Table92.A1" office:value-type="string">
            <text:p text:style-name="P58">curl --request PUT \</text:p>
            <text:p text:style-name="P58"><text:s text:c="2"/>--url 'https://[maindomian]/api/basic/meetingType/inactive/[id]' \</text:p>
            <text:p text:style-name="P58"><text:s text:c="2"/>--header 'Authorization: Bearer [JWT token]'</text:p>
          </table:table-cell>
        </table:table-row>
      </table:table>
      <text:p text:style-name="P57"><text:span text:style-name="Strong_20_Emphasis"><text:span text:style-name="T9"/></text:span></text:p>
      <text:p text:style-name="P57"><text:span text:style-name="Strong_20_Emphasis"><text:span text:style-name="T8">Response Sample</text:span></text:span></text:p>
      <table:table table:name="Table93" table:style-name="Table93">
        <table:table-column table:style-name="Table93.A"/>
        <table:table-row>
          <table:table-cell table:style-name="Table93.A1" office:value-type="string">
            <text:p text:style-name="P58">{</text:p>
            <text:p text:style-name="P58"><text:tab/>"statusCode" : 200,</text:p>
            <text:p text:style-name="P58"><text:tab/>"status" : "success",</text:p>
            <text:p text:style-name="P58"><text:tab/>"message" : "The record is <text:span text:style-name="T14">in</text:span><text:span text:style-name="T11">activated</text:span> successfully."</text:p>
            <text:p text:style-name="P58"><text:tab/>"errorCode" : 0,</text:p>
            <text:p text:style-name="P58"><text:tab/>"data" : <text:span text:style-name="T11">null</text:span></text:p>
            <text:p text:style-name="P58">}</text:p>
          </table:table-cell>
        </table:table-row>
      </table:table>
      <text:p text:style-name="P57"><text:span text:style-name="Strong_20_Emphasis"/></text:p>
      <text:h text:style-name="P56" text:outline-level="2"><text:bookmark-start text:name="__RefHeading___Toc2085_720390006 Copy 2"/><text:span text:style-name="Strong_20_Emphasis"><text:span text:style-name="T10">Fetch Specific Record</text:span></text:span><text:bookmark-end text:name="__RefHeading___Toc2085_720390006 Copy 2"/></text:h>
      <text:p text:style-name="P57"><text:span text:style-name="Strong_20_Emphasis"><text:span text:style-name="T6">Description</text:span></text:span></text:p>
      <text:p text:style-name="P57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32">meeting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57"><text:span text:style-name="Strong_20_Emphasis"><text:span text:style-name="T8">Request CURL Sample</text:span></text:span></text:p>
      <table:table table:name="Table94" table:style-name="Table94">
        <table:table-column table:style-name="Table94.A"/>
        <text:soft-page-break/>
        <table:table-row>
          <table:table-cell table:style-name="Table94.A1" office:value-type="string">
            <text:p text:style-name="P58">curl --request GET \</text:p>
            <text:p text:style-name="P58"><text:s text:c="2"/>--url 'https://[maindomian]/api/basic/meetingType/[id]' \</text:p>
            <text:p text:style-name="P58"><text:s text:c="2"/>--header 'Authorization: Bearer [JWT token]'</text:p>
          </table:table-cell>
        </table:table-row>
      </table:table>
      <text:p text:style-name="P57"><text:span text:style-name="Strong_20_Emphasis"><text:span text:style-name="T9"/></text:span></text:p>
      <text:p text:style-name="P57"><text:span text:style-name="Strong_20_Emphasis"><text:span text:style-name="T8">Response Sample</text:span></text:span></text:p>
      <table:table table:name="Table95" table:style-name="Table95">
        <table:table-column table:style-name="Table95.A"/>
        <table:table-row>
          <table:table-cell table:style-name="Table95.A1" office:value-type="string">
            <text:p text:style-name="P58">{</text:p>
            <text:p text:style-name="P58"><text:tab/>"statusCode" : 200,</text:p>
            <text:p text:style-name="P58"><text:tab/>""status" : "success",</text:p>
            <text:p text:style-name="P58"><text:tab/>"message" : "The data is returned successfully.",</text:p>
            <text:p text:style-name="P58"><text:tab/>"errorCode" : 0,</text:p>
            <text:p text:style-name="P58"><text:tab/>"data" : {</text:p>
            <text:p text:style-name="P58"><text:tab/><text:tab/>"id" : 16621244611384550112, </text:p>
            <text:p text:style-name="P58"><text:tab/><text:tab/>"title" : "test",</text:p>
            <text:p text:style-name="P58"><text:tab/><text:tab/>"code" : "123",</text:p>
            <text:p text:style-name="P58"><text:tab/><text:tab/>"description" : "test",</text:p>
            <text:p text:style-name="P58"><text:tab/><text:tab/>"createdAt" : "2025-8-25 12:00:00",</text:p>
            <text:p text:style-name="P58"><text:tab/><text:tab/>"createdBy" : "John Davis" </text:p>
            <text:p text:style-name="P58"><text:tab/>}</text:p>
            <text:p text:style-name="P58">}</text:p>
          </table:table-cell>
        </table:table-row>
      </table:table>
      <text:p text:style-name="P57"><text:span text:style-name="Strong_20_Emphasis"/></text:p>
      <text:h text:style-name="P56" text:outline-level="2"><text:bookmark-start text:name="__RefHeading___Toc702_3019299338 Copy 2"/><text:span text:style-name="Strong_20_Emphasis"><text:span text:style-name="T10">Get All Records</text:span></text:span><text:bookmark-end text:name="__RefHeading___Toc702_3019299338 Copy 2"/></text:h>
      <text:p text:style-name="P57"><text:span text:style-name="Strong_20_Emphasis"><text:span text:style-name="T6">Description</text:span></text:span></text:p>
      <text:p text:style-name="P57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2">meeting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57"><text:span text:style-name="Strong_20_Emphasis"><text:span text:style-name="T8">Request CURL Sample</text:span></text:span></text:p>
      <table:table table:name="Table96" table:style-name="Table96">
        <table:table-column table:style-name="Table96.A"/>
        <table:table-row>
          <table:table-cell table:style-name="Table96.A1" office:value-type="string">
            <text:p text:style-name="P58">curl --request GET \</text:p>
            <text:p text:style-name="P58"><text:s text:c="2"/>--url 'https://[maindomian]/api/basic/meetingType/getAll?title=test&amp;code=123&amp;description=test&amp;offset=0&amp;limit=15&amp;sort_by=desc%28fieldName%29' \</text:p>
            <text:p text:style-name="P58"><text:s text:c="2"/>--header 'Authorization: Bearer [JWT token]'</text:p>
          </table:table-cell>
        </table:table-row>
      </table:table>
      <text:p text:style-name="P57"><text:span text:style-name="Strong_20_Emphasis"><text:span text:style-name="T9"/></text:span></text:p>
      <text:p text:style-name="P57"><text:span text:style-name="Strong_20_Emphasis"><text:span text:style-name="T8">Response Sample</text:span></text:span></text:p>
      <table:table table:name="Table97" table:style-name="Table97">
        <table:table-column table:style-name="Table97.A"/>
        <table:table-row>
          <table:table-cell table:style-name="Table97.A1" office:value-type="string">
            <text:p text:style-name="P58">{</text:p>
            <text:p text:style-name="P58"><text:tab/>"statusCode" : 200,</text:p>
            <text:p text:style-name="P58"><text:tab/>"status" : "success",</text:p>
            <text:p text:style-name="P58"><text:tab/>"message" : "The data is returned successfully.",</text:p>
            <text:p text:style-name="P58"><text:soft-page-break/><text:tab/>"errorCode" : 0,</text:p>
            <text:p text:style-name="P58"><text:tab/>"data" : <text:span text:style-name="T19">[</text:span>{</text:p>
            <text:p text:style-name="P58"><text:tab/><text:tab/>"id" : 16621244611384550112, </text:p>
            <text:p text:style-name="P58"><text:tab/><text:tab/>"title" : "test",</text:p>
            <text:p text:style-name="P58"><text:tab/><text:tab/>"code" : "123",</text:p>
            <text:p text:style-name="P58"><text:tab/><text:tab/>"description" : "test",</text:p>
            <text:p text:style-name="P58"><text:tab/><text:tab/>"createdAt" : "2025-8-25 12:00:00",</text:p>
            <text:p text:style-name="P58"><text:tab/><text:tab/>"createdBy" : "John Davis" </text:p>
            <text:p text:style-name="P58"><text:tab/>}<text:span text:style-name="T19">]</text:span></text:p>
            <text:p text:style-name="P58">}</text:p>
          </table:table-cell>
        </table:table-row>
      </table:table>
      <text:p text:style-name="P57"><text:span text:style-name="Strong_20_Emphasis"/></text:p>
      <text:h text:style-name="P56" text:outline-level="2"><text:bookmark-start text:name="__RefHeading___Toc704_3019299338 Copy 2"/><text:span text:style-name="Strong_20_Emphasis"><text:span text:style-name="T10">Get Combo List</text:span></text:span><text:bookmark-end text:name="__RefHeading___Toc704_3019299338 Copy 2"/></text:h>
      <text:p text:style-name="P57"><text:span text:style-name="Strong_20_Emphasis"><text:span text:style-name="T6">Description</text:span></text:span></text:p>
      <text:p text:style-name="P57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0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4">meeting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0">to use in combo or list form components</text:span></text:span><text:span text:style-name="Strong_20_Emphasis"><text:span text:style-name="T7">.</text:span></text:span></text:p>
      <text:p text:style-name="P57"><text:span text:style-name="Strong_20_Emphasis"><text:span text:style-name="T8">Request CURL Sample</text:span></text:span></text:p>
      <table:table table:name="Table98" table:style-name="Table98">
        <table:table-column table:style-name="Table98.A"/>
        <table:table-row>
          <table:table-cell table:style-name="Table98.A1" office:value-type="string">
            <text:p text:style-name="P58">curl --request GET \</text:p>
            <text:p text:style-name="P58"><text:s text:c="2"/>--url 'https://[maindomian]/api/basic/meetingType/getComboList' \</text:p>
            <text:p text:style-name="P58"><text:s text:c="2"/>--header 'Authorization: Bearer [JWT token]'</text:p>
          </table:table-cell>
        </table:table-row>
      </table:table>
      <text:p text:style-name="P57"><text:span text:style-name="Strong_20_Emphasis"><text:span text:style-name="T9"/></text:span></text:p>
      <text:p text:style-name="P57"><text:span text:style-name="Strong_20_Emphasis"><text:span text:style-name="T8">Response Sample</text:span></text:span></text:p>
      <table:table table:name="Table99" table:style-name="Table99">
        <table:table-column table:style-name="Table99.A"/>
        <table:table-row>
          <table:table-cell table:style-name="Table99.A1" office:value-type="string">
            <text:p text:style-name="P58">{</text:p>
            <text:p text:style-name="P58"><text:tab/>"statusCode" : 200,</text:p>
            <text:p text:style-name="P58"><text:tab/>"status" : "success",</text:p>
            <text:p text:style-name="P58"><text:tab/>"message" : "The data is returned successfully.",</text:p>
            <text:p text:style-name="P58"><text:tab/>"errorCode" : 0,</text:p>
            <text:p text:style-name="P58"><text:tab/>"data" : <text:span text:style-name="T19">[</text:span>{</text:p>
            <text:p text:style-name="P58"><text:tab/><text:tab/>"id" : 16621244611384550112, </text:p>
            <text:p text:style-name="P58"><text:tab/><text:tab/>"title" : "test",</text:p>
            <text:p text:style-name="P58"><text:tab/><text:tab/>"code" : "123"</text:p>
            <text:p text:style-name="P58"><text:tab/>}<text:span text:style-name="T19">]</text:span></text:p>
            <text:p text:style-name="P58">}</text:p>
          </table:table-cell>
        </table:table-row>
      </table:table>
      <text:p text:style-name="P57"><text:span text:style-name="Strong_20_Emphasis"/></text:p>
      <text:h text:style-name="P59" text:outline-level="1"><text:bookmark-start text:name="__RefHeading___Toc227_771010674 Copy 2 Copy 1"/><text:soft-page-break/><text:span text:style-name="T35">Document</text:span> Type<text:bookmark-end text:name="__RefHeading___Toc227_771010674 Copy 2 Copy 1"/></text:h>
      <text:h text:style-name="P60" text:outline-level="2"><text:bookmark-start text:name="__RefHeading___Toc908_3206075736 Copy 3 Copy 1"/><text:span text:style-name="Strong_20_Emphasis"><text:span text:style-name="T5">Add</text:span></text:span><text:bookmark-end text:name="__RefHeading___Toc908_3206075736 Copy 3 Copy 1"/></text:h>
      <text:p text:style-name="P61"><text:span text:style-name="Strong_20_Emphasis"><text:span text:style-name="T6">Description</text:span></text:span></text:p>
      <text:p text:style-name="P61"><text:span text:style-name="Strong_20_Emphasis"><text:span text:style-name="T7">This API adds a record of “</text:span></text:span><text:span text:style-name="Strong_20_Emphasis"><text:span text:style-name="T33">document</text:span></text:span><text:span text:style-name="Strong_20_Emphasis"><text:span text:style-name="T32"> type</text:span></text:span><text:span text:style-name="Strong_20_Emphasis"><text:span text:style-name="T7">” into the basic data.</text:span></text:span></text:p>
      <text:p text:style-name="P61"><text:span text:style-name="Strong_20_Emphasis"><text:span text:style-name="T8">Request CURL Sample</text:span></text:span></text:p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62">curl --request POST \</text:p>
            <text:p text:style-name="P62"><text:s text:c="2"/>--url 'https://[maindomian]/api/basic/documentType' \</text:p>
            <text:p text:style-name="P62"><text:s text:c="2"/>--header 'Authorization: Bearer [JWT token]' \</text:p>
            <text:p text:style-name="P62"><text:s text:c="2"/>--header 'content-type: application/json' \</text:p>
            <text:p text:style-name="P62"><text:s text:c="2"/>--data '{"code":"123","title":"test","decription":"test"}'</text:p>
          </table:table-cell>
        </table:table-row>
      </table:table>
      <text:p text:style-name="P61"><text:span text:style-name="Strong_20_Emphasis"><text:span text:style-name="T9"/></text:span></text:p>
      <text:p text:style-name="P61"><text:span text:style-name="Strong_20_Emphasis"><text:span text:style-name="T8">Response Sample</text:span></text:span></text:p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62">{</text:p>
            <text:p text:style-name="P62"><text:tab/>"statusCode" : 200,</text:p>
            <text:p text:style-name="P62"><text:tab/>"status" : "success",</text:p>
            <text:p text:style-name="P62"><text:tab/>"message" : "The record is added successfully."</text:p>
            <text:p text:style-name="P62"><text:tab/>"errorCode": 0,</text:p>
            <text:p text:style-name="P62"><text:tab/>"data": {</text:p>
            <text:p text:style-name="P62"><text:tab/><text:tab/>"id": 123</text:p>
            <text:p text:style-name="P62"><text:tab/>}</text:p>
            <text:p text:style-name="P62">}</text:p>
          </table:table-cell>
        </table:table-row>
      </table:table>
      <text:p text:style-name="P61"><text:span text:style-name="Strong_20_Emphasis"/></text:p>
      <text:h text:style-name="P60" text:outline-level="2"><text:bookmark-start text:name="__RefHeading___Toc2081_720390006 Copy 1 Copy 2 Copy 1"/><text:span text:style-name="Strong_20_Emphasis"><text:span text:style-name="T10">Update</text:span></text:span><text:bookmark-end text:name="__RefHeading___Toc2081_720390006 Copy 1 Copy 2 Copy 1"/></text:h>
      <text:p text:style-name="P61"><text:span text:style-name="Strong_20_Emphasis"><text:span text:style-name="T6">Description</text:span></text:span></text:p>
      <text:p text:style-name="P61"><text:span text:style-name="Strong_20_Emphasis"><text:span text:style-name="T7">This API updates a specific record of “</text:span></text:span><text:span text:style-name="Strong_20_Emphasis"><text:span text:style-name="T33">document</text:span></text:span><text:span text:style-name="Strong_20_Emphasis"><text:span text:style-name="T32"> type</text:span></text:span><text:span text:style-name="Strong_20_Emphasis"><text:span text:style-name="T7">” in the basic data.</text:span></text:span></text:p>
      <text:p text:style-name="P61"><text:span text:style-name="Strong_20_Emphasis"><text:span text:style-name="T8">Request CURL Sample</text:span></text:span></text:p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62">curl --request POST \</text:p>
            <text:p text:style-name="P62"><text:s text:c="2"/>--url 'https://[maindomian]/api/basic/documentType' \</text:p>
            <text:p text:style-name="P62"><text:s text:c="2"/>--header 'Authorization: Bearer [JWT token]' \</text:p>
            <text:p text:style-name="P62"><text:s text:c="2"/>--header 'content-type: application/json' \</text:p>
            <text:p text:style-name="P62"><text:s text:c="2"/>--data '{"code":"123","title":"test","decription":"test"}'</text:p>
          </table:table-cell>
        </table:table-row>
      </table:table>
      <text:p text:style-name="P61"><text:span text:style-name="Strong_20_Emphasis"><text:span text:style-name="T9"/></text:span></text:p>
      <text:p text:style-name="P61"><text:soft-page-break/><text:span text:style-name="Strong_20_Emphasis"><text:span text:style-name="T8">Response Sample</text:span></text:span></text:p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P62">{</text:p>
            <text:p text:style-name="P62"><text:tab/>"statusCode" : 200,</text:p>
            <text:p text:style-name="P62"><text:tab/>"status" : "success",</text:p>
            <text:p text:style-name="P62"><text:tab/>"message" : "The record is <text:span text:style-name="T10">updated</text:span> successfully."</text:p>
            <text:p text:style-name="P62"><text:tab/>"errorCode" : 0,</text:p>
            <text:p text:style-name="P62"><text:tab/>"data" : <text:span text:style-name="T11">null</text:span></text:p>
            <text:p text:style-name="P62">}</text:p>
          </table:table-cell>
        </table:table-row>
      </table:table>
      <text:p text:style-name="P61"><text:span text:style-name="Strong_20_Emphasis"/></text:p>
      <text:h text:style-name="P60" text:outline-level="2"><text:bookmark-start text:name="__RefHeading___Toc908_3206075736 Copy 1 Copy 2 Copy 1"/><text:span text:style-name="Strong_20_Emphasis"><text:span text:style-name="T10">Delete</text:span></text:span><text:bookmark-end text:name="__RefHeading___Toc908_3206075736 Copy 1 Copy 2 Copy 1"/></text:h>
      <text:p text:style-name="P61"><text:span text:style-name="Strong_20_Emphasis"><text:span text:style-name="T6">Description</text:span></text:span></text:p>
      <text:p text:style-name="P61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33">document</text:span></text:span><text:span text:style-name="Strong_20_Emphasis"><text:span text:style-name="T32"> type</text:span></text:span><text:span text:style-name="Strong_20_Emphasis"><text:span text:style-name="T7">” from the basic data.</text:span></text:span></text:p>
      <text:p text:style-name="P61"><text:span text:style-name="Strong_20_Emphasis"><text:span text:style-name="T8">Request CURL Sample</text:span></text:span></text:p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P62">curl --request DELETE \</text:p>
            <text:p text:style-name="P62"><text:s text:c="2"/>--url 'https://[maindomian]/api/basic/documentType/[id]' \</text:p>
            <text:p text:style-name="P62"><text:s text:c="2"/>--header 'Authorization: Bearer [JWT token]'</text:p>
          </table:table-cell>
        </table:table-row>
      </table:table>
      <text:p text:style-name="P61"><text:span text:style-name="Strong_20_Emphasis"><text:span text:style-name="T9"/></text:span></text:p>
      <text:p text:style-name="P61"><text:span text:style-name="Strong_20_Emphasis"><text:span text:style-name="T8">Response Sample</text:span></text:span></text:p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P62">{</text:p>
            <text:p text:style-name="P62"><text:tab/>"statusCode" : 200,</text:p>
            <text:p text:style-name="P62"><text:tab/>"status" : "success",</text:p>
            <text:p text:style-name="P62"><text:tab/>"message" : "The record is <text:span text:style-name="T11">deleted</text:span> successfully."</text:p>
            <text:p text:style-name="P62"><text:tab/>"errorCode" : 0,</text:p>
            <text:p text:style-name="P62"><text:tab/>"data" : <text:span text:style-name="T11">null</text:span></text:p>
            <text:p text:style-name="P62">}</text:p>
          </table:table-cell>
        </table:table-row>
      </table:table>
      <text:p text:style-name="P61"><text:span text:style-name="Strong_20_Emphasis"/></text:p>
      <text:h text:style-name="P60" text:outline-level="2"><text:bookmark-start text:name="__RefHeading___Toc2079_720390006 Copy 2 Copy 1"/><text:span text:style-name="Strong_20_Emphasis"><text:span text:style-name="T10">Active</text:span></text:span><text:bookmark-end text:name="__RefHeading___Toc2079_720390006 Copy 2 Copy 1"/></text:h>
      <text:p text:style-name="P61"><text:span text:style-name="Strong_20_Emphasis"><text:span text:style-name="T6">Description</text:span></text:span></text:p>
      <text:p text:style-name="P61"><text:span text:style-name="Strong_20_Emphasis"><text:span text:style-name="T7">This API actives a specific record of “</text:span></text:span><text:span text:style-name="Strong_20_Emphasis"><text:span text:style-name="T33">document type</text:span></text:span><text:span text:style-name="Strong_20_Emphasis"><text:span text:style-name="T7">” in the basic data.</text:span></text:span></text:p>
      <text:p text:style-name="P61"><text:span text:style-name="Strong_20_Emphasis"><text:span text:style-name="T8">Request CURL Sample</text:span></text:span></text:p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P62">curl --request PUT \</text:p>
            <text:p text:style-name="P62"><text:soft-page-break/><text:s text:c="2"/>--url 'https://[maindomian]/api/basic/documentType/active/[id]' \</text:p>
            <text:p text:style-name="P62"><text:s text:c="2"/>--header 'Authorization: Bearer [JWT token]'</text:p>
          </table:table-cell>
        </table:table-row>
      </table:table>
      <text:p text:style-name="P61"><text:span text:style-name="Strong_20_Emphasis"><text:span text:style-name="T9"/></text:span></text:p>
      <text:p text:style-name="P61"><text:span text:style-name="Strong_20_Emphasis"><text:span text:style-name="T8">Response Sample</text:span></text:span></text:p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P62">{</text:p>
            <text:p text:style-name="P62"><text:tab/>"statusCode" : 200,</text:p>
            <text:p text:style-name="P62"><text:tab/>"status" : "success",</text:p>
            <text:p text:style-name="P62"><text:tab/>"message" : "The record is <text:span text:style-name="T11">activated</text:span> successfully."</text:p>
            <text:p text:style-name="P62"><text:tab/>"errorCode" : 0,</text:p>
            <text:p text:style-name="P62"><text:tab/>"data" : <text:span text:style-name="T11">null</text:span></text:p>
            <text:p text:style-name="P62">}</text:p>
          </table:table-cell>
        </table:table-row>
      </table:table>
      <text:p text:style-name="P61"><text:span text:style-name="Strong_20_Emphasis"/></text:p>
      <text:h text:style-name="P60" text:outline-level="2"><text:bookmark-start text:name="__RefHeading___Toc2083_720390006 Copy 2 Copy 1"/><text:span text:style-name="Strong_20_Emphasis"><text:span text:style-name="T10">Inactive</text:span></text:span><text:bookmark-end text:name="__RefHeading___Toc2083_720390006 Copy 2 Copy 1"/></text:h>
      <text:p text:style-name="P61"><text:span text:style-name="Strong_20_Emphasis"><text:span text:style-name="T6">Description</text:span></text:span></text:p>
      <text:p text:style-name="P61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33">document</text:span></text:span><text:span text:style-name="Strong_20_Emphasis"><text:span text:style-name="T32"> type</text:span></text:span><text:span text:style-name="Strong_20_Emphasis"><text:span text:style-name="T7">” in the basic data.</text:span></text:span></text:p>
      <text:p text:style-name="P61"><text:span text:style-name="Strong_20_Emphasis"><text:span text:style-name="T8">Request CURL Sample</text:span></text:span></text:p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P62">curl --request PUT \</text:p>
            <text:p text:style-name="P62"><text:s text:c="2"/>--url 'https://[maindomian]/api/basic/documentType/inactive/[id]' \</text:p>
            <text:p text:style-name="P62"><text:s text:c="2"/>--header 'Authorization: Bearer [JWT token]'</text:p>
          </table:table-cell>
        </table:table-row>
      </table:table>
      <text:p text:style-name="P61"><text:span text:style-name="Strong_20_Emphasis"><text:span text:style-name="T9"/></text:span></text:p>
      <text:p text:style-name="P61"><text:span text:style-name="Strong_20_Emphasis"><text:span text:style-name="T8">Response Sample</text:span></text:span></text:p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P62">{</text:p>
            <text:p text:style-name="P62"><text:tab/>"statusCode" : 200,</text:p>
            <text:p text:style-name="P62"><text:tab/>"status" : "success",</text:p>
            <text:p text:style-name="P62"><text:tab/>"message" : "The record is <text:span text:style-name="T14">in</text:span><text:span text:style-name="T11">activated</text:span> successfully."</text:p>
            <text:p text:style-name="P62"><text:tab/>"errorCode" : 0,</text:p>
            <text:p text:style-name="P62"><text:tab/>"data" : <text:span text:style-name="T11">null</text:span></text:p>
            <text:p text:style-name="P62">}</text:p>
          </table:table-cell>
        </table:table-row>
      </table:table>
      <text:p text:style-name="P61"><text:span text:style-name="Strong_20_Emphasis"/></text:p>
      <text:h text:style-name="P60" text:outline-level="2"><text:bookmark-start text:name="__RefHeading___Toc2085_720390006 Copy 2 Copy 1"/><text:span text:style-name="Strong_20_Emphasis"><text:span text:style-name="T10">Fetch Specific Record</text:span></text:span><text:bookmark-end text:name="__RefHeading___Toc2085_720390006 Copy 2 Copy 1"/></text:h>
      <text:p text:style-name="P61"><text:span text:style-name="Strong_20_Emphasis"><text:span text:style-name="T6">Description</text:span></text:span></text:p>
      <text:p text:style-name="P61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33">document</text:span></text:span><text:span text:style-name="Strong_20_Emphasis"><text:span text:style-name="T32">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61"><text:soft-page-break/><text:span text:style-name="Strong_20_Emphasis"><text:span text:style-name="T8">Request CURL Sample</text:span></text:span></text:p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P62">curl --request GET \</text:p>
            <text:p text:style-name="P62"><text:s text:c="2"/>--url 'https://[maindomian]/api/basic/documentType/[id]' \</text:p>
            <text:p text:style-name="P62"><text:s text:c="2"/>--header 'Authorization: Bearer [JWT token]'</text:p>
          </table:table-cell>
        </table:table-row>
      </table:table>
      <text:p text:style-name="P61"><text:span text:style-name="Strong_20_Emphasis"><text:span text:style-name="T9"/></text:span></text:p>
      <text:p text:style-name="P61"><text:span text:style-name="Strong_20_Emphasis"><text:span text:style-name="T8">Response Sample</text:span></text:span></text:p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P62">{</text:p>
            <text:p text:style-name="P62"><text:tab/>"statusCode" : 200,</text:p>
            <text:p text:style-name="P62"><text:tab/>"status" : "success",</text:p>
            <text:p text:style-name="P62"><text:tab/>"message" : "The data is returned successfully.",</text:p>
            <text:p text:style-name="P62"><text:tab/>"errorCode" : 0,</text:p>
            <text:p text:style-name="P62"><text:tab/>"data" : {</text:p>
            <text:p text:style-name="P62"><text:tab/><text:tab/>"id" : 16621244611384550112, </text:p>
            <text:p text:style-name="P62"><text:tab/><text:tab/>"title" : "test",</text:p>
            <text:p text:style-name="P62"><text:tab/><text:tab/>"code" : "123",</text:p>
            <text:p text:style-name="P62"><text:tab/><text:tab/>"description" : "test",</text:p>
            <text:p text:style-name="P62"><text:tab/><text:tab/>"createdAt" : "2025-8-25 12:00:00",</text:p>
            <text:p text:style-name="P62"><text:tab/><text:tab/>"createdBy" : "John Davis" </text:p>
            <text:p text:style-name="P62"><text:tab/>}</text:p>
            <text:p text:style-name="P62">}</text:p>
          </table:table-cell>
        </table:table-row>
      </table:table>
      <text:p text:style-name="P61"><text:span text:style-name="Strong_20_Emphasis"/></text:p>
      <text:h text:style-name="P60" text:outline-level="2"><text:bookmark-start text:name="__RefHeading___Toc702_3019299338 Copy 2 Copy 1"/><text:span text:style-name="Strong_20_Emphasis"><text:span text:style-name="T10">Get All Records</text:span></text:span><text:bookmark-end text:name="__RefHeading___Toc702_3019299338 Copy 2 Copy 1"/></text:h>
      <text:p text:style-name="P61"><text:span text:style-name="Strong_20_Emphasis"><text:span text:style-name="T6">Description</text:span></text:span></text:p>
      <text:p text:style-name="P61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3">document</text:span></text:span><text:span text:style-name="Strong_20_Emphasis"><text:span text:style-name="T32">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61"><text:span text:style-name="Strong_20_Emphasis"><text:span text:style-name="T8">Request CURL Sample</text:span></text:span></text:p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P62">curl --request GET \</text:p>
            <text:p text:style-name="P62"><text:s text:c="2"/>--url 'https://[maindomian]/api/basic/documentType/getAll?title=test&amp;code=123&amp;description=test&amp;offset=0&amp;limit=15&amp;sort_by=desc%28fieldName%29' \</text:p>
            <text:p text:style-name="P62"><text:s text:c="2"/>--header 'Authorization: Bearer [JWT token]'</text:p>
          </table:table-cell>
        </table:table-row>
      </table:table>
      <text:p text:style-name="P61"><text:span text:style-name="Strong_20_Emphasis"><text:span text:style-name="T9"/></text:span></text:p>
      <text:p text:style-name="P61"><text:span text:style-name="Strong_20_Emphasis"><text:span text:style-name="T8">Response Sample</text:span></text:span></text:p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P62">{</text:p>
            <text:p text:style-name="P62"><text:tab/>"statusCode" : 200,</text:p>
            <text:p text:style-name="P62"><text:soft-page-break/><text:tab/>"status" : "success",</text:p>
            <text:p text:style-name="P62"><text:tab/>"message" : "The data is returned successfully.",</text:p>
            <text:p text:style-name="P62"><text:tab/>"errorCode" : 0,</text:p>
            <text:p text:style-name="P62"><text:tab/>"data" : <text:span text:style-name="T19">[</text:span>{</text:p>
            <text:p text:style-name="P62"><text:tab/><text:tab/>"id" : 16621244611384550112, </text:p>
            <text:p text:style-name="P62"><text:tab/><text:tab/>"title" : "test",</text:p>
            <text:p text:style-name="P62"><text:tab/><text:tab/>"code" : "123",</text:p>
            <text:p text:style-name="P62"><text:tab/><text:tab/>"description" : "test",</text:p>
            <text:p text:style-name="P62"><text:tab/><text:tab/>"createdAt" : "2025-8-25 12:00:00",</text:p>
            <text:p text:style-name="P62"><text:tab/><text:tab/>"createdBy" : "John Davis" </text:p>
            <text:p text:style-name="P62"><text:tab/>}<text:span text:style-name="T19">]</text:span></text:p>
            <text:p text:style-name="P62">}</text:p>
          </table:table-cell>
        </table:table-row>
      </table:table>
      <text:p text:style-name="P61"><text:span text:style-name="Strong_20_Emphasis"/></text:p>
      <text:h text:style-name="P60" text:outline-level="2"><text:bookmark-start text:name="__RefHeading___Toc704_3019299338 Copy 2 Copy 1"/><text:span text:style-name="Strong_20_Emphasis"><text:span text:style-name="T10">Get Combo List</text:span></text:span><text:bookmark-end text:name="__RefHeading___Toc704_3019299338 Copy 2 Copy 1"/></text:h>
      <text:p text:style-name="P61"><text:span text:style-name="Strong_20_Emphasis"><text:span text:style-name="T6">Description</text:span></text:span></text:p>
      <text:p text:style-name="P61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0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3">document</text:span></text:span><text:span text:style-name="Strong_20_Emphasis"><text:span text:style-name="T34">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0">to use in combo or list form components</text:span></text:span><text:span text:style-name="Strong_20_Emphasis"><text:span text:style-name="T7">.</text:span></text:span></text:p>
      <text:p text:style-name="P61"><text:span text:style-name="Strong_20_Emphasis"><text:span text:style-name="T8">Request CURL Sample</text:span></text:span></text:p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P62">curl --request GET \</text:p>
            <text:p text:style-name="P62"><text:s text:c="2"/>--url 'https://[maindomian]/api/basic/documentType/getComboList' \</text:p>
            <text:p text:style-name="P62"><text:s text:c="2"/>--header 'Authorization: Bearer [JWT token]'</text:p>
          </table:table-cell>
        </table:table-row>
      </table:table>
      <text:p text:style-name="P61"><text:span text:style-name="Strong_20_Emphasis"><text:span text:style-name="T9"/></text:span></text:p>
      <text:p text:style-name="P61"><text:span text:style-name="Strong_20_Emphasis"><text:span text:style-name="T8">Response Sample</text:span></text:span></text:p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P62">{</text:p>
            <text:p text:style-name="P62"><text:tab/>"statusCode" : 200,</text:p>
            <text:p text:style-name="P62"><text:tab/>"status" : "success",</text:p>
            <text:p text:style-name="P62"><text:tab/>"message" : "The data is returned successfully.",</text:p>
            <text:p text:style-name="P62"><text:tab/>"errorCode" : 0,</text:p>
            <text:p text:style-name="P62"><text:tab/>"data" : <text:span text:style-name="T19">[</text:span>{</text:p>
            <text:p text:style-name="P62"><text:tab/><text:tab/>"id" : 16621244611384550112, </text:p>
            <text:p text:style-name="P62"><text:tab/><text:tab/>"title" : "test",</text:p>
            <text:p text:style-name="P62"><text:tab/><text:tab/>"code" : "123"</text:p>
            <text:p text:style-name="P62"><text:tab/>}<text:span text:style-name="T19">]</text:span></text:p>
            <text:p text:style-name="P62">}</text:p>
          </table:table-cell>
        </table:table-row>
      </table:table>
      <text:p text:style-name="P61"><text:span text:style-name="Strong_20_Emphasis"/></text:p>
      <text:h text:style-name="P63" text:outline-level="1"><text:bookmark-start text:name="__RefHeading___Toc227_771010674 Copy 2 Copy 1 Copy 1"/><text:soft-page-break/>File Extension<text:bookmark-end text:name="__RefHeading___Toc227_771010674 Copy 2 Copy 1 Copy 1"/></text:h>
      <text:h text:style-name="P64" text:outline-level="2"><text:bookmark-start text:name="__RefHeading___Toc908_3206075736 Copy 3 Copy 1 Copy 1"/><text:span text:style-name="Strong_20_Emphasis"><text:span text:style-name="T5">Add</text:span></text:span><text:bookmark-end text:name="__RefHeading___Toc908_3206075736 Copy 3 Copy 1 Copy 1"/></text:h>
      <text:p text:style-name="P65"><text:span text:style-name="Strong_20_Emphasis"><text:span text:style-name="T6">Description</text:span></text:span></text:p>
      <text:p text:style-name="P65"><text:span text:style-name="Strong_20_Emphasis"><text:span text:style-name="T7">This API adds a record of “</text:span></text:span><text:span text:style-name="Strong_20_Emphasis"><text:span text:style-name="T36">file extension</text:span></text:span><text:span text:style-name="Strong_20_Emphasis"><text:span text:style-name="T7">” into the basic data.</text:span></text:span></text:p>
      <text:p text:style-name="P65"><text:span text:style-name="Strong_20_Emphasis"><text:span text:style-name="T8">Request CURL Sample</text:span></text:span></text:p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P66">curl --request POST \</text:p>
            <text:p text:style-name="P66"><text:s text:c="2"/>--url 'https://[maindomian]/api/basic/fileExtension' \</text:p>
            <text:p text:style-name="P66"><text:s text:c="2"/>--header 'Authorization: Bearer [JWT token]' \</text:p>
            <text:p text:style-name="P66"><text:s text:c="2"/>--header 'content-type: application/json' \</text:p>
            <text:p text:style-name="P66"><text:s text:c="2"/>--data '{"code":"123","title":"test","decription":"test"}'</text:p>
          </table:table-cell>
        </table:table-row>
      </table:table>
      <text:p text:style-name="P65"><text:span text:style-name="Strong_20_Emphasis"><text:span text:style-name="T9"/></text:span></text:p>
      <text:p text:style-name="P65"><text:span text:style-name="Strong_20_Emphasis"><text:span text:style-name="T8">Response Sample</text:span></text:span></text:p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66">{</text:p>
            <text:p text:style-name="P66"><text:tab/>"statusCode" : 200,</text:p>
            <text:p text:style-name="P66"><text:tab/>"status" : "success",</text:p>
            <text:p text:style-name="P66"><text:tab/>"message" : "The record is added successfully."</text:p>
            <text:p text:style-name="P66"><text:tab/>"errorCode": 0,</text:p>
            <text:p text:style-name="P66"><text:tab/>"data": {</text:p>
            <text:p text:style-name="P66"><text:tab/><text:tab/>"id": 123</text:p>
            <text:p text:style-name="P66"><text:tab/>}</text:p>
            <text:p text:style-name="P66">}</text:p>
          </table:table-cell>
        </table:table-row>
      </table:table>
      <text:p text:style-name="P65"><text:span text:style-name="Strong_20_Emphasis"/></text:p>
      <text:h text:style-name="P64" text:outline-level="2"><text:bookmark-start text:name="__RefHeading___Toc2081_720390006 Copy 1 Copy 2 Copy 1 Copy 1"/><text:span text:style-name="Strong_20_Emphasis"><text:span text:style-name="T10">Update</text:span></text:span><text:bookmark-end text:name="__RefHeading___Toc2081_720390006 Copy 1 Copy 2 Copy 1 Copy 1"/></text:h>
      <text:p text:style-name="P65"><text:span text:style-name="Strong_20_Emphasis"><text:span text:style-name="T6">Description</text:span></text:span></text:p>
      <text:p text:style-name="P65"><text:span text:style-name="Strong_20_Emphasis"><text:span text:style-name="T7">This API updates a specific record of “</text:span></text:span><text:span text:style-name="Strong_20_Emphasis"><text:span text:style-name="T36">file extension</text:span></text:span><text:span text:style-name="Strong_20_Emphasis"><text:span text:style-name="T7">” in the basic data.</text:span></text:span></text:p>
      <text:p text:style-name="P65"><text:span text:style-name="Strong_20_Emphasis"><text:span text:style-name="T8">Request CURL Sample</text:span></text:span></text:p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66">curl --request PUT \</text:p>
            <text:p text:style-name="P66"><text:s text:c="2"/>--url 'https://[maindomian]/api/basic/fileExtension/[id]' \</text:p>
            <text:p text:style-name="P66"><text:s text:c="2"/>--header 'Authorization: Bearer [JWT token]' \</text:p>
            <text:p text:style-name="P66"><text:s text:c="2"/>--header 'content-type: application/json' \</text:p>
            <text:p text:style-name="P66"><text:s text:c="2"/>--data '{"code":"123","title":"test","decription":"test"}'</text:p>
          </table:table-cell>
        </table:table-row>
      </table:table>
      <text:p text:style-name="P65"><text:span text:style-name="Strong_20_Emphasis"><text:span text:style-name="T9"/></text:span></text:p>
      <text:p text:style-name="P65"><text:soft-page-break/><text:span text:style-name="Strong_20_Emphasis"><text:span text:style-name="T8">Response Sample</text:span></text:span></text:p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P66">{</text:p>
            <text:p text:style-name="P66"><text:tab/>"statusCode" : 200,</text:p>
            <text:p text:style-name="P66"><text:tab/>"status" : "success",</text:p>
            <text:p text:style-name="P66"><text:tab/>"message" : "The record is <text:span text:style-name="T10">updated</text:span> successfully."</text:p>
            <text:p text:style-name="P66"><text:tab/>"errorCode" : 0,</text:p>
            <text:p text:style-name="P66"><text:tab/>"data" : <text:span text:style-name="T11">null</text:span></text:p>
            <text:p text:style-name="P66">}</text:p>
          </table:table-cell>
        </table:table-row>
      </table:table>
      <text:p text:style-name="P65"><text:span text:style-name="Strong_20_Emphasis"/></text:p>
      <text:h text:style-name="P64" text:outline-level="2"><text:bookmark-start text:name="__RefHeading___Toc908_3206075736 Copy 1 Copy 2 Copy 1 Copy 1"/><text:span text:style-name="Strong_20_Emphasis"><text:span text:style-name="T10">Delete</text:span></text:span><text:bookmark-end text:name="__RefHeading___Toc908_3206075736 Copy 1 Copy 2 Copy 1 Copy 1"/></text:h>
      <text:p text:style-name="P65"><text:span text:style-name="Strong_20_Emphasis"><text:span text:style-name="T6">Description</text:span></text:span></text:p>
      <text:p text:style-name="P65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36">file extension</text:span></text:span><text:span text:style-name="Strong_20_Emphasis"><text:span text:style-name="T7">” from the basic data.</text:span></text:span></text:p>
      <text:p text:style-name="P65"><text:span text:style-name="Strong_20_Emphasis"><text:span text:style-name="T8">Request CURL Sample</text:span></text:span></text:p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66">curl --request DELETE \</text:p>
            <text:p text:style-name="P66"><text:s text:c="2"/>--url 'https://[maindomian]/api/basic/fileExtension/[id]' \</text:p>
            <text:p text:style-name="P66"><text:s text:c="2"/>--header 'Authorization: Bearer [JWT token]'</text:p>
          </table:table-cell>
        </table:table-row>
      </table:table>
      <text:p text:style-name="P65"><text:span text:style-name="Strong_20_Emphasis"><text:span text:style-name="T9"/></text:span></text:p>
      <text:p text:style-name="P65"><text:span text:style-name="Strong_20_Emphasis"><text:span text:style-name="T8">Response Sample</text:span></text:span>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66">{</text:p>
            <text:p text:style-name="P66"><text:tab/>"statusCode" : 200,</text:p>
            <text:p text:style-name="P66"><text:tab/>"status" : "success",</text:p>
            <text:p text:style-name="P66"><text:tab/>"message" : "The record is <text:span text:style-name="T11">deleted</text:span> successfully."</text:p>
            <text:p text:style-name="P66"><text:tab/>"errorCode" : 0,</text:p>
            <text:p text:style-name="P66"><text:tab/>"data" : <text:span text:style-name="T11">null</text:span></text:p>
            <text:p text:style-name="P66">}</text:p>
          </table:table-cell>
        </table:table-row>
      </table:table>
      <text:p text:style-name="P65"><text:span text:style-name="Strong_20_Emphasis"/></text:p>
      <text:h text:style-name="P64" text:outline-level="2"><text:bookmark-start text:name="__RefHeading___Toc2079_720390006 Copy 2 Copy 1 Copy 1"/><text:span text:style-name="Strong_20_Emphasis"><text:span text:style-name="T10">Active</text:span></text:span><text:bookmark-end text:name="__RefHeading___Toc2079_720390006 Copy 2 Copy 1 Copy 1"/></text:h>
      <text:p text:style-name="P65"><text:span text:style-name="Strong_20_Emphasis"><text:span text:style-name="T6">Description</text:span></text:span></text:p>
      <text:p text:style-name="P65"><text:span text:style-name="Strong_20_Emphasis"><text:span text:style-name="T7">This API actives a specific record of “</text:span></text:span><text:span text:style-name="Strong_20_Emphasis"><text:span text:style-name="T36">file extension</text:span></text:span><text:span text:style-name="Strong_20_Emphasis"><text:span text:style-name="T7">” in the basic data.</text:span></text:span></text:p>
      <text:p text:style-name="P65"><text:span text:style-name="Strong_20_Emphasis"><text:span text:style-name="T8">Request CURL Sample</text:span></text:span></text:p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P66">curl --request PUT \</text:p>
            <text:p text:style-name="P66"><text:soft-page-break/><text:s text:c="2"/>--url 'https://[maindomian]/api/basic/fileExtension/active/[id]' \</text:p>
            <text:p text:style-name="P66"><text:s text:c="2"/>--header 'Authorization: Bearer [JWT token]'</text:p>
          </table:table-cell>
        </table:table-row>
      </table:table>
      <text:p text:style-name="P65"><text:span text:style-name="Strong_20_Emphasis"><text:span text:style-name="T9"/></text:span></text:p>
      <text:p text:style-name="P65"><text:span text:style-name="Strong_20_Emphasis"><text:span text:style-name="T8">Response Sample</text:span></text:span></text:p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P66">{</text:p>
            <text:p text:style-name="P66"><text:tab/>"statusCode" : 200,</text:p>
            <text:p text:style-name="P66"><text:tab/>"status" : "success",</text:p>
            <text:p text:style-name="P66"><text:tab/>"message" : "The record is <text:span text:style-name="T11">activated</text:span> successfully."</text:p>
            <text:p text:style-name="P66"><text:tab/>"errorCode" : 0,</text:p>
            <text:p text:style-name="P66"><text:tab/>"data" : <text:span text:style-name="T11">null</text:span></text:p>
            <text:p text:style-name="P66">}</text:p>
          </table:table-cell>
        </table:table-row>
      </table:table>
      <text:p text:style-name="P65"><text:span text:style-name="Strong_20_Emphasis"/></text:p>
      <text:h text:style-name="P64" text:outline-level="2"><text:bookmark-start text:name="__RefHeading___Toc2083_720390006 Copy 2 Copy 1 Copy 1"/><text:span text:style-name="Strong_20_Emphasis"><text:span text:style-name="T10">Inactive</text:span></text:span><text:bookmark-end text:name="__RefHeading___Toc2083_720390006 Copy 2 Copy 1 Copy 1"/></text:h>
      <text:p text:style-name="P65"><text:span text:style-name="Strong_20_Emphasis"><text:span text:style-name="T6">Description</text:span></text:span></text:p>
      <text:p text:style-name="P65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36">file extension</text:span></text:span><text:span text:style-name="Strong_20_Emphasis"><text:span text:style-name="T7">” in the basic data.</text:span></text:span></text:p>
      <text:p text:style-name="P65"><text:span text:style-name="Strong_20_Emphasis"><text:span text:style-name="T8">Request CURL Sample</text:span></text:span></text:p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P66">curl --request PUT \</text:p>
            <text:p text:style-name="P66"><text:s text:c="2"/>--url 'https://[maindomian]/api/basic/fileExtension/inactive/[id]' \</text:p>
            <text:p text:style-name="P66"><text:s text:c="2"/>--header 'Authorization: Bearer [JWT token]'</text:p>
          </table:table-cell>
        </table:table-row>
      </table:table>
      <text:p text:style-name="P65"><text:span text:style-name="Strong_20_Emphasis"><text:span text:style-name="T9"/></text:span></text:p>
      <text:p text:style-name="P65"><text:span text:style-name="Strong_20_Emphasis"><text:span text:style-name="T8">Response Sample</text:span></text:span></text:p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P66">{</text:p>
            <text:p text:style-name="P66"><text:tab/>"statusCode" : 200,</text:p>
            <text:p text:style-name="P66"><text:tab/>"status" : "success",</text:p>
            <text:p text:style-name="P66"><text:tab/>"message" : "The record is <text:span text:style-name="T14">in</text:span><text:span text:style-name="T11">activated</text:span> successfully."</text:p>
            <text:p text:style-name="P66"><text:tab/>"errorCode" : 0,</text:p>
            <text:p text:style-name="P66"><text:tab/>"data" : <text:span text:style-name="T11">null</text:span></text:p>
            <text:p text:style-name="P66">}</text:p>
          </table:table-cell>
        </table:table-row>
      </table:table>
      <text:p text:style-name="P65"><text:span text:style-name="Strong_20_Emphasis"/></text:p>
      <text:h text:style-name="P64" text:outline-level="2"><text:bookmark-start text:name="__RefHeading___Toc2085_720390006 Copy 2 Copy 1 Copy 1"/><text:span text:style-name="Strong_20_Emphasis"><text:span text:style-name="T10">Fetch Specific Record</text:span></text:span><text:bookmark-end text:name="__RefHeading___Toc2085_720390006 Copy 2 Copy 1 Copy 1"/></text:h>
      <text:p text:style-name="P65"><text:span text:style-name="Strong_20_Emphasis"><text:span text:style-name="T6">Description</text:span></text:span></text:p>
      <text:p text:style-name="P65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36">file extension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65"><text:soft-page-break/><text:span text:style-name="Strong_20_Emphasis"><text:span text:style-name="T8">Request CURL Sample</text:span></text:span></text:p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P66">curl --request GET \</text:p>
            <text:p text:style-name="P66"><text:s text:c="2"/>--url 'https://[maindomian]/api/basic/fileExtension/[id]' \</text:p>
            <text:p text:style-name="P66"><text:s text:c="2"/>--header 'Authorization: Bearer [JWT token]'</text:p>
          </table:table-cell>
        </table:table-row>
      </table:table>
      <text:p text:style-name="P65"><text:span text:style-name="Strong_20_Emphasis"><text:span text:style-name="T9"/></text:span></text:p>
      <text:p text:style-name="P65"><text:span text:style-name="Strong_20_Emphasis"><text:span text:style-name="T8">Response Sample</text:span></text:span></text:p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P66">{</text:p>
            <text:p text:style-name="P66"><text:tab/>"statusCode" : 200,</text:p>
            <text:p text:style-name="P66"><text:tab/>"status" : "success",</text:p>
            <text:p text:style-name="P66"><text:tab/>"message" : "The data is returned successfully.",</text:p>
            <text:p text:style-name="P66"><text:tab/>"errorCode" : 0,</text:p>
            <text:p text:style-name="P66"><text:tab/>"data" : {</text:p>
            <text:p text:style-name="P66"><text:tab/><text:tab/>"id" : 16621244611384550112, </text:p>
            <text:p text:style-name="P66"><text:tab/><text:tab/>"title" : "test",</text:p>
            <text:p text:style-name="P66"><text:tab/><text:tab/>"code" : "123",</text:p>
            <text:p text:style-name="P66"><text:tab/><text:tab/>"description" : "test",</text:p>
            <text:p text:style-name="P66"><text:tab/><text:tab/>"createdAt" : "2025-8-25 12:00:00",</text:p>
            <text:p text:style-name="P66"><text:tab/><text:tab/>"createdBy" : "John Davis" </text:p>
            <text:p text:style-name="P66"><text:tab/>}</text:p>
            <text:p text:style-name="P66">}</text:p>
          </table:table-cell>
        </table:table-row>
      </table:table>
      <text:p text:style-name="P65"><text:span text:style-name="Strong_20_Emphasis"/></text:p>
      <text:h text:style-name="P64" text:outline-level="2"><text:bookmark-start text:name="__RefHeading___Toc702_3019299338 Copy 2 Copy 1 Copy 1"/><text:span text:style-name="Strong_20_Emphasis"><text:span text:style-name="T10">Get All Records</text:span></text:span><text:bookmark-end text:name="__RefHeading___Toc702_3019299338 Copy 2 Copy 1 Copy 1"/></text:h>
      <text:p text:style-name="P65"><text:span text:style-name="Strong_20_Emphasis"><text:span text:style-name="T6">Description</text:span></text:span></text:p>
      <text:p text:style-name="P65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6">file extension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65"><text:span text:style-name="Strong_20_Emphasis"><text:span text:style-name="T8">Request CURL Sample</text:span></text:span></text:p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P66">curl --request GET \</text:p>
            <text:p text:style-name="P66"><text:s text:c="2"/>--url 'https://[maindomian]/api/basic/educationLevel/getAll?title=test&amp;code=123&amp;description=test&amp;offset=0&amp;limit=15&amp;sort_by=desc%28fieldName%29' \</text:p>
            <text:p text:style-name="P66"><text:s text:c="2"/>--header 'Authorization: Bearer [JWT token]'</text:p>
          </table:table-cell>
        </table:table-row>
      </table:table>
      <text:p text:style-name="P65"><text:span text:style-name="Strong_20_Emphasis"><text:span text:style-name="T9"/></text:span></text:p>
      <text:p text:style-name="P65"><text:span text:style-name="Strong_20_Emphasis"><text:span text:style-name="T8">Response Sample</text:span></text:span></text:p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P66">{</text:p>
            <text:p text:style-name="P66"><text:tab/>"statusCode" : 200,</text:p>
            <text:p text:style-name="P66"><text:soft-page-break/><text:tab/>"status" : "success",</text:p>
            <text:p text:style-name="P66"><text:tab/>"message" : "The data is returned successfully.",</text:p>
            <text:p text:style-name="P66"><text:tab/>"errorCode" : 0,</text:p>
            <text:p text:style-name="P66"><text:tab/>"data" : <text:span text:style-name="T19">[</text:span>{</text:p>
            <text:p text:style-name="P66"><text:tab/><text:tab/>"id" : 16621244611384550112, </text:p>
            <text:p text:style-name="P66"><text:tab/><text:tab/>"title" : "test",</text:p>
            <text:p text:style-name="P66"><text:tab/><text:tab/>"code" : "123",</text:p>
            <text:p text:style-name="P66"><text:tab/><text:tab/>"description" : "test",</text:p>
            <text:p text:style-name="P66"><text:tab/><text:tab/>"createdAt" : "2025-8-25 12:00:00",</text:p>
            <text:p text:style-name="P66"><text:tab/><text:tab/>"createdBy" : "John Davis" </text:p>
            <text:p text:style-name="P66"><text:tab/>}<text:span text:style-name="T19">]</text:span></text:p>
            <text:p text:style-name="P66">}</text:p>
          </table:table-cell>
        </table:table-row>
      </table:table>
      <text:p text:style-name="P65"><text:span text:style-name="Strong_20_Emphasis"/></text:p>
      <text:h text:style-name="P64" text:outline-level="2"><text:bookmark-start text:name="__RefHeading___Toc704_3019299338 Copy 2 Copy 1 Copy 1"/><text:span text:style-name="Strong_20_Emphasis"><text:span text:style-name="T10">Get Combo List</text:span></text:span><text:bookmark-end text:name="__RefHeading___Toc704_3019299338 Copy 2 Copy 1 Copy 1"/></text:h>
      <text:p text:style-name="P65"><text:span text:style-name="Strong_20_Emphasis"><text:span text:style-name="T6">Description</text:span></text:span></text:p>
      <text:p text:style-name="P65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0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6">file extension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0">to use in combo or list form components</text:span></text:span><text:span text:style-name="Strong_20_Emphasis"><text:span text:style-name="T7">.</text:span></text:span></text:p>
      <text:p text:style-name="P65"><text:span text:style-name="Strong_20_Emphasis"><text:span text:style-name="T8">Request CURL Sample</text:span></text:span></text:p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P66">curl --request GET \</text:p>
            <text:p text:style-name="P66"><text:s text:c="2"/>--url 'https://[maindomian]/api/basic/fileExtension/getComboList' \</text:p>
            <text:p text:style-name="P66"><text:s text:c="2"/>--header 'Authorization: Bearer [JWT token]'</text:p>
          </table:table-cell>
        </table:table-row>
      </table:table>
      <text:p text:style-name="P65"><text:span text:style-name="Strong_20_Emphasis"><text:span text:style-name="T9"/></text:span></text:p>
      <text:p text:style-name="P65"><text:span text:style-name="Strong_20_Emphasis"><text:span text:style-name="T8">Response Sample</text:span></text:span></text:p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P66">{</text:p>
            <text:p text:style-name="P66"><text:tab/>"statusCode" : 200,</text:p>
            <text:p text:style-name="P66"><text:tab/>"status" : "success",</text:p>
            <text:p text:style-name="P66"><text:tab/>"message" : "The data is returned successfully.",</text:p>
            <text:p text:style-name="P66"><text:tab/>"errorCode" : 0,</text:p>
            <text:p text:style-name="P66"><text:tab/>"data" : <text:span text:style-name="T19">[</text:span>{</text:p>
            <text:p text:style-name="P66"><text:tab/><text:tab/>"id" : 16621244611384550112, </text:p>
            <text:p text:style-name="P66"><text:tab/><text:tab/>"title" : "test",</text:p>
            <text:p text:style-name="P66"><text:tab/><text:tab/>"code" : "123"</text:p>
            <text:p text:style-name="P66"><text:tab/>}<text:span text:style-name="T19">]</text:span></text:p>
            <text:p text:style-name="P66">}</text:p>
          </table:table-cell>
        </table:table-row>
      </table:table>
      <text:p text:style-name="P65"><text:span text:style-name="Strong_20_Emphasis"/></text:p>
      <text:h text:style-name="P67" text:outline-level="1"><text:bookmark-start text:name="__RefHeading___Toc227_771010674 Copy 2 Copy 1 Copy 1 Copy 1"/><text:soft-page-break/>Contract Type<text:bookmark-end text:name="__RefHeading___Toc227_771010674 Copy 2 Copy 1 Copy 1 Copy 1"/></text:h>
      <text:h text:style-name="P68" text:outline-level="2"><text:bookmark-start text:name="__RefHeading___Toc908_3206075736 Copy 3 Copy 1 Copy 1 Copy 1"/><text:span text:style-name="Strong_20_Emphasis"><text:span text:style-name="T5">Add</text:span></text:span><text:bookmark-end text:name="__RefHeading___Toc908_3206075736 Copy 3 Copy 1 Copy 1 Copy 1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adds a record of “</text:span></text:span><text:span text:style-name="Strong_20_Emphasis"><text:span text:style-name="T37">c</text:span></text:span><text:span text:style-name="Strong_20_Emphasis"><text:span text:style-name="T37">ontract type</text:span></text:span><text:span text:style-name="Strong_20_Emphasis"><text:span text:style-name="T7">” into the basic data.</text:span></text:span></text:p>
      <text:p text:style-name="P69"><text:span text:style-name="Strong_20_Emphasis"><text:span text:style-name="T8">Request CURL Sample</text:span></text:span></text:p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P70">curl --request POST \</text:p>
            <text:p text:style-name="P70"><text:s text:c="2"/>--url 'https://[maindomian]/api/basic/contractType' \</text:p>
            <text:p text:style-name="P70"><text:s text:c="2"/>--header 'Authorization: Bearer [JWT token]' \</text:p>
            <text:p text:style-name="P70"><text:s text:c="2"/>--header 'content-type: application/json' \</text:p>
            <text:p text:style-name="P70"><text:s text:c="2"/>--data '{"code":"123","title":"test","decription":"test"}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added successfully."</text:p>
            <text:p text:style-name="P70"><text:tab/>"errorCode": 0,</text:p>
            <text:p text:style-name="P70"><text:tab/>"data": {</text:p>
            <text:p text:style-name="P70"><text:tab/><text:tab/>"id": 123</text:p>
            <text:p text:style-name="P70"><text:tab/>}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2081_720390006 Copy 1 Copy 2 Copy 1 Copy 1 Copy 1"/><text:span text:style-name="Strong_20_Emphasis"><text:span text:style-name="T10">Update</text:span></text:span><text:bookmark-end text:name="__RefHeading___Toc2081_720390006 Copy 1 Copy 2 Copy 1 Copy 1 Copy 1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updates a specific record of “</text:span></text:span><text:span text:style-name="Strong_20_Emphasis"><text:span text:style-name="T37">contract type</text:span></text:span><text:span text:style-name="Strong_20_Emphasis"><text:span text:style-name="T7">” in the basic data.</text:span></text:span></text:p>
      <text:p text:style-name="P69"><text:span text:style-name="Strong_20_Emphasis"><text:span text:style-name="T8">Request CURL Sample</text:span></text:span></text:p>
      <table:table table:name="Table134" table:style-name="Table134">
        <table:table-column table:style-name="Table134.A"/>
        <table:table-row>
          <table:table-cell table:style-name="Table134.A1" office:value-type="string">
            <text:p text:style-name="P70">curl --request PUT \</text:p>
            <text:p text:style-name="P70"><text:s text:c="2"/>--url 'https://[maindomian]/api/basic/contractType/[id]' \</text:p>
            <text:p text:style-name="P70"><text:s text:c="2"/>--header 'Authorization: Bearer [JWT token]' \</text:p>
            <text:p text:style-name="P70"><text:s text:c="2"/>--header 'content-type: application/json' \</text:p>
            <text:p text:style-name="P70"><text:s text:c="2"/>--data '{"code":"123","title":"test","decription":"test"}'</text:p>
          </table:table-cell>
        </table:table-row>
      </table:table>
      <text:p text:style-name="P69"><text:span text:style-name="Strong_20_Emphasis"><text:span text:style-name="T9"/></text:span></text:p>
      <text:p text:style-name="P69"><text:soft-page-break/><text:span text:style-name="Strong_20_Emphasis"><text:span text:style-name="T8">Response Sample</text:span></text:span></text:p>
      <table:table table:name="Table135" table:style-name="Table135">
        <table:table-column table:style-name="Table135.A"/>
        <table:table-row>
          <table:table-cell table:style-name="Table135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<text:span text:style-name="T10">updated</text:span> successfully."</text:p>
            <text:p text:style-name="P70"><text:tab/>"errorCode" : 0,</text:p>
            <text:p text:style-name="P70"><text:tab/>"data" : <text:span text:style-name="T11">null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908_3206075736 Copy 1 Copy 2 Copy 1 Copy 1 Copy 1"/><text:span text:style-name="Strong_20_Emphasis"><text:span text:style-name="T10">Delete</text:span></text:span><text:bookmark-end text:name="__RefHeading___Toc908_3206075736 Copy 1 Copy 2 Copy 1 Copy 1 Copy 1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37">contract type</text:span></text:span><text:span text:style-name="Strong_20_Emphasis"><text:span text:style-name="T7">” from the basic data.</text:span></text:span></text:p>
      <text:p text:style-name="P69"><text:span text:style-name="Strong_20_Emphasis"><text:span text:style-name="T8">Request CURL Sample</text:span></text:span></text:p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P70">curl --request DELETE \</text:p>
            <text:p text:style-name="P70"><text:s text:c="2"/>--url 'https://[maindomian]/api/basic/contractType/[id]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<text:span text:style-name="T11">deleted</text:span> successfully."</text:p>
            <text:p text:style-name="P70"><text:tab/>"errorCode" : 0,</text:p>
            <text:p text:style-name="P70"><text:tab/>"data" : <text:span text:style-name="T11">null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2079_720390006 Copy 2 Copy 1 Copy 1 Copy 1"/><text:span text:style-name="Strong_20_Emphasis"><text:span text:style-name="T10">Active</text:span></text:span><text:bookmark-end text:name="__RefHeading___Toc2079_720390006 Copy 2 Copy 1 Copy 1 Copy 1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actives a specific record of “</text:span></text:span><text:span text:style-name="Strong_20_Emphasis"><text:span text:style-name="T37">contract type</text:span></text:span><text:span text:style-name="Strong_20_Emphasis"><text:span text:style-name="T7">” in the basic data.</text:span></text:span></text:p>
      <text:p text:style-name="P69"><text:span text:style-name="Strong_20_Emphasis"><text:span text:style-name="T8">Request CURL Sample</text:span></text:span></text:p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P70">curl --request PUT \</text:p>
            <text:p text:style-name="P70"><text:soft-page-break/><text:s text:c="2"/>--url 'https://[maindomian]/api/basic/contractType/active/[id]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39" table:style-name="Table139">
        <table:table-column table:style-name="Table139.A"/>
        <table:table-row>
          <table:table-cell table:style-name="Table139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<text:span text:style-name="T11">activated</text:span> successfully."</text:p>
            <text:p text:style-name="P70"><text:tab/>"errorCode" : 0,</text:p>
            <text:p text:style-name="P70"><text:tab/>"data" : <text:span text:style-name="T11">null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2083_720390006 Copy 2 Copy 1 Copy 1 Copy 1"/><text:span text:style-name="Strong_20_Emphasis"><text:span text:style-name="T10">Inactive</text:span></text:span><text:bookmark-end text:name="__RefHeading___Toc2083_720390006 Copy 2 Copy 1 Copy 1 Copy 1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37">contract type</text:span></text:span><text:span text:style-name="Strong_20_Emphasis"><text:span text:style-name="T7">” in the basic data.</text:span></text:span></text:p>
      <text:p text:style-name="P69"><text:span text:style-name="Strong_20_Emphasis"><text:span text:style-name="T8">Request CURL Sample</text:span></text:span></text:p>
      <table:table table:name="Table140" table:style-name="Table140">
        <table:table-column table:style-name="Table140.A"/>
        <table:table-row>
          <table:table-cell table:style-name="Table140.A1" office:value-type="string">
            <text:p text:style-name="P70">curl --request PUT \</text:p>
            <text:p text:style-name="P70"><text:s text:c="2"/>--url 'https://[maindomian]/api/basic/contractType/inactive/[id]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<text:span text:style-name="T14">in</text:span><text:span text:style-name="T11">activated</text:span> successfully."</text:p>
            <text:p text:style-name="P70"><text:tab/>"errorCode" : 0,</text:p>
            <text:p text:style-name="P70"><text:tab/>"data" : <text:span text:style-name="T11">null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2085_720390006 Copy 2 Copy 1 Copy 1 Copy 1"/><text:span text:style-name="Strong_20_Emphasis"><text:span text:style-name="T10">Fetch Specific Record</text:span></text:span><text:bookmark-end text:name="__RefHeading___Toc2085_720390006 Copy 2 Copy 1 Copy 1 Copy 1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37">contract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69"><text:soft-page-break/><text:span text:style-name="Strong_20_Emphasis"><text:span text:style-name="T8">Request CURL Sample</text:span></text:span></text:p>
      <table:table table:name="Table142" table:style-name="Table142">
        <table:table-column table:style-name="Table142.A"/>
        <table:table-row>
          <table:table-cell table:style-name="Table142.A1" office:value-type="string">
            <text:p text:style-name="P70">curl --request GET \</text:p>
            <text:p text:style-name="P70"><text:s text:c="2"/>--url 'https://[maindomian]/api/basic/contractType/[id]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43" table:style-name="Table143">
        <table:table-column table:style-name="Table143.A"/>
        <table:table-row>
          <table:table-cell table:style-name="Table143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data is returned successfully.",</text:p>
            <text:p text:style-name="P70"><text:tab/>"errorCode" : 0,</text:p>
            <text:p text:style-name="P70"><text:tab/>"data" : {</text:p>
            <text:p text:style-name="P70"><text:tab/><text:tab/>"id" : 16621244611384550112, </text:p>
            <text:p text:style-name="P70"><text:tab/><text:tab/>"title" : "test",</text:p>
            <text:p text:style-name="P70"><text:tab/><text:tab/>"code" : "123",</text:p>
            <text:p text:style-name="P70"><text:tab/><text:tab/>"description" : "test",</text:p>
            <text:p text:style-name="P70"><text:tab/><text:tab/>"createdAt" : "2025-8-25 12:00:00",</text:p>
            <text:p text:style-name="P70"><text:tab/><text:tab/>"createdBy" : "John Davis" </text:p>
            <text:p text:style-name="P70"><text:tab/>}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702_3019299338 Copy 2 Copy 1 Copy 1 Copy 1"/><text:span text:style-name="Strong_20_Emphasis"><text:span text:style-name="T10">Get All Records</text:span></text:span><text:bookmark-end text:name="__RefHeading___Toc702_3019299338 Copy 2 Copy 1 Copy 1 Copy 1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7">contract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69"><text:span text:style-name="Strong_20_Emphasis"><text:span text:style-name="T8">Request CURL Sample</text:span></text:span></text:p>
      <table:table table:name="Table144" table:style-name="Table144">
        <table:table-column table:style-name="Table144.A"/>
        <table:table-row>
          <table:table-cell table:style-name="Table144.A1" office:value-type="string">
            <text:p text:style-name="P70">curl --request GET \</text:p>
            <text:p text:style-name="P70"><text:s text:c="2"/>--url 'https://[maindomian]/api/basic/contractType/getAll?title=test&amp;code=123&amp;description=test&amp;offset=0&amp;limit=15&amp;sort_by=desc%28fieldName%29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45" table:style-name="Table145">
        <table:table-column table:style-name="Table145.A"/>
        <table:table-row>
          <table:table-cell table:style-name="Table145.A1" office:value-type="string">
            <text:p text:style-name="P70">{</text:p>
            <text:p text:style-name="P70"><text:tab/>"statusCode" : 200,</text:p>
            <text:p text:style-name="P70"><text:soft-page-break/><text:tab/>"status" : "success",</text:p>
            <text:p text:style-name="P70"><text:tab/>"message" : "The data is returned successfully.",</text:p>
            <text:p text:style-name="P70"><text:tab/>"errorCode" : 0,</text:p>
            <text:p text:style-name="P70"><text:tab/>"data" : <text:span text:style-name="T19">[</text:span>{</text:p>
            <text:p text:style-name="P70"><text:tab/><text:tab/>"id" : 16621244611384550112, </text:p>
            <text:p text:style-name="P70"><text:tab/><text:tab/>"title" : "test",</text:p>
            <text:p text:style-name="P70"><text:tab/><text:tab/>"code" : "123",</text:p>
            <text:p text:style-name="P70"><text:tab/><text:tab/>"description" : "test",</text:p>
            <text:p text:style-name="P70"><text:tab/><text:tab/>"createdAt" : "2025-8-25 12:00:00",</text:p>
            <text:p text:style-name="P70"><text:tab/><text:tab/>"createdBy" : "John Davis" </text:p>
            <text:p text:style-name="P70"><text:tab/>}<text:span text:style-name="T19">]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704_3019299338 Copy 2 Copy 1 Copy 1 Copy 1"/><text:span text:style-name="Strong_20_Emphasis"><text:span text:style-name="T10">Get Combo List</text:span></text:span><text:bookmark-end text:name="__RefHeading___Toc704_3019299338 Copy 2 Copy 1 Copy 1 Copy 1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0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7">contract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0">to use in combo or list form components</text:span></text:span><text:span text:style-name="Strong_20_Emphasis"><text:span text:style-name="T7">.</text:span></text:span></text:p>
      <text:p text:style-name="P69"><text:span text:style-name="Strong_20_Emphasis"><text:span text:style-name="T8">Request CURL Sample</text:span></text:span></text:p>
      <table:table table:name="Table146" table:style-name="Table146">
        <table:table-column table:style-name="Table146.A"/>
        <table:table-row>
          <table:table-cell table:style-name="Table146.A1" office:value-type="string">
            <text:p text:style-name="P70">curl --request GET \</text:p>
            <text:p text:style-name="P70"><text:s text:c="2"/>--url 'https://[maindomian]/api/basic/contractType/getComboList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47" table:style-name="Table147">
        <table:table-column table:style-name="Table147.A"/>
        <table:table-row>
          <table:table-cell table:style-name="Table147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data is returned successfully.",</text:p>
            <text:p text:style-name="P70"><text:tab/>"errorCode" : 0,</text:p>
            <text:p text:style-name="P70"><text:tab/>"data" : <text:span text:style-name="T19">[</text:span>{</text:p>
            <text:p text:style-name="P70"><text:tab/><text:tab/>"id" : 16621244611384550112, </text:p>
            <text:p text:style-name="P70"><text:tab/><text:tab/>"title" : "test",</text:p>
            <text:p text:style-name="P70"><text:tab/><text:tab/>"code" : "123"</text:p>
            <text:p text:style-name="P70"><text:tab/>}<text:span text:style-name="T19">]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71" text:outline-level="1"><text:bookmark-start text:name="__RefHeading___Toc227_771010674 Copy 2 Copy 1 Copy 1 Copy 2"/><text:soft-page-break/>Test Approval<text:bookmark-end text:name="__RefHeading___Toc227_771010674 Copy 2 Copy 1 Copy 1 Copy 2"/></text:h>
      <text:h text:style-name="P68" text:outline-level="2"><text:bookmark-start text:name="__RefHeading___Toc908_3206075736 Copy 3 Copy 1 Copy 1 Copy 2"/><text:span text:style-name="Strong_20_Emphasis"><text:span text:style-name="T5">Add</text:span></text:span><text:bookmark-end text:name="__RefHeading___Toc908_3206075736 Copy 3 Copy 1 Copy 1 Copy 2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adds a record of “</text:span></text:span><text:span text:style-name="Strong_20_Emphasis"><text:span text:style-name="T38">test approval</text:span></text:span><text:span text:style-name="Strong_20_Emphasis"><text:span text:style-name="T7">” into the basic data.</text:span></text:span></text:p>
      <text:p text:style-name="P69"><text:span text:style-name="Strong_20_Emphasis"><text:span text:style-name="T8">Request CURL Sample</text:span></text:span></text:p>
      <table:table table:name="Table148" table:style-name="Table148">
        <table:table-column table:style-name="Table148.A"/>
        <table:table-row>
          <table:table-cell table:style-name="Table148.A1" office:value-type="string">
            <text:p text:style-name="P70">curl --request POST \</text:p>
            <text:p text:style-name="P70"><text:s text:c="2"/>--url 'https://[maindomian]/api/basic/testApproval' \</text:p>
            <text:p text:style-name="P70"><text:s text:c="2"/>--header 'Authorization: Bearer [JWT token]' \</text:p>
            <text:p text:style-name="P70"><text:s text:c="2"/>--header 'content-type: application/json' \</text:p>
            <text:p text:style-name="P70"><text:s text:c="2"/>--data '{"code":"123","title":"test","color":"#FFFFFF","isApproved":true,"decription":"test"}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49" table:style-name="Table149">
        <table:table-column table:style-name="Table149.A"/>
        <table:table-row>
          <table:table-cell table:style-name="Table149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added successfully."</text:p>
            <text:p text:style-name="P70"><text:tab/>"errorCode": 0,</text:p>
            <text:p text:style-name="P70"><text:tab/>"data": {</text:p>
            <text:p text:style-name="P70"><text:tab/><text:tab/>"id": 123</text:p>
            <text:p text:style-name="P70"><text:tab/>}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2081_720390006 Copy 1 Copy 2 Copy 1 Copy 1 Copy 2"/><text:span text:style-name="Strong_20_Emphasis"><text:span text:style-name="T10">Update</text:span></text:span><text:bookmark-end text:name="__RefHeading___Toc2081_720390006 Copy 1 Copy 2 Copy 1 Copy 1 Copy 2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updates a specific record of “</text:span></text:span><text:span text:style-name="Strong_20_Emphasis"><text:span text:style-name="T38">test approval</text:span></text:span><text:span text:style-name="Strong_20_Emphasis"><text:span text:style-name="T7">” in the basic data.</text:span></text:span></text:p>
      <text:p text:style-name="P69"><text:span text:style-name="Strong_20_Emphasis"><text:span text:style-name="T8">Request CURL Sample</text:span></text:span></text:p>
      <table:table table:name="Table150" table:style-name="Table150">
        <table:table-column table:style-name="Table150.A"/>
        <table:table-row>
          <table:table-cell table:style-name="Table150.A1" office:value-type="string">
            <text:p text:style-name="P70">curl --request PUT \</text:p>
            <text:p text:style-name="P70"><text:s text:c="2"/>--url 'https://[maindomian]/api/basic/testApproval/[id]' \</text:p>
            <text:p text:style-name="P70"><text:s text:c="2"/>--header 'Authorization: Bearer [JWT token]' \</text:p>
            <text:p text:style-name="P70"><text:s text:c="2"/>--header 'content-type: application/json' \</text:p>
            <text:p text:style-name="P70"><text:soft-page-break/><text:s text:c="2"/>--data '{"code":"123","title":"test","color":"#FFFFFF","isApproved":true,"decription":"test"}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51" table:style-name="Table151">
        <table:table-column table:style-name="Table151.A"/>
        <table:table-row>
          <table:table-cell table:style-name="Table151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<text:span text:style-name="T10">updated</text:span> successfully."</text:p>
            <text:p text:style-name="P70"><text:tab/>"errorCode" : 0,</text:p>
            <text:p text:style-name="P70"><text:tab/>"data" : <text:span text:style-name="T11">null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908_3206075736 Copy 1 Copy 2 Copy 1 Copy 1 Copy 2"/><text:span text:style-name="Strong_20_Emphasis"><text:span text:style-name="T10">Delete</text:span></text:span><text:bookmark-end text:name="__RefHeading___Toc908_3206075736 Copy 1 Copy 2 Copy 1 Copy 1 Copy 2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38">test approval</text:span></text:span><text:span text:style-name="Strong_20_Emphasis"><text:span text:style-name="T7">” from the basic data.</text:span></text:span></text:p>
      <text:p text:style-name="P69"><text:span text:style-name="Strong_20_Emphasis"><text:span text:style-name="T8">Request CURL Sample</text:span></text:span></text:p>
      <table:table table:name="Table152" table:style-name="Table152">
        <table:table-column table:style-name="Table152.A"/>
        <table:table-row>
          <table:table-cell table:style-name="Table152.A1" office:value-type="string">
            <text:p text:style-name="P70">curl --request DELETE \</text:p>
            <text:p text:style-name="P70"><text:s text:c="2"/>--url 'https://[maindomian]/api/basic/testApproval/[id]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53" table:style-name="Table153">
        <table:table-column table:style-name="Table153.A"/>
        <table:table-row>
          <table:table-cell table:style-name="Table153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<text:span text:style-name="T11">deleted</text:span> successfully."</text:p>
            <text:p text:style-name="P70"><text:tab/>"errorCode" : 0,</text:p>
            <text:p text:style-name="P70"><text:tab/>"data" : <text:span text:style-name="T11">null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2079_720390006 Copy 2 Copy 1 Copy 1 Copy 2"/><text:span text:style-name="Strong_20_Emphasis"><text:span text:style-name="T10">Active</text:span></text:span><text:bookmark-end text:name="__RefHeading___Toc2079_720390006 Copy 2 Copy 1 Copy 1 Copy 2"/></text:h>
      <text:p text:style-name="P69"><text:span text:style-name="Strong_20_Emphasis"><text:span text:style-name="T6">Description</text:span></text:span></text:p>
      <text:p text:style-name="P69"><text:soft-page-break/><text:span text:style-name="Strong_20_Emphasis"><text:span text:style-name="T7">This API actives a specific record of “</text:span></text:span><text:span text:style-name="Strong_20_Emphasis"><text:span text:style-name="T38">test approval</text:span></text:span><text:span text:style-name="Strong_20_Emphasis"><text:span text:style-name="T7">” in the basic data.</text:span></text:span></text:p>
      <text:p text:style-name="P69"><text:span text:style-name="Strong_20_Emphasis"><text:span text:style-name="T8">Request CURL Sample</text:span></text:span></text:p>
      <table:table table:name="Table154" table:style-name="Table154">
        <table:table-column table:style-name="Table154.A"/>
        <table:table-row>
          <table:table-cell table:style-name="Table154.A1" office:value-type="string">
            <text:p text:style-name="P70">curl --request PUT \</text:p>
            <text:p text:style-name="P70"><text:s text:c="2"/>--url 'https://[maindomian]/api/basic/testApproval/active/[id]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55" table:style-name="Table155">
        <table:table-column table:style-name="Table155.A"/>
        <table:table-row>
          <table:table-cell table:style-name="Table155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<text:span text:style-name="T11">activated</text:span> successfully."</text:p>
            <text:p text:style-name="P70"><text:tab/>"errorCode" : 0,</text:p>
            <text:p text:style-name="P70"><text:tab/>"data" : <text:span text:style-name="T11">null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2083_720390006 Copy 2 Copy 1 Copy 1 Copy 2"/><text:span text:style-name="Strong_20_Emphasis"><text:span text:style-name="T10">Inactive</text:span></text:span><text:bookmark-end text:name="__RefHeading___Toc2083_720390006 Copy 2 Copy 1 Copy 1 Copy 2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38">test approval</text:span></text:span><text:span text:style-name="Strong_20_Emphasis"><text:span text:style-name="T7">” in the basic data.</text:span></text:span></text:p>
      <text:p text:style-name="P69"><text:span text:style-name="Strong_20_Emphasis"><text:span text:style-name="T8">Request CURL Sample</text:span></text:span></text:p>
      <table:table table:name="Table156" table:style-name="Table156">
        <table:table-column table:style-name="Table156.A"/>
        <table:table-row>
          <table:table-cell table:style-name="Table156.A1" office:value-type="string">
            <text:p text:style-name="P70">curl --request PUT \</text:p>
            <text:p text:style-name="P70"><text:s text:c="2"/>--url 'https://[maindomian]/api/basic/testApproval/incative/[id]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57" table:style-name="Table157">
        <table:table-column table:style-name="Table157.A"/>
        <table:table-row>
          <table:table-cell table:style-name="Table157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<text:span text:style-name="T14">in</text:span><text:span text:style-name="T11">activated</text:span> successfully."</text:p>
            <text:p text:style-name="P70"><text:tab/>"errorCode" : 0,</text:p>
            <text:p text:style-name="P70"><text:tab/>"data" : <text:span text:style-name="T11">null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2085_720390006 Copy 2 Copy 1 Copy 1 Copy 2"/><text:soft-page-break/><text:span text:style-name="Strong_20_Emphasis"><text:span text:style-name="T10">Fetch Specific Record</text:span></text:span><text:bookmark-end text:name="__RefHeading___Toc2085_720390006 Copy 2 Copy 1 Copy 1 Copy 2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38">test approval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69"><text:span text:style-name="Strong_20_Emphasis"><text:span text:style-name="T8">Request CURL Sample</text:span></text:span></text:p>
      <table:table table:name="Table158" table:style-name="Table158">
        <table:table-column table:style-name="Table158.A"/>
        <table:table-row>
          <table:table-cell table:style-name="Table158.A1" office:value-type="string">
            <text:p text:style-name="P70">curl --request GET \</text:p>
            <text:p text:style-name="P70"><text:s text:c="2"/>--url 'https://[maindomian]/api/basic/testApproval/[id]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59" table:style-name="Table159">
        <table:table-column table:style-name="Table159.A"/>
        <table:table-row>
          <table:table-cell table:style-name="Table159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data is returned successfully.",</text:p>
            <text:p text:style-name="P70"><text:tab/>"errorCode" : 0,</text:p>
            <text:p text:style-name="P70"><text:tab/>"data" : {</text:p>
            <text:p text:style-name="P70"><text:tab/><text:tab/>"id" : 16621244611384550112, </text:p>
            <text:p text:style-name="P70"><text:tab/><text:tab/>"title" : "test",</text:p>
            <text:p text:style-name="P70"><text:tab/><text:tab/>"code" : "123",</text:p>
            <text:p text:style-name="P70"><text:tab/><text:tab/>"description" : "test",</text:p>
            <text:p text:style-name="P70"><text:tab/><text:tab/>"createdAt" : "2025-8-25 12:00:00",</text:p>
            <text:p text:style-name="P70"><text:tab/><text:tab/>"createdBy" : "John Davis" </text:p>
            <text:p text:style-name="P70"><text:tab/>}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702_3019299338 Copy 2 Copy 1 Copy 1 Copy 2"/><text:span text:style-name="Strong_20_Emphasis"><text:span text:style-name="T10">Get All Records</text:span></text:span><text:bookmark-end text:name="__RefHeading___Toc702_3019299338 Copy 2 Copy 1 Copy 1 Copy 2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8">test approval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69"><text:span text:style-name="Strong_20_Emphasis"><text:span text:style-name="T8">Request CURL Sample</text:span></text:span></text:p>
      <table:table table:name="Table160" table:style-name="Table160">
        <table:table-column table:style-name="Table160.A"/>
        <table:table-row>
          <table:table-cell table:style-name="Table160.A1" office:value-type="string">
            <text:p text:style-name="P70">curl --request GET \</text:p>
            <text:p text:style-name="P70"><text:s text:c="2"/>--url 'https://[maindomian]/api/basic/testApproval/getAll?title=test&amp;code=123&amp;color=FFFFFF&amp;isApproved=true%2Ffalse&amp;description=test&amp;offset=0&amp;limit=15&amp;sort_by=desc%28fieldName%29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oft-page-break/><text:span text:style-name="Strong_20_Emphasis"><text:span text:style-name="T8">Response Sample</text:span></text:span></text:p>
      <table:table table:name="Table161" table:style-name="Table161">
        <table:table-column table:style-name="Table161.A"/>
        <table:table-row>
          <table:table-cell table:style-name="Table161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data is returned successfully.",</text:p>
            <text:p text:style-name="P70"><text:tab/>"errorCode" : 0,</text:p>
            <text:p text:style-name="P70"><text:tab/>"data" : <text:span text:style-name="T19">[</text:span>{</text:p>
            <text:p text:style-name="P70"><text:tab/><text:tab/>"id" : 16621244611384550112, </text:p>
            <text:p text:style-name="P70"><text:tab/><text:tab/>"title" : "test",</text:p>
            <text:p text:style-name="P70"><text:tab/><text:tab/>"code" : "123",</text:p>
            <text:p text:style-name="P70"><text:tab/><text:tab/>"description" : "test",</text:p>
            <text:p text:style-name="P70"><text:tab/><text:tab/>"createdAt" : "2025-8-25 12:00:00",</text:p>
            <text:p text:style-name="P70"><text:tab/><text:tab/>"createdBy" : "John Davis" </text:p>
            <text:p text:style-name="P70"><text:tab/>}<text:span text:style-name="T19">]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704_3019299338 Copy 2 Copy 1 Copy 1 Copy 2"/><text:span text:style-name="Strong_20_Emphasis"><text:span text:style-name="T10">Get Combo List</text:span></text:span><text:bookmark-end text:name="__RefHeading___Toc704_3019299338 Copy 2 Copy 1 Copy 1 Copy 2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0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8">test approval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0">to use in combo or list form components</text:span></text:span><text:span text:style-name="Strong_20_Emphasis"><text:span text:style-name="T7">.</text:span></text:span></text:p>
      <text:p text:style-name="P69"><text:span text:style-name="Strong_20_Emphasis"><text:span text:style-name="T8">Request CURL Sample</text:span></text:span></text:p>
      <table:table table:name="Table162" table:style-name="Table162">
        <table:table-column table:style-name="Table162.A"/>
        <table:table-row>
          <table:table-cell table:style-name="Table162.A1" office:value-type="string">
            <text:p text:style-name="P70">curl --request GET \</text:p>
            <text:p text:style-name="P70"><text:s text:c="2"/>--url 'https://[maindomian]/api/basic/testApproval/getComboList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63" table:style-name="Table163">
        <table:table-column table:style-name="Table163.A"/>
        <table:table-row>
          <table:table-cell table:style-name="Table163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data is returned successfully.",</text:p>
            <text:p text:style-name="P70"><text:tab/>"errorCode" : 0,</text:p>
            <text:p text:style-name="P70"><text:tab/>"data" : <text:span text:style-name="T19">[</text:span>{</text:p>
            <text:p text:style-name="P70"><text:tab/><text:tab/>"id" : 16621244611384550112, </text:p>
            <text:p text:style-name="P70"><text:tab/><text:tab/>"title" : "test",</text:p>
            <text:p text:style-name="P70"><text:tab/><text:tab/>"code" : "123"</text:p>
            <text:p text:style-name="P70"><text:tab/>}<text:span text:style-name="T19">]</text:span></text:p>
            <text:p text:style-name="P70"><text:soft-page-break/>}</text:p>
          </table:table-cell>
        </table:table-row>
      </table:table>
      <text:p text:style-name="P69"><text:span text:style-name="Strong_20_Emphasis"/></text:p>
      <text:h text:style-name="P72" text:outline-level="1"><text:bookmark-start text:name="__RefHeading___Toc227_771010674 Copy 2 Copy 1 Copy 1 Copy 3"/>Test Complexity Level<text:bookmark-end text:name="__RefHeading___Toc227_771010674 Copy 2 Copy 1 Copy 1 Copy 3"/></text:h>
      <text:h text:style-name="P68" text:outline-level="2"><text:bookmark-start text:name="__RefHeading___Toc908_3206075736 Copy 3 Copy 1 Copy 1 Copy 3"/><text:span text:style-name="Strong_20_Emphasis"><text:span text:style-name="T5">Add</text:span></text:span><text:bookmark-end text:name="__RefHeading___Toc908_3206075736 Copy 3 Copy 1 Copy 1 Copy 3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adds a record of “</text:span></text:span><text:span text:style-name="Strong_20_Emphasis"><text:span text:style-name="T38">t</text:span></text:span><text:span text:style-name="Strong_20_Emphasis"><text:span text:style-name="T36">est </text:span></text:span><text:span text:style-name="Strong_20_Emphasis"><text:span text:style-name="T38">c</text:span></text:span><text:span text:style-name="Strong_20_Emphasis"><text:span text:style-name="T36">omplexity </text:span></text:span><text:span text:style-name="Strong_20_Emphasis"><text:span text:style-name="T38">l</text:span></text:span><text:span text:style-name="Strong_20_Emphasis"><text:span text:style-name="T36">evel</text:span></text:span><text:span text:style-name="Strong_20_Emphasis"><text:span text:style-name="T7">” into the basic data.</text:span></text:span></text:p>
      <text:p text:style-name="P69"><text:span text:style-name="Strong_20_Emphasis"><text:span text:style-name="T8">Request CURL Sample</text:span></text:span></text:p>
      <table:table table:name="Table164" table:style-name="Table164">
        <table:table-column table:style-name="Table164.A"/>
        <table:table-row>
          <table:table-cell table:style-name="Table164.A1" office:value-type="string">
            <text:p text:style-name="P70">curl --request POST \</text:p>
            <text:p text:style-name="P70"><text:s text:c="2"/>--url 'https://[maindomian]/api/basic/testComplexityLevel' \</text:p>
            <text:p text:style-name="P70"><text:s text:c="2"/>--header 'Authorization: Bearer [JWT token]' \</text:p>
            <text:p text:style-name="P70"><text:s text:c="2"/>--header 'content-type: application/json' \</text:p>
            <text:p text:style-name="P70"><text:s text:c="2"/>--data '{"code":"123","title":"test","valueNumber":1,"decription":"test"}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65" table:style-name="Table165">
        <table:table-column table:style-name="Table165.A"/>
        <table:table-row>
          <table:table-cell table:style-name="Table165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added successfully."</text:p>
            <text:p text:style-name="P70"><text:tab/>"errorCode": 0,</text:p>
            <text:p text:style-name="P70"><text:tab/>"data": {</text:p>
            <text:p text:style-name="P70"><text:tab/><text:tab/>"id": 123</text:p>
            <text:p text:style-name="P70"><text:tab/>}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2081_720390006 Copy 1 Copy 2 Copy 1 Copy 1 Copy 3"/><text:span text:style-name="Strong_20_Emphasis"><text:span text:style-name="T10">Update</text:span></text:span><text:bookmark-end text:name="__RefHeading___Toc2081_720390006 Copy 1 Copy 2 Copy 1 Copy 1 Copy 3"/></text:h>
      <text:p text:style-name="P69"><text:span text:style-name="Strong_20_Emphasis"><text:span text:style-name="T6">Description</text:span></text:span></text:p>
      <text:p text:style-name="P73"><text:span text:style-name="Strong_20_Emphasis"><text:span text:style-name="T7">This API updates a specific record of “</text:span></text:span><text:span text:style-name="Strong_20_Emphasis"><text:span text:style-name="T38">t</text:span></text:span><text:span text:style-name="Strong_20_Emphasis"><text:span text:style-name="T36">est </text:span></text:span><text:span text:style-name="Strong_20_Emphasis"><text:span text:style-name="T38">c</text:span></text:span><text:span text:style-name="Strong_20_Emphasis"><text:span text:style-name="T36">omplexity </text:span></text:span><text:span text:style-name="Strong_20_Emphasis"><text:span text:style-name="T38">l</text:span></text:span><text:span text:style-name="Strong_20_Emphasis"><text:span text:style-name="T36">evel</text:span></text:span><text:span text:style-name="Strong_20_Emphasis"><text:span text:style-name="T7">” in the basic data.</text:span></text:span></text:p>
      <text:p text:style-name="P69"><text:span text:style-name="Strong_20_Emphasis"><text:span text:style-name="T8">Request CURL Sample</text:span></text:span></text:p>
      <table:table table:name="Table166" table:style-name="Table166">
        <table:table-column table:style-name="Table166.A"/>
        <table:table-row>
          <table:table-cell table:style-name="Table166.A1" office:value-type="string">
            <text:p text:style-name="P70">curl --request PUT \</text:p>
            <text:p text:style-name="P70"><text:soft-page-break/><text:s text:c="2"/>--url 'https://[maindomian]/api/basic/testComplexityLevel/[id]' \</text:p>
            <text:p text:style-name="P70"><text:s text:c="2"/>--header 'Authorization: Bearer [JWT token]' \</text:p>
            <text:p text:style-name="P70"><text:s text:c="2"/>--header 'content-type: application/json' \</text:p>
            <text:p text:style-name="P70"><text:s text:c="2"/>--data '{"code":"123","title":"test","valueNumber":1,"decription":"test"}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67" table:style-name="Table167">
        <table:table-column table:style-name="Table167.A"/>
        <table:table-row>
          <table:table-cell table:style-name="Table167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<text:span text:style-name="T10">updated</text:span> successfully."</text:p>
            <text:p text:style-name="P70"><text:tab/>"errorCode" : 0,</text:p>
            <text:p text:style-name="P70"><text:tab/>"data" : <text:span text:style-name="T11">null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908_3206075736 Copy 1 Copy 2 Copy 1 Copy 1 Copy 3"/><text:span text:style-name="Strong_20_Emphasis"><text:span text:style-name="T10">Delete</text:span></text:span><text:bookmark-end text:name="__RefHeading___Toc908_3206075736 Copy 1 Copy 2 Copy 1 Copy 1 Copy 3"/></text:h>
      <text:p text:style-name="P69"><text:span text:style-name="Strong_20_Emphasis"><text:span text:style-name="T6">Description</text:span></text:span></text:p>
      <text:p text:style-name="P73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38">t</text:span></text:span><text:span text:style-name="Strong_20_Emphasis"><text:span text:style-name="T36">est </text:span></text:span><text:span text:style-name="Strong_20_Emphasis"><text:span text:style-name="T38">c</text:span></text:span><text:span text:style-name="Strong_20_Emphasis"><text:span text:style-name="T36">omplexity </text:span></text:span><text:span text:style-name="Strong_20_Emphasis"><text:span text:style-name="T38">l</text:span></text:span><text:span text:style-name="Strong_20_Emphasis"><text:span text:style-name="T36">evel</text:span></text:span><text:span text:style-name="Strong_20_Emphasis"><text:span text:style-name="T7">” from the basic data.</text:span></text:span></text:p>
      <text:p text:style-name="P69"><text:span text:style-name="Strong_20_Emphasis"><text:span text:style-name="T8">Request CURL Sample</text:span></text:span></text:p>
      <table:table table:name="Table168" table:style-name="Table168">
        <table:table-column table:style-name="Table168.A"/>
        <table:table-row>
          <table:table-cell table:style-name="Table168.A1" office:value-type="string">
            <text:p text:style-name="P70">curl --request DELETE \</text:p>
            <text:p text:style-name="P70"><text:s text:c="2"/>--url 'https://[maindomian]/api/basic/testComplexityLevel/[id]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69" table:style-name="Table169">
        <table:table-column table:style-name="Table169.A"/>
        <table:table-row>
          <table:table-cell table:style-name="Table169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<text:span text:style-name="T11">deleted</text:span> successfully."</text:p>
            <text:p text:style-name="P70"><text:tab/>"errorCode" : 0,</text:p>
            <text:p text:style-name="P70"><text:tab/>"data" : <text:span text:style-name="T11">null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2079_720390006 Copy 2 Copy 1 Copy 1 Copy 3"/><text:soft-page-break/><text:span text:style-name="Strong_20_Emphasis"><text:span text:style-name="T10">Active</text:span></text:span><text:bookmark-end text:name="__RefHeading___Toc2079_720390006 Copy 2 Copy 1 Copy 1 Copy 3"/></text:h>
      <text:p text:style-name="P69"><text:span text:style-name="Strong_20_Emphasis"><text:span text:style-name="T6">Description</text:span></text:span></text:p>
      <text:p text:style-name="P73"><text:span text:style-name="Strong_20_Emphasis"><text:span text:style-name="T7">This API actives a specific record of “</text:span></text:span><text:span text:style-name="Strong_20_Emphasis"><text:span text:style-name="T38">t</text:span></text:span><text:span text:style-name="Strong_20_Emphasis"><text:span text:style-name="T36">est </text:span></text:span><text:span text:style-name="Strong_20_Emphasis"><text:span text:style-name="T38">c</text:span></text:span><text:span text:style-name="Strong_20_Emphasis"><text:span text:style-name="T36">omplexity </text:span></text:span><text:span text:style-name="Strong_20_Emphasis"><text:span text:style-name="T38">l</text:span></text:span><text:span text:style-name="Strong_20_Emphasis"><text:span text:style-name="T36">evel</text:span></text:span><text:span text:style-name="Strong_20_Emphasis"><text:span text:style-name="T7">” in the basic data.</text:span></text:span></text:p>
      <text:p text:style-name="P69"><text:span text:style-name="Strong_20_Emphasis"><text:span text:style-name="T8">Request CURL Sample</text:span></text:span></text:p>
      <table:table table:name="Table170" table:style-name="Table170">
        <table:table-column table:style-name="Table170.A"/>
        <table:table-row>
          <table:table-cell table:style-name="Table170.A1" office:value-type="string">
            <text:p text:style-name="P70">curl --request PUT \</text:p>
            <text:p text:style-name="P70"><text:s text:c="2"/>--url 'https://[maindomian]/api/basic/fileExtension/active/[id]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71" table:style-name="Table171">
        <table:table-column table:style-name="Table171.A"/>
        <table:table-row>
          <table:table-cell table:style-name="Table171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<text:span text:style-name="T11">activated</text:span> successfully."</text:p>
            <text:p text:style-name="P70"><text:tab/>"errorCode" : 0,</text:p>
            <text:p text:style-name="P70"><text:tab/>"data" : <text:span text:style-name="T11">null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2083_720390006 Copy 2 Copy 1 Copy 1 Copy 3"/><text:span text:style-name="Strong_20_Emphasis"><text:span text:style-name="T10">Inactive</text:span></text:span><text:bookmark-end text:name="__RefHeading___Toc2083_720390006 Copy 2 Copy 1 Copy 1 Copy 3"/></text:h>
      <text:p text:style-name="P69"><text:span text:style-name="Strong_20_Emphasis"><text:span text:style-name="T6">Description</text:span></text:span></text:p>
      <text:p text:style-name="P73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38">t</text:span></text:span><text:span text:style-name="Strong_20_Emphasis"><text:span text:style-name="T36">est </text:span></text:span><text:span text:style-name="Strong_20_Emphasis"><text:span text:style-name="T38">c</text:span></text:span><text:span text:style-name="Strong_20_Emphasis"><text:span text:style-name="T36">omplexity </text:span></text:span><text:span text:style-name="Strong_20_Emphasis"><text:span text:style-name="T38">l</text:span></text:span><text:span text:style-name="Strong_20_Emphasis"><text:span text:style-name="T36">evel</text:span></text:span><text:span text:style-name="Strong_20_Emphasis"><text:span text:style-name="T7">” in the basic data.</text:span></text:span></text:p>
      <text:p text:style-name="P69"><text:span text:style-name="Strong_20_Emphasis"><text:span text:style-name="T8">Request CURL Sample</text:span></text:span></text:p>
      <table:table table:name="Table172" table:style-name="Table172">
        <table:table-column table:style-name="Table172.A"/>
        <table:table-row>
          <table:table-cell table:style-name="Table172.A1" office:value-type="string">
            <text:p text:style-name="P70">curl --request PUT \</text:p>
            <text:p text:style-name="P70"><text:s text:c="2"/>--url 'https://[maindomian]/api/basic/testComplexityLevel/incative/[id]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73" table:style-name="Table173">
        <table:table-column table:style-name="Table173.A"/>
        <table:table-row>
          <table:table-cell table:style-name="Table173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<text:span text:style-name="T14">in</text:span><text:span text:style-name="T11">activated</text:span> successfully."</text:p>
            <text:p text:style-name="P70"><text:tab/>"errorCode" : 0,</text:p>
            <text:p text:style-name="P70"><text:soft-page-break/><text:tab/>"data" : <text:span text:style-name="T11">null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2085_720390006 Copy 2 Copy 1 Copy 1 Copy 3"/><text:span text:style-name="Strong_20_Emphasis"><text:span text:style-name="T10">Fetch Specific Record</text:span></text:span><text:bookmark-end text:name="__RefHeading___Toc2085_720390006 Copy 2 Copy 1 Copy 1 Copy 3"/></text:h>
      <text:p text:style-name="P69"><text:span text:style-name="Strong_20_Emphasis"><text:span text:style-name="T6">Description</text:span></text:span></text:p>
      <text:p text:style-name="P73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38">t</text:span></text:span><text:span text:style-name="Strong_20_Emphasis"><text:span text:style-name="T36">est </text:span></text:span><text:span text:style-name="Strong_20_Emphasis"><text:span text:style-name="T38">c</text:span></text:span><text:span text:style-name="Strong_20_Emphasis"><text:span text:style-name="T36">omplexity </text:span></text:span><text:span text:style-name="Strong_20_Emphasis"><text:span text:style-name="T38">l</text:span></text:span><text:span text:style-name="Strong_20_Emphasis"><text:span text:style-name="T36">evel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69"><text:span text:style-name="Strong_20_Emphasis"><text:span text:style-name="T8">Request CURL Sample</text:span></text:span></text:p>
      <table:table table:name="Table174" table:style-name="Table174">
        <table:table-column table:style-name="Table174.A"/>
        <table:table-row>
          <table:table-cell table:style-name="Table174.A1" office:value-type="string">
            <text:p text:style-name="P70">curl --request GET \</text:p>
            <text:p text:style-name="P70"><text:s text:c="2"/>--url 'https://[maindomian]/api/basic/testComplexityLevel/[id]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75" table:style-name="Table175">
        <table:table-column table:style-name="Table175.A"/>
        <table:table-row>
          <table:table-cell table:style-name="Table175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data is returned successfully.",</text:p>
            <text:p text:style-name="P70"><text:tab/>"errorCode" : 0,</text:p>
            <text:p text:style-name="P70"><text:tab/>"data" : {</text:p>
            <text:p text:style-name="P70"><text:tab/><text:tab/>"id" : 16621244611384550112, </text:p>
            <text:p text:style-name="P70"><text:tab/><text:tab/>"title" : "test",</text:p>
            <text:p text:style-name="P70"><text:tab/><text:tab/>"code" : "123",</text:p>
            <text:p text:style-name="P70"><text:tab/><text:tab/>"description" : "test",</text:p>
            <text:p text:style-name="P70"><text:tab/><text:tab/>"createdAt" : "2025-8-25 12:00:00",</text:p>
            <text:p text:style-name="P70"><text:tab/><text:tab/>"createdBy" : "John Davis" </text:p>
            <text:p text:style-name="P70"><text:tab/>}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702_3019299338 Copy 2 Copy 1 Copy 1 Copy 3"/><text:span text:style-name="Strong_20_Emphasis"><text:span text:style-name="T10">Get All Records</text:span></text:span><text:bookmark-end text:name="__RefHeading___Toc702_3019299338 Copy 2 Copy 1 Copy 1 Copy 3"/></text:h>
      <text:p text:style-name="P69"><text:span text:style-name="Strong_20_Emphasis"><text:span text:style-name="T6">Description</text:span></text:span></text:p>
      <text:p text:style-name="P73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8">t</text:span></text:span><text:span text:style-name="Strong_20_Emphasis"><text:span text:style-name="T36">est </text:span></text:span><text:span text:style-name="Strong_20_Emphasis"><text:span text:style-name="T38">c</text:span></text:span><text:span text:style-name="Strong_20_Emphasis"><text:span text:style-name="T36">omplexity </text:span></text:span><text:span text:style-name="Strong_20_Emphasis"><text:span text:style-name="T38">l</text:span></text:span><text:span text:style-name="Strong_20_Emphasis"><text:span text:style-name="T36">evel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69"><text:span text:style-name="Strong_20_Emphasis"><text:span text:style-name="T8">Request CURL Sample</text:span></text:span></text:p>
      <table:table table:name="Table176" table:style-name="Table176">
        <table:table-column table:style-name="Table176.A"/>
        <table:table-row>
          <table:table-cell table:style-name="Table176.A1" office:value-type="string">
            <text:p text:style-name="P70">curl --request GET \</text:p>
            <text:p text:style-name="P70"><text:soft-page-break/><text:s text:c="2"/>--url 'https://[maindomian]/api/basic/testComplexityLevel/getAll?title=test&amp;code=123&amp;valueNumberFrom=1.0&amp;valueNumberTo=10.0&amp;description=test&amp;offset=0&amp;limit=15&amp;sort_by=desc%28fieldName%29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77" table:style-name="Table177">
        <table:table-column table:style-name="Table177.A"/>
        <table:table-row>
          <table:table-cell table:style-name="Table177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data is returned successfully.",</text:p>
            <text:p text:style-name="P70"><text:tab/>"errorCode" : 0,</text:p>
            <text:p text:style-name="P70"><text:tab/>"data" : <text:span text:style-name="T19">[</text:span>{</text:p>
            <text:p text:style-name="P70"><text:tab/><text:tab/>"id" : 16621244611384550112, </text:p>
            <text:p text:style-name="P70"><text:tab/><text:tab/>"title" : "test",</text:p>
            <text:p text:style-name="P70"><text:tab/><text:tab/>"code" : "123",</text:p>
            <text:p text:style-name="P70"><text:tab/><text:tab/>"description" : "test",</text:p>
            <text:p text:style-name="P70"><text:tab/><text:tab/>"createdAt" : "2025-8-25 12:00:00",</text:p>
            <text:p text:style-name="P70"><text:tab/><text:tab/>"createdBy" : "John Davis" </text:p>
            <text:p text:style-name="P70"><text:tab/>}<text:span text:style-name="T19">]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704_3019299338 Copy 2 Copy 1 Copy 1 Copy 3"/><text:span text:style-name="Strong_20_Emphasis"><text:span text:style-name="T10">Get Combo List</text:span></text:span><text:bookmark-end text:name="__RefHeading___Toc704_3019299338 Copy 2 Copy 1 Copy 1 Copy 3"/></text:h>
      <text:p text:style-name="P69"><text:span text:style-name="Strong_20_Emphasis"><text:span text:style-name="T6">Description</text:span></text:span></text:p>
      <text:p text:style-name="P73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0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8">t</text:span></text:span><text:span text:style-name="Strong_20_Emphasis"><text:span text:style-name="T36">est </text:span></text:span><text:span text:style-name="Strong_20_Emphasis"><text:span text:style-name="T38">c</text:span></text:span><text:span text:style-name="Strong_20_Emphasis"><text:span text:style-name="T36">omplexity </text:span></text:span><text:span text:style-name="Strong_20_Emphasis"><text:span text:style-name="T38">l</text:span></text:span><text:span text:style-name="Strong_20_Emphasis"><text:span text:style-name="T36">evel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0">to use in combo or list form components</text:span></text:span><text:span text:style-name="Strong_20_Emphasis"><text:span text:style-name="T7">.</text:span></text:span></text:p>
      <text:p text:style-name="P69"><text:span text:style-name="Strong_20_Emphasis"><text:span text:style-name="T8">Request CURL Sample</text:span></text:span></text:p>
      <table:table table:name="Table178" table:style-name="Table178">
        <table:table-column table:style-name="Table178.A"/>
        <table:table-row>
          <table:table-cell table:style-name="Table178.A1" office:value-type="string">
            <text:p text:style-name="P70">curl --request GET \</text:p>
            <text:p text:style-name="P70"><text:s text:c="2"/>--url 'https://[maindomian]/api/basic/testComplexityLevel/getComboList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79" table:style-name="Table179">
        <table:table-column table:style-name="Table179.A"/>
        <table:table-row>
          <table:table-cell table:style-name="Table179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soft-page-break/><text:tab/>"message" : "The data is returned successfully.",</text:p>
            <text:p text:style-name="P70"><text:tab/>"errorCode" : 0,</text:p>
            <text:p text:style-name="P70"><text:tab/>"data" : <text:span text:style-name="T19">[</text:span>{</text:p>
            <text:p text:style-name="P70"><text:tab/><text:tab/>"id" : 16621244611384550112, </text:p>
            <text:p text:style-name="P70"><text:tab/><text:tab/>"title" : "test",</text:p>
            <text:p text:style-name="P70"><text:tab/><text:tab/>"code" : "123"</text:p>
            <text:p text:style-name="P70"><text:tab/>}<text:span text:style-name="T19">]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74" text:outline-level="1"><text:bookmark-start text:name="__RefHeading___Toc227_771010674 Copy 2 Copy 1 Copy 1 Copy 4"/>Time Unit<text:bookmark-end text:name="__RefHeading___Toc227_771010674 Copy 2 Copy 1 Copy 1 Copy 4"/></text:h>
      <text:h text:style-name="P68" text:outline-level="2"><text:bookmark-start text:name="__RefHeading___Toc908_3206075736 Copy 3 Copy 1 Copy 1 Copy 4"/><text:span text:style-name="Strong_20_Emphasis"><text:span text:style-name="T5">Add</text:span></text:span><text:bookmark-end text:name="__RefHeading___Toc908_3206075736 Copy 3 Copy 1 Copy 1 Copy 4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adds a record of “</text:span></text:span><text:span text:style-name="Strong_20_Emphasis"><text:span text:style-name="T39">time unit</text:span></text:span><text:span text:style-name="Strong_20_Emphasis"><text:span text:style-name="T7">” into the basic data.</text:span></text:span></text:p>
      <text:p text:style-name="P69"><text:span text:style-name="Strong_20_Emphasis"><text:span text:style-name="T8">Request CURL Sample</text:span></text:span></text:p>
      <table:table table:name="Table180" table:style-name="Table180">
        <table:table-column table:style-name="Table180.A"/>
        <table:table-row>
          <table:table-cell table:style-name="Table180.A1" office:value-type="string">
            <text:p text:style-name="P70">curl --request POST \</text:p>
            <text:p text:style-name="P70"><text:s text:c="2"/>--url 'https://[maindomian]/api/basic/timeUnit' \</text:p>
            <text:p text:style-name="P70"><text:s text:c="2"/>--header 'Authorization: Bearer [JWT token]' \</text:p>
            <text:p text:style-name="P70"><text:s text:c="2"/>--header 'content-type: application/json' \</text:p>
            <text:p text:style-name="P70"><text:s text:c="2"/>--data '{"code":"123","title":"test","valueBasedOnMillisecond":1000,"decription":"test"}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81" table:style-name="Table181">
        <table:table-column table:style-name="Table181.A"/>
        <table:table-row>
          <table:table-cell table:style-name="Table181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added successfully."</text:p>
            <text:p text:style-name="P70"><text:tab/>"errorCode": 0,</text:p>
            <text:p text:style-name="P70"><text:tab/>"data": {</text:p>
            <text:p text:style-name="P70"><text:tab/><text:tab/>"id": 123</text:p>
            <text:p text:style-name="P70"><text:tab/>}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2081_720390006 Copy 1 Copy 2 Copy 1 Copy 1 Copy 4"/><text:soft-page-break/><text:span text:style-name="Strong_20_Emphasis"><text:span text:style-name="T10">Update</text:span></text:span><text:bookmark-end text:name="__RefHeading___Toc2081_720390006 Copy 1 Copy 2 Copy 1 Copy 1 Copy 4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updates a specific record of “</text:span></text:span><text:span text:style-name="Strong_20_Emphasis"><text:span text:style-name="T39">time unit</text:span></text:span><text:span text:style-name="Strong_20_Emphasis"><text:span text:style-name="T7">” in the basic data.</text:span></text:span></text:p>
      <text:p text:style-name="P69"><text:span text:style-name="Strong_20_Emphasis"><text:span text:style-name="T8">Request CURL Sample</text:span></text:span></text:p>
      <table:table table:name="Table182" table:style-name="Table182">
        <table:table-column table:style-name="Table182.A"/>
        <table:table-row>
          <table:table-cell table:style-name="Table182.A1" office:value-type="string">
            <text:p text:style-name="P70">curl --request PUT \</text:p>
            <text:p text:style-name="P70"><text:s text:c="2"/>--url 'https://[maindomian]/api/basic/timeUnit/[id]' \</text:p>
            <text:p text:style-name="P70"><text:s text:c="2"/>--header 'Authorization: Bearer [JWT token]' \</text:p>
            <text:p text:style-name="P70"><text:s text:c="2"/>--header 'content-type: application/json' \</text:p>
            <text:p text:style-name="P70"><text:s text:c="2"/>--data '{"code":"[code]","title":"[title]","valueBasedOnMillisecond":1000,"decription":"[description (optional)]"}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83" table:style-name="Table183">
        <table:table-column table:style-name="Table183.A"/>
        <table:table-row>
          <table:table-cell table:style-name="Table183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<text:span text:style-name="T10">updated</text:span> successfully."</text:p>
            <text:p text:style-name="P70"><text:tab/>"errorCode" : 0,</text:p>
            <text:p text:style-name="P70"><text:tab/>"data" : <text:span text:style-name="T11">null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908_3206075736 Copy 1 Copy 2 Copy 1 Copy 1 Copy 4"/><text:span text:style-name="Strong_20_Emphasis"><text:span text:style-name="T10">Delete</text:span></text:span><text:bookmark-end text:name="__RefHeading___Toc908_3206075736 Copy 1 Copy 2 Copy 1 Copy 1 Copy 4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39">time unit</text:span></text:span><text:span text:style-name="Strong_20_Emphasis"><text:span text:style-name="T7">” from the basic data.</text:span></text:span></text:p>
      <text:p text:style-name="P69"><text:span text:style-name="Strong_20_Emphasis"><text:span text:style-name="T8">Request CURL Sample</text:span></text:span></text:p>
      <table:table table:name="Table184" table:style-name="Table184">
        <table:table-column table:style-name="Table184.A"/>
        <table:table-row>
          <table:table-cell table:style-name="Table184.A1" office:value-type="string">
            <text:p text:style-name="P70">curl --request DELETE \</text:p>
            <text:p text:style-name="P70"><text:s text:c="2"/>--url 'https://[maindomian]/api/basic/timeUnit/[id]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85" table:style-name="Table185">
        <table:table-column table:style-name="Table185.A"/>
        <table:table-row>
          <table:table-cell table:style-name="Table185.A1" office:value-type="string">
            <text:p text:style-name="P70">{</text:p>
            <text:p text:style-name="P70"><text:tab/>"statusCode" : 200,</text:p>
            <text:p text:style-name="P70"><text:soft-page-break/><text:tab/>"status" : "success",</text:p>
            <text:p text:style-name="P70"><text:tab/>"message" : "The record is <text:span text:style-name="T11">deleted</text:span> successfully."</text:p>
            <text:p text:style-name="P70"><text:tab/>"errorCode" : 0,</text:p>
            <text:p text:style-name="P70"><text:tab/>"data" : <text:span text:style-name="T11">null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2079_720390006 Copy 2 Copy 1 Copy 1 Copy 4"/><text:span text:style-name="Strong_20_Emphasis"><text:span text:style-name="T10">Active</text:span></text:span><text:bookmark-end text:name="__RefHeading___Toc2079_720390006 Copy 2 Copy 1 Copy 1 Copy 4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actives a specific record of “</text:span></text:span><text:span text:style-name="Strong_20_Emphasis"><text:span text:style-name="T39">time unit</text:span></text:span><text:span text:style-name="Strong_20_Emphasis"><text:span text:style-name="T7">” in the basic data.</text:span></text:span></text:p>
      <text:p text:style-name="P69"><text:span text:style-name="Strong_20_Emphasis"><text:span text:style-name="T8">Request CURL Sample</text:span></text:span></text:p>
      <table:table table:name="Table186" table:style-name="Table186">
        <table:table-column table:style-name="Table186.A"/>
        <table:table-row>
          <table:table-cell table:style-name="Table186.A1" office:value-type="string">
            <text:p text:style-name="P70">curl --request PUT \</text:p>
            <text:p text:style-name="P70"><text:s text:c="2"/>--url 'https://[maindomian]/api/basic/timeUnit/active/[id]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87" table:style-name="Table187">
        <table:table-column table:style-name="Table187.A"/>
        <table:table-row>
          <table:table-cell table:style-name="Table187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<text:span text:style-name="T11">activated</text:span> successfully."</text:p>
            <text:p text:style-name="P70"><text:tab/>"errorCode" : 0,</text:p>
            <text:p text:style-name="P70"><text:tab/>"data" : <text:span text:style-name="T11">null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2083_720390006 Copy 2 Copy 1 Copy 1 Copy 4"/><text:span text:style-name="Strong_20_Emphasis"><text:span text:style-name="T10">Inactive</text:span></text:span><text:bookmark-end text:name="__RefHeading___Toc2083_720390006 Copy 2 Copy 1 Copy 1 Copy 4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39">time unit</text:span></text:span><text:span text:style-name="Strong_20_Emphasis"><text:span text:style-name="T7">” in the basic data.</text:span></text:span></text:p>
      <text:p text:style-name="P69"><text:span text:style-name="Strong_20_Emphasis"><text:span text:style-name="T8">Request CURL Sample</text:span></text:span></text:p>
      <table:table table:name="Table188" table:style-name="Table188">
        <table:table-column table:style-name="Table188.A"/>
        <table:table-row>
          <table:table-cell table:style-name="Table188.A1" office:value-type="string">
            <text:p text:style-name="P70">curl --request PUT \</text:p>
            <text:p text:style-name="P70"><text:s text:c="2"/>--url 'https://[maindomian]/api/basic/timeUnit/incative/[id]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oft-page-break/><text:span text:style-name="Strong_20_Emphasis"><text:span text:style-name="T8">Response Sample</text:span></text:span></text:p>
      <table:table table:name="Table189" table:style-name="Table189">
        <table:table-column table:style-name="Table189.A"/>
        <table:table-row>
          <table:table-cell table:style-name="Table189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<text:span text:style-name="T14">in</text:span><text:span text:style-name="T11">activated</text:span> successfully."</text:p>
            <text:p text:style-name="P70"><text:tab/>"errorCode" : 0,</text:p>
            <text:p text:style-name="P70"><text:tab/>"data" : <text:span text:style-name="T11">null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2085_720390006 Copy 2 Copy 1 Copy 1 Copy 4"/><text:span text:style-name="Strong_20_Emphasis"><text:span text:style-name="T10">Fetch Specific Record</text:span></text:span><text:bookmark-end text:name="__RefHeading___Toc2085_720390006 Copy 2 Copy 1 Copy 1 Copy 4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39">time unit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69"><text:span text:style-name="Strong_20_Emphasis"><text:span text:style-name="T8">Request CURL Sample</text:span></text:span></text:p>
      <table:table table:name="Table190" table:style-name="Table190">
        <table:table-column table:style-name="Table190.A"/>
        <table:table-row>
          <table:table-cell table:style-name="Table190.A1" office:value-type="string">
            <text:p text:style-name="P70">curl --request GET \</text:p>
            <text:p text:style-name="P70"><text:s text:c="2"/>--url 'https://[maindomian]/api/basic/timeUnit/[id]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91" table:style-name="Table191">
        <table:table-column table:style-name="Table191.A"/>
        <table:table-row>
          <table:table-cell table:style-name="Table191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data is returned successfully.",</text:p>
            <text:p text:style-name="P70"><text:tab/>"errorCode" : 0,</text:p>
            <text:p text:style-name="P70"><text:tab/>"data" : {</text:p>
            <text:p text:style-name="P70"><text:tab/><text:tab/>"id" : 16621244611384550112, </text:p>
            <text:p text:style-name="P70"><text:tab/><text:tab/>"title" : "test",</text:p>
            <text:p text:style-name="P70"><text:tab/><text:tab/>"code" : "123",</text:p>
            <text:p text:style-name="P70"><text:tab/><text:tab/>"description" : "test",</text:p>
            <text:p text:style-name="P70"><text:tab/><text:tab/>"createdAt" : "2025-8-25 12:00:00",</text:p>
            <text:p text:style-name="P70"><text:tab/><text:tab/>"createdBy" : "John Davis" </text:p>
            <text:p text:style-name="P70"><text:tab/>}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702_3019299338 Copy 2 Copy 1 Copy 1 Copy 4"/><text:soft-page-break/><text:span text:style-name="Strong_20_Emphasis"><text:span text:style-name="T10">Get All Records</text:span></text:span><text:bookmark-end text:name="__RefHeading___Toc702_3019299338 Copy 2 Copy 1 Copy 1 Copy 4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9">time unit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69"><text:span text:style-name="Strong_20_Emphasis"><text:span text:style-name="T8">Request CURL Sample</text:span></text:span></text:p>
      <table:table table:name="Table192" table:style-name="Table192">
        <table:table-column table:style-name="Table192.A"/>
        <table:table-row>
          <table:table-cell table:style-name="Table192.A1" office:value-type="string">
            <text:p text:style-name="P70">curl --request GET \</text:p>
            <text:p text:style-name="P70"><text:s text:c="2"/>--url 'https://[maindomian]/api/basic/currency/getAll?title=test&amp;code=123&amp;valueBasedOnMillisecondFrom=1000&amp;valueBasedOnMillisecondTo=1200000&amp;description=test&amp;offset=0&amp;limit=15&amp;sort_by=desc%28fieldName%29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93" table:style-name="Table193">
        <table:table-column table:style-name="Table193.A"/>
        <table:table-row>
          <table:table-cell table:style-name="Table193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data is returned successfully.",</text:p>
            <text:p text:style-name="P70"><text:tab/>"errorCode" : 0,</text:p>
            <text:p text:style-name="P70"><text:tab/>"data" : <text:span text:style-name="T19">[</text:span>{</text:p>
            <text:p text:style-name="P70"><text:tab/><text:tab/>"id" : 16621244611384550112, </text:p>
            <text:p text:style-name="P70"><text:tab/><text:tab/>"title" : "test",</text:p>
            <text:p text:style-name="P70"><text:tab/><text:tab/>"code" : "123",</text:p>
            <text:p text:style-name="P70"><text:tab/><text:tab/>"description" : "test",</text:p>
            <text:p text:style-name="P70"><text:tab/><text:tab/>"createdAt" : "2025-8-25 12:00:00",</text:p>
            <text:p text:style-name="P70"><text:tab/><text:tab/>"createdBy" : "John Davis" </text:p>
            <text:p text:style-name="P70"><text:tab/>}<text:span text:style-name="T19">]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704_3019299338 Copy 2 Copy 1 Copy 1 Copy 4"/><text:span text:style-name="Strong_20_Emphasis"><text:span text:style-name="T10">Get Combo List</text:span></text:span><text:bookmark-end text:name="__RefHeading___Toc704_3019299338 Copy 2 Copy 1 Copy 1 Copy 4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0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9">time unit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0">to use in combo or list form components</text:span></text:span><text:span text:style-name="Strong_20_Emphasis"><text:span text:style-name="T7">.</text:span></text:span></text:p>
      <text:p text:style-name="P69"><text:span text:style-name="Strong_20_Emphasis"><text:span text:style-name="T8">Request CURL Sample</text:span></text:span></text:p>
      <table:table table:name="Table194" table:style-name="Table194">
        <table:table-column table:style-name="Table194.A"/>
        <table:table-row>
          <table:table-cell table:style-name="Table194.A1" office:value-type="string">
            <text:p text:style-name="P70">curl --request GET \</text:p>
            <text:p text:style-name="P70"><text:s text:c="2"/>--url 'https://[maindomian]/api/basic/timeUnit/getComboList' \</text:p>
            <text:p text:style-name="P70"><text:soft-page-break/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95" table:style-name="Table195">
        <table:table-column table:style-name="Table195.A"/>
        <table:table-row>
          <table:table-cell table:style-name="Table195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data is returned successfully.",</text:p>
            <text:p text:style-name="P70"><text:tab/>"errorCode" : 0,</text:p>
            <text:p text:style-name="P70"><text:tab/>"data" : <text:span text:style-name="T19">[</text:span>{</text:p>
            <text:p text:style-name="P70"><text:tab/><text:tab/>"id" : 16621244611384550112, </text:p>
            <text:p text:style-name="P70"><text:tab/><text:tab/>"title" : "test",</text:p>
            <text:p text:style-name="P70"><text:tab/><text:tab/>"code" : "123"</text:p>
            <text:p text:style-name="P70"><text:tab/>}<text:span text:style-name="T19">]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74" text:outline-level="1"><text:bookmark-start text:name="__RefHeading___Toc227_771010674 Copy 2 Copy 1 Copy 1 Copy 5"/>Currency<text:bookmark-end text:name="__RefHeading___Toc227_771010674 Copy 2 Copy 1 Copy 1 Copy 5"/></text:h>
      <text:h text:style-name="P68" text:outline-level="2"><text:bookmark-start text:name="__RefHeading___Toc908_3206075736 Copy 3 Copy 1 Copy 1 Copy 5"/><text:span text:style-name="Strong_20_Emphasis"><text:span text:style-name="T5">Add</text:span></text:span><text:bookmark-end text:name="__RefHeading___Toc908_3206075736 Copy 3 Copy 1 Copy 1 Copy 5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adds a record of “</text:span></text:span><text:span text:style-name="Strong_20_Emphasis"><text:span text:style-name="T39">currency</text:span></text:span><text:span text:style-name="Strong_20_Emphasis"><text:span text:style-name="T7">” into the basic data.</text:span></text:span></text:p>
      <text:p text:style-name="P69"><text:span text:style-name="Strong_20_Emphasis"><text:span text:style-name="T8">Request CURL Sample</text:span></text:span></text:p>
      <table:table table:name="Table196" table:style-name="Table196">
        <table:table-column table:style-name="Table196.A"/>
        <table:table-row>
          <table:table-cell table:style-name="Table196.A1" office:value-type="string">
            <text:p text:style-name="P70">curl --request POST \</text:p>
            <text:p text:style-name="P70"><text:s text:c="2"/>--url 'https://[maindomian]/api/basic/currency' \</text:p>
            <text:p text:style-name="P70"><text:s text:c="2"/>--header 'Authorization: Bearer [JWT token]' \</text:p>
            <text:p text:style-name="P70"><text:s text:c="2"/>--header 'content-type: application/json' \</text:p>
            <text:p text:style-name="P70"><text:s text:c="2"/>--data '{"code":"123","title":"test","symbol":"USD","decription":"test"}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97" table:style-name="Table197">
        <table:table-column table:style-name="Table197.A"/>
        <table:table-row>
          <table:table-cell table:style-name="Table197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added successfully."</text:p>
            <text:p text:style-name="P70"><text:tab/>"errorCode": 0,</text:p>
            <text:p text:style-name="P70"><text:soft-page-break/><text:tab/>"data": {</text:p>
            <text:p text:style-name="P70"><text:tab/><text:tab/>"id": 123</text:p>
            <text:p text:style-name="P70"><text:tab/>}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2081_720390006 Copy 1 Copy 2 Copy 1 Copy 1 Copy 5"/><text:span text:style-name="Strong_20_Emphasis"><text:span text:style-name="T10">Update</text:span></text:span><text:bookmark-end text:name="__RefHeading___Toc2081_720390006 Copy 1 Copy 2 Copy 1 Copy 1 Copy 5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updates a specific record of “</text:span></text:span><text:span text:style-name="Strong_20_Emphasis"><text:span text:style-name="T39">currency</text:span></text:span><text:span text:style-name="Strong_20_Emphasis"><text:span text:style-name="T7">” in the basic data.</text:span></text:span></text:p>
      <text:p text:style-name="P69"><text:span text:style-name="Strong_20_Emphasis"><text:span text:style-name="T8">Request CURL Sample</text:span></text:span></text:p>
      <table:table table:name="Table198" table:style-name="Table198">
        <table:table-column table:style-name="Table198.A"/>
        <table:table-row>
          <table:table-cell table:style-name="Table198.A1" office:value-type="string">
            <text:p text:style-name="P70">curl --request PUT \</text:p>
            <text:p text:style-name="P70"><text:s text:c="2"/>--url 'https://[maindomian]/api/basic/currency/[id]' \</text:p>
            <text:p text:style-name="P70"><text:s text:c="2"/>--header 'Authorization: Bearer [JWT token]' \</text:p>
            <text:p text:style-name="P70"><text:s text:c="2"/>--header 'content-type: application/json' \</text:p>
            <text:p text:style-name="P70"><text:s text:c="2"/>--data '{"code":"123","title":"test","symbol":"USD","decription":"test"}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199" table:style-name="Table199">
        <table:table-column table:style-name="Table199.A"/>
        <table:table-row>
          <table:table-cell table:style-name="Table199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<text:span text:style-name="T10">updated</text:span> successfully."</text:p>
            <text:p text:style-name="P70"><text:tab/>"errorCode" : 0,</text:p>
            <text:p text:style-name="P70"><text:tab/>"data" : <text:span text:style-name="T11">null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908_3206075736 Copy 1 Copy 2 Copy 1 Copy 1 Copy 5"/><text:span text:style-name="Strong_20_Emphasis"><text:span text:style-name="T10">Delete</text:span></text:span><text:bookmark-end text:name="__RefHeading___Toc908_3206075736 Copy 1 Copy 2 Copy 1 Copy 1 Copy 5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39">currency</text:span></text:span><text:span text:style-name="Strong_20_Emphasis"><text:span text:style-name="T7">” from the basic data.</text:span></text:span></text:p>
      <text:p text:style-name="P69"><text:span text:style-name="Strong_20_Emphasis"><text:span text:style-name="T8">Request CURL Sample</text:span></text:span></text:p>
      <table:table table:name="Table200" table:style-name="Table200">
        <table:table-column table:style-name="Table200.A"/>
        <table:table-row>
          <table:table-cell table:style-name="Table200.A1" office:value-type="string">
            <text:p text:style-name="P70">curl --request DELETE \</text:p>
            <text:p text:style-name="P70"><text:s text:c="2"/>--url 'https://[maindomian]/api/basic/currency/[id]' \</text:p>
            <text:p text:style-name="P70"><text:s text:c="2"/>--header 'Authorization: Bearer [JWT token]'</text:p>
          </table:table-cell>
        </table:table-row>
      </table:table>
      <text:p text:style-name="P69"><text:soft-page-break/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201" table:style-name="Table201">
        <table:table-column table:style-name="Table201.A"/>
        <table:table-row>
          <table:table-cell table:style-name="Table201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<text:span text:style-name="T11">deleted</text:span> successfully."</text:p>
            <text:p text:style-name="P70"><text:tab/>"errorCode" : 0,</text:p>
            <text:p text:style-name="P70"><text:tab/>"data" : <text:span text:style-name="T11">null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2079_720390006 Copy 2 Copy 1 Copy 1 Copy 5"/><text:span text:style-name="Strong_20_Emphasis"><text:span text:style-name="T10">Active</text:span></text:span><text:bookmark-end text:name="__RefHeading___Toc2079_720390006 Copy 2 Copy 1 Copy 1 Copy 5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actives a specific record of “</text:span></text:span><text:span text:style-name="Strong_20_Emphasis"><text:span text:style-name="T39">currency</text:span></text:span><text:span text:style-name="Strong_20_Emphasis"><text:span text:style-name="T7">” in the basic data.</text:span></text:span></text:p>
      <text:p text:style-name="P69"><text:span text:style-name="Strong_20_Emphasis"><text:span text:style-name="T8">Request CURL Sample</text:span></text:span></text:p>
      <table:table table:name="Table202" table:style-name="Table202">
        <table:table-column table:style-name="Table202.A"/>
        <table:table-row>
          <table:table-cell table:style-name="Table202.A1" office:value-type="string">
            <text:p text:style-name="P70">curl --request PUT \</text:p>
            <text:p text:style-name="P70"><text:s text:c="2"/>--url 'https://[maindomian]/api/basic/currency/active/[id]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203" table:style-name="Table203">
        <table:table-column table:style-name="Table203.A"/>
        <table:table-row>
          <table:table-cell table:style-name="Table203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<text:span text:style-name="T11">activated</text:span> successfully."</text:p>
            <text:p text:style-name="P70"><text:tab/>"errorCode" : 0,</text:p>
            <text:p text:style-name="P70"><text:tab/>"data" : <text:span text:style-name="T11">null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2083_720390006 Copy 2 Copy 1 Copy 1 Copy 5"/><text:span text:style-name="Strong_20_Emphasis"><text:span text:style-name="T10">Inactive</text:span></text:span><text:bookmark-end text:name="__RefHeading___Toc2083_720390006 Copy 2 Copy 1 Copy 1 Copy 5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36">file extension</text:span></text:span><text:span text:style-name="Strong_20_Emphasis"><text:span text:style-name="T7">” in the basic data.</text:span></text:span></text:p>
      <text:p text:style-name="P69"><text:span text:style-name="Strong_20_Emphasis"><text:span text:style-name="T8">Request CURL Sample</text:span></text:span></text:p>
      <table:table table:name="Table204" table:style-name="Table204">
        <table:table-column table:style-name="Table204.A"/>
        <text:soft-page-break/>
        <table:table-row>
          <table:table-cell table:style-name="Table204.A1" office:value-type="string">
            <text:p text:style-name="P70">curl --request PUT \</text:p>
            <text:p text:style-name="P70"><text:s text:c="2"/>--url 'https://[maindomian]/api/basic/currency/incative/[id]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205" table:style-name="Table205">
        <table:table-column table:style-name="Table205.A"/>
        <table:table-row>
          <table:table-cell table:style-name="Table205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record is <text:span text:style-name="T14">in</text:span><text:span text:style-name="T11">activated</text:span> successfully."</text:p>
            <text:p text:style-name="P70"><text:tab/>"errorCode" : 0,</text:p>
            <text:p text:style-name="P70"><text:tab/>"data" : <text:span text:style-name="T11">null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2085_720390006 Copy 2 Copy 1 Copy 1 Copy 5"/><text:span text:style-name="Strong_20_Emphasis"><text:span text:style-name="T10">Fetch Specific Record</text:span></text:span><text:bookmark-end text:name="__RefHeading___Toc2085_720390006 Copy 2 Copy 1 Copy 1 Copy 5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39">currency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69"><text:span text:style-name="Strong_20_Emphasis"><text:span text:style-name="T8">Request CURL Sample</text:span></text:span></text:p>
      <table:table table:name="Table206" table:style-name="Table206">
        <table:table-column table:style-name="Table206.A"/>
        <table:table-row>
          <table:table-cell table:style-name="Table206.A1" office:value-type="string">
            <text:p text:style-name="P70">curl --request GET \</text:p>
            <text:p text:style-name="P70"><text:s text:c="2"/>--url 'https://[maindomian]/api/basic/currency/[id]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207" table:style-name="Table207">
        <table:table-column table:style-name="Table207.A"/>
        <table:table-row>
          <table:table-cell table:style-name="Table207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data is returned successfully.",</text:p>
            <text:p text:style-name="P70"><text:tab/>"errorCode" : 0,</text:p>
            <text:p text:style-name="P70"><text:tab/>"data" : {</text:p>
            <text:p text:style-name="P70"><text:tab/><text:tab/>"id" : 16621244611384550112, </text:p>
            <text:p text:style-name="P70"><text:tab/><text:tab/>"title" : "test",</text:p>
            <text:p text:style-name="P70"><text:tab/><text:tab/>"code" : "123",</text:p>
            <text:p text:style-name="P70"><text:tab/><text:tab/>"description" : "test",</text:p>
            <text:p text:style-name="P70"><text:tab/><text:tab/>"createdAt" : "2025-8-25 12:00:00",</text:p>
            <text:p text:style-name="P70"><text:tab/><text:tab/>"createdBy" : "John Davis" </text:p>
            <text:p text:style-name="P70"><text:tab/>}</text:p>
            <text:p text:style-name="P70"><text:soft-page-break/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702_3019299338 Copy 2 Copy 1 Copy 1 Copy 5"/><text:span text:style-name="Strong_20_Emphasis"><text:span text:style-name="T10">Get All Records</text:span></text:span><text:bookmark-end text:name="__RefHeading___Toc702_3019299338 Copy 2 Copy 1 Copy 1 Copy 5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9">currency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69"><text:span text:style-name="Strong_20_Emphasis"><text:span text:style-name="T8">Request CURL Sample</text:span></text:span></text:p>
      <table:table table:name="Table208" table:style-name="Table208">
        <table:table-column table:style-name="Table208.A"/>
        <table:table-row>
          <table:table-cell table:style-name="Table208.A1" office:value-type="string">
            <text:p text:style-name="P70">curl --request GET \</text:p>
            <text:p text:style-name="P70"><text:s text:c="2"/>--url 'https://[maindomian]/api/basic/currency/getAll?title=test&amp;code=123&amp;symbol=USD&amp;description=test&amp;offset=0&amp;limit=15&amp;sort_by=desc%28fieldName%29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209" table:style-name="Table209">
        <table:table-column table:style-name="Table209.A"/>
        <table:table-row>
          <table:table-cell table:style-name="Table209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data is returned successfully.",</text:p>
            <text:p text:style-name="P70"><text:tab/>"errorCode" : 0,</text:p>
            <text:p text:style-name="P70"><text:tab/>"data" : <text:span text:style-name="T19">[</text:span>{</text:p>
            <text:p text:style-name="P70"><text:tab/><text:tab/>"id" : 16621244611384550112, </text:p>
            <text:p text:style-name="P70"><text:tab/><text:tab/>"title" : "test",</text:p>
            <text:p text:style-name="P70"><text:tab/><text:tab/>"code" : "123",</text:p>
            <text:p text:style-name="P70"><text:tab/><text:tab/>"description" : "test",</text:p>
            <text:p text:style-name="P70"><text:tab/><text:tab/>"createdAt" : "2025-8-25 12:00:00",</text:p>
            <text:p text:style-name="P70"><text:tab/><text:tab/>"createdBy" : "John Davis" </text:p>
            <text:p text:style-name="P70"><text:tab/>}<text:span text:style-name="T19">]</text:span></text:p>
            <text:p text:style-name="P70">}</text:p>
          </table:table-cell>
        </table:table-row>
      </table:table>
      <text:p text:style-name="P69"><text:span text:style-name="Strong_20_Emphasis"/></text:p>
      <text:h text:style-name="P68" text:outline-level="2"><text:bookmark-start text:name="__RefHeading___Toc704_3019299338 Copy 2 Copy 1 Copy 1 Copy 5"/><text:span text:style-name="Strong_20_Emphasis"><text:span text:style-name="T10">Get Combo List</text:span></text:span><text:bookmark-end text:name="__RefHeading___Toc704_3019299338 Copy 2 Copy 1 Copy 1 Copy 5"/></text:h>
      <text:p text:style-name="P69"><text:span text:style-name="Strong_20_Emphasis"><text:span text:style-name="T6">Description</text:span></text:span></text:p>
      <text:p text:style-name="P69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0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9">currency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0">to use in combo or list form components</text:span></text:span><text:span text:style-name="Strong_20_Emphasis"><text:span text:style-name="T7">.</text:span></text:span></text:p>
      <text:p text:style-name="P69"><text:span text:style-name="Strong_20_Emphasis"><text:span text:style-name="T8">Request CURL Sample</text:span></text:span></text:p>
      <table:table table:name="Table210" table:style-name="Table210">
        <table:table-column table:style-name="Table210.A"/>
        <text:soft-page-break/>
        <table:table-row>
          <table:table-cell table:style-name="Table210.A1" office:value-type="string">
            <text:p text:style-name="P70">curl --request GET \</text:p>
            <text:p text:style-name="P70"><text:s text:c="2"/>--url 'https://[maindomian]/api/basic/currency/getComboList' \</text:p>
            <text:p text:style-name="P70"><text:s text:c="2"/>--header 'Authorization: Bearer [JWT token]'</text:p>
          </table:table-cell>
        </table:table-row>
      </table:table>
      <text:p text:style-name="P69"><text:span text:style-name="Strong_20_Emphasis"><text:span text:style-name="T9"/></text:span></text:p>
      <text:p text:style-name="P69"><text:span text:style-name="Strong_20_Emphasis"><text:span text:style-name="T8">Response Sample</text:span></text:span></text:p>
      <table:table table:name="Table211" table:style-name="Table211">
        <table:table-column table:style-name="Table211.A"/>
        <table:table-row>
          <table:table-cell table:style-name="Table211.A1" office:value-type="string">
            <text:p text:style-name="P70">{</text:p>
            <text:p text:style-name="P70"><text:tab/>"statusCode" : 200,</text:p>
            <text:p text:style-name="P70"><text:tab/>"status" : "success",</text:p>
            <text:p text:style-name="P70"><text:tab/>"message" : "The data is returned successfully.",</text:p>
            <text:p text:style-name="P70"><text:tab/>"errorCode" : 0,</text:p>
            <text:p text:style-name="P70"><text:tab/>"data" : <text:span text:style-name="T19">[</text:span>{</text:p>
            <text:p text:style-name="P70"><text:tab/><text:tab/>"id" : 16621244611384550112, </text:p>
            <text:p text:style-name="P70"><text:tab/><text:tab/>"title" : "test",</text:p>
            <text:p text:style-name="P70"><text:tab/><text:tab/>"code" : "123"</text:p>
            <text:p text:style-name="P70"><text:tab/>}<text:span text:style-name="T19">]</text:span></text:p>
            <text:p text:style-name="P70">}</text:p>
          </table:table-cell>
        </table:table-row>
      </table:table>
      <text:p text:style-name="P69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2&#10;&#10;" text:name="DocumentVersion"/>
        </text:user-field-decls>
        <text:p text:style-name="MP1"><text:subject>API Specification for Basic Data</text:subject><text:tab/><text:tab/>Document Version: <text:user-field-get text:name="DocumentVersion">1.2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72</text:page-number><text:s/>of <text:page-count>72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6-07-01T02:41:04.333182500</dc:date>
    <meta:editing-duration>P24DT19H54M</meta:editing-duration>
    <meta:editing-cycles>1153</meta:editing-cycles>
    <meta:generator>LibreOffice/25.2.7.2$Windows_X86_64 LibreOffice_project/5cbfd1ab6520636bb5f7b99185aa69bd7456825d</meta:generator>
    <dc:subject>API Specification for Basic Data</dc:subject>
    <dc:title>Horizon Research Project</dc:title>
    <meta:document-statistic meta:table-count="211" meta:image-count="1" meta:object-count="0" meta:page-count="72" meta:paragraph-count="2088" meta:word-count="7745" meta:character-count="54024" meta:non-whitespace-character-count="47245"/>
  </office:meta>
</office:document-meta>
</file>