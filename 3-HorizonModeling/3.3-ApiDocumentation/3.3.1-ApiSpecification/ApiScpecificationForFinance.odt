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8" style:family="table-cell">
      <style:table-cell-properties fo:padding="0.0382in" fo:border-left="0.5pt solid #000000" fo:border-right="none" fo:border-top="none" fo:border-bottom="0.5pt solid #000000"/>
    </style:style>
    <style:style style:name="Table82.B8" style:family="table-cell">
      <style:table-cell-properties fo:padding="0.0382in" fo:border-left="0.5pt solid #000000" fo:border-right="none" fo:border-top="none" fo:border-bottom="0.5pt solid #000000"/>
    </style:style>
    <style:style style:name="Table8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9" style:family="table-cell">
      <style:table-cell-properties fo:padding="0.0382in" fo:border-left="0.5pt solid #000000" fo:border-right="none" fo:border-top="none" fo:border-bottom="0.5pt solid #000000"/>
    </style:style>
    <style:style style:name="Table82.B9" style:family="table-cell">
      <style:table-cell-properties fo:padding="0.0382in" fo:border-left="0.5pt solid #000000" fo:border-right="none" fo:border-top="none" fo:border-bottom="0.5pt solid #000000"/>
    </style:style>
    <style:style style:name="Table8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10" style:family="table-cell">
      <style:table-cell-properties fo:padding="0.0382in" fo:border-left="0.5pt solid #000000" fo:border-right="none" fo:border-top="none" fo:border-bottom="0.5pt solid #000000"/>
    </style:style>
    <style:style style:name="Table82.B10" style:family="table-cell">
      <style:table-cell-properties fo:padding="0.0382in" fo:border-left="0.5pt solid #000000" fo:border-right="none" fo:border-top="none" fo:border-bottom="0.5pt solid #000000"/>
    </style:style>
    <style:style style:name="Table8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92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925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925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925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925in" style:rel-column-width="65535*"/>
    </style:style>
    <style:style style:name="Table58.A1" style:family="table-cell">
      <style:table-cell-properties fo:padding="0.0382in" fo:border="0.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925in" style:rel-column-width="65535*"/>
    </style:style>
    <style:style style:name="Table61.A1" style:family="table-cell">
      <style:table-cell-properties fo:padding="0.0382in" fo:border="0.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925in" style:rel-column-width="65535*"/>
    </style:style>
    <style:style style:name="Table62.A1" style:family="table-cell">
      <style:table-cell-properties fo:padding="0.0382in" fo:border="0.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925in" style:rel-column-width="65535*"/>
    </style:style>
    <style:style style:name="Table65.A1" style:family="table-cell">
      <style:table-cell-properties fo:padding="0.0382in" fo:border="0.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925in" style:rel-column-width="65535*"/>
    </style:style>
    <style:style style:name="Table66.A1" style:family="table-cell">
      <style:table-cell-properties fo:padding="0.0382in" fo:border="0.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925in" style:rel-column-width="65535*"/>
    </style:style>
    <style:style style:name="Table67.A1" style:family="table-cell">
      <style:table-cell-properties fo:padding="0.0382in" fo:border="0.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925in" style:rel-column-width="65535*"/>
    </style:style>
    <style:style style:name="Table68.A1" style:family="table-cell">
      <style:table-cell-properties fo:padding="0.0382in" fo:border="0.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925in" style:rel-column-width="65535*"/>
    </style:style>
    <style:style style:name="Table69.A1" style:family="table-cell">
      <style:table-cell-properties fo:padding="0.0382in" fo:border="0.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925in" style:rel-column-width="65535*"/>
    </style:style>
    <style:style style:name="Table70.A1" style:family="table-cell">
      <style:table-cell-properties fo:padding="0.0382in" fo:border="0.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925in" style:rel-column-width="65535*"/>
    </style:style>
    <style:style style:name="Table71.A1" style:family="table-cell">
      <style:table-cell-properties fo:padding="0.0382in" fo:border="0.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925in" style:rel-column-width="65535*"/>
    </style:style>
    <style:style style:name="Table75.A1" style:family="table-cell">
      <style:table-cell-properties fo:padding="0.0382in" fo:border="0.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6.925in" style:rel-column-width="65535*"/>
    </style:style>
    <style:style style:name="Table76.A1" style:family="table-cell">
      <style:table-cell-properties fo:padding="0.0382in" fo:border="0.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6.925in" style:rel-column-width="65535*"/>
    </style:style>
    <style:style style:name="Table77.A1" style:family="table-cell">
      <style:table-cell-properties fo:padding="0.0382in" fo:border="0.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6.925in" style:rel-column-width="65535*"/>
    </style:style>
    <style:style style:name="Table80.A1" style:family="table-cell">
      <style:table-cell-properties fo:padding="0.0382in" fo:border="0.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6.925in" style:rel-column-width="65535*"/>
    </style:style>
    <style:style style:name="Table84.A1" style:family="table-cell">
      <style:table-cell-properties fo:padding="0.0382in" fo:border="0.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6.925in" style:rel-column-width="65535*"/>
    </style:style>
    <style:style style:name="Table85.A1" style:family="table-cell">
      <style:table-cell-properties fo:padding="0.0382in" fo:border="0.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6.925in" style:rel-column-width="65535*"/>
    </style:style>
    <style:style style:name="Table86.A1" style:family="table-cell">
      <style:table-cell-properties fo:padding="0.0382in" fo:border="0.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6.925in" style:rel-column-width="65535*"/>
    </style:style>
    <style:style style:name="Table88.A1" style:family="table-cell">
      <style:table-cell-properties fo:padding="0.0382in" fo:border="0.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6.925in" style:rel-column-width="65535*"/>
    </style:style>
    <style:style style:name="Table92.A1" style:family="table-cell">
      <style:table-cell-properties fo:padding="0.0382in" fo:border="0.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6.925in" style:rel-column-width="65535*"/>
    </style:style>
    <style:style style:name="Table93.A1" style:family="table-cell">
      <style:table-cell-properties fo:padding="0.0382in" fo:border="0.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6.925in" style:rel-column-width="65535*"/>
    </style:style>
    <style:style style:name="Table94.A1" style:family="table-cell">
      <style:table-cell-properties fo:padding="0.0382in" fo:border="0.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6.925in" style:rel-column-width="65535*"/>
    </style:style>
    <style:style style:name="Table95.A1" style:family="table-cell">
      <style:table-cell-properties fo:padding="0.0382in" fo:border="0.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6.925in" style:rel-column-width="65535*"/>
    </style:style>
    <style:style style:name="Table96.A1" style:family="table-cell">
      <style:table-cell-properties fo:padding="0.0382in" fo:border="0.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6.925in" style:rel-column-width="65535*"/>
    </style:style>
    <style:style style:name="Table97.A1" style:family="table-cell">
      <style:table-cell-properties fo:padding="0.0382in" fo:border="0.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6.925in" style:rel-column-width="65535*"/>
    </style:style>
    <style:style style:name="Table98.A1" style:family="table-cell">
      <style:table-cell-properties fo:padding="0.0382in" fo:border="0.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6.925in" style:rel-column-width="65535*"/>
    </style:style>
    <style:style style:name="Table99.A1" style:family="table-cell">
      <style:table-cell-properties fo:padding="0.0382in" fo:border="0.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6.925in" style:rel-column-width="65535*"/>
    </style:style>
    <style:style style:name="Table100.A1" style:family="table-cell">
      <style:table-cell-properties fo:padding="0.0382in" fo:border="0.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6.925in" style:rel-column-width="65535*"/>
    </style:style>
    <style:style style:name="Table101.A1" style:family="table-cell">
      <style:table-cell-properties fo:padding="0.0382in" fo:border="0.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6.925in" style:rel-column-width="65535*"/>
    </style:style>
    <style:style style:name="Table102.A1" style:family="table-cell">
      <style:table-cell-properties fo:padding="0.0382in" fo:border="0.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6.925in" style:rel-column-width="65535*"/>
    </style:style>
    <style:style style:name="Table103.A1" style:family="table-cell">
      <style:table-cell-properties fo:padding="0.0382in" fo:border="0.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6.925in" style:rel-column-width="65535*"/>
    </style:style>
    <style:style style:name="Table104.A1" style:family="table-cell">
      <style:table-cell-properties fo:padding="0.0382in" fo:border="0.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6.925in" style:rel-column-width="65535*"/>
    </style:style>
    <style:style style:name="Table105.A1" style:family="table-cell">
      <style:table-cell-properties fo:padding="0.0382in" fo:border="0.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6.925in" style:rel-column-width="65535*"/>
    </style:style>
    <style:style style:name="Table106.A1" style:family="table-cell">
      <style:table-cell-properties fo:padding="0.0382in" fo:border="0.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6.925in" style:rel-column-width="65535*"/>
    </style:style>
    <style:style style:name="Table107.A1" style:family="table-cell">
      <style:table-cell-properties fo:padding="0.0382in" fo:border="0.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6.925in" style:rel-column-width="65535*"/>
    </style:style>
    <style:style style:name="Table108.A1" style:family="table-cell">
      <style:table-cell-properties fo:padding="0.0382in" fo:border="0.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6.925in" style:rel-column-width="65535*"/>
    </style:style>
    <style:style style:name="Table109.A1" style:family="table-cell">
      <style:table-cell-properties fo:padding="0.0382in" fo:border="0.5pt solid #000000"/>
    </style:style>
    <style:style style:name="Table110" style:family="table">
      <style:table-properties style:width="6.925in" table:align="margins"/>
    </style:style>
    <style:style style:name="Table110.A" style:family="table-column">
      <style:table-column-properties style:column-width="6.925in" style:rel-column-width="65535*"/>
    </style:style>
    <style:style style:name="Table110.A1" style:family="table-cell">
      <style:table-cell-properties fo:padding="0.0382in" fo:border="0.5pt solid #000000"/>
    </style:style>
    <style:style style:name="Table111" style:family="table">
      <style:table-properties style:width="6.925in" table:align="margins"/>
    </style:style>
    <style:style style:name="Table111.A" style:family="table-column">
      <style:table-column-properties style:column-width="6.925in" style:rel-column-width="65535*"/>
    </style:style>
    <style:style style:name="Table111.A1" style:family="table-cell">
      <style:table-cell-properties fo:padding="0.0382in" fo:border="0.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6.925in" style:rel-column-width="65535*"/>
    </style:style>
    <style:style style:name="Table112.A1" style:family="table-cell">
      <style:table-cell-properties fo:padding="0.0382in" fo:border="0.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6.925in" style:rel-column-width="65535*"/>
    </style:style>
    <style:style style:name="Table113.A1" style:family="table-cell">
      <style:table-cell-properties fo:padding="0.0382in" fo:border="0.5pt solid #000000"/>
    </style:style>
    <style:style style:name="Table114" style:family="table">
      <style:table-properties style:width="6.925in" table:align="margins"/>
    </style:style>
    <style:style style:name="Table114.A" style:family="table-column">
      <style:table-column-properties style:column-width="6.925in" style:rel-column-width="65535*"/>
    </style:style>
    <style:style style:name="Table114.A1" style:family="table-cell">
      <style:table-cell-properties fo:padding="0.0382in" fo:border="0.5pt solid #000000"/>
    </style:style>
    <style:style style:name="Table115" style:family="table">
      <style:table-properties style:width="6.925in" table:align="margins"/>
    </style:style>
    <style:style style:name="Table115.A" style:family="table-column">
      <style:table-column-properties style:column-width="6.925in" style:rel-column-width="65535*"/>
    </style:style>
    <style:style style:name="Table115.1" style:family="table-row">
      <style:table-row-properties style:min-row-height="6.5028in"/>
    </style:style>
    <style:style style:name="Table115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d8f75f" officeooo:paragraph-rsid="07d8f75f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Text_20_body">
      <style:text-properties officeooo:paragraph-rsid="07d8f75f"/>
    </style:style>
    <style:style style:name="P26" style:family="paragraph" style:parent-style-name="Text_20_body">
      <style:text-properties style:font-name="Liberation Sans" fo:font-size="18.2000007629395pt" fo:font-weight="bold" officeooo:rsid="07c07f1c" officeooo:paragraph-rsid="0792679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7" style:family="paragraph" style:parent-style-name="Heading_20_1">
      <style:text-properties style:font-name="Liberation Sans" fo:font-size="18.2000007629395pt" fo:font-weight="bold" officeooo:rsid="07d8f75f" officeooo:paragraph-rsid="07d8fe41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8" style:family="paragraph" style:parent-style-name="Heading_20_2">
      <style:text-properties officeooo:paragraph-rsid="07d8fe41"/>
    </style:style>
    <style:style style:name="P29" style:family="paragraph" style:parent-style-name="Text_20_body">
      <style:text-properties officeooo:paragraph-rsid="07d8fe41"/>
    </style:style>
    <style:style style:name="P30" style:family="paragraph" style:parent-style-name="Table_20_Contents">
      <style:text-properties style:font-name="Cascadia Code Light" officeooo:paragraph-rsid="07d8fe41"/>
    </style:style>
    <style:style style:name="P31" style:family="paragraph" style:parent-style-name="Text_20_body">
      <style:text-properties officeooo:paragraph-rsid="07db3cb4"/>
    </style:style>
    <style:style style:name="P32" style:family="paragraph" style:parent-style-name="Text_20_body">
      <style:text-properties style:font-name="Liberation Sans" fo:font-size="18.2000007629395pt" fo:font-weight="bold" officeooo:rsid="07c07f1c" officeooo:paragraph-rsid="07d8fe41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3" style:family="paragraph" style:parent-style-name="Heading_20_1">
      <style:text-properties style:font-name="Liberation Sans" fo:font-size="18.2000007629395pt" fo:font-weight="bold" officeooo:rsid="07d9b0e9" officeooo:paragraph-rsid="07d9b0e9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4" style:family="paragraph" style:parent-style-name="Text_20_body">
      <style:text-properties officeooo:paragraph-rsid="07dd277f"/>
    </style:style>
    <style:style style:name="P35" style:family="paragraph" style:parent-style-name="Text_20_body">
      <style:text-properties officeooo:paragraph-rsid="07e0dc77"/>
    </style:style>
    <style:style style:name="P36" style:family="paragraph" style:parent-style-name="Text_20_body">
      <style:text-properties officeooo:paragraph-rsid="07e1944a"/>
    </style:style>
    <style:style style:name="P37" style:family="paragraph" style:parent-style-name="Text_20_body">
      <style:text-properties officeooo:paragraph-rsid="07e2ebfa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70a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9" style:family="text">
      <style:text-properties fo:font-weight="normal" officeooo:rsid="07d8f75f" style:font-weight-asian="normal" style:font-weight-complex="normal"/>
    </style:style>
    <style:style style:name="T10" style:family="text">
      <style:text-properties fo:font-weight="normal" officeooo:rsid="07d8fe41" style:font-weight-asian="normal" style:font-weight-complex="normal"/>
    </style:style>
    <style:style style:name="T11" style:family="text">
      <style:text-properties fo:font-weight="normal" officeooo:rsid="07a83750" style:font-weight-asian="normal" style:font-weight-complex="normal"/>
    </style:style>
    <style:style style:name="T12" style:family="text">
      <style:text-properties fo:font-weight="normal" officeooo:rsid="07b8209e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78bff70"/>
    </style:style>
    <style:style style:name="T16" style:family="text">
      <style:text-properties fo:font-weight="normal" officeooo:rsid="078c4a89" style:font-weight-asian="normal" style:font-weight-complex="normal"/>
    </style:style>
    <style:style style:name="T17" style:family="text">
      <style:text-properties fo:font-weight="normal" officeooo:rsid="07d8fe41" style:font-weight-asian="normal" style:language-complex="fa" style:country-complex="IR" style:font-weight-complex="normal"/>
    </style:style>
    <style:style style:name="T18" style:family="text">
      <style:text-properties officeooo:rsid="078c4a89"/>
    </style:style>
    <style:style style:name="T19" style:family="text">
      <style:text-properties fo:font-weight="normal" officeooo:rsid="078d4d60" style:font-weight-asian="normal" style:font-weight-complex="normal"/>
    </style:style>
    <style:style style:name="T20" style:family="text">
      <style:text-properties fo:font-weight="normal" officeooo:rsid="07baa476" style:font-weight-asian="normal" style:font-weight-complex="normal"/>
    </style:style>
    <style:style style:name="T21" style:family="text">
      <style:text-properties fo:font-weight="normal" officeooo:rsid="07db3cb4" style:font-weight-asian="normal" style:font-weight-complex="normal"/>
    </style:style>
    <style:style style:name="T22" style:family="text">
      <style:text-properties fo:font-weight="normal" officeooo:rsid="07dd277f" style:font-weight-asian="normal" style:font-weight-complex="normal"/>
    </style:style>
    <style:style style:name="T23" style:family="text">
      <style:text-properties fo:font-weight="normal" officeooo:rsid="07e0dc77" style:font-weight-asian="normal" style:font-weight-complex="normal"/>
    </style:style>
    <style:style style:name="T24" style:family="text">
      <style:text-properties fo:font-weight="normal" officeooo:rsid="07e1944a" style:font-weight-asian="normal" style:font-weight-complex="normal"/>
    </style:style>
    <style:style style:name="T25" style:family="text">
      <style:text-properties officeooo:rsid="07d9b0e9"/>
    </style:style>
    <style:style style:name="T26" style:family="text">
      <style:text-properties fo:font-weight="normal" officeooo:rsid="07e2ebfa" style:font-weight-asian="normal" style:font-weight-complex="normal"/>
    </style:style>
    <style:style style:name="T27" style:family="text">
      <style:text-properties style:font-name="Liberation Sans" fo:font-size="18.2000007629395pt" fo:font-weight="bold" officeooo:rsid="07c07f1c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Finance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5">Document Version: <text:user-field-get text:name="DocumentVersion">1.0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6-06-01T03:01:25.002663312" text:fixed="true">June 1, 2026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4</text:a></text:p>
          <text:p text:style-name="P8"><text:a xlink:type="simple" xlink:href="#__RefHeading___Toc2750_3019299338" text:style-name="Index_20_Link" text:visited-style-name="Index_20_Link">1.1 Status Codes<text:tab/>4</text:a></text:p>
          <text:p text:style-name="P8"><text:a xlink:type="simple" xlink:href="#__RefHeading___Toc2528_3019299338" text:style-name="Index_20_Link" text:visited-style-name="Index_20_Link">1.2 Statuses<text:tab/>4</text:a></text:p>
          <text:p text:style-name="P8"><text:a xlink:type="simple" xlink:href="#__RefHeading___Toc2530_3019299338" text:style-name="Index_20_Link" text:visited-style-name="Index_20_Link">1.3 Successful Messages<text:tab/>4</text:a></text:p>
          <text:p text:style-name="P8"><text:a xlink:type="simple" xlink:href="#__RefHeading___Toc255_2732334432" text:style-name="Index_20_Link" text:visited-style-name="Index_20_Link">1.4 Format of Response<text:tab/>4</text:a></text:p>
          <text:p text:style-name="P7"><text:a xlink:type="simple" xlink:href="#__RefHeading___Toc227_771010674%20Copy%201" text:style-name="Index_20_Link" text:visited-style-name="Index_20_Link">2 Staff Contract<text:tab/>5</text:a></text:p>
          <text:p text:style-name="P8"><text:a xlink:type="simple" xlink:href="#__RefHeading___Toc908_3206075736%20Copy%201%20Copy%201" text:style-name="Index_20_Link" text:visited-style-name="Index_20_Link">2.1 Delete<text:tab/>5</text:a></text:p>
          <text:p text:style-name="P8"><text:a xlink:type="simple" xlink:href="#__RefHeading___Toc2079_720390006%20Copy%201" text:style-name="Index_20_Link" text:visited-style-name="Index_20_Link">2.2 Active<text:tab/>5</text:a></text:p>
          <text:p text:style-name="P8"><text:a xlink:type="simple" xlink:href="#__RefHeading___Toc2083_720390006%20Copy%201" text:style-name="Index_20_Link" text:visited-style-name="Index_20_Link">2.3 Inactive<text:tab/>6</text:a></text:p>
          <text:p text:style-name="P8"><text:a xlink:type="simple" xlink:href="#__RefHeading___Toc2085_720390006%20Copy%201" text:style-name="Index_20_Link" text:visited-style-name="Index_20_Link">2.4 Fetch Specific Record<text:tab/>6</text:a></text:p>
          <text:p text:style-name="P7"><text:a xlink:type="simple" xlink:href="#__RefHeading___Toc227_771010674%20Copy%201%20Copy%201" text:style-name="Index_20_Link" text:visited-style-name="Index_20_Link">3 Contract Salary Item<text:tab/>8</text:a></text:p>
          <text:p text:style-name="P8"><text:a xlink:type="simple" xlink:href="#__RefHeading___Toc908_3206075736%20Copy%201%20Copy%201%20Copy%201" text:style-name="Index_20_Link" text:visited-style-name="Index_20_Link">3.1 Delete<text:tab/>8</text:a></text:p>
          <text:p text:style-name="P8"><text:a xlink:type="simple" xlink:href="#__RefHeading___Toc2079_720390006%20Copy%201%20Copy%201" text:style-name="Index_20_Link" text:visited-style-name="Index_20_Link">3.2 Active<text:tab/>8</text:a></text:p>
          <text:p text:style-name="P8"><text:a xlink:type="simple" xlink:href="#__RefHeading___Toc2083_720390006%20Copy%201%20Copy%201" text:style-name="Index_20_Link" text:visited-style-name="Index_20_Link">3.3 Inactive<text:tab/>9</text:a></text:p>
          <text:p text:style-name="P8"><text:a xlink:type="simple" xlink:href="#__RefHeading___Toc2085_720390006%20Copy%201%20Copy%201" text:style-name="Index_20_Link" text:visited-style-name="Index_20_Link">3.4 Fetch Specific Record<text:tab/>9</text:a></text:p>
          <text:p text:style-name="P7"><text:a xlink:type="simple" xlink:href="#__RefHeading___Toc227_771010674%20Copy%201%20Copy%202" text:style-name="Index_20_Link" text:visited-style-name="Index_20_Link">4 Contract Deduction Item<text:tab/>10</text:a></text:p>
          <text:p text:style-name="P8"><text:a xlink:type="simple" xlink:href="#__RefHeading___Toc908_3206075736%20Copy%201%20Copy%201%20Copy%202" text:style-name="Index_20_Link" text:visited-style-name="Index_20_Link">4.1 Delete<text:tab/>10</text:a></text:p>
          <text:p text:style-name="P8"><text:a xlink:type="simple" xlink:href="#__RefHeading___Toc2079_720390006%20Copy%201%20Copy%202" text:style-name="Index_20_Link" text:visited-style-name="Index_20_Link">4.2 Active<text:tab/>11</text:a></text:p>
          <text:p text:style-name="P8"><text:a xlink:type="simple" xlink:href="#__RefHeading___Toc2083_720390006%20Copy%201%20Copy%202" text:style-name="Index_20_Link" text:visited-style-name="Index_20_Link">4.3 Inactive<text:tab/>12</text:a></text:p>
          <text:p text:style-name="P8"><text:a xlink:type="simple" xlink:href="#__RefHeading___Toc2085_720390006%20Copy%201%20Copy%202" text:style-name="Index_20_Link" text:visited-style-name="Index_20_Link">4.4 Fetch Specific Record<text:tab/>12</text:a></text:p>
          <text:p text:style-name="P7"><text:a xlink:type="simple" xlink:href="#__RefHeading___Toc227_771010674%20Copy%201%20Copy%203" text:style-name="Index_20_Link" text:visited-style-name="Index_20_Link">5 Supplier<text:tab/>13</text:a></text:p>
          <text:p text:style-name="P8"><text:a xlink:type="simple" xlink:href="#__RefHeading___Toc908_3206075736%20Copy%201%20Copy%201%20Copy%203" text:style-name="Index_20_Link" text:visited-style-name="Index_20_Link">5.1 Delete<text:tab/>13</text:a></text:p>
          <text:p text:style-name="P8"><text:a xlink:type="simple" xlink:href="#__RefHeading___Toc2079_720390006%20Copy%201%20Copy%203" text:style-name="Index_20_Link" text:visited-style-name="Index_20_Link">5.2 Active<text:tab/>14</text:a></text:p>
          <text:p text:style-name="P8"><text:a xlink:type="simple" xlink:href="#__RefHeading___Toc2083_720390006%20Copy%201%20Copy%203" text:style-name="Index_20_Link" text:visited-style-name="Index_20_Link">5.3 Inactive<text:tab/>15</text:a></text:p>
          <text:p text:style-name="P8"><text:a xlink:type="simple" xlink:href="#__RefHeading___Toc2085_720390006%20Copy%201%20Copy%203" text:style-name="Index_20_Link" text:visited-style-name="Index_20_Link">5.4 Fetch Specific Record<text:tab/>15</text:a></text:p>
          <text:p text:style-name="P7"><text:a xlink:type="simple" xlink:href="#__RefHeading___Toc227_771010674%20Copy%201%20Copy%204" text:style-name="Index_20_Link" text:visited-style-name="Index_20_Link">6 Cost Invoice<text:tab/>16</text:a></text:p>
          <text:p text:style-name="P8"><text:a xlink:type="simple" xlink:href="#__RefHeading___Toc908_3206075736%20Copy%201%20Copy%201%20Copy%204" text:style-name="Index_20_Link" text:visited-style-name="Index_20_Link">6.1 Delete<text:tab/>16</text:a></text:p>
          <text:p text:style-name="P8"><text:a xlink:type="simple" xlink:href="#__RefHeading___Toc2079_720390006%20Copy%201%20Copy%204" text:style-name="Index_20_Link" text:visited-style-name="Index_20_Link">6.2 Active<text:tab/>17</text:a></text:p>
          <text:p text:style-name="P8"><text:a xlink:type="simple" xlink:href="#__RefHeading___Toc2083_720390006%20Copy%201%20Copy%204" text:style-name="Index_20_Link" text:visited-style-name="Index_20_Link">6.3 Inactive<text:tab/>17</text:a></text:p>
          <text:p text:style-name="P8"><text:a xlink:type="simple" xlink:href="#__RefHeading___Toc2085_720390006%20Copy%201%20Copy%204" text:style-name="Index_20_Link" text:visited-style-name="Index_20_Link">6.4 Fetch Specific Record<text:tab/>18</text:a></text:p>
          <text:p text:style-name="P7"><text:a xlink:type="simple" xlink:href="#__RefHeading___Toc227_771010674%20Copy%201%20Copy%205" text:style-name="Index_20_Link" text:visited-style-name="Index_20_Link">7 Cost Invoice Item<text:tab/>19</text:a></text:p>
          <text:p text:style-name="P8"><text:a xlink:type="simple" xlink:href="#__RefHeading___Toc908_3206075736%20Copy%201%20Copy%201%20Copy%205" text:style-name="Index_20_Link" text:visited-style-name="Index_20_Link">7.1 Delete<text:tab/>19</text:a></text:p>
          <text:p text:style-name="P8"><text:a xlink:type="simple" xlink:href="#__RefHeading___Toc2079_720390006%20Copy%201%20Copy%205" text:style-name="Index_20_Link" text:visited-style-name="Index_20_Link">7.2 Active<text:tab/>20</text:a></text:p>
          <text:p text:style-name="P8"><text:a xlink:type="simple" xlink:href="#__RefHeading___Toc2083_720390006%20Copy%201%20Copy%205" text:style-name="Index_20_Link" text:visited-style-name="Index_20_Link">7.3 Inactive<text:tab/>20</text:a></text:p>
          <text:p text:style-name="P8"><text:a xlink:type="simple" xlink:href="#__RefHeading___Toc2085_720390006%20Copy%201%20Copy%205" text:style-name="Index_20_Link" text:visited-style-name="Index_20_Link">7.4 Fetch Specific Record<text:tab/>21</text:a></text:p>
          <text:p text:style-name="P7"><text:a xlink:type="simple" xlink:href="#__RefHeading___Toc227_771010674%20Copy%201%20Copy%206" text:style-name="Index_20_Link" text:visited-style-name="Index_20_Link">8 Project Direct Cost Item<text:tab/>22</text:a></text:p>
          <text:p text:style-name="P8"><text:a xlink:type="simple" xlink:href="#__RefHeading___Toc908_3206075736%20Copy%201%20Copy%201%20Copy%206" text:style-name="Index_20_Link" text:visited-style-name="Index_20_Link">8.1 Delete<text:tab/>22</text:a></text:p>
          <text:p text:style-name="P8"><text:a xlink:type="simple" xlink:href="#__RefHeading___Toc2079_720390006%20Copy%201%20Copy%206" text:style-name="Index_20_Link" text:visited-style-name="Index_20_Link">8.2 Active<text:tab/>23</text:a></text:p>
          <text:p text:style-name="P8"><text:a xlink:type="simple" xlink:href="#__RefHeading___Toc2083_720390006%20Copy%201%20Copy%206" text:style-name="Index_20_Link" text:visited-style-name="Index_20_Link">8.3 Inactive<text:tab/>23</text:a></text:p>
          <text:p text:style-name="P8"><text:a xlink:type="simple" xlink:href="#__RefHeading___Toc2085_720390006%20Copy%201%20Copy%206" text:style-name="Index_20_Link" text:visited-style-name="Index_20_Link">8.4 Fetch Specific Record<text:tab/>24</text:a></text:p>
          <text:p text:style-name="P7"><text:a xlink:type="simple" xlink:href="#__RefHeading___Toc227_771010674%20Copy%201%20Copy%207" text:style-name="Index_20_Link" text:visited-style-name="Index_20_Link">9 Cost Payment Receipt<text:tab/>25</text:a></text:p>
          <text:p text:style-name="P8"><text:a xlink:type="simple" xlink:href="#__RefHeading___Toc908_3206075736%20Copy%201%20Copy%201%20Copy%207" text:style-name="Index_20_Link" text:visited-style-name="Index_20_Link"><text:soft-page-break/>9.1 Delete<text:tab/>25</text:a></text:p>
          <text:p text:style-name="P8"><text:a xlink:type="simple" xlink:href="#__RefHeading___Toc2079_720390006%20Copy%201%20Copy%207" text:style-name="Index_20_Link" text:visited-style-name="Index_20_Link">9.2 Active<text:tab/>26</text:a></text:p>
          <text:p text:style-name="P8"><text:a xlink:type="simple" xlink:href="#__RefHeading___Toc2083_720390006%20Copy%201%20Copy%207" text:style-name="Index_20_Link" text:visited-style-name="Index_20_Link">9.3 Inactive<text:tab/>26</text:a></text:p>
          <text:p text:style-name="P8"><text:a xlink:type="simple" xlink:href="#__RefHeading___Toc2085_720390006%20Copy%201%20Copy%207" text:style-name="Index_20_Link" text:visited-style-name="Index_20_Link">9.4 Fetch Specific Record<text:tab/>27</text:a></text:p>
          <text:p text:style-name="P7"><text:a xlink:type="simple" xlink:href="#__RefHeading___Toc227_771010674%20Copy%201%20Copy%208" text:style-name="Index_20_Link" text:visited-style-name="Index_20_Link">10 Salary Payment Receipt<text:tab/>28</text:a></text:p>
          <text:p text:style-name="P8"><text:a xlink:type="simple" xlink:href="#__RefHeading___Toc908_3206075736%20Copy%201%20Copy%201%20Copy%208" text:style-name="Index_20_Link" text:visited-style-name="Index_20_Link">10.1 Delete<text:tab/>28</text:a></text:p>
          <text:p text:style-name="P8"><text:a xlink:type="simple" xlink:href="#__RefHeading___Toc2079_720390006%20Copy%201%20Copy%208" text:style-name="Index_20_Link" text:visited-style-name="Index_20_Link">10.2 Active<text:tab/>28</text:a></text:p>
          <text:p text:style-name="P8"><text:a xlink:type="simple" xlink:href="#__RefHeading___Toc2083_720390006%20Copy%201%20Copy%208" text:style-name="Index_20_Link" text:visited-style-name="Index_20_Link">10.3 Inactive<text:tab/>29</text:a></text:p>
          <text:p text:style-name="P8"><text:a xlink:type="simple" xlink:href="#__RefHeading___Toc2085_720390006%20Copy%201%20Copy%208" text:style-name="Index_20_Link" text:visited-style-name="Index_20_Link">10.4 Fetch Specific Record<text:tab/>30</text:a></text:p>
          <text:p text:style-name="P7"><text:a xlink:type="simple" xlink:href="#__RefHeading___Toc227_771010674%20Copy%201%20Copy%209" text:style-name="Index_20_Link" text:visited-style-name="Index_20_Link">11 Staff Additional Payment Receipt<text:tab/>31</text:a></text:p>
          <text:p text:style-name="P8"><text:a xlink:type="simple" xlink:href="#__RefHeading___Toc908_3206075736%20Copy%201%20Copy%201%20Copy%209" text:style-name="Index_20_Link" text:visited-style-name="Index_20_Link">11.1 Delete<text:tab/>31</text:a></text:p>
          <text:p text:style-name="P8"><text:a xlink:type="simple" xlink:href="#__RefHeading___Toc2079_720390006%20Copy%201%20Copy%209" text:style-name="Index_20_Link" text:visited-style-name="Index_20_Link">11.2 Active<text:tab/>31</text:a></text:p>
          <text:p text:style-name="P8"><text:a xlink:type="simple" xlink:href="#__RefHeading___Toc2083_720390006%20Copy%201%20Copy%209" text:style-name="Index_20_Link" text:visited-style-name="Index_20_Link">11.3 Inactive<text:tab/>32</text:a></text:p>
          <text:p text:style-name="P8"><text:a xlink:type="simple" xlink:href="#__RefHeading___Toc2085_720390006%20Copy%201%20Copy%209" text:style-name="Index_20_Link" text:visited-style-name="Index_20_Link">11.4 Fetch Specific Record<text:tab/>33</text:a></text:p>
          <text:p text:style-name="P7"><text:a xlink:type="simple" xlink:href="#__RefHeading___Toc227_771010674%20Copy%201%20Copy%2010" text:style-name="Index_20_Link" text:visited-style-name="Index_20_Link">12 Customer<text:tab/>34</text:a></text:p>
          <text:p text:style-name="P8"><text:a xlink:type="simple" xlink:href="#__RefHeading___Toc908_3206075736%20Copy%201%20Copy%201%20Copy%2010" text:style-name="Index_20_Link" text:visited-style-name="Index_20_Link">12.1 Delete<text:tab/>34</text:a></text:p>
          <text:p text:style-name="P8"><text:a xlink:type="simple" xlink:href="#__RefHeading___Toc2079_720390006%20Copy%201%20Copy%2010" text:style-name="Index_20_Link" text:visited-style-name="Index_20_Link">12.2 Active<text:tab/>34</text:a></text:p>
          <text:p text:style-name="P8"><text:a xlink:type="simple" xlink:href="#__RefHeading___Toc2083_720390006%20Copy%201%20Copy%2010" text:style-name="Index_20_Link" text:visited-style-name="Index_20_Link">12.3 Inactive<text:tab/>35</text:a></text:p>
          <text:p text:style-name="P8"><text:a xlink:type="simple" xlink:href="#__RefHeading___Toc2085_720390006%20Copy%201%20Copy%2010" text:style-name="Index_20_Link" text:visited-style-name="Index_20_Link">12.4 Fetch Specific Record<text:tab/>36</text:a></text:p>
          <text:p text:style-name="P7"><text:a xlink:type="simple" xlink:href="#__RefHeading___Toc227_771010674%20Copy%201%20Copy%2011" text:style-name="Index_20_Link" text:visited-style-name="Index_20_Link">13 Customer Contract<text:tab/>37</text:a></text:p>
          <text:p text:style-name="P8"><text:a xlink:type="simple" xlink:href="#__RefHeading___Toc908_3206075736%20Copy%201%20Copy%201%20Copy%2011" text:style-name="Index_20_Link" text:visited-style-name="Index_20_Link">13.1 Delete<text:tab/>37</text:a></text:p>
          <text:p text:style-name="P8"><text:a xlink:type="simple" xlink:href="#__RefHeading___Toc2079_720390006%20Copy%201%20Copy%2011" text:style-name="Index_20_Link" text:visited-style-name="Index_20_Link">13.2 Active<text:tab/>37</text:a></text:p>
          <text:p text:style-name="P8"><text:a xlink:type="simple" xlink:href="#__RefHeading___Toc2083_720390006%20Copy%201%20Copy%2011" text:style-name="Index_20_Link" text:visited-style-name="Index_20_Link">13.3 Inactive<text:tab/>38</text:a></text:p>
          <text:p text:style-name="P8"><text:a xlink:type="simple" xlink:href="#__RefHeading___Toc2085_720390006%20Copy%201%20Copy%2011" text:style-name="Index_20_Link" text:visited-style-name="Index_20_Link">13.4 Fetch Specific Record<text:tab/>38</text:a></text:p>
          <text:p text:style-name="P7"><text:a xlink:type="simple" xlink:href="#__RefHeading___Toc227_771010674%20Copy%201%20Copy%2012" text:style-name="Index_20_Link" text:visited-style-name="Index_20_Link">14 Customer Contract Payment Schedule<text:tab/>40</text:a></text:p>
          <text:p text:style-name="P8"><text:a xlink:type="simple" xlink:href="#__RefHeading___Toc908_3206075736%20Copy%201%20Copy%201%20Copy%2012" text:style-name="Index_20_Link" text:visited-style-name="Index_20_Link">14.1 Delete<text:tab/>40</text:a></text:p>
          <text:p text:style-name="P8"><text:a xlink:type="simple" xlink:href="#__RefHeading___Toc2079_720390006%20Copy%201%20Copy%2012" text:style-name="Index_20_Link" text:visited-style-name="Index_20_Link">14.2 Active<text:tab/>40</text:a></text:p>
          <text:p text:style-name="P8"><text:a xlink:type="simple" xlink:href="#__RefHeading___Toc2083_720390006%20Copy%201%20Copy%2012" text:style-name="Index_20_Link" text:visited-style-name="Index_20_Link">14.3 Inactive<text:tab/>41</text:a></text:p>
          <text:p text:style-name="P8"><text:a xlink:type="simple" xlink:href="#__RefHeading___Toc2085_720390006%20Copy%201%20Copy%2012" text:style-name="Index_20_Link" text:visited-style-name="Index_20_Link">14.4 Fetch Specific Record<text:tab/>41</text:a></text:p>
          <text:p text:style-name="P7"><text:a xlink:type="simple" xlink:href="#__RefHeading___Toc227_771010674%20Copy%201%20Copy%2013" text:style-name="Index_20_Link" text:visited-style-name="Index_20_Link">15 Customer Contract Payment Receipt<text:tab/>43</text:a></text:p>
          <text:p text:style-name="P8"><text:a xlink:type="simple" xlink:href="#__RefHeading___Toc908_3206075736%20Copy%201%20Copy%201%20Copy%2013" text:style-name="Index_20_Link" text:visited-style-name="Index_20_Link">15.1 Delete<text:tab/>43</text:a></text:p>
          <text:p text:style-name="P8"><text:a xlink:type="simple" xlink:href="#__RefHeading___Toc2079_720390006%20Copy%201%20Copy%2013" text:style-name="Index_20_Link" text:visited-style-name="Index_20_Link">15.2 Active<text:tab/>43</text:a></text:p>
          <text:p text:style-name="P8"><text:a xlink:type="simple" xlink:href="#__RefHeading___Toc2083_720390006%20Copy%201%20Copy%2013" text:style-name="Index_20_Link" text:visited-style-name="Index_20_Link">15.3 Inactive<text:tab/>44</text:a></text:p>
          <text:p text:style-name="P8"><text:a xlink:type="simple" xlink:href="#__RefHeading___Toc2085_720390006%20Copy%201%20Copy%2013" text:style-name="Index_20_Link" text:visited-style-name="Index_20_Link">15.4 Fetch Specific Record<text:tab/>44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ext:soft-page-break/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/>
      <text:h text:style-name="P21" text:outline-level="1"><text:bookmark-start text:name="__RefHeading___Toc227_771010674 Copy 1"/>Staff Contract<text:bookmark-end text:name="__RefHeading___Toc227_771010674 Copy 1"/></text:h>
      <text:h text:style-name="P22" text:outline-level="2"><text:bookmark-start text:name="__RefHeading___Toc908_3206075736 Copy 1 Copy 1"/><text:span text:style-name="Strong_20_Emphasis"><text:span text:style-name="T5">Delete</text:span></text:span><text:bookmark-end text:name="__RefHeading___Toc908_320607573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9">staff’s contract</text:span></text:span><text:span text:style-name="Strong_20_Emphasis"><text:span text:style-name="T7">” from the </text:span></text:span><text:span text:style-name="Strong_20_Emphasis"><text:span text:style-name="T10">finance</text:span></text:span><text:span text:style-name="Strong_20_Emphasis"><text:span text:style-name="T11"> man</text:span></text:span><text:span text:style-name="Strong_20_Emphasis"><text:span text:style-name="T12">a</text:span></text:span><text:span text:style-name="Strong_20_Emphasis"><text:span text:style-name="T11">gement</text:span></text:span><text:span text:style-name="Strong_20_Emphasis"><text:span text:style-name="T7">.</text:span></text:span></text:p>
      <text:p text:style-name="P23"><text:span text:style-name="Strong_20_Emphasis"><text:span text:style-name="T13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finance/staffContrac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4"/></text:span></text:p>
      <text:p text:style-name="P23"><text:span text:style-name="Strong_20_Emphasis"><text:span text:style-name="T13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5">deleted</text:span> successfully.",</text:p>
            <text:p text:style-name="P24"><text:tab/>"errorCode" : 0,</text:p>
            <text:p text:style-name="P24"><text:tab/>"data" : <text:span text:style-name="T15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79_720390006 Copy 1"/><text:span text:style-name="Strong_20_Emphasis"><text:span text:style-name="T5">Active</text:span></text:span><text:bookmark-end text:name="__RefHeading___Toc2079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actives a “</text:span></text:span><text:span text:style-name="Strong_20_Emphasis"><text:span text:style-name="T9">staff’s contract</text:span></text:span><text:span text:style-name="Strong_20_Emphasis"><text:span text:style-name="T7">” in the </text:span></text:span><text:span text:style-name="Strong_20_Emphasis"><text:span text:style-name="T10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3"><text:span text:style-name="Strong_20_Emphasis"><text:span text:style-name="T13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finance/staffContract/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4"/></text:span></text:p>
      <text:p text:style-name="P23"><text:soft-page-break/><text:span text:style-name="Strong_20_Emphasis"><text:span text:style-name="T13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5">activated</text:span> successfully.",</text:p>
            <text:p text:style-name="P24"><text:tab/>"errorCode" : 0,</text:p>
            <text:p text:style-name="P24"><text:tab/>"data" : <text:span text:style-name="T15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5">Inactive</text:span></text:span><text:bookmark-end text:name="__RefHeading___Toc2083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</text:span></text:span><text:span text:style-name="Strong_20_Emphasis"><text:span text:style-name="T16">in</text:span></text:span><text:span text:style-name="Strong_20_Emphasis"><text:span text:style-name="T7">-actives a specific “</text:span></text:span><text:span text:style-name="Strong_20_Emphasis"><text:span text:style-name="T9">staff’s contract</text:span></text:span><text:span text:style-name="Strong_20_Emphasis"><text:span text:style-name="T7">” in the </text:span></text:span><text:span text:style-name="Strong_20_Emphasis"><text:span text:style-name="T17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3"><text:span text:style-name="Strong_20_Emphasis"><text:span text:style-name="T13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finance/staffContract/in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4"/></text:span></text:p>
      <text:p text:style-name="P23"><text:span text:style-name="Strong_20_Emphasis"><text:span text:style-name="T13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8">in</text:span><text:span text:style-name="T15">activated</text:span> successfully.",</text:p>
            <text:p text:style-name="P24"><text:tab/>"errorCode" : 0,</text:p>
            <text:p text:style-name="P24"><text:tab/>"data" : <text:span text:style-name="T15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5">Fetch Specific Record</text:span></text:span><text:bookmark-end text:name="__RefHeading___Toc2085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</text:span></text:span><text:span text:style-name="Strong_20_Emphasis"><text:span text:style-name="T19">returns</text:span></text:span><text:span text:style-name="Strong_20_Emphasis"><text:span text:style-name="T7"> a specific “</text:span></text:span><text:span text:style-name="Strong_20_Emphasis"><text:span text:style-name="T9">staff’s contract</text:span></text:span><text:span text:style-name="Strong_20_Emphasis"><text:span text:style-name="T7">” </text:span></text:span><text:span text:style-name="Strong_20_Emphasis"><text:span text:style-name="T19">from</text:span></text:span><text:span text:style-name="Strong_20_Emphasis"><text:span text:style-name="T7"> the </text:span></text:span><text:span text:style-name="Strong_20_Emphasis"><text:span text:style-name="T10">finance</text:span></text:span><text:span text:style-name="Strong_20_Emphasis"><text:span text:style-name="T20"> management</text:span></text:span><text:span text:style-name="Strong_20_Emphasis"><text:span text:style-name="T7">.</text:span></text:span></text:p>
      <text:p text:style-name="P23"><text:span text:style-name="Strong_20_Emphasis"><text:span text:style-name="T13">Request CURL Sample</text:span></text:span></text:p>
      <table:table table:name="Table27" table:style-name="Table27">
        <table:table-column table:style-name="Table27.A"/>
        <text:soft-page-break/>
        <table:table-row>
          <table:table-cell table:style-name="Table27.A1" office:value-type="string">
            <text:p text:style-name="P24">curl --request GET \</text:p>
            <text:p text:style-name="P24"><text:s text:c="2"/>--url 'https://[maindomian]/api/finance/staffContrac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4"/></text:span></text:p>
      <text:p text:style-name="P23"><text:span text:style-name="Strong_20_Emphasis"><text:span text:style-name="T13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rofileId": [{</text:p>
            <text:p text:style-name="P24"><text:tab/><text:tab/><text:tab/>"id" : 16621244611384550113,</text:p>
            <text:p text:style-name="P24"><text:tab/><text:tab/><text:tab/>"firstName": "David",</text:p>
            <text:p text:style-name="P24"><text:tab/><text:tab/><text:tab/>"lastName": "Talor"</text:p>
            <text:p text:style-name="P24"><text:tab/><text:tab/>}],</text:p>
            <text:p text:style-name="P24"><text:tab/><text:tab/>"roleFormPermissionId": [{</text:p>
            <text:p text:style-name="P24"><text:tab/><text:tab/><text:tab/>"id" : 16621244611384550114,</text:p>
            <text:p text:style-name="P24"><text:tab/><text:tab/><text:tab/>"formPermissionId": {</text:p>
            <text:p text:style-name="P24"><text:tab/><text:tab/><text:tab/><text:tab/>"id" : 16621244611384550114,</text:p>
            <text:p text:style-name="P24"><text:tab/><text:tab/><text:tab/><text:tab/>"formId": {</text:p>
            <text:p text:style-name="P24"><text:tab/><text:tab/><text:tab/><text:tab/><text:tab/>"id" : 16621244611384550115,</text:p>
            <text:p text:style-name="P24"><text:tab/><text:tab/><text:tab/><text:tab/><text:tab/>"title": "Project"</text:p>
            <text:p text:style-name="P24"><text:tab/><text:tab/><text:tab/><text:tab/>},</text:p>
            <text:p text:style-name="P24"><text:tab/><text:tab/><text:tab/><text:tab/>"permissionId": {</text:p>
            <text:p text:style-name="P24"><text:tab/><text:tab/><text:tab/><text:tab/><text:tab/>"id" : 16621244611384550116,</text:p>
            <text:p text:style-name="P24"><text:tab/><text:tab/><text:tab/><text:tab/><text:tab/>"title": "Add"</text:p>
            <text:p text:style-name="P24"><text:tab/><text:tab/><text:tab/><text:tab/>}</text:p>
            <text:p text:style-name="P24"><text:tab/><text:tab/><text:tab/>}</text:p>
            <text:p text:style-name="P24"><text:tab/><text:tab/>}]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6"/>
      <text:h text:style-name="P27" text:outline-level="1"><text:bookmark-start text:name="__RefHeading___Toc227_771010674 Copy 1 Copy 1"/><text:soft-page-break/>Contract Salary Item<text:bookmark-end text:name="__RefHeading___Toc227_771010674 Copy 1 Copy 1"/></text:h>
      <text:h text:style-name="P28" text:outline-level="2"><text:bookmark-start text:name="__RefHeading___Toc908_3206075736 Copy 1 Copy 1 Copy 1"/><text:span text:style-name="Strong_20_Emphasis"><text:span text:style-name="T5">Delete</text:span></text:span><text:bookmark-end text:name="__RefHeading___Toc908_3206075736 Copy 1 Copy 1 Copy 1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1">main i</text:span></text:span><text:span text:style-name="Strong_20_Emphasis"><text:span text:style-name="T21">tem of salary in the staff’s contract</text:span></text:span><text:span text:style-name="Strong_20_Emphasis"><text:span text:style-name="T7">” from the </text:span></text:span><text:span text:style-name="Strong_20_Emphasis"><text:span text:style-name="T10">finance</text:span></text:span><text:span text:style-name="Strong_20_Emphasis"><text:span text:style-name="T11"> man</text:span></text:span><text:span text:style-name="Strong_20_Emphasis"><text:span text:style-name="T12">a</text:span></text:span><text:span text:style-name="Strong_20_Emphasis"><text:span text:style-name="T11">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0">curl --request DELETE \</text:p>
            <text:p text:style-name="P30"><text:s text:c="2"/>--url 'https://[maindomian]/api/finance/contractSalaryItem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dele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1"/><text:span text:style-name="Strong_20_Emphasis"><text:span text:style-name="T5">Active</text:span></text:span><text:bookmark-end text:name="__RefHeading___Toc2079_720390006 Copy 1 Copy 1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actives a “</text:span></text:span><text:span text:style-name="Strong_20_Emphasis"><text:span text:style-name="T21">main </text:span></text:span><text:span text:style-name="Strong_20_Emphasis"><text:span text:style-name="T21">item of salary in the staff’s contract</text:span></text:span><text:span text:style-name="Strong_20_Emphasis"><text:span text:style-name="T7">” in the </text:span></text:span><text:span text:style-name="Strong_20_Emphasis"><text:span text:style-name="T10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0">curl --request PUT \</text:p>
            <text:p text:style-name="P30"><text:s text:c="2"/>--url 'https://[maindomian]/api/finance/contractSalaryItem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0">{</text:p>
            <text:p text:style-name="P30"><text:tab/>"statusCode" : 200,</text:p>
            <text:p text:style-name="P30"><text:soft-page-break/><text:tab/>"status" : "success",</text:p>
            <text:p text:style-name="P30"><text:tab/>"message" : "The record is 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1"/><text:span text:style-name="Strong_20_Emphasis"><text:span text:style-name="T5">Inactive</text:span></text:span><text:bookmark-end text:name="__RefHeading___Toc2083_720390006 Copy 1 Copy 1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6">in</text:span></text:span><text:span text:style-name="Strong_20_Emphasis"><text:span text:style-name="T7">-actives a specific “</text:span></text:span><text:span text:style-name="Strong_20_Emphasis"><text:span text:style-name="T21">main </text:span></text:span><text:span text:style-name="Strong_20_Emphasis"><text:span text:style-name="T21">item of salary in the staff’s contract</text:span></text:span><text:span text:style-name="Strong_20_Emphasis"><text:span text:style-name="T7">” in the </text:span></text:span><text:span text:style-name="Strong_20_Emphasis"><text:span text:style-name="T17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0">curl --request PUT \</text:p>
            <text:p text:style-name="P30"><text:s text:c="2"/>--url 'https://[maindomian]/api/finance/contractSalaryItem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8">in</text:span>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1"/><text:span text:style-name="Strong_20_Emphasis"><text:span text:style-name="T5">Fetch Specific Record</text:span></text:span><text:bookmark-end text:name="__RefHeading___Toc2085_720390006 Copy 1 Copy 1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9">returns</text:span></text:span><text:span text:style-name="Strong_20_Emphasis"><text:span text:style-name="T7"> a specific “</text:span></text:span><text:span text:style-name="Strong_20_Emphasis"><text:span text:style-name="T21">item of salary in the staff’s contract</text:span></text:span><text:span text:style-name="Strong_20_Emphasis"><text:span text:style-name="T7">” </text:span></text:span><text:span text:style-name="Strong_20_Emphasis"><text:span text:style-name="T19">from</text:span></text:span><text:span text:style-name="Strong_20_Emphasis"><text:span text:style-name="T7"> the </text:span></text:span><text:span text:style-name="Strong_20_Emphasis"><text:span text:style-name="T10">finance</text:span></text:span><text:span text:style-name="Strong_20_Emphasis"><text:span text:style-name="T20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0">curl --request GET \</text:p>
            <text:p text:style-name="P30"><text:s text:c="2"/>--url 'https://[maindomian]/api/finance/contractSalaryItem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oft-page-break/><text:span text:style-name="Strong_20_Emphasis"><text:span text:style-name="T13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2"/>Contract Deduction Item<text:bookmark-end text:name="__RefHeading___Toc227_771010674 Copy 1 Copy 2"/></text:h>
      <text:h text:style-name="P28" text:outline-level="2"><text:bookmark-start text:name="__RefHeading___Toc908_3206075736 Copy 1 Copy 1 Copy 2"/><text:span text:style-name="Strong_20_Emphasis"><text:span text:style-name="T5">Delete</text:span></text:span><text:bookmark-end text:name="__RefHeading___Toc908_3206075736 Copy 1 Copy 1 Copy 2"/></text:h>
      <text:p text:style-name="P29"><text:span text:style-name="Strong_20_Emphasis"><text:span text:style-name="T6">Description</text:span></text:span></text:p>
      <text:p text:style-name="P31"><text:soft-page-break/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1">deduction item of salary in the staff’s contract</text:span></text:span><text:span text:style-name="Strong_20_Emphasis"><text:span text:style-name="T7">” from the </text:span></text:span><text:span text:style-name="Strong_20_Emphasis"><text:span text:style-name="T10">finance</text:span></text:span><text:span text:style-name="Strong_20_Emphasis"><text:span text:style-name="T11"> man</text:span></text:span><text:span text:style-name="Strong_20_Emphasis"><text:span text:style-name="T12">a</text:span></text:span><text:span text:style-name="Strong_20_Emphasis"><text:span text:style-name="T11">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0">curl --request DELETE \</text:p>
            <text:p text:style-name="P30"><text:s text:c="2"/>--url 'https://[maindomian]/api/finance/contractDeductionItem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dele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2"/><text:span text:style-name="Strong_20_Emphasis"><text:span text:style-name="T5">Active</text:span></text:span><text:bookmark-end text:name="__RefHeading___Toc2079_720390006 Copy 1 Copy 2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actives a “</text:span></text:span><text:span text:style-name="Strong_20_Emphasis"><text:span text:style-name="T21">deduction item of salary in the staff’s contract</text:span></text:span><text:span text:style-name="Strong_20_Emphasis"><text:span text:style-name="T7">” in the </text:span></text:span><text:span text:style-name="Strong_20_Emphasis"><text:span text:style-name="T10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0">curl --request PUT \</text:p>
            <text:p text:style-name="P30"><text:s text:c="2"/>--url 'https://[maindomian]/api/finance/contractDeductionItem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<text:soft-page-break/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2"/><text:span text:style-name="Strong_20_Emphasis"><text:span text:style-name="T5">Inactive</text:span></text:span><text:bookmark-end text:name="__RefHeading___Toc2083_720390006 Copy 1 Copy 2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6">in</text:span></text:span><text:span text:style-name="Strong_20_Emphasis"><text:span text:style-name="T7">-actives a specific “</text:span></text:span><text:span text:style-name="Strong_20_Emphasis"><text:span text:style-name="T21">deduction item of salary in the staff’s contract</text:span></text:span><text:span text:style-name="Strong_20_Emphasis"><text:span text:style-name="T7">” in the </text:span></text:span><text:span text:style-name="Strong_20_Emphasis"><text:span text:style-name="T17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0">curl --request PUT \</text:p>
            <text:p text:style-name="P30"><text:s text:c="2"/>--url 'https://[maindomian]/api/finance/contractDeductionItem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8">in</text:span>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2"/><text:span text:style-name="Strong_20_Emphasis"><text:span text:style-name="T5">Fetch Specific Record</text:span></text:span><text:bookmark-end text:name="__RefHeading___Toc2085_720390006 Copy 1 Copy 2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9">returns</text:span></text:span><text:span text:style-name="Strong_20_Emphasis"><text:span text:style-name="T7"> a specific “</text:span></text:span><text:span text:style-name="Strong_20_Emphasis"><text:span text:style-name="T21">deduction item of salary in the staff’s contract</text:span></text:span><text:span text:style-name="Strong_20_Emphasis"><text:span text:style-name="T7">” </text:span></text:span><text:span text:style-name="Strong_20_Emphasis"><text:span text:style-name="T19">from</text:span></text:span><text:span text:style-name="Strong_20_Emphasis"><text:span text:style-name="T7"> the </text:span></text:span><text:span text:style-name="Strong_20_Emphasis"><text:span text:style-name="T10">finance</text:span></text:span><text:span text:style-name="Strong_20_Emphasis"><text:span text:style-name="T20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0">curl --request GET \</text:p>
            <text:p text:style-name="P30"><text:s text:c="2"/>--url 'https://[maindomian]/api/finance/contractDeductionItem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oft-page-break/><text:span text:style-name="Strong_20_Emphasis"><text:span text:style-name="T13">Response Sample</text:span>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33" text:outline-level="1"><text:bookmark-start text:name="__RefHeading___Toc227_771010674 Copy 1 Copy 3"/>Supplier<text:bookmark-end text:name="__RefHeading___Toc227_771010674 Copy 1 Copy 3"/></text:h>
      <text:h text:style-name="P28" text:outline-level="2"><text:bookmark-start text:name="__RefHeading___Toc908_3206075736 Copy 1 Copy 1 Copy 3"/><text:span text:style-name="Strong_20_Emphasis"><text:span text:style-name="T5">Delete</text:span></text:span><text:bookmark-end text:name="__RefHeading___Toc908_3206075736 Copy 1 Copy 1 Copy 3"/></text:h>
      <text:p text:style-name="P29"><text:span text:style-name="Strong_20_Emphasis"><text:span text:style-name="T6">Description</text:span></text:span></text:p>
      <text:p text:style-name="P29"><text:soft-page-break/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2">supplier</text:span></text:span><text:span text:style-name="Strong_20_Emphasis"><text:span text:style-name="T7">” from the </text:span></text:span><text:span text:style-name="Strong_20_Emphasis"><text:span text:style-name="T10">finance</text:span></text:span><text:span text:style-name="Strong_20_Emphasis"><text:span text:style-name="T11"> man</text:span></text:span><text:span text:style-name="Strong_20_Emphasis"><text:span text:style-name="T12">a</text:span></text:span><text:span text:style-name="Strong_20_Emphasis"><text:span text:style-name="T11">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0">curl --request DELETE \</text:p>
            <text:p text:style-name="P30"><text:s text:c="2"/>--url 'https://[maindomian]/api/finance/supplier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dele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3"/><text:span text:style-name="Strong_20_Emphasis"><text:span text:style-name="T5">Active</text:span></text:span><text:bookmark-end text:name="__RefHeading___Toc2079_720390006 Copy 1 Copy 3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actives a “</text:span></text:span><text:span text:style-name="Strong_20_Emphasis"><text:span text:style-name="T9">s</text:span></text:span><text:span text:style-name="Strong_20_Emphasis"><text:span text:style-name="T22">upplier</text:span></text:span><text:span text:style-name="Strong_20_Emphasis"><text:span text:style-name="T7">” in the </text:span></text:span><text:span text:style-name="Strong_20_Emphasis"><text:span text:style-name="T10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0">curl --request PUT \</text:p>
            <text:p text:style-name="P30"><text:s text:c="2"/>--url 'https://[maindomian]/api/finance/supplier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3"/><text:soft-page-break/><text:span text:style-name="Strong_20_Emphasis"><text:span text:style-name="T5">Inactive</text:span></text:span><text:bookmark-end text:name="__RefHeading___Toc2083_720390006 Copy 1 Copy 3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6">in</text:span></text:span><text:span text:style-name="Strong_20_Emphasis"><text:span text:style-name="T7">-actives a specific “</text:span></text:span><text:span text:style-name="Strong_20_Emphasis"><text:span text:style-name="T9">s</text:span></text:span><text:span text:style-name="Strong_20_Emphasis"><text:span text:style-name="T22">upplier</text:span></text:span><text:span text:style-name="Strong_20_Emphasis"><text:span text:style-name="T7">” in the </text:span></text:span><text:span text:style-name="Strong_20_Emphasis"><text:span text:style-name="T17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0">curl --request PUT \</text:p>
            <text:p text:style-name="P30"><text:s text:c="2"/>--url 'https://[maindomian]/api/finance/supplier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8">in</text:span>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3"/><text:span text:style-name="Strong_20_Emphasis"><text:span text:style-name="T5">Fetch Specific Record</text:span></text:span><text:bookmark-end text:name="__RefHeading___Toc2085_720390006 Copy 1 Copy 3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9">returns</text:span></text:span><text:span text:style-name="Strong_20_Emphasis"><text:span text:style-name="T7"> a specific “</text:span></text:span><text:span text:style-name="Strong_20_Emphasis"><text:span text:style-name="T9">s</text:span></text:span><text:span text:style-name="Strong_20_Emphasis"><text:span text:style-name="T22">upplier</text:span></text:span><text:span text:style-name="Strong_20_Emphasis"><text:span text:style-name="T7">” </text:span></text:span><text:span text:style-name="Strong_20_Emphasis"><text:span text:style-name="T19">from</text:span></text:span><text:span text:style-name="Strong_20_Emphasis"><text:span text:style-name="T7"> the </text:span></text:span><text:span text:style-name="Strong_20_Emphasis"><text:span text:style-name="T10">finance</text:span></text:span><text:span text:style-name="Strong_20_Emphasis"><text:span text:style-name="T20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0">curl --request GET \</text:p>
            <text:p text:style-name="P30"><text:s text:c="2"/>--url 'https://[maindomian]/api/finance/supplier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soft-page-break/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33" text:outline-level="1"><text:bookmark-start text:name="__RefHeading___Toc227_771010674 Copy 1 Copy 4"/>Cost Invoice<text:bookmark-end text:name="__RefHeading___Toc227_771010674 Copy 1 Copy 4"/></text:h>
      <text:h text:style-name="P28" text:outline-level="2"><text:bookmark-start text:name="__RefHeading___Toc908_3206075736 Copy 1 Copy 1 Copy 4"/><text:span text:style-name="Strong_20_Emphasis"><text:span text:style-name="T5">Delete</text:span></text:span><text:bookmark-end text:name="__RefHeading___Toc908_3206075736 Copy 1 Copy 1 Copy 4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</text:span></text:span><text:span text:style-name="Strong_20_Emphasis"><text:span text:style-name="T22">n</text:span></text:span><text:span text:style-name="Strong_20_Emphasis"><text:span text:style-name="T7"> “</text:span></text:span><text:span text:style-name="Strong_20_Emphasis"><text:span text:style-name="T22">invoice of shopping</text:span></text:span><text:span text:style-name="Strong_20_Emphasis"><text:span text:style-name="T7">” from the </text:span></text:span><text:span text:style-name="Strong_20_Emphasis"><text:span text:style-name="T10">finance</text:span></text:span><text:span text:style-name="Strong_20_Emphasis"><text:span text:style-name="T11"> man</text:span></text:span><text:span text:style-name="Strong_20_Emphasis"><text:span text:style-name="T12">a</text:span></text:span><text:span text:style-name="Strong_20_Emphasis"><text:span text:style-name="T11">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0">curl --request DELETE \</text:p>
            <text:p text:style-name="P30"><text:s text:c="2"/>--url 'https://[maindomian]/api/finance/costInvoice/[id]' \</text:p>
            <text:p text:style-name="P30"><text:s text:c="2"/>--header 'Authorization: Bearer [token]'</text:p>
          </table:table-cell>
        </table:table-row>
      </table:table>
      <text:p text:style-name="P29"><text:soft-page-break/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dele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4"/><text:span text:style-name="Strong_20_Emphasis"><text:span text:style-name="T5">Active</text:span></text:span><text:bookmark-end text:name="__RefHeading___Toc2079_720390006 Copy 1 Copy 4"/></text:h>
      <text:p text:style-name="P29"><text:span text:style-name="Strong_20_Emphasis"><text:span text:style-name="T6">Description</text:span></text:span></text:p>
      <text:p text:style-name="P34"><text:span text:style-name="Strong_20_Emphasis"><text:span text:style-name="T7">This API actives a</text:span></text:span><text:span text:style-name="Strong_20_Emphasis"><text:span text:style-name="T22">n</text:span></text:span><text:span text:style-name="Strong_20_Emphasis"><text:span text:style-name="T7"> “</text:span></text:span><text:span text:style-name="Strong_20_Emphasis"><text:span text:style-name="T22">invoice of shopping</text:span></text:span><text:span text:style-name="Strong_20_Emphasis"><text:span text:style-name="T7">” in the </text:span></text:span><text:span text:style-name="Strong_20_Emphasis"><text:span text:style-name="T10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0">curl --request PUT \</text:p>
            <text:p text:style-name="P30"><text:s text:c="2"/>--url 'https://[maindomian]/api/finance/costInvoice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4"/><text:span text:style-name="Strong_20_Emphasis"><text:span text:style-name="T5">Inactive</text:span></text:span><text:bookmark-end text:name="__RefHeading___Toc2083_720390006 Copy 1 Copy 4"/></text:h>
      <text:p text:style-name="P29"><text:span text:style-name="Strong_20_Emphasis"><text:span text:style-name="T6">Description</text:span></text:span></text:p>
      <text:p text:style-name="P34"><text:span text:style-name="Strong_20_Emphasis"><text:span text:style-name="T7">This API </text:span></text:span><text:span text:style-name="Strong_20_Emphasis"><text:span text:style-name="T16">in</text:span></text:span><text:span text:style-name="Strong_20_Emphasis"><text:span text:style-name="T7">-actives a specific “</text:span></text:span><text:span text:style-name="Strong_20_Emphasis"><text:span text:style-name="T22">invoice of shopping</text:span></text:span><text:span text:style-name="Strong_20_Emphasis"><text:span text:style-name="T7">” in the </text:span></text:span><text:span text:style-name="Strong_20_Emphasis"><text:span text:style-name="T17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37" table:style-name="Table37">
        <table:table-column table:style-name="Table37.A"/>
        <text:soft-page-break/>
        <table:table-row>
          <table:table-cell table:style-name="Table37.A1" office:value-type="string">
            <text:p text:style-name="P30">curl --request PUT \</text:p>
            <text:p text:style-name="P30"><text:s text:c="2"/>--url 'https://[maindomian]/api/finance/costInvoice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8">in</text:span>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4"/><text:span text:style-name="Strong_20_Emphasis"><text:span text:style-name="T5">Fetch Specific Record</text:span></text:span><text:bookmark-end text:name="__RefHeading___Toc2085_720390006 Copy 1 Copy 4"/></text:h>
      <text:p text:style-name="P29"><text:span text:style-name="Strong_20_Emphasis"><text:span text:style-name="T6">Description</text:span></text:span></text:p>
      <text:p text:style-name="P34"><text:span text:style-name="Strong_20_Emphasis"><text:span text:style-name="T7">This API </text:span></text:span><text:span text:style-name="Strong_20_Emphasis"><text:span text:style-name="T19">returns</text:span></text:span><text:span text:style-name="Strong_20_Emphasis"><text:span text:style-name="T7"> a specific “</text:span></text:span><text:span text:style-name="Strong_20_Emphasis"><text:span text:style-name="T22">invoice of shopping</text:span></text:span><text:span text:style-name="Strong_20_Emphasis"><text:span text:style-name="T7">” </text:span></text:span><text:span text:style-name="Strong_20_Emphasis"><text:span text:style-name="T19">from</text:span></text:span><text:span text:style-name="Strong_20_Emphasis"><text:span text:style-name="T7"> the </text:span></text:span><text:span text:style-name="Strong_20_Emphasis"><text:span text:style-name="T10">finance</text:span></text:span><text:span text:style-name="Strong_20_Emphasis"><text:span text:style-name="T20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0">curl --request GET \</text:p>
            <text:p text:style-name="P30"><text:s text:c="2"/>--url 'https://[maindomian]/api/finance/costInvoic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soft-page-break/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33" text:outline-level="1"><text:bookmark-start text:name="__RefHeading___Toc227_771010674 Copy 1 Copy 5"/>Cost Invoice Item<text:bookmark-end text:name="__RefHeading___Toc227_771010674 Copy 1 Copy 5"/></text:h>
      <text:h text:style-name="P28" text:outline-level="2"><text:bookmark-start text:name="__RefHeading___Toc908_3206075736 Copy 1 Copy 1 Copy 5"/><text:span text:style-name="Strong_20_Emphasis"><text:span text:style-name="T5">Delete</text:span></text:span><text:bookmark-end text:name="__RefHeading___Toc908_3206075736 Copy 1 Copy 1 Copy 5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</text:span></text:span><text:span text:style-name="Strong_20_Emphasis"><text:span text:style-name="T22">n</text:span></text:span><text:span text:style-name="Strong_20_Emphasis"><text:span text:style-name="T7"> “</text:span></text:span><text:span text:style-name="Strong_20_Emphasis"><text:span text:style-name="T22">item of invoice</text:span></text:span><text:span text:style-name="Strong_20_Emphasis"><text:span text:style-name="T7">” from the </text:span></text:span><text:span text:style-name="Strong_20_Emphasis"><text:span text:style-name="T10">finance</text:span></text:span><text:span text:style-name="Strong_20_Emphasis"><text:span text:style-name="T11"> man</text:span></text:span><text:span text:style-name="Strong_20_Emphasis"><text:span text:style-name="T12">a</text:span></text:span><text:span text:style-name="Strong_20_Emphasis"><text:span text:style-name="T11">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0">curl --request DELETE \</text:p>
            <text:p text:style-name="P30"><text:s text:c="2"/>--url 'https://[maindomian]/api/finance/costInvoiceItem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soft-page-break/><text:tab/>"message" : "The record is <text:span text:style-name="T15">dele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5"/><text:span text:style-name="Strong_20_Emphasis"><text:span text:style-name="T5">Active</text:span></text:span><text:bookmark-end text:name="__RefHeading___Toc2079_720390006 Copy 1 Copy 5"/></text:h>
      <text:p text:style-name="P29"><text:span text:style-name="Strong_20_Emphasis"><text:span text:style-name="T6">Description</text:span></text:span></text:p>
      <text:p text:style-name="P34"><text:span text:style-name="Strong_20_Emphasis"><text:span text:style-name="T7">This API actives a</text:span></text:span><text:span text:style-name="Strong_20_Emphasis"><text:span text:style-name="T22">n</text:span></text:span><text:span text:style-name="Strong_20_Emphasis"><text:span text:style-name="T7"> “</text:span></text:span><text:span text:style-name="Strong_20_Emphasis"><text:span text:style-name="T22">item of invoice</text:span></text:span><text:span text:style-name="Strong_20_Emphasis"><text:span text:style-name="T7">” in the </text:span></text:span><text:span text:style-name="Strong_20_Emphasis"><text:span text:style-name="T10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0">curl --request PUT \</text:p>
            <text:p text:style-name="P30"><text:s text:c="2"/>--url 'https://[maindomian]/api/finance/costInvoiceItem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5"/><text:span text:style-name="Strong_20_Emphasis"><text:span text:style-name="T5">Inactive</text:span></text:span><text:bookmark-end text:name="__RefHeading___Toc2083_720390006 Copy 1 Copy 5"/></text:h>
      <text:p text:style-name="P29"><text:span text:style-name="Strong_20_Emphasis"><text:span text:style-name="T6">Description</text:span></text:span></text:p>
      <text:p text:style-name="P34"><text:span text:style-name="Strong_20_Emphasis"><text:span text:style-name="T7">This API </text:span></text:span><text:span text:style-name="Strong_20_Emphasis"><text:span text:style-name="T16">in</text:span></text:span><text:span text:style-name="Strong_20_Emphasis"><text:span text:style-name="T7">-actives a specific “</text:span></text:span><text:span text:style-name="Strong_20_Emphasis"><text:span text:style-name="T22">item of invoice</text:span></text:span><text:span text:style-name="Strong_20_Emphasis"><text:span text:style-name="T7">” in the </text:span></text:span><text:span text:style-name="Strong_20_Emphasis"><text:span text:style-name="T17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0">curl --request PUT \</text:p>
            <text:p text:style-name="P30"><text:s text:c="2"/>--url 'https://[maindomian]/api/finance/costInvoiceItem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oft-page-break/><text:span text:style-name="Strong_20_Emphasis"><text:span text:style-name="T13">Response Sample</text:span>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8">in</text:span>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5"/><text:span text:style-name="Strong_20_Emphasis"><text:span text:style-name="T5">Fetch Specific Record</text:span></text:span><text:bookmark-end text:name="__RefHeading___Toc2085_720390006 Copy 1 Copy 5"/></text:h>
      <text:p text:style-name="P29"><text:span text:style-name="Strong_20_Emphasis"><text:span text:style-name="T6">Description</text:span></text:span></text:p>
      <text:p text:style-name="P34"><text:span text:style-name="Strong_20_Emphasis"><text:span text:style-name="T7">This API </text:span></text:span><text:span text:style-name="Strong_20_Emphasis"><text:span text:style-name="T19">returns</text:span></text:span><text:span text:style-name="Strong_20_Emphasis"><text:span text:style-name="T7"> a specific “</text:span></text:span><text:span text:style-name="Strong_20_Emphasis"><text:span text:style-name="T22">item of invoice</text:span></text:span><text:span text:style-name="Strong_20_Emphasis"><text:span text:style-name="T7">” </text:span></text:span><text:span text:style-name="Strong_20_Emphasis"><text:span text:style-name="T19">from</text:span></text:span><text:span text:style-name="Strong_20_Emphasis"><text:span text:style-name="T7"> the </text:span></text:span><text:span text:style-name="Strong_20_Emphasis"><text:span text:style-name="T10">finance</text:span></text:span><text:span text:style-name="Strong_20_Emphasis"><text:span text:style-name="T20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0">curl --request GET \</text:p>
            <text:p text:style-name="P30"><text:s text:c="2"/>--url 'https://[maindomian]/api/finance/costInvoiceItem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soft-page-break/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6"/>Project Direct Cost Item<text:bookmark-end text:name="__RefHeading___Toc227_771010674 Copy 1 Copy 6"/></text:h>
      <text:h text:style-name="P28" text:outline-level="2"><text:bookmark-start text:name="__RefHeading___Toc908_3206075736 Copy 1 Copy 1 Copy 6"/><text:span text:style-name="Strong_20_Emphasis"><text:span text:style-name="T5">Delete</text:span></text:span><text:bookmark-end text:name="__RefHeading___Toc908_3206075736 Copy 1 Copy 1 Copy 6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3">direct cost item of the project</text:span></text:span><text:span text:style-name="Strong_20_Emphasis"><text:span text:style-name="T7">” from the </text:span></text:span><text:span text:style-name="Strong_20_Emphasis"><text:span text:style-name="T10">finance</text:span></text:span><text:span text:style-name="Strong_20_Emphasis"><text:span text:style-name="T11"> man</text:span></text:span><text:span text:style-name="Strong_20_Emphasis"><text:span text:style-name="T12">a</text:span></text:span><text:span text:style-name="Strong_20_Emphasis"><text:span text:style-name="T11">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0">curl --request DELETE \</text:p>
            <text:p text:style-name="P30"><text:s text:c="2"/>--url 'https://[maindomian]/api/finance/projectDirectCostItem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dele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oft-page-break/><text:span text:style-name="Strong_20_Emphasis"/></text:p>
      <text:h text:style-name="P28" text:outline-level="2"><text:bookmark-start text:name="__RefHeading___Toc2079_720390006 Copy 1 Copy 6"/><text:span text:style-name="Strong_20_Emphasis"><text:span text:style-name="T5">Active</text:span></text:span><text:bookmark-end text:name="__RefHeading___Toc2079_720390006 Copy 1 Copy 6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actives a “</text:span></text:span><text:span text:style-name="Strong_20_Emphasis"><text:span text:style-name="T23">direct cost item of the project</text:span></text:span><text:span text:style-name="Strong_20_Emphasis"><text:span text:style-name="T7">” in the </text:span></text:span><text:span text:style-name="Strong_20_Emphasis"><text:span text:style-name="T10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0">curl --request PUT \</text:p>
            <text:p text:style-name="P30"><text:s text:c="2"/>--url 'https://[maindomian]/api/finance/projectDirectCostItem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6"/><text:span text:style-name="Strong_20_Emphasis"><text:span text:style-name="T5">Inactive</text:span></text:span><text:bookmark-end text:name="__RefHeading___Toc2083_720390006 Copy 1 Copy 6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</text:span></text:span><text:span text:style-name="Strong_20_Emphasis"><text:span text:style-name="T16">in</text:span></text:span><text:span text:style-name="Strong_20_Emphasis"><text:span text:style-name="T7">-actives a specific “</text:span></text:span><text:span text:style-name="Strong_20_Emphasis"><text:span text:style-name="T23">direct cost item of the project</text:span></text:span><text:span text:style-name="Strong_20_Emphasis"><text:span text:style-name="T7">” in the </text:span></text:span><text:span text:style-name="Strong_20_Emphasis"><text:span text:style-name="T17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0">curl --request PUT \</text:p>
            <text:p text:style-name="P30"><text:s text:c="2"/>--url 'https://[maindomian]/api/finance/projectDirectCostItem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0">{</text:p>
            <text:p text:style-name="P30"><text:soft-page-break/><text:tab/>"statusCode" : 200,</text:p>
            <text:p text:style-name="P30"><text:tab/>"status" : "success",</text:p>
            <text:p text:style-name="P30"><text:tab/>"message" : "The record is <text:span text:style-name="T18">in</text:span>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6"/><text:span text:style-name="Strong_20_Emphasis"><text:span text:style-name="T5">Fetch Specific Record</text:span></text:span><text:bookmark-end text:name="__RefHeading___Toc2085_720390006 Copy 1 Copy 6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</text:span></text:span><text:span text:style-name="Strong_20_Emphasis"><text:span text:style-name="T19">returns</text:span></text:span><text:span text:style-name="Strong_20_Emphasis"><text:span text:style-name="T7"> a specific “</text:span></text:span><text:span text:style-name="Strong_20_Emphasis"><text:span text:style-name="T23">direct cost item of the project</text:span></text:span><text:span text:style-name="Strong_20_Emphasis"><text:span text:style-name="T7">” </text:span></text:span><text:span text:style-name="Strong_20_Emphasis"><text:span text:style-name="T19">from</text:span></text:span><text:span text:style-name="Strong_20_Emphasis"><text:span text:style-name="T7"> the </text:span></text:span><text:span text:style-name="Strong_20_Emphasis"><text:span text:style-name="T10">finance</text:span></text:span><text:span text:style-name="Strong_20_Emphasis"><text:span text:style-name="T20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0">curl --request GET \</text:p>
            <text:p text:style-name="P30"><text:s text:c="2"/>--url 'https://[maindomian]/api/finance/projectDirectCostItem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soft-page-break/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7"/>Cost Payment Receipt<text:bookmark-end text:name="__RefHeading___Toc227_771010674 Copy 1 Copy 7"/></text:h>
      <text:h text:style-name="P28" text:outline-level="2"><text:bookmark-start text:name="__RefHeading___Toc908_3206075736 Copy 1 Copy 1 Copy 7"/><text:span text:style-name="Strong_20_Emphasis"><text:span text:style-name="T5">Delete</text:span></text:span><text:bookmark-end text:name="__RefHeading___Toc908_3206075736 Copy 1 Copy 1 Copy 7"/></text:h>
      <text:p text:style-name="P29"><text:span text:style-name="Strong_20_Emphasis"><text:span text:style-name="T6">Description</text:span></text:span></text:p>
      <text:p text:style-name="P36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3">receipt of the payment for any cost</text:span></text:span><text:span text:style-name="Strong_20_Emphasis"><text:span text:style-name="T7">” from the </text:span></text:span><text:span text:style-name="Strong_20_Emphasis"><text:span text:style-name="T10">finance</text:span></text:span><text:span text:style-name="Strong_20_Emphasis"><text:span text:style-name="T11"> man</text:span></text:span><text:span text:style-name="Strong_20_Emphasis"><text:span text:style-name="T12">a</text:span></text:span><text:span text:style-name="Strong_20_Emphasis"><text:span text:style-name="T11">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0">curl --request DELETE \</text:p>
            <text:p text:style-name="P30"><text:s text:c="2"/>--url 'https://[maindomian]/api/finance/costPaymentReceip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dele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7"/><text:soft-page-break/><text:span text:style-name="Strong_20_Emphasis"><text:span text:style-name="T5">Active</text:span></text:span><text:bookmark-end text:name="__RefHeading___Toc2079_720390006 Copy 1 Copy 7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actives a “</text:span></text:span><text:span text:style-name="Strong_20_Emphasis"><text:span text:style-name="T23">receipt of the payment for any cost</text:span></text:span><text:span text:style-name="Strong_20_Emphasis"><text:span text:style-name="T7">” in the </text:span></text:span><text:span text:style-name="Strong_20_Emphasis"><text:span text:style-name="T10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0">curl --request PUT \</text:p>
            <text:p text:style-name="P30"><text:s text:c="2"/>--url 'https://[maindomian]/api/finance/costPaymentReceipt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7"/><text:span text:style-name="Strong_20_Emphasis"><text:span text:style-name="T5">Inactive</text:span></text:span><text:bookmark-end text:name="__RefHeading___Toc2083_720390006 Copy 1 Copy 7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</text:span></text:span><text:span text:style-name="Strong_20_Emphasis"><text:span text:style-name="T16">in</text:span></text:span><text:span text:style-name="Strong_20_Emphasis"><text:span text:style-name="T7">-actives a specific “</text:span></text:span><text:span text:style-name="Strong_20_Emphasis"><text:span text:style-name="T23">receipt of the payment for any cost</text:span></text:span><text:span text:style-name="Strong_20_Emphasis"><text:span text:style-name="T7">” in the </text:span></text:span><text:span text:style-name="Strong_20_Emphasis"><text:span text:style-name="T17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30">curl --request PUT \</text:p>
            <text:p text:style-name="P30"><text:s text:c="2"/>--url 'https://[maindomian]/api/finance/costPaymentReceipt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8">in</text:span><text:span text:style-name="T15">activated</text:span> successfully.",</text:p>
            <text:p text:style-name="P30"><text:soft-page-break/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7"/><text:span text:style-name="Strong_20_Emphasis"><text:span text:style-name="T5">Fetch Specific Record</text:span></text:span><text:bookmark-end text:name="__RefHeading___Toc2085_720390006 Copy 1 Copy 7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</text:span></text:span><text:span text:style-name="Strong_20_Emphasis"><text:span text:style-name="T19">returns</text:span></text:span><text:span text:style-name="Strong_20_Emphasis"><text:span text:style-name="T7"> a specific “</text:span></text:span><text:span text:style-name="Strong_20_Emphasis"><text:span text:style-name="T23">receipt of the payment for any cost</text:span></text:span><text:span text:style-name="Strong_20_Emphasis"><text:span text:style-name="T7">” </text:span></text:span><text:span text:style-name="Strong_20_Emphasis"><text:span text:style-name="T19">from</text:span></text:span><text:span text:style-name="Strong_20_Emphasis"><text:span text:style-name="T7"> the </text:span></text:span><text:span text:style-name="Strong_20_Emphasis"><text:span text:style-name="T10">finance</text:span></text:span><text:span text:style-name="Strong_20_Emphasis"><text:span text:style-name="T20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30">curl --request GET \</text:p>
            <text:p text:style-name="P30"><text:s text:c="2"/>--url 'https://[maindomian]/api/finance/costPaymentReceip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soft-page-break/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8"/>Salary Payment Receipt<text:bookmark-end text:name="__RefHeading___Toc227_771010674 Copy 1 Copy 8"/></text:h>
      <text:h text:style-name="P28" text:outline-level="2"><text:bookmark-start text:name="__RefHeading___Toc908_3206075736 Copy 1 Copy 1 Copy 8"/><text:span text:style-name="Strong_20_Emphasis"><text:span text:style-name="T5">Delete</text:span></text:span><text:bookmark-end text:name="__RefHeading___Toc908_3206075736 Copy 1 Copy 1 Copy 8"/></text:h>
      <text:p text:style-name="P29"><text:span text:style-name="Strong_20_Emphasis"><text:span text:style-name="T6">Description</text:span></text:span></text:p>
      <text:p text:style-name="P36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3">receipt of the payment for any </text:span></text:span><text:span text:style-name="Strong_20_Emphasis"><text:span text:style-name="T24">salary</text:span></text:span><text:span text:style-name="Strong_20_Emphasis"><text:span text:style-name="T7">” from the </text:span></text:span><text:span text:style-name="Strong_20_Emphasis"><text:span text:style-name="T10">finance</text:span></text:span><text:span text:style-name="Strong_20_Emphasis"><text:span text:style-name="T11"> man</text:span></text:span><text:span text:style-name="Strong_20_Emphasis"><text:span text:style-name="T12">a</text:span></text:span><text:span text:style-name="Strong_20_Emphasis"><text:span text:style-name="T11">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30">curl --request DELETE \</text:p>
            <text:p text:style-name="P30"><text:s text:c="2"/>--url 'https://[maindomian]/api/finance/salaryPaymentReceip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dele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8"/><text:span text:style-name="Strong_20_Emphasis"><text:span text:style-name="T5">Active</text:span></text:span><text:bookmark-end text:name="__RefHeading___Toc2079_720390006 Copy 1 Copy 8"/></text:h>
      <text:p text:style-name="P29"><text:span text:style-name="Strong_20_Emphasis"><text:span text:style-name="T6">Description</text:span></text:span></text:p>
      <text:p text:style-name="P36"><text:soft-page-break/><text:span text:style-name="Strong_20_Emphasis"><text:span text:style-name="T7">This API actives a “</text:span></text:span><text:span text:style-name="Strong_20_Emphasis"><text:span text:style-name="T23">receipt of the payment for any </text:span></text:span><text:span text:style-name="Strong_20_Emphasis"><text:span text:style-name="T24">salary</text:span></text:span><text:span text:style-name="Strong_20_Emphasis"><text:span text:style-name="T7">” in the </text:span></text:span><text:span text:style-name="Strong_20_Emphasis"><text:span text:style-name="T10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30">curl --request PUT \</text:p>
            <text:p text:style-name="P30"><text:s text:c="2"/>--url 'https://[maindomian]/api/finance/salaryPaymentReceipt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8"/><text:span text:style-name="Strong_20_Emphasis"><text:span text:style-name="T5">Inactive</text:span></text:span><text:bookmark-end text:name="__RefHeading___Toc2083_720390006 Copy 1 Copy 8"/></text:h>
      <text:p text:style-name="P29"><text:span text:style-name="Strong_20_Emphasis"><text:span text:style-name="T6">Description</text:span></text:span></text:p>
      <text:p text:style-name="P36"><text:span text:style-name="Strong_20_Emphasis"><text:span text:style-name="T7">This API </text:span></text:span><text:span text:style-name="Strong_20_Emphasis"><text:span text:style-name="T16">in</text:span></text:span><text:span text:style-name="Strong_20_Emphasis"><text:span text:style-name="T7">-actives a specific “</text:span></text:span><text:span text:style-name="Strong_20_Emphasis"><text:span text:style-name="T23">receipt of the payment for any </text:span></text:span><text:span text:style-name="Strong_20_Emphasis"><text:span text:style-name="T24">salary</text:span></text:span><text:span text:style-name="Strong_20_Emphasis"><text:span text:style-name="T7">” in the </text:span></text:span><text:span text:style-name="Strong_20_Emphasis"><text:span text:style-name="T17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30">curl --request PUT \</text:p>
            <text:p text:style-name="P30"><text:s text:c="2"/>--url 'https://[maindomian]/api/finance/salaryPaymentReceipt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8">in</text:span>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<text:soft-page-break/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8"/><text:span text:style-name="Strong_20_Emphasis"><text:span text:style-name="T5">Fetch Specific Record</text:span></text:span><text:bookmark-end text:name="__RefHeading___Toc2085_720390006 Copy 1 Copy 8"/></text:h>
      <text:p text:style-name="P29"><text:span text:style-name="Strong_20_Emphasis"><text:span text:style-name="T6">Description</text:span></text:span></text:p>
      <text:p text:style-name="P36"><text:span text:style-name="Strong_20_Emphasis"><text:span text:style-name="T7">This API </text:span></text:span><text:span text:style-name="Strong_20_Emphasis"><text:span text:style-name="T19">returns</text:span></text:span><text:span text:style-name="Strong_20_Emphasis"><text:span text:style-name="T7"> a specific “</text:span></text:span><text:span text:style-name="Strong_20_Emphasis"><text:span text:style-name="T23">receipt of the payment for any </text:span></text:span><text:span text:style-name="Strong_20_Emphasis"><text:span text:style-name="T24">salary</text:span></text:span><text:span text:style-name="Strong_20_Emphasis"><text:span text:style-name="T7">” </text:span></text:span><text:span text:style-name="Strong_20_Emphasis"><text:span text:style-name="T19">from</text:span></text:span><text:span text:style-name="Strong_20_Emphasis"><text:span text:style-name="T7"> the </text:span></text:span><text:span text:style-name="Strong_20_Emphasis"><text:span text:style-name="T10">finance</text:span></text:span><text:span text:style-name="Strong_20_Emphasis"><text:span text:style-name="T20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30">curl --request GET \</text:p>
            <text:p text:style-name="P30"><text:s text:c="2"/>--url 'https://[maindomian]/api/finance/salaryPaymentReceip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soft-page-break/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9"/>Staff Additional Payment Receipt<text:bookmark-end text:name="__RefHeading___Toc227_771010674 Copy 1 Copy 9"/></text:h>
      <text:h text:style-name="P28" text:outline-level="2"><text:bookmark-start text:name="__RefHeading___Toc908_3206075736 Copy 1 Copy 1 Copy 9"/><text:span text:style-name="Strong_20_Emphasis"><text:span text:style-name="T5">Delete</text:span></text:span><text:bookmark-end text:name="__RefHeading___Toc908_3206075736 Copy 1 Copy 1 Copy 9"/></text:h>
      <text:p text:style-name="P29"><text:span text:style-name="Strong_20_Emphasis"><text:span text:style-name="T6">Description</text:span></text:span></text:p>
      <text:p text:style-name="P36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3">receipt of </text:span></text:span><text:span text:style-name="Strong_20_Emphasis"><text:span text:style-name="T24">additional</text:span></text:span><text:span text:style-name="Strong_20_Emphasis"><text:span text:style-name="T23"> payment for </text:span></text:span><text:span text:style-name="Strong_20_Emphasis"><text:span text:style-name="T24">staffs</text:span></text:span><text:span text:style-name="Strong_20_Emphasis"><text:span text:style-name="T7">” from the </text:span></text:span><text:span text:style-name="Strong_20_Emphasis"><text:span text:style-name="T10">finance</text:span></text:span><text:span text:style-name="Strong_20_Emphasis"><text:span text:style-name="T11"> man</text:span></text:span><text:span text:style-name="Strong_20_Emphasis"><text:span text:style-name="T12">a</text:span></text:span><text:span text:style-name="Strong_20_Emphasis"><text:span text:style-name="T11">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30">curl --request DELETE \</text:p>
            <text:p text:style-name="P30"><text:s text:c="2"/>--url 'https://[maindomian]/api/finance/staffAdditionalPaymentReceip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dele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9"/><text:span text:style-name="Strong_20_Emphasis"><text:span text:style-name="T5">Active</text:span></text:span><text:bookmark-end text:name="__RefHeading___Toc2079_720390006 Copy 1 Copy 9"/></text:h>
      <text:p text:style-name="P29"><text:span text:style-name="Strong_20_Emphasis"><text:span text:style-name="T6">Description</text:span></text:span></text:p>
      <text:p text:style-name="P36"><text:soft-page-break/><text:span text:style-name="Strong_20_Emphasis"><text:span text:style-name="T7">This API actives a “</text:span></text:span><text:span text:style-name="Strong_20_Emphasis"><text:span text:style-name="T23">receipt of </text:span></text:span><text:span text:style-name="Strong_20_Emphasis"><text:span text:style-name="T24">additional</text:span></text:span><text:span text:style-name="Strong_20_Emphasis"><text:span text:style-name="T23"> payment for </text:span></text:span><text:span text:style-name="Strong_20_Emphasis"><text:span text:style-name="T24">staffs</text:span></text:span><text:span text:style-name="Strong_20_Emphasis"><text:span text:style-name="T7">” in the </text:span></text:span><text:span text:style-name="Strong_20_Emphasis"><text:span text:style-name="T10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30">curl --request PUT \</text:p>
            <text:p text:style-name="P30"><text:s text:c="2"/>--url 'https://[maindomian]/api/finance/staffAdditionalPaymentReceipt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9"/><text:span text:style-name="Strong_20_Emphasis"><text:span text:style-name="T5">Inactive</text:span></text:span><text:bookmark-end text:name="__RefHeading___Toc2083_720390006 Copy 1 Copy 9"/></text:h>
      <text:p text:style-name="P29"><text:span text:style-name="Strong_20_Emphasis"><text:span text:style-name="T6">Description</text:span></text:span></text:p>
      <text:p text:style-name="P36"><text:span text:style-name="Strong_20_Emphasis"><text:span text:style-name="T7">This API </text:span></text:span><text:span text:style-name="Strong_20_Emphasis"><text:span text:style-name="T16">in</text:span></text:span><text:span text:style-name="Strong_20_Emphasis"><text:span text:style-name="T7">-actives a specific “</text:span></text:span><text:span text:style-name="Strong_20_Emphasis"><text:span text:style-name="T23">receipt of </text:span></text:span><text:span text:style-name="Strong_20_Emphasis"><text:span text:style-name="T24">additional</text:span></text:span><text:span text:style-name="Strong_20_Emphasis"><text:span text:style-name="T23"> payment for </text:span></text:span><text:span text:style-name="Strong_20_Emphasis"><text:span text:style-name="T24">staffs</text:span></text:span><text:span text:style-name="Strong_20_Emphasis"><text:span text:style-name="T7">” in the </text:span></text:span><text:span text:style-name="Strong_20_Emphasis"><text:span text:style-name="T17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30">curl --request PUT \</text:p>
            <text:p text:style-name="P30"><text:s text:c="2"/>--url 'https://[maindomian]/api/finance/staffAdditionalPaymentReceipt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8">in</text:span><text:span text:style-name="T15">activated</text:span> successfully.",</text:p>
            <text:p text:style-name="P30"><text:tab/>"errorCode" : 0,</text:p>
            <text:p text:style-name="P30"><text:soft-page-break/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9"/><text:span text:style-name="Strong_20_Emphasis"><text:span text:style-name="T5">Fetch Specific Record</text:span></text:span><text:bookmark-end text:name="__RefHeading___Toc2085_720390006 Copy 1 Copy 9"/></text:h>
      <text:p text:style-name="P29"><text:span text:style-name="Strong_20_Emphasis"><text:span text:style-name="T6">Description</text:span></text:span></text:p>
      <text:p text:style-name="P36"><text:span text:style-name="Strong_20_Emphasis"><text:span text:style-name="T7">This API </text:span></text:span><text:span text:style-name="Strong_20_Emphasis"><text:span text:style-name="T19">returns</text:span></text:span><text:span text:style-name="Strong_20_Emphasis"><text:span text:style-name="T7"> a specific “</text:span></text:span><text:span text:style-name="Strong_20_Emphasis"><text:span text:style-name="T23">receipt of </text:span></text:span><text:span text:style-name="Strong_20_Emphasis"><text:span text:style-name="T24">additional</text:span></text:span><text:span text:style-name="Strong_20_Emphasis"><text:span text:style-name="T23"> payment for </text:span></text:span><text:span text:style-name="Strong_20_Emphasis"><text:span text:style-name="T24">staffs</text:span></text:span><text:span text:style-name="Strong_20_Emphasis"><text:span text:style-name="T7">” </text:span></text:span><text:span text:style-name="Strong_20_Emphasis"><text:span text:style-name="T19">from</text:span></text:span><text:span text:style-name="Strong_20_Emphasis"><text:span text:style-name="T7"> the </text:span></text:span><text:span text:style-name="Strong_20_Emphasis"><text:span text:style-name="T10">finance</text:span></text:span><text:span text:style-name="Strong_20_Emphasis"><text:span text:style-name="T20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30">curl --request GET \</text:p>
            <text:p text:style-name="P30"><text:s text:c="2"/>--url 'https://[maindomian]/api/finance/staffAdditionalPaymentReceip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soft-page-break/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33" text:outline-level="1"><text:bookmark-start text:name="__RefHeading___Toc227_771010674 Copy 1 Copy 10"/>Customer<text:bookmark-end text:name="__RefHeading___Toc227_771010674 Copy 1 Copy 10"/></text:h>
      <text:h text:style-name="P28" text:outline-level="2"><text:bookmark-start text:name="__RefHeading___Toc908_3206075736 Copy 1 Copy 1 Copy 10"/><text:span text:style-name="Strong_20_Emphasis"><text:span text:style-name="T5">Delete</text:span></text:span><text:bookmark-end text:name="__RefHeading___Toc908_3206075736 Copy 1 Copy 1 Copy 10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4">customer</text:span></text:span><text:span text:style-name="Strong_20_Emphasis"><text:span text:style-name="T7">” from the </text:span></text:span><text:span text:style-name="Strong_20_Emphasis"><text:span text:style-name="T10">finance</text:span></text:span><text:span text:style-name="Strong_20_Emphasis"><text:span text:style-name="T11"> man</text:span></text:span><text:span text:style-name="Strong_20_Emphasis"><text:span text:style-name="T12">a</text:span></text:span><text:span text:style-name="Strong_20_Emphasis"><text:span text:style-name="T11">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30">curl --request DELETE \</text:p>
            <text:p text:style-name="P30"><text:s text:c="2"/>--url 'https://[maindomian]/api/finance/customer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dele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10"/><text:span text:style-name="Strong_20_Emphasis"><text:span text:style-name="T5">Active</text:span></text:span><text:bookmark-end text:name="__RefHeading___Toc2079_720390006 Copy 1 Copy 10"/></text:h>
      <text:p text:style-name="P29"><text:span text:style-name="Strong_20_Emphasis"><text:span text:style-name="T6">Description</text:span></text:span></text:p>
      <text:p text:style-name="P36"><text:soft-page-break/><text:span text:style-name="Strong_20_Emphasis"><text:span text:style-name="T7">This API actives a “</text:span></text:span><text:span text:style-name="Strong_20_Emphasis"><text:span text:style-name="T24">customer</text:span></text:span><text:span text:style-name="Strong_20_Emphasis"><text:span text:style-name="T7">” in the </text:span></text:span><text:span text:style-name="Strong_20_Emphasis"><text:span text:style-name="T10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30">curl --request PUT \</text:p>
            <text:p text:style-name="P30"><text:s text:c="2"/>--url 'https://[maindomian]/api/finance/customer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10"/><text:span text:style-name="Strong_20_Emphasis"><text:span text:style-name="T5">Inactive</text:span></text:span><text:bookmark-end text:name="__RefHeading___Toc2083_720390006 Copy 1 Copy 10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16">in</text:span></text:span><text:span text:style-name="Strong_20_Emphasis"><text:span text:style-name="T7">-actives a specific “</text:span></text:span><text:span text:style-name="Strong_20_Emphasis"><text:span text:style-name="T24">customer</text:span></text:span><text:span text:style-name="Strong_20_Emphasis"><text:span text:style-name="T7">” in the </text:span></text:span><text:span text:style-name="Strong_20_Emphasis"><text:span text:style-name="T17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30">curl --request PUT \</text:p>
            <text:p text:style-name="P30"><text:s text:c="2"/>--url 'https://[maindomian]/api/finance/customer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8">in</text:span>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10"/><text:soft-page-break/><text:span text:style-name="Strong_20_Emphasis"><text:span text:style-name="T5">Fetch Specific Record</text:span></text:span><text:bookmark-end text:name="__RefHeading___Toc2085_720390006 Copy 1 Copy 10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19">returns</text:span></text:span><text:span text:style-name="Strong_20_Emphasis"><text:span text:style-name="T7"> a specific “</text:span></text:span><text:span text:style-name="Strong_20_Emphasis"><text:span text:style-name="T24">customer</text:span></text:span><text:span text:style-name="Strong_20_Emphasis"><text:span text:style-name="T7">” </text:span></text:span><text:span text:style-name="Strong_20_Emphasis"><text:span text:style-name="T19">from</text:span></text:span><text:span text:style-name="Strong_20_Emphasis"><text:span text:style-name="T7"> the </text:span></text:span><text:span text:style-name="Strong_20_Emphasis"><text:span text:style-name="T10">finance</text:span></text:span><text:span text:style-name="Strong_20_Emphasis"><text:span text:style-name="T20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30">curl --request GET \</text:p>
            <text:p text:style-name="P30"><text:s text:c="2"/>--url 'https://[maindomian]/api/finance/customer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soft-page-break/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11"/><text:span text:style-name="T25">Customer</text:span> Contract<text:bookmark-end text:name="__RefHeading___Toc227_771010674 Copy 1 Copy 11"/></text:h>
      <text:h text:style-name="P28" text:outline-level="2"><text:bookmark-start text:name="__RefHeading___Toc908_3206075736 Copy 1 Copy 1 Copy 11"/><text:span text:style-name="Strong_20_Emphasis"><text:span text:style-name="T5">Delete</text:span></text:span><text:bookmark-end text:name="__RefHeading___Toc908_3206075736 Copy 1 Copy 1 Copy 11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6">customer</text:span></text:span><text:span text:style-name="Strong_20_Emphasis"><text:span text:style-name="T9">’s contract</text:span></text:span><text:span text:style-name="Strong_20_Emphasis"><text:span text:style-name="T7">” from the </text:span></text:span><text:span text:style-name="Strong_20_Emphasis"><text:span text:style-name="T10">finance</text:span></text:span><text:span text:style-name="Strong_20_Emphasis"><text:span text:style-name="T11"> man</text:span></text:span><text:span text:style-name="Strong_20_Emphasis"><text:span text:style-name="T12">a</text:span></text:span><text:span text:style-name="Strong_20_Emphasis"><text:span text:style-name="T11">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30">curl --request DELETE \</text:p>
            <text:p text:style-name="P30"><text:s text:c="2"/>--url 'https://[maindomian]/api/finance/customerContrac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dele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11"/><text:span text:style-name="Strong_20_Emphasis"><text:span text:style-name="T5">Active</text:span></text:span><text:bookmark-end text:name="__RefHeading___Toc2079_720390006 Copy 1 Copy 11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actives a “</text:span></text:span><text:span text:style-name="Strong_20_Emphasis"><text:span text:style-name="T26">customer</text:span></text:span><text:span text:style-name="Strong_20_Emphasis"><text:span text:style-name="T9">’s contract</text:span></text:span><text:span text:style-name="Strong_20_Emphasis"><text:span text:style-name="T7">” in the </text:span></text:span><text:span text:style-name="Strong_20_Emphasis"><text:span text:style-name="T10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30">curl --request PUT \</text:p>
            <text:p text:style-name="P30"><text:s text:c="2"/>--url 'https://[maindomian]/api/finance/customerContract/active/[id]' \</text:p>
            <text:p text:style-name="P30"><text:soft-page-break/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11"/><text:span text:style-name="Strong_20_Emphasis"><text:span text:style-name="T5">Inactive</text:span></text:span><text:bookmark-end text:name="__RefHeading___Toc2083_720390006 Copy 1 Copy 11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6">in</text:span></text:span><text:span text:style-name="Strong_20_Emphasis"><text:span text:style-name="T7">-actives a specific “</text:span></text:span><text:span text:style-name="Strong_20_Emphasis"><text:span text:style-name="T26">customer</text:span></text:span><text:span text:style-name="Strong_20_Emphasis"><text:span text:style-name="T9">’s contract</text:span></text:span><text:span text:style-name="Strong_20_Emphasis"><text:span text:style-name="T7">” in the </text:span></text:span><text:span text:style-name="Strong_20_Emphasis"><text:span text:style-name="T17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30">curl --request PUT \</text:p>
            <text:p text:style-name="P30"><text:s text:c="2"/>--url 'https://[maindomian]/api/finance/customerContract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8">in</text:span>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11"/><text:span text:style-name="Strong_20_Emphasis"><text:span text:style-name="T5">Fetch Specific Record</text:span></text:span><text:bookmark-end text:name="__RefHeading___Toc2085_720390006 Copy 1 Copy 11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9">returns</text:span></text:span><text:span text:style-name="Strong_20_Emphasis"><text:span text:style-name="T7"> a specific “</text:span></text:span><text:span text:style-name="Strong_20_Emphasis"><text:span text:style-name="T26">customer</text:span></text:span><text:span text:style-name="Strong_20_Emphasis"><text:span text:style-name="T9">’s contract</text:span></text:span><text:span text:style-name="Strong_20_Emphasis"><text:span text:style-name="T7">” </text:span></text:span><text:span text:style-name="Strong_20_Emphasis"><text:span text:style-name="T19">from</text:span></text:span><text:span text:style-name="Strong_20_Emphasis"><text:span text:style-name="T7"> the </text:span></text:span><text:span text:style-name="Strong_20_Emphasis"><text:span text:style-name="T10">finance</text:span></text:span><text:span text:style-name="Strong_20_Emphasis"><text:span text:style-name="T20"> management</text:span></text:span><text:span text:style-name="Strong_20_Emphasis"><text:span text:style-name="T7">.</text:span></text:span></text:p>
      <text:p text:style-name="P29"><text:soft-page-break/><text:span text:style-name="Strong_20_Emphasis"><text:span text:style-name="T13">Request CURL Sample</text:span></text:span>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30">curl --request GET \</text:p>
            <text:p text:style-name="P30"><text:s text:c="2"/>--url 'https://[maindomian]/api/finance/customerContract/[id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12"/><text:soft-page-break/>Customer Contract Payment Schedule<text:bookmark-end text:name="__RefHeading___Toc227_771010674 Copy 1 Copy 12"/></text:h>
      <text:h text:style-name="P28" text:outline-level="2"><text:bookmark-start text:name="__RefHeading___Toc908_3206075736 Copy 1 Copy 1 Copy 12"/><text:span text:style-name="Strong_20_Emphasis"><text:span text:style-name="T5">Delete</text:span></text:span><text:bookmark-end text:name="__RefHeading___Toc908_3206075736 Copy 1 Copy 1 Copy 12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6">payment schedule for customer</text:span></text:span><text:span text:style-name="Strong_20_Emphasis"><text:span text:style-name="T9">’s contract</text:span></text:span><text:span text:style-name="Strong_20_Emphasis"><text:span text:style-name="T7">” from the </text:span></text:span><text:span text:style-name="Strong_20_Emphasis"><text:span text:style-name="T10">finance</text:span></text:span><text:span text:style-name="Strong_20_Emphasis"><text:span text:style-name="T11"> man</text:span></text:span><text:span text:style-name="Strong_20_Emphasis"><text:span text:style-name="T12">a</text:span></text:span><text:span text:style-name="Strong_20_Emphasis"><text:span text:style-name="T11">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30">curl --request DELETE \</text:p>
            <text:p text:style-name="P30"><text:s text:c="2"/>--url 'https://[maindomian]/api/finance/CustomerContractPaymentSchedul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dele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12"/><text:span text:style-name="Strong_20_Emphasis"><text:span text:style-name="T5">Active</text:span></text:span><text:bookmark-end text:name="__RefHeading___Toc2079_720390006 Copy 1 Copy 12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actives a “</text:span></text:span><text:span text:style-name="Strong_20_Emphasis"><text:span text:style-name="T26">payment schedule for customer</text:span></text:span><text:span text:style-name="Strong_20_Emphasis"><text:span text:style-name="T9">’s contract</text:span></text:span><text:span text:style-name="Strong_20_Emphasis"><text:span text:style-name="T7">” in the </text:span></text:span><text:span text:style-name="Strong_20_Emphasis"><text:span text:style-name="T10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30">curl --request PUT \</text:p>
            <text:p text:style-name="P30"><text:s text:c="2"/>--url 'https://[maindomian]/api/finance/CustomerContractPaymentSchedule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103" table:style-name="Table103">
        <table:table-column table:style-name="Table103.A"/>
        <text:soft-page-break/>
        <table:table-row>
          <table:table-cell table:style-name="Table103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12"/><text:span text:style-name="Strong_20_Emphasis"><text:span text:style-name="T5">Inactive</text:span></text:span><text:bookmark-end text:name="__RefHeading___Toc2083_720390006 Copy 1 Copy 12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16">in</text:span></text:span><text:span text:style-name="Strong_20_Emphasis"><text:span text:style-name="T7">-actives a specific “</text:span></text:span><text:span text:style-name="Strong_20_Emphasis"><text:span text:style-name="T26">payment schedule for customer</text:span></text:span><text:span text:style-name="Strong_20_Emphasis"><text:span text:style-name="T9">’s contract</text:span></text:span><text:span text:style-name="Strong_20_Emphasis"><text:span text:style-name="T7">” in the </text:span></text:span><text:span text:style-name="Strong_20_Emphasis"><text:span text:style-name="T17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30">curl --request GET \</text:p>
            <text:p text:style-name="P30"><text:s text:c="2"/>--url 'https://[maindomian]/api/finance/CustomerContractPaymentSchedul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8">in</text:span>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12"/><text:span text:style-name="Strong_20_Emphasis"><text:span text:style-name="T5">Fetch Specific Record</text:span></text:span><text:bookmark-end text:name="__RefHeading___Toc2085_720390006 Copy 1 Copy 12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19">returns</text:span></text:span><text:span text:style-name="Strong_20_Emphasis"><text:span text:style-name="T7"> a specific “</text:span></text:span><text:span text:style-name="Strong_20_Emphasis"><text:span text:style-name="T26">payment schedule for customer</text:span></text:span><text:span text:style-name="Strong_20_Emphasis"><text:span text:style-name="T9">’s contract</text:span></text:span><text:span text:style-name="Strong_20_Emphasis"><text:span text:style-name="T7">” </text:span></text:span><text:span text:style-name="Strong_20_Emphasis"><text:span text:style-name="T19">from</text:span></text:span><text:span text:style-name="Strong_20_Emphasis"><text:span text:style-name="T7"> the </text:span></text:span><text:span text:style-name="Strong_20_Emphasis"><text:span text:style-name="T10">finance</text:span></text:span><text:span text:style-name="Strong_20_Emphasis"><text:span text:style-name="T20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P30">curl --request GET \</text:p>
            <text:p text:style-name="P30"><text:soft-page-break/><text:s text:c="2"/>--url 'https://[maindomian]/api/finance/CustomerContractPaymentSchedul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13"/><text:soft-page-break/>Customer Contract Payment Receipt<text:bookmark-end text:name="__RefHeading___Toc227_771010674 Copy 1 Copy 13"/></text:h>
      <text:h text:style-name="P28" text:outline-level="2"><text:bookmark-start text:name="__RefHeading___Toc908_3206075736 Copy 1 Copy 1 Copy 13"/><text:span text:style-name="Strong_20_Emphasis"><text:span text:style-name="T5">Delete</text:span></text:span><text:bookmark-end text:name="__RefHeading___Toc908_3206075736 Copy 1 Copy 1 Copy 13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6">receipt of </text:span></text:span><text:span text:style-name="Strong_20_Emphasis"><text:span text:style-name="T26">payment for customer</text:span></text:span><text:span text:style-name="Strong_20_Emphasis"><text:span text:style-name="T9">’s contract</text:span></text:span><text:span text:style-name="Strong_20_Emphasis"><text:span text:style-name="T7">” from the </text:span></text:span><text:span text:style-name="Strong_20_Emphasis"><text:span text:style-name="T10">finance</text:span></text:span><text:span text:style-name="Strong_20_Emphasis"><text:span text:style-name="T11"> man</text:span></text:span><text:span text:style-name="Strong_20_Emphasis"><text:span text:style-name="T12">a</text:span></text:span><text:span text:style-name="Strong_20_Emphasis"><text:span text:style-name="T11">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P30">curl --request DELETE \</text:p>
            <text:p text:style-name="P30"><text:s text:c="2"/>--url 'https://[maindomian]/api/finance/customerContractPaymentReceip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dele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13"/><text:span text:style-name="Strong_20_Emphasis"><text:span text:style-name="T5">Active</text:span></text:span><text:bookmark-end text:name="__RefHeading___Toc2079_720390006 Copy 1 Copy 13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actives a “</text:span></text:span><text:span text:style-name="Strong_20_Emphasis"><text:span text:style-name="T26">receipt of payment for customer</text:span></text:span><text:span text:style-name="Strong_20_Emphasis"><text:span text:style-name="T9">’s contract</text:span></text:span><text:span text:style-name="Strong_20_Emphasis"><text:span text:style-name="T7">” in the </text:span></text:span><text:span text:style-name="Strong_20_Emphasis"><text:span text:style-name="T10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30">curl --request PUT \</text:p>
            <text:p text:style-name="P30"><text:s text:c="2"/>--url 'https://[maindomian]/api/finance/customerContractPaymentReceipt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oft-page-break/><text:span text:style-name="Strong_20_Emphasis"><text:span text:style-name="T13">Response Sample</text:span></text:span></text:p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13"/><text:span text:style-name="Strong_20_Emphasis"><text:span text:style-name="T5">Inactive</text:span></text:span><text:bookmark-end text:name="__RefHeading___Toc2083_720390006 Copy 1 Copy 13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16">in</text:span></text:span><text:span text:style-name="Strong_20_Emphasis"><text:span text:style-name="T7">-actives a specific “</text:span></text:span><text:span text:style-name="Strong_20_Emphasis"><text:span text:style-name="T26">receipt of payment for customer</text:span></text:span><text:span text:style-name="Strong_20_Emphasis"><text:span text:style-name="T9">’s contract</text:span></text:span><text:span text:style-name="Strong_20_Emphasis"><text:span text:style-name="T7">” in the </text:span></text:span><text:span text:style-name="Strong_20_Emphasis"><text:span text:style-name="T17">finance</text:span></text:span><text:span text:style-name="Strong_20_Emphasis"><text:span text:style-name="T11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30">curl --request PUT \</text:p>
            <text:p text:style-name="P30"><text:s text:c="2"/>--url 'https://[maindomian]/api/finance/customerContractPaymentReceipt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8">in</text:span><text:span text:style-name="T15">activated</text:span> successfully.",</text:p>
            <text:p text:style-name="P30"><text:tab/>"errorCode" : 0,</text:p>
            <text:p text:style-name="P30"><text:tab/>"data" : <text:span text:style-name="T15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13"/><text:span text:style-name="Strong_20_Emphasis"><text:span text:style-name="T5">Fetch Specific Record</text:span></text:span><text:bookmark-end text:name="__RefHeading___Toc2085_720390006 Copy 1 Copy 13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19">returns</text:span></text:span><text:span text:style-name="Strong_20_Emphasis"><text:span text:style-name="T7"> a specific “</text:span></text:span><text:span text:style-name="Strong_20_Emphasis"><text:span text:style-name="T26">receipt of payment for customer</text:span></text:span><text:span text:style-name="Strong_20_Emphasis"><text:span text:style-name="T9">’s contract</text:span></text:span><text:span text:style-name="Strong_20_Emphasis"><text:span text:style-name="T7">” </text:span></text:span><text:span text:style-name="Strong_20_Emphasis"><text:span text:style-name="T19">from</text:span></text:span><text:span text:style-name="Strong_20_Emphasis"><text:span text:style-name="T7"> the </text:span></text:span><text:span text:style-name="Strong_20_Emphasis"><text:span text:style-name="T10">finance</text:span></text:span><text:span text:style-name="Strong_20_Emphasis"><text:span text:style-name="T20"> management</text:span></text:span><text:span text:style-name="Strong_20_Emphasis"><text:span text:style-name="T7">.</text:span></text:span></text:p>
      <text:p text:style-name="P29"><text:span text:style-name="Strong_20_Emphasis"><text:span text:style-name="T13">Request CURL Sample</text:span></text:span></text:p>
      <table:table table:name="Table114" table:style-name="Table114">
        <table:table-column table:style-name="Table114.A"/>
        <text:soft-page-break/>
        <table:table-row>
          <table:table-cell table:style-name="Table114.A1" office:value-type="string">
            <text:p text:style-name="P30">curl --request GET \</text:p>
            <text:p text:style-name="P30"><text:s text:c="2"/>--url 'https://[maindomian]/api/finance/customerContractPaymentReceip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4"/></text:span></text:p>
      <text:p text:style-name="P29"><text:span text:style-name="Strong_20_Emphasis"><text:span text:style-name="T13">Response Sample</text:span></text:span></text:p>
      <table:table table:name="Table115" table:style-name="Table115">
        <table:table-column table:style-name="Table115.A"/>
        <table:table-row table:style-name="Table115.1">
          <table:table-cell table:style-name="Table115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29"><text:soft-page-break/><text:span text:style-name="T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&#10;&#10;" text:name="DocumentVersion"/>
        </text:user-field-decls>
        <text:p text:style-name="MP1"><text:subject>API Specification for Finance</text:subject><text:tab/><text:tab/>Document Version: <text:user-field-get text:name="DocumentVersion">1.0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46</text:page-number><text:s/>of <text:page-count>46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6-06-01T03:01:28.936223200</dc:date>
    <meta:editing-duration>P25DT9H44M20S</meta:editing-duration>
    <meta:editing-cycles>1177</meta:editing-cycles>
    <meta:generator>LibreOffice/25.2.6.2$Windows_X86_64 LibreOffice_project/729c5bfe710f5eb71ed3bbde9e06a6065e9c6c5d</meta:generator>
    <dc:subject>API Specification for Finance</dc:subject>
    <dc:title>Horizon Research Project</dc:title>
    <meta:document-statistic meta:table-count="115" meta:image-count="1" meta:object-count="0" meta:page-count="46" meta:paragraph-count="1367" meta:word-count="4559" meta:character-count="33268" meta:non-whitespace-character-count="28676"/>
  </office:meta>
</office:document-meta>
</file>