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e55416" officeooo:paragraph-rsid="07e5541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ext_20_body">
      <style:text-properties officeooo:paragraph-rsid="07e55416"/>
    </style:style>
    <style:style style:name="P26" style:family="paragraph" style:parent-style-name="Text_20_body">
      <style:text-properties style:font-name="Liberation Sans" fo:font-size="18.2000007629395pt" fo:font-weight="bold" officeooo:rsid="07c07f1c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1">
      <style:text-properties style:font-name="Liberation Sans" fo:font-size="18.2000007629395pt" fo:font-weight="bold" officeooo:rsid="07e55416" officeooo:paragraph-rsid="07e64ea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8" style:family="paragraph" style:parent-style-name="Heading_20_2">
      <style:text-properties officeooo:paragraph-rsid="07e64ea8"/>
    </style:style>
    <style:style style:name="P29" style:family="paragraph" style:parent-style-name="Text_20_body">
      <style:text-properties officeooo:paragraph-rsid="07e64ea8"/>
    </style:style>
    <style:style style:name="P30" style:family="paragraph" style:parent-style-name="Table_20_Contents">
      <style:text-properties style:font-name="Cascadia Code Light" officeooo:paragraph-rsid="07e64ea8"/>
    </style:style>
    <style:style style:name="P31" style:family="paragraph" style:parent-style-name="Table_20_Contents">
      <style:text-properties style:font-name="Cascadia Code Light" fo:font-weight="normal" officeooo:paragraph-rsid="07e64ea8" style:font-weight-asian="normal" style:font-weight-complex="normal"/>
    </style:style>
    <style:style style:name="P32" style:family="paragraph" style:parent-style-name="Text_20_body">
      <style:text-properties style:font-name="Liberation Sans" fo:font-size="18.2000007629395pt" fo:font-weight="bold" officeooo:rsid="07c07f1c" officeooo:paragraph-rsid="07e64ea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3" style:family="paragraph" style:parent-style-name="Heading_20_1">
      <style:text-properties style:font-name="Liberation Sans" fo:font-size="18.2000007629395pt" fo:font-weight="bold" officeooo:rsid="07e55416" officeooo:paragraph-rsid="07e6c40e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4" style:family="paragraph" style:parent-style-name="Heading_20_2">
      <style:text-properties officeooo:paragraph-rsid="07e6c40e"/>
    </style:style>
    <style:style style:name="P35" style:family="paragraph" style:parent-style-name="Text_20_body">
      <style:text-properties officeooo:paragraph-rsid="07e6c40e"/>
    </style:style>
    <style:style style:name="P36" style:family="paragraph" style:parent-style-name="Table_20_Contents">
      <style:text-properties style:font-name="Cascadia Code Light" officeooo:paragraph-rsid="07e6c40e"/>
    </style:style>
    <style:style style:name="P37" style:family="paragraph" style:parent-style-name="Text_20_body">
      <style:text-properties officeooo:paragraph-rsid="07ea242c"/>
    </style:style>
    <style:style style:name="P38" style:family="paragraph" style:parent-style-name="Text_20_body">
      <style:text-properties style:font-name="Liberation Sans" fo:font-size="18.2000007629395pt" fo:font-weight="bold" officeooo:rsid="07c07f1c" officeooo:paragraph-rsid="07e6c40e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70a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9" style:family="text">
      <style:text-properties fo:font-weight="normal" officeooo:rsid="07e55416" style:font-weight-asian="normal" style:font-weight-complex="normal"/>
    </style:style>
    <style:style style:name="T10" style:family="text">
      <style:text-properties style:font-name="Liberation Sans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78bff70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fo:font-weight="normal" officeooo:rsid="07e55416" style:font-weight-asian="normal" style:language-complex="fa" style:country-complex="IR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fo:font-weight="normal" officeooo:rsid="07e64ea8" style:font-weight-asian="normal" style:font-weight-complex="normal"/>
    </style:style>
    <style:style style:name="T18" style:family="text">
      <style:text-properties officeooo:rsid="07e64ea8"/>
    </style:style>
    <style:style style:name="T19" style:family="text">
      <style:text-properties officeooo:rsid="07e6c40e"/>
    </style:style>
    <style:style style:name="T20" style:family="text">
      <style:text-properties fo:font-weight="normal" officeooo:rsid="07e6c40e" style:font-weight-asian="normal" style:font-weight-complex="normal"/>
    </style:style>
    <style:style style:name="T21" style:family="text">
      <style:text-properties officeooo:rsid="07e8ba9b"/>
    </style:style>
    <style:style style:name="T22" style:family="text">
      <style:text-properties fo:font-weight="normal" officeooo:rsid="07e8ba9b" style:font-weight-asian="normal" style:font-weight-complex="normal"/>
    </style:style>
    <style:style style:name="T23" style:family="text">
      <style:text-properties fo:font-weight="normal" officeooo:rsid="07ea242c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Quality Control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6-04T01:03:49.747396381" text:fixed="true">June 4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Test Scenario<text:tab/>4</text:a></text:p>
          <text:p text:style-name="P8"><text:a xlink:type="simple" xlink:href="#__RefHeading___Toc908_3206075736%20Copy%201%20Copy%201" text:style-name="Index_20_Link" text:visited-style-name="Index_20_Link">2.1 Delete<text:tab/>4</text:a></text:p>
          <text:p text:style-name="P8"><text:a xlink:type="simple" xlink:href="#__RefHeading___Toc2079_720390006%20Copy%201" text:style-name="Index_20_Link" text:visited-style-name="Index_20_Link">2.2 Active<text:tab/>4</text:a></text:p>
          <text:p text:style-name="P8"><text:a xlink:type="simple" xlink:href="#__RefHeading___Toc2083_720390006%20Copy%201" text:style-name="Index_20_Link" text:visited-style-name="Index_20_Link">2.3 Inactive<text:tab/>5</text:a></text:p>
          <text:p text:style-name="P8"><text:a xlink:type="simple" xlink:href="#__RefHeading___Toc2085_720390006%20Copy%201" text:style-name="Index_20_Link" text:visited-style-name="Index_20_Link">2.4 Fetch Specific Record<text:tab/>5</text:a></text:p>
          <text:p text:style-name="P7"><text:a xlink:type="simple" xlink:href="#__RefHeading___Toc227_771010674%20Copy%201%20Copy%202" text:style-name="Index_20_Link" text:visited-style-name="Index_20_Link">3 Prerequisite Test Scenario<text:tab/>7</text:a></text:p>
          <text:p text:style-name="P8"><text:a xlink:type="simple" xlink:href="#__RefHeading___Toc908_3206075736%20Copy%201%20Copy%201%20Copy%202" text:style-name="Index_20_Link" text:visited-style-name="Index_20_Link">3.1 Delete<text:tab/>7</text:a></text:p>
          <text:p text:style-name="P8"><text:a xlink:type="simple" xlink:href="#__RefHeading___Toc2079_720390006%20Copy%201%20Copy%202" text:style-name="Index_20_Link" text:visited-style-name="Index_20_Link">3.2 Active<text:tab/>7</text:a></text:p>
          <text:p text:style-name="P8"><text:a xlink:type="simple" xlink:href="#__RefHeading___Toc2083_720390006%20Copy%201%20Copy%202" text:style-name="Index_20_Link" text:visited-style-name="Index_20_Link">3.3 Inactive<text:tab/>8</text:a></text:p>
          <text:p text:style-name="P8"><text:a xlink:type="simple" xlink:href="#__RefHeading___Toc2085_720390006%20Copy%201%20Copy%202" text:style-name="Index_20_Link" text:visited-style-name="Index_20_Link">3.4 Fetch Specific Record<text:tab/>8</text:a></text:p>
          <text:p text:style-name="P7"><text:a xlink:type="simple" xlink:href="#__RefHeading___Toc227_771010674%20Copy%201%20Copy%203" text:style-name="Index_20_Link" text:visited-style-name="Index_20_Link">4 Test Plan<text:tab/>10</text:a></text:p>
          <text:p text:style-name="P8"><text:a xlink:type="simple" xlink:href="#__RefHeading___Toc908_3206075736%20Copy%201%20Copy%201%20Copy%203" text:style-name="Index_20_Link" text:visited-style-name="Index_20_Link">4.1 Delete<text:tab/>10</text:a></text:p>
          <text:p text:style-name="P8"><text:a xlink:type="simple" xlink:href="#__RefHeading___Toc2079_720390006%20Copy%201%20Copy%203" text:style-name="Index_20_Link" text:visited-style-name="Index_20_Link">4.2 Active<text:tab/>10</text:a></text:p>
          <text:p text:style-name="P8"><text:a xlink:type="simple" xlink:href="#__RefHeading___Toc2083_720390006%20Copy%201%20Copy%203" text:style-name="Index_20_Link" text:visited-style-name="Index_20_Link">4.3 Inactive<text:tab/>11</text:a></text:p>
          <text:p text:style-name="P8"><text:a xlink:type="simple" xlink:href="#__RefHeading___Toc2085_720390006%20Copy%201%20Copy%203" text:style-name="Index_20_Link" text:visited-style-name="Index_20_Link">4.4 Fetch Specific Record<text:tab/>11</text:a></text:p>
          <text:p text:style-name="P7"><text:a xlink:type="simple" xlink:href="#__RefHeading___Toc227_771010674%20Copy%201%20Copy%204" text:style-name="Index_20_Link" text:visited-style-name="Index_20_Link">5 Test Plan Scenario<text:tab/>12</text:a></text:p>
          <text:p text:style-name="P8"><text:a xlink:type="simple" xlink:href="#__RefHeading___Toc908_3206075736%20Copy%201%20Copy%201%20Copy%204" text:style-name="Index_20_Link" text:visited-style-name="Index_20_Link">5.1 Delete<text:tab/>12</text:a></text:p>
          <text:p text:style-name="P8"><text:a xlink:type="simple" xlink:href="#__RefHeading___Toc2079_720390006%20Copy%201%20Copy%204" text:style-name="Index_20_Link" text:visited-style-name="Index_20_Link">5.2 Active<text:tab/>13</text:a></text:p>
          <text:p text:style-name="P8"><text:a xlink:type="simple" xlink:href="#__RefHeading___Toc2083_720390006%20Copy%201%20Copy%204" text:style-name="Index_20_Link" text:visited-style-name="Index_20_Link">5.3 Inactive<text:tab/>14</text:a></text:p>
          <text:p text:style-name="P8"><text:a xlink:type="simple" xlink:href="#__RefHeading___Toc2085_720390006%20Copy%201%20Copy%204" text:style-name="Index_20_Link" text:visited-style-name="Index_20_Link">5.4 Fetch Specific Record<text:tab/>14</text:a></text:p>
          <text:p text:style-name="P7"><text:a xlink:type="simple" xlink:href="#__RefHeading___Toc227_771010674%20Copy%201%20Copy%205" text:style-name="Index_20_Link" text:visited-style-name="Index_20_Link">6 Test Plan Scenario Issue Coverage<text:tab/>15</text:a></text:p>
          <text:p text:style-name="P8"><text:a xlink:type="simple" xlink:href="#__RefHeading___Toc908_3206075736%20Copy%201%20Copy%201%20Copy%205" text:style-name="Index_20_Link" text:visited-style-name="Index_20_Link">6.1 Delete<text:tab/>15</text:a></text:p>
          <text:p text:style-name="P8"><text:a xlink:type="simple" xlink:href="#__RefHeading___Toc2079_720390006%20Copy%201%20Copy%205" text:style-name="Index_20_Link" text:visited-style-name="Index_20_Link">6.2 Active<text:tab/>16</text:a></text:p>
          <text:p text:style-name="P8"><text:a xlink:type="simple" xlink:href="#__RefHeading___Toc2083_720390006%20Copy%201%20Copy%205" text:style-name="Index_20_Link" text:visited-style-name="Index_20_Link">6.3 Inactive<text:tab/>17</text:a></text:p>
          <text:p text:style-name="P8"><text:a xlink:type="simple" xlink:href="#__RefHeading___Toc2085_720390006%20Copy%201%20Copy%205" text:style-name="Index_20_Link" text:visited-style-name="Index_20_Link">6.4 Fetch Specific Record<text:tab/>17</text:a></text:p>
          <text:p text:style-name="P7"><text:a xlink:type="simple" xlink:href="#__RefHeading___Toc227_771010674%20Copy%201%20Copy%206" text:style-name="Index_20_Link" text:visited-style-name="Index_20_Link">7 Test Result<text:tab/>18</text:a></text:p>
          <text:p text:style-name="P8"><text:a xlink:type="simple" xlink:href="#__RefHeading___Toc908_3206075736%20Copy%201%20Copy%201%20Copy%206" text:style-name="Index_20_Link" text:visited-style-name="Index_20_Link">7.1 Delete<text:tab/>18</text:a></text:p>
          <text:p text:style-name="P8"><text:a xlink:type="simple" xlink:href="#__RefHeading___Toc2079_720390006%20Copy%201%20Copy%206" text:style-name="Index_20_Link" text:visited-style-name="Index_20_Link">7.2 Active<text:tab/>19</text:a></text:p>
          <text:p text:style-name="P8"><text:a xlink:type="simple" xlink:href="#__RefHeading___Toc2083_720390006%20Copy%201%20Copy%206" text:style-name="Index_20_Link" text:visited-style-name="Index_20_Link">7.3 Inactive<text:tab/>20</text:a></text:p>
          <text:p text:style-name="P8"><text:a xlink:type="simple" xlink:href="#__RefHeading___Toc2085_720390006%20Copy%201%20Copy%206" text:style-name="Index_20_Link" text:visited-style-name="Index_20_Link">7.4 Fetch Specific Record<text:tab/>20</text:a></text:p>
          <text:p text:style-name="P7"><text:a xlink:type="simple" xlink:href="#__RefHeading___Toc227_771010674%20Copy%201%20Copy%201" text:style-name="Index_20_Link" text:visited-style-name="Index_20_Link">8 Test Result Detail<text:tab/>21</text:a></text:p>
          <text:p text:style-name="P8"><text:a xlink:type="simple" xlink:href="#__RefHeading___Toc908_3206075736%20Copy%201%20Copy%201%20Copy%201" text:style-name="Index_20_Link" text:visited-style-name="Index_20_Link">8.1 Delete<text:tab/>21</text:a></text:p>
          <text:p text:style-name="P8"><text:a xlink:type="simple" xlink:href="#__RefHeading___Toc2079_720390006%20Copy%201%20Copy%201" text:style-name="Index_20_Link" text:visited-style-name="Index_20_Link">8.2 Active<text:tab/>22</text:a></text:p>
          <text:p text:style-name="P8"><text:a xlink:type="simple" xlink:href="#__RefHeading___Toc2083_720390006%20Copy%201%20Copy%201" text:style-name="Index_20_Link" text:visited-style-name="Index_20_Link">8.3 Inactive<text:tab/>22</text:a></text:p>
          <text:p text:style-name="P8"><text:a xlink:type="simple" xlink:href="#__RefHeading___Toc2085_720390006%20Copy%201%20Copy%201" text:style-name="Index_20_Link" text:visited-style-name="Index_20_Link">8.4 Fetch Specific Record<text:tab/>23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 Copy 1"/>Test Scenario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5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test scenario</text:span></text:span><text:span text:style-name="Strong_20_Emphasis"><text:span text:style-name="T7">” from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qualityControl/testScenario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5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actives a “</text:span></text:span><text:span text:style-name="Strong_20_Emphasis"><text:span text:style-name="T9">test scenario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qualityControl/testScenario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oft-page-break/><text:span text:style-name="Strong_20_Emphasis"><text:span text:style-name="T10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5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test scenario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qualityControl/testScenario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5">in</text:span><text:span text:style-name="T12">activated</text:span> successfully.",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5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test scenario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3"><text:span text:style-name="Strong_20_Emphasis"><text:span text:style-name="T10">Request CURL Sample</text:span></text:span>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qualityControl/testScenario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1"/></text:span></text:p>
      <text:p text:style-name="P23"><text:span text:style-name="Strong_20_Emphasis"><text:span text:style-name="T10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6"/>
      <text:h text:style-name="P27" text:outline-level="1"><text:bookmark-start text:name="__RefHeading___Toc227_771010674 Copy 1 Copy 2"/><text:soft-page-break/>Prerequisite Test Scenario<text:bookmark-end text:name="__RefHeading___Toc227_771010674 Copy 1 Copy 2"/></text:h>
      <text:h text:style-name="P28" text:outline-level="2"><text:bookmark-start text:name="__RefHeading___Toc908_3206075736 Copy 1 Copy 1 Copy 2"/><text:span text:style-name="Strong_20_Emphasis"><text:span text:style-name="T5">Delete</text:span></text:span><text:bookmark-end text:name="__RefHeading___Toc908_3206075736 Copy 1 Copy 1 Copy 2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17">prerequisite </text:span></text:span><text:span text:style-name="Strong_20_Emphasis"><text:span text:style-name="T9">test scenario </text:span></text:span><text:span text:style-name="Strong_20_Emphasis"><text:span text:style-name="T17">for other scenario</text:span></text:span><text:span text:style-name="Strong_20_Emphasis"><text:span text:style-name="T7">” from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">curl --request DELETE \</text:p>
            <text:p text:style-name="P30"><text:s text:c="2"/>--url 'https://[maindomian]/api/qualityControl/prerequisiteTestScenario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2"/><text:span text:style-name="Strong_20_Emphasis"><text:span text:style-name="T5">Active</text:span></text:span><text:bookmark-end text:name="__RefHeading___Toc2079_720390006 Copy 1 Copy 2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actives a “</text:span></text:span><text:span text:style-name="Strong_20_Emphasis"><text:span text:style-name="T17">prerequisite </text:span></text:span><text:span text:style-name="Strong_20_Emphasis"><text:span text:style-name="T9">test scenario </text:span></text:span><text:span text:style-name="Strong_20_Emphasis"><text:span text:style-name="T17">for other scenario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0">curl --request PUT \</text:p>
            <text:p text:style-name="P30"><text:s text:c="2"/>--url 'https://[maindomian]/api/qualityControl/prerequisiteTestScenario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2"/><text:span text:style-name="Strong_20_Emphasis"><text:span text:style-name="T5">Inactive</text:span></text:span><text:bookmark-end text:name="__RefHeading___Toc2083_720390006 Copy 1 Copy 2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17">prerequisite </text:span></text:span><text:span text:style-name="Strong_20_Emphasis"><text:span text:style-name="T9">test scenario </text:span></text:span><text:span text:style-name="Strong_20_Emphasis"><text:span text:style-name="T17">for other scenario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0">curl --request PUT \</text:p>
            <text:p text:style-name="P30"><text:s text:c="2"/>--url 'https://[maindomian]/api/qualityControl/prerequisiteTestScenario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2"/><text:span text:style-name="Strong_20_Emphasis"><text:span text:style-name="T5">Fetch Specific Record</text:span></text:span><text:bookmark-end text:name="__RefHeading___Toc2085_720390006 Copy 1 Copy 2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17">prerequisite </text:span></text:span><text:span text:style-name="Strong_20_Emphasis"><text:span text:style-name="T9">test scenario </text:span></text:span><text:span text:style-name="Strong_20_Emphasis"><text:span text:style-name="T17">for other scenario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1">curl --request GET \</text:p>
            <text:p text:style-name="P31"><text:soft-page-break/><text:s text:c="2"/>--url 'https://[maindomian]/api/qualityControl/prerequisiteTestScenario/[id]' \</text:p>
            <text:p text:style-name="P31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3"/><text:soft-page-break/>Test <text:span text:style-name="T18">Plan</text:span><text:bookmark-end text:name="__RefHeading___Toc227_771010674 Copy 1 Copy 3"/></text:h>
      <text:h text:style-name="P28" text:outline-level="2"><text:bookmark-start text:name="__RefHeading___Toc908_3206075736 Copy 1 Copy 1 Copy 3"/><text:span text:style-name="Strong_20_Emphasis"><text:span text:style-name="T5">Delete</text:span></text:span><text:bookmark-end text:name="__RefHeading___Toc908_3206075736 Copy 1 Copy 1 Copy 3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test </text:span></text:span><text:span text:style-name="Strong_20_Emphasis"><text:span text:style-name="T17">plan</text:span></text:span><text:span text:style-name="Strong_20_Emphasis"><text:span text:style-name="T7">” from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0">curl --request DELETE \</text:p>
            <text:p text:style-name="P30"><text:s text:c="2"/>--url 'https://[maindomian]/api/qualityControl/testPla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3"/><text:span text:style-name="Strong_20_Emphasis"><text:span text:style-name="T5">Active</text:span></text:span><text:bookmark-end text:name="__RefHeading___Toc2079_720390006 Copy 1 Copy 3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actives a “</text:span></text:span><text:span text:style-name="Strong_20_Emphasis"><text:span text:style-name="T9">test </text:span></text:span><text:span text:style-name="Strong_20_Emphasis"><text:span text:style-name="T17">plan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0">curl --request PUT \</text:p>
            <text:p text:style-name="P30"><text:s text:c="2"/>--url 'https://[maindomian]/api/qualityControl/testPlan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0">{</text:p>
            <text:p text:style-name="P30"><text:tab/>"statusCode" : 200,</text:p>
            <text:p text:style-name="P30"><text:soft-page-break/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3"/><text:span text:style-name="Strong_20_Emphasis"><text:span text:style-name="T5">Inactive</text:span></text:span><text:bookmark-end text:name="__RefHeading___Toc2083_720390006 Copy 1 Copy 3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test </text:span></text:span><text:span text:style-name="Strong_20_Emphasis"><text:span text:style-name="T17">plan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">curl --request PUT \</text:p>
            <text:p text:style-name="P30"><text:s text:c="2"/>--url 'https://[maindomian]/api/qualityControl/testPlan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3"/><text:span text:style-name="Strong_20_Emphasis"><text:span text:style-name="T5">Fetch Specific Record</text:span></text:span><text:bookmark-end text:name="__RefHeading___Toc2085_720390006 Copy 1 Copy 3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test </text:span></text:span><text:span text:style-name="Strong_20_Emphasis"><text:span text:style-name="T17">pla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0">curl --request GET \</text:p>
            <text:p text:style-name="P30"><text:s text:c="2"/>--url 'https://[maindomian]/api/qualityControl/testPlan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oft-page-break/><text:span text:style-name="Strong_20_Emphasis"><text:span text:style-name="T10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4"/>Test <text:span text:style-name="T18">Plan </text:span>Scenario<text:bookmark-end text:name="__RefHeading___Toc227_771010674 Copy 1 Copy 4"/></text:h>
      <text:h text:style-name="P28" text:outline-level="2"><text:bookmark-start text:name="__RefHeading___Toc908_3206075736 Copy 1 Copy 1 Copy 4"/><text:span text:style-name="Strong_20_Emphasis"><text:span text:style-name="T5">Delete</text:span></text:span><text:bookmark-end text:name="__RefHeading___Toc908_3206075736 Copy 1 Copy 1 Copy 4"/></text:h>
      <text:p text:style-name="P29"><text:span text:style-name="Strong_20_Emphasis"><text:span text:style-name="T6">Description</text:span></text:span></text:p>
      <text:p text:style-name="P29"><text:soft-page-break/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test scenario </text:span></text:span><text:span text:style-name="Strong_20_Emphasis"><text:span text:style-name="T17">of a test plan</text:span></text:span><text:span text:style-name="Strong_20_Emphasis"><text:span text:style-name="T7">” from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0">curl --request DELETE \</text:p>
            <text:p text:style-name="P30"><text:s text:c="2"/>--url 'https://[maindomian]/api/qualityControl/testPlanScenario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4"/><text:span text:style-name="Strong_20_Emphasis"><text:span text:style-name="T5">Active</text:span></text:span><text:bookmark-end text:name="__RefHeading___Toc2079_720390006 Copy 1 Copy 4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actives a “</text:span></text:span><text:span text:style-name="Strong_20_Emphasis"><text:span text:style-name="T9">test scenario </text:span></text:span><text:span text:style-name="Strong_20_Emphasis"><text:span text:style-name="T17">of a test plan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0">curl --request PUT \</text:p>
            <text:p text:style-name="P30"><text:s text:c="2"/>--url 'https://[maindomian]/api/qualityControl/testPlanScenario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<text:soft-page-break/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4"/><text:span text:style-name="Strong_20_Emphasis"><text:span text:style-name="T5">Inactive</text:span></text:span><text:bookmark-end text:name="__RefHeading___Toc2083_720390006 Copy 1 Copy 4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test scenario </text:span></text:span><text:span text:style-name="Strong_20_Emphasis"><text:span text:style-name="T17">of a test plan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0">curl --request PUT \</text:p>
            <text:p text:style-name="P30"><text:s text:c="2"/>--url 'https://[maindomian]/api/qualityControl/testPlanScenario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4"/><text:span text:style-name="Strong_20_Emphasis"><text:span text:style-name="T5">Fetch Specific Record</text:span></text:span><text:bookmark-end text:name="__RefHeading___Toc2085_720390006 Copy 1 Copy 4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test scenario </text:span></text:span><text:span text:style-name="Strong_20_Emphasis"><text:span text:style-name="T17">of a test pla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0">curl --request GET \</text:p>
            <text:p text:style-name="P30"><text:s text:c="2"/>--url 'https://[maindomian]/api/qualityControl/testPlanScenario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0" table:style-name="Table40">
        <table:table-column table:style-name="Table40.A"/>
        <text:soft-page-break/>
        <table:table-row>
          <table:table-cell table:style-name="Table4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5"/>Test Plan Scenario Issue Coverage<text:bookmark-end text:name="__RefHeading___Toc227_771010674 Copy 1 Copy 5"/></text:h>
      <text:h text:style-name="P28" text:outline-level="2"><text:bookmark-start text:name="__RefHeading___Toc908_3206075736 Copy 1 Copy 1 Copy 5"/><text:span text:style-name="Strong_20_Emphasis"><text:span text:style-name="T5">Delete</text:span></text:span><text:bookmark-end text:name="__RefHeading___Toc908_3206075736 Copy 1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</text:span></text:span><text:span text:style-name="Strong_20_Emphasis"><text:span text:style-name="T17">n</text:span></text:span><text:span text:style-name="Strong_20_Emphasis"><text:span text:style-name="T7"> “</text:span></text:span><text:span text:style-name="Strong_20_Emphasis"><text:span text:style-name="T17">issue coverage of a scenario in test plan</text:span></text:span><text:span text:style-name="Strong_20_Emphasis"><text:span text:style-name="T7">” from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oft-page-break/><text:span text:style-name="Strong_20_Emphasis"><text:span text:style-name="T10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0">curl --request DELETE \</text:p>
            <text:p text:style-name="P30"><text:s text:c="2"/>--url 'https://[maindomian]/api/qualityControl/testPlanScenarioIssueCoverag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5"/><text:span text:style-name="Strong_20_Emphasis"><text:span text:style-name="T5">Active</text:span></text:span><text:bookmark-end text:name="__RefHeading___Toc2079_720390006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actives a</text:span></text:span><text:span text:style-name="Strong_20_Emphasis"><text:span text:style-name="T17">n</text:span></text:span><text:span text:style-name="Strong_20_Emphasis"><text:span text:style-name="T7"> “</text:span></text:span><text:span text:style-name="Strong_20_Emphasis"><text:span text:style-name="T17">issue coverage of a scenario in test plan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0">curl --request PUT \</text:p>
            <text:p text:style-name="P30"><text:s text:c="2"/>--url 'https://[maindomian]/api/qualityControl/testPlanScenarioIssueCoverage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oft-page-break/><text:span text:style-name="Strong_20_Emphasis"/></text:p>
      <text:h text:style-name="P28" text:outline-level="2"><text:bookmark-start text:name="__RefHeading___Toc2083_720390006 Copy 1 Copy 5"/><text:span text:style-name="Strong_20_Emphasis"><text:span text:style-name="T5">Inactive</text:span></text:span><text:bookmark-end text:name="__RefHeading___Toc2083_720390006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t</text:span></text:span><text:span text:style-name="Strong_20_Emphasis"><text:span text:style-name="T17">issue coverage of a scenario in test plan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0">curl --request PUT \</text:p>
            <text:p text:style-name="P30"><text:s text:c="2"/>--url 'https://[maindomian]/api/qualityControl/testPlanScenarioIssueCoverage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5"/><text:span text:style-name="Strong_20_Emphasis"><text:span text:style-name="T5">Fetch Specific Record</text:span></text:span><text:bookmark-end text:name="__RefHeading___Toc2085_720390006 Copy 1 Copy 5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test scenario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0">curl --request GET \</text:p>
            <text:p text:style-name="P30"><text:s text:c="2"/>--url 'https://[maindomian]/api/qualityControl/testPlanScenarioIssueCoverag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48" table:style-name="Table48">
        <table:table-column table:style-name="Table48.A"/>
        <text:soft-page-break/>
        <table:table-row>
          <table:table-cell table:style-name="Table48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27" text:outline-level="1"><text:bookmark-start text:name="__RefHeading___Toc227_771010674 Copy 1 Copy 6"/>Test <text:span text:style-name="T19">Result</text:span><text:bookmark-end text:name="__RefHeading___Toc227_771010674 Copy 1 Copy 6"/></text:h>
      <text:h text:style-name="P28" text:outline-level="2"><text:bookmark-start text:name="__RefHeading___Toc908_3206075736 Copy 1 Copy 1 Copy 6"/><text:span text:style-name="Strong_20_Emphasis"><text:span text:style-name="T5">Delete</text:span></text:span><text:bookmark-end text:name="__RefHeading___Toc908_3206075736 Copy 1 Copy 1 Copy 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9">test </text:span></text:span><text:span text:style-name="Strong_20_Emphasis"><text:span text:style-name="T20">result</text:span></text:span><text:span text:style-name="Strong_20_Emphasis"><text:span text:style-name="T7">” from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oft-page-break/><text:span text:style-name="Strong_20_Emphasis"><text:span text:style-name="T10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0">curl --request DELETE \</text:p>
            <text:p text:style-name="P30"><text:s text:c="2"/>--url 'https://[maindomian]/api/qualityControl/testResul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dele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79_720390006 Copy 1 Copy 6"/><text:span text:style-name="Strong_20_Emphasis"><text:span text:style-name="T5">Active</text:span></text:span><text:bookmark-end text:name="__RefHeading___Toc2079_720390006 Copy 1 Copy 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actives a “</text:span></text:span><text:span text:style-name="Strong_20_Emphasis"><text:span text:style-name="T9">test </text:span></text:span><text:span text:style-name="Strong_20_Emphasis"><text:span text:style-name="T20">result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0">curl --request PUT \</text:p>
            <text:p text:style-name="P30"><text:s text:c="2"/>--url 'https://[maindomian]/api/qualityControl/testResult/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3_720390006 Copy 1 Copy 6"/><text:soft-page-break/><text:span text:style-name="Strong_20_Emphasis"><text:span text:style-name="T5">Inactive</text:span></text:span><text:bookmark-end text:name="__RefHeading___Toc2083_720390006 Copy 1 Copy 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9">test </text:span></text:span><text:span text:style-name="Strong_20_Emphasis"><text:span text:style-name="T20">result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0">curl --request PUT \</text:p>
            <text:p text:style-name="P30"><text:s text:c="2"/>--url 'https://[maindomian]/api/qualityControl/testResult/inactive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5">in</text:span><text:span text:style-name="T12">activated</text:span> successfully.",</text:p>
            <text:p text:style-name="P30"><text:tab/>"errorCode" : 0,</text:p>
            <text:p text:style-name="P30"><text:tab/>"data" : <text:span text:style-name="T12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2085_720390006 Copy 1 Copy 6"/><text:span text:style-name="Strong_20_Emphasis"><text:span text:style-name="T5">Fetch Specific Record</text:span></text:span><text:bookmark-end text:name="__RefHeading___Toc2085_720390006 Copy 1 Copy 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9">test </text:span></text:span><text:span text:style-name="Strong_20_Emphasis"><text:span text:style-name="T20">resul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29"><text:span text:style-name="Strong_20_Emphasis"><text:span text:style-name="T10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0">curl --request GET \</text:p>
            <text:p text:style-name="P30"><text:s text:c="2"/>--url 'https://[maindomian]/api/qualityControl/testResult/[id]' \</text:p>
            <text:p text:style-name="P30"><text:s text:c="2"/>--header 'Authorization: Bearer [token]'</text:p>
          </table:table-cell>
        </table:table-row>
      </table:table>
      <text:p text:style-name="P29"><text:span text:style-name="Strong_20_Emphasis"><text:span text:style-name="T11"/></text:span></text:p>
      <text:p text:style-name="P29"><text:span text:style-name="Strong_20_Emphasis"><text:span text:style-name="T10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data is returned successfully.",</text:p>
            <text:p text:style-name="P30"><text:tab/>"errorCode" : 0,</text:p>
            <text:p text:style-name="P30"><text:soft-page-break/><text:tab/>"data" : {</text:p>
            <text:p text:style-name="P30"><text:tab/><text:tab/>"id" : 16621244611384550112, </text:p>
            <text:p text:style-name="P30"><text:tab/><text:tab/>"title" : "test",</text:p>
            <text:p text:style-name="P30"><text:tab/><text:tab/>"code" : "123",</text:p>
            <text:p text:style-name="P30"><text:tab/><text:tab/>"description" : "test",</text:p>
            <text:p text:style-name="P30"><text:tab/><text:tab/>"profileId": [{</text:p>
            <text:p text:style-name="P30"><text:tab/><text:tab/><text:tab/>"id" : 16621244611384550113,</text:p>
            <text:p text:style-name="P30"><text:tab/><text:tab/><text:tab/>"firstName": "David",</text:p>
            <text:p text:style-name="P30"><text:tab/><text:tab/><text:tab/>"lastName": "Talor"</text:p>
            <text:p text:style-name="P30"><text:tab/><text:tab/>}],</text:p>
            <text:p text:style-name="P30"><text:tab/><text:tab/>"roleFormPermissionId": [{</text:p>
            <text:p text:style-name="P30"><text:tab/><text:tab/><text:tab/>"id" : 16621244611384550114,</text:p>
            <text:p text:style-name="P30"><text:tab/><text:tab/><text:tab/>"formPermissionId": {</text:p>
            <text:p text:style-name="P30"><text:tab/><text:tab/><text:tab/><text:tab/>"id" : 16621244611384550114,</text:p>
            <text:p text:style-name="P30"><text:tab/><text:tab/><text:tab/><text:tab/>"formId": {</text:p>
            <text:p text:style-name="P30"><text:tab/><text:tab/><text:tab/><text:tab/><text:tab/>"id" : 16621244611384550115,</text:p>
            <text:p text:style-name="P30"><text:tab/><text:tab/><text:tab/><text:tab/><text:tab/>"title": "Project"</text:p>
            <text:p text:style-name="P30"><text:tab/><text:tab/><text:tab/><text:tab/>},</text:p>
            <text:p text:style-name="P30"><text:tab/><text:tab/><text:tab/><text:tab/>"permissionId": {</text:p>
            <text:p text:style-name="P30"><text:tab/><text:tab/><text:tab/><text:tab/><text:tab/>"id" : 16621244611384550116,</text:p>
            <text:p text:style-name="P30"><text:tab/><text:tab/><text:tab/><text:tab/><text:tab/>"title": "Add"</text:p>
            <text:p text:style-name="P30"><text:tab/><text:tab/><text:tab/><text:tab/>}</text:p>
            <text:p text:style-name="P30"><text:tab/><text:tab/><text:tab/>}</text:p>
            <text:p text:style-name="P30"><text:tab/><text:tab/>}],</text:p>
            <text:p text:style-name="P30"><text:tab/><text:tab/>"createdAt" : "2025-8-25 12:00:00",</text:p>
            <text:p text:style-name="P30"><text:tab/><text:tab/>"createdBy" : "John Davis" </text:p>
            <text:p text:style-name="P30"><text:tab/>}</text:p>
            <text:p text:style-name="P30">}</text:p>
          </table:table-cell>
        </table:table-row>
      </table:table>
      <text:p text:style-name="P32"/>
      <text:h text:style-name="P33" text:outline-level="1"><text:bookmark-start text:name="__RefHeading___Toc227_771010674 Copy 1 Copy 1"/>Test <text:span text:style-name="T21">Result Detail</text:span><text:bookmark-end text:name="__RefHeading___Toc227_771010674 Copy 1 Copy 1"/></text:h>
      <text:h text:style-name="P34" text:outline-level="2"><text:bookmark-start text:name="__RefHeading___Toc908_3206075736 Copy 1 Copy 1 Copy 1"/><text:span text:style-name="Strong_20_Emphasis"><text:span text:style-name="T5">Delete</text:span></text:span><text:bookmark-end text:name="__RefHeading___Toc908_3206075736 Copy 1 Copy 1 Copy 1"/></text:h>
      <text:p text:style-name="P35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8">logically</text:span></text:span><text:span text:style-name="Strong_20_Emphasis"><text:span text:style-name="T7"> deletes a “</text:span></text:span><text:span text:style-name="Strong_20_Emphasis"><text:span text:style-name="T22">detail of </text:span></text:span><text:span text:style-name="Strong_20_Emphasis"><text:span text:style-name="T9">test scenario</text:span></text:span><text:span text:style-name="Strong_20_Emphasis"><text:span text:style-name="T7">” from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35"><text:span text:style-name="Strong_20_Emphasis"><text:span text:style-name="T10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6">curl --request DELETE \</text:p>
            <text:p text:style-name="P36"><text:s text:c="2"/>--url <text:soft-page-break/>'https://[maindomian]/api/qualityControl/testResultDetail/[id]' \</text:p>
            <text:p text:style-name="P36"><text:s text:c="2"/>--header 'Authorization: Bearer [token]'</text:p>
          </table:table-cell>
        </table:table-row>
      </table:table>
      <text:p text:style-name="P35"><text:span text:style-name="Strong_20_Emphasis"><text:span text:style-name="T11"/></text:span></text:p>
      <text:p text:style-name="P35"><text:span text:style-name="Strong_20_Emphasis"><text:span text:style-name="T10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6">{</text:p>
            <text:p text:style-name="P36"><text:tab/>"statusCode" : 200,</text:p>
            <text:p text:style-name="P36"><text:tab/>"status" : "success",</text:p>
            <text:p text:style-name="P36"><text:tab/>"message" : "The record is <text:span text:style-name="T12">deleted</text:span> successfully.",</text:p>
            <text:p text:style-name="P36"><text:tab/>"errorCode" : 0,</text:p>
            <text:p text:style-name="P36"><text:tab/>"data" : <text:span text:style-name="T12">null</text:span></text:p>
            <text:p text:style-name="P36">}</text:p>
          </table:table-cell>
        </table:table-row>
      </table:table>
      <text:p text:style-name="P35"><text:span text:style-name="Strong_20_Emphasis"/></text:p>
      <text:h text:style-name="P34" text:outline-level="2"><text:bookmark-start text:name="__RefHeading___Toc2079_720390006 Copy 1 Copy 1"/><text:span text:style-name="Strong_20_Emphasis"><text:span text:style-name="T5">Active</text:span></text:span><text:bookmark-end text:name="__RefHeading___Toc2079_720390006 Copy 1 Copy 1"/></text:h>
      <text:p text:style-name="P35"><text:span text:style-name="Strong_20_Emphasis"><text:span text:style-name="T6">Description</text:span></text:span></text:p>
      <text:p text:style-name="P37"><text:span text:style-name="Strong_20_Emphasis"><text:span text:style-name="T7">This API actives a “</text:span></text:span><text:span text:style-name="Strong_20_Emphasis"><text:span text:style-name="T22">detail of </text:span></text:span><text:span text:style-name="Strong_20_Emphasis"><text:span text:style-name="T9">test scenario</text:span></text:span><text:span text:style-name="Strong_20_Emphasis"><text:span text:style-name="T7">” in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35"><text:span text:style-name="Strong_20_Emphasis"><text:span text:style-name="T10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6">curl --request PUT \</text:p>
            <text:p text:style-name="P36"><text:s text:c="2"/>--url 'https://[maindomian]/api/qualityControl/testResultDetail/active/[id]' \</text:p>
            <text:p text:style-name="P36"><text:s text:c="2"/>--header 'Authorization: Bearer [token]'</text:p>
          </table:table-cell>
        </table:table-row>
      </table:table>
      <text:p text:style-name="P35"><text:span text:style-name="Strong_20_Emphasis"><text:span text:style-name="T11"/></text:span></text:p>
      <text:p text:style-name="P35"><text:span text:style-name="Strong_20_Emphasis"><text:span text:style-name="T10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6">{</text:p>
            <text:p text:style-name="P36"><text:tab/>"statusCode" : 200,</text:p>
            <text:p text:style-name="P36"><text:tab/>"status" : "success",</text:p>
            <text:p text:style-name="P36"><text:tab/>"message" : "The record is <text:span text:style-name="T12">activated</text:span> successfully.",</text:p>
            <text:p text:style-name="P36"><text:tab/>"errorCode" : 0,</text:p>
            <text:p text:style-name="P36"><text:tab/>"data" : <text:span text:style-name="T12">null</text:span></text:p>
            <text:p text:style-name="P36">}</text:p>
          </table:table-cell>
        </table:table-row>
      </table:table>
      <text:p text:style-name="P35"><text:span text:style-name="Strong_20_Emphasis"/></text:p>
      <text:h text:style-name="P34" text:outline-level="2"><text:bookmark-start text:name="__RefHeading___Toc2083_720390006 Copy 1 Copy 1"/><text:span text:style-name="Strong_20_Emphasis"><text:span text:style-name="T5">Inactive</text:span></text:span><text:bookmark-end text:name="__RefHeading___Toc2083_720390006 Copy 1 Copy 1"/></text:h>
      <text:p text:style-name="P35"><text:span text:style-name="Strong_20_Emphasis"><text:span text:style-name="T6">Description</text:span></text:span></text:p>
      <text:p text:style-name="P37"><text:soft-page-break/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“</text:span></text:span><text:span text:style-name="Strong_20_Emphasis"><text:span text:style-name="T22">detail of </text:span></text:span><text:span text:style-name="Strong_20_Emphasis"><text:span text:style-name="T9">test scenario</text:span></text:span><text:span text:style-name="Strong_20_Emphasis"><text:span text:style-name="T7">” in the </text:span></text:span><text:span text:style-name="Strong_20_Emphasis"><text:span text:style-name="T14">quality control</text:span></text:span><text:span text:style-name="Strong_20_Emphasis"><text:span text:style-name="T7">.</text:span></text:span></text:p>
      <text:p text:style-name="P35"><text:span text:style-name="Strong_20_Emphasis"><text:span text:style-name="T10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6">curl --request PUT \</text:p>
            <text:p text:style-name="P36"><text:s text:c="2"/>--url 'https://[maindomian]/api/qualityControl/testResultDetail/inactive/[id]' \</text:p>
            <text:p text:style-name="P36"><text:s text:c="2"/>--header 'Authorization: Bearer [token]'</text:p>
          </table:table-cell>
        </table:table-row>
      </table:table>
      <text:p text:style-name="P35"><text:span text:style-name="Strong_20_Emphasis"><text:span text:style-name="T11"/></text:span></text:p>
      <text:p text:style-name="P35"><text:span text:style-name="Strong_20_Emphasis"><text:span text:style-name="T10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>{</text:p>
            <text:p text:style-name="P36"><text:tab/>"statusCode" : 200,</text:p>
            <text:p text:style-name="P36"><text:tab/>"status" : "success",</text:p>
            <text:p text:style-name="P36"><text:tab/>"message" : "The record is <text:span text:style-name="T15">in</text:span><text:span text:style-name="T12">activated</text:span> successfully.",</text:p>
            <text:p text:style-name="P36"><text:tab/>"errorCode" : 0,</text:p>
            <text:p text:style-name="P36"><text:tab/>"data" : <text:span text:style-name="T12">null</text:span></text:p>
            <text:p text:style-name="P36">}</text:p>
          </table:table-cell>
        </table:table-row>
      </table:table>
      <text:p text:style-name="P35"><text:span text:style-name="Strong_20_Emphasis"/></text:p>
      <text:h text:style-name="P34" text:outline-level="2"><text:bookmark-start text:name="__RefHeading___Toc2085_720390006 Copy 1 Copy 1"/><text:span text:style-name="Strong_20_Emphasis"><text:span text:style-name="T5">Fetch Specific Record</text:span></text:span><text:bookmark-end text:name="__RefHeading___Toc2085_720390006 Copy 1 Copy 1"/></text:h>
      <text:p text:style-name="P35"><text:span text:style-name="Strong_20_Emphasis"><text:span text:style-name="T6">Description</text:span></text:span></text:p>
      <text:p text:style-name="P3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3">detail of </text:span></text:span><text:span text:style-name="Strong_20_Emphasis"><text:span text:style-name="T9">test scenario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9">quality control</text:span></text:span><text:span text:style-name="Strong_20_Emphasis"><text:span text:style-name="T7">.</text:span></text:span></text:p>
      <text:p text:style-name="P35"><text:span text:style-name="Strong_20_Emphasis"><text:span text:style-name="T10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6">curl --request PUT \</text:p>
            <text:p text:style-name="P36"><text:s text:c="2"/>--url 'https://[maindomian]/api/qualityControl/testResultDetail/inactive/[id]' \</text:p>
            <text:p text:style-name="P36"><text:s text:c="2"/>--header 'Authorization: Bearer [token]'</text:p>
          </table:table-cell>
        </table:table-row>
      </table:table>
      <text:p text:style-name="P35"><text:span text:style-name="Strong_20_Emphasis"><text:span text:style-name="T11"/></text:span></text:p>
      <text:p text:style-name="P35"><text:span text:style-name="Strong_20_Emphasis"><text:span text:style-name="T10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6">{</text:p>
            <text:p text:style-name="P36"><text:tab/>"statusCode" : 200,</text:p>
            <text:p text:style-name="P36"><text:tab/>"status" : "success",</text:p>
            <text:p text:style-name="P36"><text:tab/>"message" : "The data is returned successfully.",</text:p>
            <text:p text:style-name="P36"><text:tab/>"errorCode" : 0,</text:p>
            <text:p text:style-name="P36"><text:soft-page-break/><text:tab/>"data" : {</text:p>
            <text:p text:style-name="P36"><text:tab/><text:tab/>"id" : 16621244611384550112, </text:p>
            <text:p text:style-name="P36"><text:tab/><text:tab/>"title" : "test",</text:p>
            <text:p text:style-name="P36"><text:tab/><text:tab/>"code" : "123",</text:p>
            <text:p text:style-name="P36"><text:tab/><text:tab/>"description" : "test",</text:p>
            <text:p text:style-name="P36"><text:tab/><text:tab/>"profileId": [{</text:p>
            <text:p text:style-name="P36"><text:tab/><text:tab/><text:tab/>"id" : 16621244611384550113,</text:p>
            <text:p text:style-name="P36"><text:tab/><text:tab/><text:tab/>"firstName": "David",</text:p>
            <text:p text:style-name="P36"><text:tab/><text:tab/><text:tab/>"lastName": "Talor"</text:p>
            <text:p text:style-name="P36"><text:tab/><text:tab/>}],</text:p>
            <text:p text:style-name="P36"><text:tab/><text:tab/>"roleFormPermissionId": [{</text:p>
            <text:p text:style-name="P36"><text:tab/><text:tab/><text:tab/>"id" : 16621244611384550114,</text:p>
            <text:p text:style-name="P36"><text:tab/><text:tab/><text:tab/>"formPermissionId": {</text:p>
            <text:p text:style-name="P36"><text:tab/><text:tab/><text:tab/><text:tab/>"id" : 16621244611384550114,</text:p>
            <text:p text:style-name="P36"><text:tab/><text:tab/><text:tab/><text:tab/>"formId": {</text:p>
            <text:p text:style-name="P36"><text:tab/><text:tab/><text:tab/><text:tab/><text:tab/>"id" : 16621244611384550115,</text:p>
            <text:p text:style-name="P36"><text:tab/><text:tab/><text:tab/><text:tab/><text:tab/>"title": "Project"</text:p>
            <text:p text:style-name="P36"><text:tab/><text:tab/><text:tab/><text:tab/>},</text:p>
            <text:p text:style-name="P36"><text:tab/><text:tab/><text:tab/><text:tab/>"permissionId": {</text:p>
            <text:p text:style-name="P36"><text:tab/><text:tab/><text:tab/><text:tab/><text:tab/>"id" : 16621244611384550116,</text:p>
            <text:p text:style-name="P36"><text:tab/><text:tab/><text:tab/><text:tab/><text:tab/>"title": "Add"</text:p>
            <text:p text:style-name="P36"><text:tab/><text:tab/><text:tab/><text:tab/>}</text:p>
            <text:p text:style-name="P36"><text:tab/><text:tab/><text:tab/>}</text:p>
            <text:p text:style-name="P36"><text:tab/><text:tab/>}],</text:p>
            <text:p text:style-name="P36"><text:tab/><text:tab/>"createdAt" : "2025-8-25 12:00:00",</text:p>
            <text:p text:style-name="P36"><text:tab/><text:tab/>"createdBy" : "John Davis" </text:p>
            <text:p text:style-name="P36"><text:tab/>}</text:p>
            <text:p text:style-name="P36">}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Quality Control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24</text:page-number><text:s/>of <text:page-count>24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6-04T01:03:54.038980100</dc:date>
    <meta:editing-duration>P25DT10H10M42S</meta:editing-duration>
    <meta:editing-cycles>1182</meta:editing-cycles>
    <meta:generator>LibreOffice/25.2.7.2$Windows_X86_64 LibreOffice_project/5cbfd1ab6520636bb5f7b99185aa69bd7456825d</meta:generator>
    <dc:subject>API Specification for Quality Control</dc:subject>
    <dc:title>Horizon Research Project</dc:title>
    <meta:document-statistic meta:table-count="59" meta:image-count="1" meta:object-count="0" meta:page-count="24" meta:paragraph-count="724" meta:word-count="2389" meta:character-count="17240" meta:non-whitespace-character-count="14874"/>
  </office:meta>
</office:document-meta>
</file>