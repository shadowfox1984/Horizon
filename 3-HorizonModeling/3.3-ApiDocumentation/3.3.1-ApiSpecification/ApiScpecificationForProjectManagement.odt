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600000226C86F0DD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scadia Code Light" svg:font-family="'Cascadia Code Light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81" style:family="table">
      <style:table-properties style:width="6.925in" table:align="margins"/>
    </style:style>
    <style:style style:name="Table81.A" style:family="table-column">
      <style:table-column-properties style:column-width="0.409in" style:rel-column-width="3870*"/>
    </style:style>
    <style:style style:name="Table81.B" style:family="table-column">
      <style:table-column-properties style:column-width="1.7563in" style:rel-column-width="16620*"/>
    </style:style>
    <style:style style:name="Table81.C" style:family="table-column">
      <style:table-column-properties style:column-width="4.7597in" style:rel-column-width="45045*"/>
    </style:style>
    <style:style style:name="Table81.1" style:family="table-row">
      <style:table-row-properties style:min-row-height="0.2903in"/>
    </style:style>
    <style:style style:name="Table81.A1" style:family="table-cell">
      <style:table-cell-properties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81.C1" style:family="table-cell">
      <style:table-cell-properties fo:background-color="#b4c7dc" fo:padding="0.0382in" fo:border="0.5pt solid #000000">
        <style:background-image/>
      </style:table-cell-properties>
    </style:style>
    <style:style style:name="Table81.A2" style:family="table-cell">
      <style:table-cell-properties fo:padding="0.0382in" fo:border-left="0.5pt solid #000000" fo:border-right="none" fo:border-top="none" fo:border-bottom="0.5pt solid #000000"/>
    </style:style>
    <style:style style:name="Table81.B2" style:family="table-cell">
      <style:table-cell-properties fo:padding="0.0382in" fo:border-left="0.5pt solid #000000" fo:border-right="none" fo:border-top="none" fo:border-bottom="0.5pt solid #000000"/>
    </style:style>
    <style:style style:name="Table8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81.3" style:family="table-row">
      <style:table-row-properties style:min-row-height="0.2528in"/>
    </style:style>
    <style:style style:name="Table81.A3" style:family="table-cell">
      <style:table-cell-properties fo:padding="0.0382in" fo:border-left="0.5pt solid #000000" fo:border-right="none" fo:border-top="none" fo:border-bottom="0.5pt solid #000000"/>
    </style:style>
    <style:style style:name="Table81.B3" style:family="table-cell">
      <style:table-cell-properties fo:padding="0.0382in" fo:border-left="0.5pt solid #000000" fo:border-right="none" fo:border-top="none" fo:border-bottom="0.5pt solid #000000"/>
    </style:style>
    <style:style style:name="Table81.C3" style:family="table-cell">
      <style:table-cell-properties fo:padding="0.0382in" fo:border-left="0.5pt solid #000000" fo:border-right="0.5pt solid #000000" fo:border-top="none" fo:border-bottom="0.5pt solid #000000"/>
    </style:style>
    <style:style style:name="Table82" style:family="table">
      <style:table-properties style:width="6.925in" table:align="margins"/>
    </style:style>
    <style:style style:name="Table82.A" style:family="table-column">
      <style:table-column-properties style:column-width="0.4389in" style:rel-column-width="4153*"/>
    </style:style>
    <style:style style:name="Table82.B" style:family="table-column">
      <style:table-column-properties style:column-width="3.4972in" style:rel-column-width="33096*"/>
    </style:style>
    <style:style style:name="Table82.C" style:family="table-column">
      <style:table-column-properties style:column-width="2.9889in" style:rel-column-width="28286*"/>
    </style:style>
    <style:style style:name="Table82.A1" style:family="table-cell">
      <style:table-cell-properties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82.C1" style:family="table-cell">
      <style:table-cell-properties fo:background-color="#b4c7dc" fo:padding="0.0382in" fo:border="0.5pt solid #000000">
        <style:background-image/>
      </style:table-cell-properties>
    </style:style>
    <style:style style:name="Table82.A2" style:family="table-cell">
      <style:table-cell-properties fo:padding="0.0382in" fo:border-left="0.5pt solid #000000" fo:border-right="none" fo:border-top="none" fo:border-bottom="0.5pt solid #000000"/>
    </style:style>
    <style:style style:name="Table82.B2" style:family="table-cell">
      <style:table-cell-properties fo:padding="0.0382in" fo:border-left="0.5pt solid #000000" fo:border-right="none" fo:border-top="none" fo:border-bottom="0.5pt solid #000000"/>
    </style:style>
    <style:style style:name="Table8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3" style:family="table-cell">
      <style:table-cell-properties fo:padding="0.0382in" fo:border-left="0.5pt solid #000000" fo:border-right="none" fo:border-top="none" fo:border-bottom="0.5pt solid #000000"/>
    </style:style>
    <style:style style:name="Table82.B3" style:family="table-cell">
      <style:table-cell-properties fo:padding="0.0382in" fo:border-left="0.5pt solid #000000" fo:border-right="none" fo:border-top="none" fo:border-bottom="0.5pt solid #000000"/>
    </style:style>
    <style:style style:name="Table82.C3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4" style:family="table-cell">
      <style:table-cell-properties fo:padding="0.0382in" fo:border-left="0.5pt solid #000000" fo:border-right="none" fo:border-top="none" fo:border-bottom="0.5pt solid #000000"/>
    </style:style>
    <style:style style:name="Table82.B4" style:family="table-cell">
      <style:table-cell-properties fo:padding="0.0382in" fo:border-left="0.5pt solid #000000" fo:border-right="none" fo:border-top="none" fo:border-bottom="0.5pt solid #000000"/>
    </style:style>
    <style:style style:name="Table82.C4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5" style:family="table-cell">
      <style:table-cell-properties fo:padding="0.0382in" fo:border-left="0.5pt solid #000000" fo:border-right="none" fo:border-top="none" fo:border-bottom="0.5pt solid #000000"/>
    </style:style>
    <style:style style:name="Table82.B5" style:family="table-cell">
      <style:table-cell-properties fo:padding="0.0382in" fo:border-left="0.5pt solid #000000" fo:border-right="none" fo:border-top="none" fo:border-bottom="0.5pt solid #000000"/>
    </style:style>
    <style:style style:name="Table82.C5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6" style:family="table-cell">
      <style:table-cell-properties fo:padding="0.0382in" fo:border-left="0.5pt solid #000000" fo:border-right="none" fo:border-top="none" fo:border-bottom="0.5pt solid #000000"/>
    </style:style>
    <style:style style:name="Table82.B6" style:family="table-cell">
      <style:table-cell-properties fo:padding="0.0382in" fo:border-left="0.5pt solid #000000" fo:border-right="none" fo:border-top="none" fo:border-bottom="0.5pt solid #000000"/>
    </style:style>
    <style:style style:name="Table82.C6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7" style:family="table-cell">
      <style:table-cell-properties fo:padding="0.0382in" fo:border-left="0.5pt solid #000000" fo:border-right="none" fo:border-top="none" fo:border-bottom="0.5pt solid #000000"/>
    </style:style>
    <style:style style:name="Table82.B7" style:family="table-cell">
      <style:table-cell-properties fo:padding="0.0382in" fo:border-left="0.5pt solid #000000" fo:border-right="none" fo:border-top="none" fo:border-bottom="0.5pt solid #000000"/>
    </style:style>
    <style:style style:name="Table82.C7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8" style:family="table-cell">
      <style:table-cell-properties fo:padding="0.0382in" fo:border-left="0.5pt solid #000000" fo:border-right="none" fo:border-top="none" fo:border-bottom="0.5pt solid #000000"/>
    </style:style>
    <style:style style:name="Table82.B8" style:family="table-cell">
      <style:table-cell-properties fo:padding="0.0382in" fo:border-left="0.5pt solid #000000" fo:border-right="none" fo:border-top="none" fo:border-bottom="0.5pt solid #000000"/>
    </style:style>
    <style:style style:name="Table82.C8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9" style:family="table-cell">
      <style:table-cell-properties fo:padding="0.0382in" fo:border-left="0.5pt solid #000000" fo:border-right="none" fo:border-top="none" fo:border-bottom="0.5pt solid #000000"/>
    </style:style>
    <style:style style:name="Table82.B9" style:family="table-cell">
      <style:table-cell-properties fo:padding="0.0382in" fo:border-left="0.5pt solid #000000" fo:border-right="none" fo:border-top="none" fo:border-bottom="0.5pt solid #000000"/>
    </style:style>
    <style:style style:name="Table82.C9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10" style:family="table-cell">
      <style:table-cell-properties fo:padding="0.0382in" fo:border-left="0.5pt solid #000000" fo:border-right="none" fo:border-top="none" fo:border-bottom="0.5pt solid #000000"/>
    </style:style>
    <style:style style:name="Table82.B10" style:family="table-cell">
      <style:table-cell-properties fo:padding="0.0382in" fo:border-left="0.5pt solid #000000" fo:border-right="none" fo:border-top="none" fo:border-bottom="0.5pt solid #000000"/>
    </style:style>
    <style:style style:name="Table82.C10" style:family="table-cell">
      <style:table-cell-properties fo:padding="0.0382in" fo:border-left="0.5pt solid #000000" fo:border-right="0.5pt solid #000000" fo:border-top="none" fo:border-bottom="0.5pt solid #000000"/>
    </style:style>
    <style:style style:name="Table83" style:family="table">
      <style:table-properties style:width="6.925in" table:align="margins"/>
    </style:style>
    <style:style style:name="Table83.A" style:family="table-column">
      <style:table-column-properties style:column-width="0.409in" style:rel-column-width="3870*"/>
    </style:style>
    <style:style style:name="Table83.B" style:family="table-column">
      <style:table-column-properties style:column-width="1.3396in" style:rel-column-width="12677*"/>
    </style:style>
    <style:style style:name="Table83.C" style:family="table-column">
      <style:table-column-properties style:column-width="1.3542in" style:rel-column-width="12815*"/>
    </style:style>
    <style:style style:name="Table83.D" style:family="table-column">
      <style:table-column-properties style:column-width="3.8222in" style:rel-column-width="36173*"/>
    </style:style>
    <style:style style:name="Table83.A1" style:family="table-cell">
      <style:table-cell-properties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83.D1" style:family="table-cell">
      <style:table-cell-properties fo:background-color="#b4c7dc" fo:padding="0.0382in" fo:border="0.5pt solid #000000">
        <style:background-image/>
      </style:table-cell-properties>
    </style:style>
    <style:style style:name="Table83.A2" style:family="table-cell">
      <style:table-cell-properties fo:padding="0.0382in" fo:border-left="0.5pt solid #000000" fo:border-right="none" fo:border-top="none" fo:border-bottom="0.5pt solid #000000"/>
    </style:style>
    <style:style style:name="Table83.B2" style:family="table-cell">
      <style:table-cell-properties fo:padding="0.0382in" fo:border-left="0.5pt solid #000000" fo:border-right="none" fo:border-top="none" fo:border-bottom="0.5pt solid #000000"/>
    </style:style>
    <style:style style:name="Table83.C2" style:family="table-cell">
      <style:table-cell-properties fo:padding="0.0382in" fo:border-left="0.5pt solid #000000" fo:border-right="none" fo:border-top="none" fo:border-bottom="0.5pt solid #000000"/>
    </style:style>
    <style:style style:name="Table83.D2" style:family="table-cell">
      <style:table-cell-properties fo:padding="0.0382in" fo:border-left="0.5pt solid #000000" fo:border-right="0.5pt solid #000000" fo:border-top="none" fo:border-bottom="0.5pt solid #000000"/>
    </style:style>
    <style:style style:name="Table83.A3" style:family="table-cell">
      <style:table-cell-properties fo:padding="0.0382in" fo:border-left="0.5pt solid #000000" fo:border-right="none" fo:border-top="none" fo:border-bottom="0.5pt solid #000000"/>
    </style:style>
    <style:style style:name="Table83.B3" style:family="table-cell">
      <style:table-cell-properties fo:padding="0.0382in" fo:border-left="0.5pt solid #000000" fo:border-right="none" fo:border-top="none" fo:border-bottom="0.5pt solid #000000"/>
    </style:style>
    <style:style style:name="Table83.C3" style:family="table-cell">
      <style:table-cell-properties fo:padding="0.0382in" fo:border-left="0.5pt solid #000000" fo:border-right="none" fo:border-top="none" fo:border-bottom="0.5pt solid #000000"/>
    </style:style>
    <style:style style:name="Table83.D3" style:family="table-cell">
      <style:table-cell-properties fo:padding="0.0382in" fo:border-left="0.5pt solid #000000" fo:border-right="0.5pt solid #000000" fo:border-top="none" fo:border-bottom="0.5pt solid #000000"/>
    </style:style>
    <style:style style:name="Table83.A4" style:family="table-cell">
      <style:table-cell-properties fo:padding="0.0382in" fo:border-left="0.5pt solid #000000" fo:border-right="none" fo:border-top="none" fo:border-bottom="0.5pt solid #000000"/>
    </style:style>
    <style:style style:name="Table83.B4" style:family="table-cell">
      <style:table-cell-properties fo:padding="0.0382in" fo:border-left="0.5pt solid #000000" fo:border-right="none" fo:border-top="none" fo:border-bottom="0.5pt solid #000000"/>
    </style:style>
    <style:style style:name="Table83.C4" style:family="table-cell">
      <style:table-cell-properties fo:padding="0.0382in" fo:border-left="0.5pt solid #000000" fo:border-right="none" fo:border-top="none" fo:border-bottom="0.5pt solid #000000"/>
    </style:style>
    <style:style style:name="Table83.D4" style:family="table-cell">
      <style:table-cell-properties fo:padding="0.0382in" fo:border-left="0.5pt solid #000000" fo:border-right="0.5pt solid #000000" fo:border-top="none" fo:border-bottom="0.5pt solid #000000"/>
    </style:style>
    <style:style style:name="Table83.A5" style:family="table-cell">
      <style:table-cell-properties fo:padding="0.0382in" fo:border-left="0.5pt solid #000000" fo:border-right="none" fo:border-top="none" fo:border-bottom="0.5pt solid #000000"/>
    </style:style>
    <style:style style:name="Table83.B5" style:family="table-cell">
      <style:table-cell-properties fo:padding="0.0382in" fo:border-left="0.5pt solid #000000" fo:border-right="none" fo:border-top="none" fo:border-bottom="0.5pt solid #000000"/>
    </style:style>
    <style:style style:name="Table83.C5" style:family="table-cell">
      <style:table-cell-properties fo:padding="0.0382in" fo:border-left="0.5pt solid #000000" fo:border-right="none" fo:border-top="none" fo:border-bottom="0.5pt solid #000000"/>
    </style:style>
    <style:style style:name="Table83.D5" style:family="table-cell">
      <style:table-cell-properties fo:padding="0.0382in" fo:border-left="0.5pt solid #000000" fo:border-right="0.5pt solid #000000" fo:border-top="none" fo:border-bottom="0.5pt solid #000000"/>
    </style:style>
    <style:style style:name="Table83.A6" style:family="table-cell">
      <style:table-cell-properties fo:padding="0.0382in" fo:border-left="0.5pt solid #000000" fo:border-right="none" fo:border-top="none" fo:border-bottom="0.5pt solid #000000"/>
    </style:style>
    <style:style style:name="Table83.B6" style:family="table-cell">
      <style:table-cell-properties fo:padding="0.0382in" fo:border-left="0.5pt solid #000000" fo:border-right="none" fo:border-top="none" fo:border-bottom="0.5pt solid #000000"/>
    </style:style>
    <style:style style:name="Table83.C6" style:family="table-cell">
      <style:table-cell-properties fo:padding="0.0382in" fo:border-left="0.5pt solid #000000" fo:border-right="none" fo:border-top="none" fo:border-bottom="0.5pt solid #000000"/>
    </style:style>
    <style:style style:name="Table83.D6" style:family="table-cell">
      <style:table-cell-properties fo:padding="0.0382in" fo:border-left="0.5pt solid #000000" fo:border-right="0.5pt solid #000000" fo:border-top="none" fo:border-bottom="0.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6.925in" style:rel-column-width="65535*"/>
    </style:style>
    <style:style style:name="Table21.A1" style:family="table-cell">
      <style:table-cell-properties fo:padding="0.0382in" fo:border="0.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6.925in" style:rel-column-width="65535*"/>
    </style:style>
    <style:style style:name="Table22.A1" style:family="table-cell">
      <style:table-cell-properties fo:padding="0.0382in" fo:border="0.5pt solid #000000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6.925in" style:rel-column-width="65535*"/>
    </style:style>
    <style:style style:name="Table23.A1" style:family="table-cell">
      <style:table-cell-properties fo:padding="0.0382in" fo:border="0.5pt solid #000000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6.925in" style:rel-column-width="65535*"/>
    </style:style>
    <style:style style:name="Table24.A1" style:family="table-cell">
      <style:table-cell-properties fo:padding="0.0382in" fo:border="0.5pt solid #000000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6.925in" style:rel-column-width="65535*"/>
    </style:style>
    <style:style style:name="Table25.A1" style:family="table-cell">
      <style:table-cell-properties fo:padding="0.0382in" fo:border="0.5pt solid #000000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6.925in" style:rel-column-width="65535*"/>
    </style:style>
    <style:style style:name="Table26.A1" style:family="table-cell">
      <style:table-cell-properties fo:padding="0.0382in" fo:border="0.5pt solid #000000"/>
    </style:style>
    <style:style style:name="Table27" style:family="table">
      <style:table-properties style:width="6.925in" table:align="margins"/>
    </style:style>
    <style:style style:name="Table27.A" style:family="table-column">
      <style:table-column-properties style:column-width="6.925in" style:rel-column-width="65535*"/>
    </style:style>
    <style:style style:name="Table27.A1" style:family="table-cell">
      <style:table-cell-properties fo:padding="0.0382in" fo:border="0.5pt solid #000000"/>
    </style:style>
    <style:style style:name="Table28" style:family="table">
      <style:table-properties style:width="6.925in" table:align="margins"/>
    </style:style>
    <style:style style:name="Table28.A" style:family="table-column">
      <style:table-column-properties style:column-width="6.925in" style:rel-column-width="65535*"/>
    </style:style>
    <style:style style:name="Table28.A1" style:family="table-cell">
      <style:table-cell-properties fo:padding="0.0382in" fo:border="0.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0.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padding="0.0382in" fo:border="0.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382in" fo:border="0.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6.925in" style:rel-column-width="65535*"/>
    </style:style>
    <style:style style:name="Table12.A1" style:family="table-cell">
      <style:table-cell-properties fo:padding="0.0382in" fo:border="0.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6.925in" style:rel-column-width="65535*"/>
    </style:style>
    <style:style style:name="Table13.A1" style:family="table-cell">
      <style:table-cell-properties fo:padding="0.0382in" fo:border="0.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6.925in" style:rel-column-width="65535*"/>
    </style:style>
    <style:style style:name="Table14.A1" style:family="table-cell">
      <style:table-cell-properties fo:padding="0.0382in" fo:border="0.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6.925in" style:rel-column-width="65535*"/>
    </style:style>
    <style:style style:name="Table15.A1" style:family="table-cell">
      <style:table-cell-properties fo:padding="0.0382in" fo:border="0.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6.925in" style:rel-column-width="65535*"/>
    </style:style>
    <style:style style:name="Table16.A1" style:family="table-cell">
      <style:table-cell-properties fo:padding="0.0382in" fo:border="0.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6.925in" style:rel-column-width="65535*"/>
    </style:style>
    <style:style style:name="Table17.A1" style:family="table-cell">
      <style:table-cell-properties fo:padding="0.0382in" fo:border="0.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6.925in" style:rel-column-width="65535*"/>
    </style:style>
    <style:style style:name="Table18.A1" style:family="table-cell">
      <style:table-cell-properties fo:padding="0.0382in" fo:border="0.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6.925in" style:rel-column-width="65535*"/>
    </style:style>
    <style:style style:name="Table19.A1" style:family="table-cell">
      <style:table-cell-properties fo:padding="0.0382in" fo:border="0.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6.925in" style:rel-column-width="65535*"/>
    </style:style>
    <style:style style:name="Table20.A1" style:family="table-cell">
      <style:table-cell-properties fo:padding="0.0382in" fo:border="0.5pt solid #000000"/>
    </style:style>
    <style:style style:name="Table29" style:family="table">
      <style:table-properties style:width="6.925in" table:align="margins"/>
    </style:style>
    <style:style style:name="Table29.A" style:family="table-column">
      <style:table-column-properties style:column-width="6.925in" style:rel-column-width="65535*"/>
    </style:style>
    <style:style style:name="Table29.A1" style:family="table-cell">
      <style:table-cell-properties fo:padding="0.0382in" fo:border="0.5pt solid #000000"/>
    </style:style>
    <style:style style:name="Table30" style:family="table">
      <style:table-properties style:width="6.925in" table:align="margins"/>
    </style:style>
    <style:style style:name="Table30.A" style:family="table-column">
      <style:table-column-properties style:column-width="6.925in" style:rel-column-width="65535*"/>
    </style:style>
    <style:style style:name="Table30.A1" style:family="table-cell">
      <style:table-cell-properties fo:padding="0.0382in" fo:border="0.5pt solid #000000"/>
    </style:style>
    <style:style style:name="Table31" style:family="table">
      <style:table-properties style:width="6.925in" table:align="margins"/>
    </style:style>
    <style:style style:name="Table31.A" style:family="table-column">
      <style:table-column-properties style:column-width="6.925in" style:rel-column-width="65535*"/>
    </style:style>
    <style:style style:name="Table31.A1" style:family="table-cell">
      <style:table-cell-properties fo:padding="0.0382in" fo:border="0.5pt solid #000000"/>
    </style:style>
    <style:style style:name="Table32" style:family="table">
      <style:table-properties style:width="6.925in" table:align="margins"/>
    </style:style>
    <style:style style:name="Table32.A" style:family="table-column">
      <style:table-column-properties style:column-width="6.925in" style:rel-column-width="65535*"/>
    </style:style>
    <style:style style:name="Table32.A1" style:family="table-cell">
      <style:table-cell-properties fo:padding="0.0382in" fo:border="0.5pt solid #000000"/>
    </style:style>
    <style:style style:name="Table33" style:family="table">
      <style:table-properties style:width="6.925in" table:align="margins"/>
    </style:style>
    <style:style style:name="Table33.A" style:family="table-column">
      <style:table-column-properties style:column-width="6.925in" style:rel-column-width="65535*"/>
    </style:style>
    <style:style style:name="Table33.A1" style:family="table-cell">
      <style:table-cell-properties fo:padding="0.0382in" fo:border="0.5pt solid #000000"/>
    </style:style>
    <style:style style:name="Table34" style:family="table">
      <style:table-properties style:width="6.925in" table:align="margins"/>
    </style:style>
    <style:style style:name="Table34.A" style:family="table-column">
      <style:table-column-properties style:column-width="6.925in" style:rel-column-width="65535*"/>
    </style:style>
    <style:style style:name="Table34.A1" style:family="table-cell">
      <style:table-cell-properties fo:padding="0.0382in" fo:border="0.5pt solid #000000"/>
    </style:style>
    <style:style style:name="Table35" style:family="table">
      <style:table-properties style:width="6.925in" table:align="margins"/>
    </style:style>
    <style:style style:name="Table35.A" style:family="table-column">
      <style:table-column-properties style:column-width="6.925in" style:rel-column-width="65535*"/>
    </style:style>
    <style:style style:name="Table35.A1" style:family="table-cell">
      <style:table-cell-properties fo:padding="0.0382in" fo:border="0.5pt solid #000000"/>
    </style:style>
    <style:style style:name="Table36" style:family="table">
      <style:table-properties style:width="6.925in" table:align="margins"/>
    </style:style>
    <style:style style:name="Table36.A" style:family="table-column">
      <style:table-column-properties style:column-width="6.925in" style:rel-column-width="65535*"/>
    </style:style>
    <style:style style:name="Table36.A1" style:family="table-cell">
      <style:table-cell-properties fo:padding="0.0382in" fo:border="0.5pt solid #000000"/>
    </style:style>
    <style:style style:name="Table37" style:family="table">
      <style:table-properties style:width="6.925in" table:align="margins"/>
    </style:style>
    <style:style style:name="Table37.A" style:family="table-column">
      <style:table-column-properties style:column-width="6.925in" style:rel-column-width="65535*"/>
    </style:style>
    <style:style style:name="Table37.A1" style:family="table-cell">
      <style:table-cell-properties fo:padding="0.0382in" fo:border="0.5pt solid #000000"/>
    </style:style>
    <style:style style:name="Table38" style:family="table">
      <style:table-properties style:width="6.925in" table:align="margins"/>
    </style:style>
    <style:style style:name="Table38.A" style:family="table-column">
      <style:table-column-properties style:column-width="6.925in" style:rel-column-width="65535*"/>
    </style:style>
    <style:style style:name="Table38.A1" style:family="table-cell">
      <style:table-cell-properties fo:padding="0.0382in" fo:border="0.5pt solid #000000"/>
    </style:style>
    <style:style style:name="Table39" style:family="table">
      <style:table-properties style:width="6.925in" table:align="margins"/>
    </style:style>
    <style:style style:name="Table39.A" style:family="table-column">
      <style:table-column-properties style:column-width="6.925in" style:rel-column-width="65535*"/>
    </style:style>
    <style:style style:name="Table39.A1" style:family="table-cell">
      <style:table-cell-properties fo:padding="0.0382in" fo:border="0.5pt solid #000000"/>
    </style:style>
    <style:style style:name="Table40" style:family="table">
      <style:table-properties style:width="6.925in" table:align="margins"/>
    </style:style>
    <style:style style:name="Table40.A" style:family="table-column">
      <style:table-column-properties style:column-width="6.925in" style:rel-column-width="65535*"/>
    </style:style>
    <style:style style:name="Table40.A1" style:family="table-cell">
      <style:table-cell-properties fo:padding="0.0382in" fo:border="0.5pt solid #000000"/>
    </style:style>
    <style:style style:name="Table41" style:family="table">
      <style:table-properties style:width="6.925in" table:align="margins"/>
    </style:style>
    <style:style style:name="Table41.A" style:family="table-column">
      <style:table-column-properties style:column-width="6.925in" style:rel-column-width="65535*"/>
    </style:style>
    <style:style style:name="Table41.A1" style:family="table-cell">
      <style:table-cell-properties fo:padding="0.0382in" fo:border="0.5pt solid #000000"/>
    </style:style>
    <style:style style:name="Table42" style:family="table">
      <style:table-properties style:width="6.925in" table:align="margins"/>
    </style:style>
    <style:style style:name="Table42.A" style:family="table-column">
      <style:table-column-properties style:column-width="6.925in" style:rel-column-width="65535*"/>
    </style:style>
    <style:style style:name="Table42.A1" style:family="table-cell">
      <style:table-cell-properties fo:padding="0.0382in" fo:border="0.5pt solid #000000"/>
    </style:style>
    <style:style style:name="Table43" style:family="table">
      <style:table-properties style:width="6.925in" table:align="margins"/>
    </style:style>
    <style:style style:name="Table43.A" style:family="table-column">
      <style:table-column-properties style:column-width="6.925in" style:rel-column-width="65535*"/>
    </style:style>
    <style:style style:name="Table43.A1" style:family="table-cell">
      <style:table-cell-properties fo:padding="0.0382in" fo:border="0.5pt solid #000000"/>
    </style:style>
    <style:style style:name="Table44" style:family="table">
      <style:table-properties style:width="6.925in" table:align="margins"/>
    </style:style>
    <style:style style:name="Table44.A" style:family="table-column">
      <style:table-column-properties style:column-width="6.925in" style:rel-column-width="65535*"/>
    </style:style>
    <style:style style:name="Table44.A1" style:family="table-cell">
      <style:table-cell-properties fo:padding="0.0382in" fo:border="0.5pt solid #000000"/>
    </style:style>
    <style:style style:name="Table45" style:family="table">
      <style:table-properties style:width="6.925in" table:align="margins"/>
    </style:style>
    <style:style style:name="Table45.A" style:family="table-column">
      <style:table-column-properties style:column-width="6.925in" style:rel-column-width="65535*"/>
    </style:style>
    <style:style style:name="Table45.A1" style:family="table-cell">
      <style:table-cell-properties fo:padding="0.0382in" fo:border="0.5pt solid #000000"/>
    </style:style>
    <style:style style:name="Table46" style:family="table">
      <style:table-properties style:width="6.925in" table:align="margins"/>
    </style:style>
    <style:style style:name="Table46.A" style:family="table-column">
      <style:table-column-properties style:column-width="6.925in" style:rel-column-width="65535*"/>
    </style:style>
    <style:style style:name="Table46.A1" style:family="table-cell">
      <style:table-cell-properties fo:padding="0.0382in" fo:border="0.5pt solid #000000"/>
    </style:style>
    <style:style style:name="Table47" style:family="table">
      <style:table-properties style:width="6.925in" table:align="margins"/>
    </style:style>
    <style:style style:name="Table47.A" style:family="table-column">
      <style:table-column-properties style:column-width="6.925in" style:rel-column-width="65535*"/>
    </style:style>
    <style:style style:name="Table47.A1" style:family="table-cell">
      <style:table-cell-properties fo:padding="0.0382in" fo:border="0.5pt solid #000000"/>
    </style:style>
    <style:style style:name="Table48" style:family="table">
      <style:table-properties style:width="6.925in" table:align="margins"/>
    </style:style>
    <style:style style:name="Table48.A" style:family="table-column">
      <style:table-column-properties style:column-width="6.925in" style:rel-column-width="65535*"/>
    </style:style>
    <style:style style:name="Table48.A1" style:family="table-cell">
      <style:table-cell-properties fo:padding="0.0382in" fo:border="0.5pt solid #000000"/>
    </style:style>
    <style:style style:name="Table49" style:family="table">
      <style:table-properties style:width="6.925in" table:align="margins"/>
    </style:style>
    <style:style style:name="Table49.A" style:family="table-column">
      <style:table-column-properties style:column-width="6.925in" style:rel-column-width="65535*"/>
    </style:style>
    <style:style style:name="Table49.A1" style:family="table-cell">
      <style:table-cell-properties fo:padding="0.0382in" fo:border="0.5pt solid #000000"/>
    </style:style>
    <style:style style:name="Table50" style:family="table">
      <style:table-properties style:width="6.925in" table:align="margins"/>
    </style:style>
    <style:style style:name="Table50.A" style:family="table-column">
      <style:table-column-properties style:column-width="6.925in" style:rel-column-width="65535*"/>
    </style:style>
    <style:style style:name="Table50.A1" style:family="table-cell">
      <style:table-cell-properties fo:padding="0.0382in" fo:border="0.5pt solid #000000"/>
    </style:style>
    <style:style style:name="Table51" style:family="table">
      <style:table-properties style:width="6.925in" table:align="margins"/>
    </style:style>
    <style:style style:name="Table51.A" style:family="table-column">
      <style:table-column-properties style:column-width="6.925in" style:rel-column-width="65535*"/>
    </style:style>
    <style:style style:name="Table51.A1" style:family="table-cell">
      <style:table-cell-properties fo:padding="0.0382in" fo:border="0.5pt solid #000000"/>
    </style:style>
    <style:style style:name="Table52" style:family="table">
      <style:table-properties style:width="6.925in" table:align="margins"/>
    </style:style>
    <style:style style:name="Table52.A" style:family="table-column">
      <style:table-column-properties style:column-width="6.925in" style:rel-column-width="65535*"/>
    </style:style>
    <style:style style:name="Table52.A1" style:family="table-cell">
      <style:table-cell-properties fo:padding="0.0382in" fo:border="0.5pt solid #000000"/>
    </style:style>
    <style:style style:name="Table53" style:family="table">
      <style:table-properties style:width="6.925in" table:align="margins"/>
    </style:style>
    <style:style style:name="Table53.A" style:family="table-column">
      <style:table-column-properties style:column-width="6.925in" style:rel-column-width="65535*"/>
    </style:style>
    <style:style style:name="Table53.A1" style:family="table-cell">
      <style:table-cell-properties fo:padding="0.0382in" fo:border="0.5pt solid #000000"/>
    </style:style>
    <style:style style:name="Table54" style:family="table">
      <style:table-properties style:width="6.925in" table:align="margins"/>
    </style:style>
    <style:style style:name="Table54.A" style:family="table-column">
      <style:table-column-properties style:column-width="6.925in" style:rel-column-width="65535*"/>
    </style:style>
    <style:style style:name="Table54.A1" style:family="table-cell">
      <style:table-cell-properties fo:padding="0.0382in" fo:border="0.5pt solid #000000"/>
    </style:style>
    <style:style style:name="Table55" style:family="table">
      <style:table-properties style:width="6.925in" table:align="margins"/>
    </style:style>
    <style:style style:name="Table55.A" style:family="table-column">
      <style:table-column-properties style:column-width="6.925in" style:rel-column-width="65535*"/>
    </style:style>
    <style:style style:name="Table55.A1" style:family="table-cell">
      <style:table-cell-properties fo:padding="0.0382in" fo:border="0.5pt solid #000000"/>
    </style:style>
    <style:style style:name="Table56" style:family="table">
      <style:table-properties style:width="6.925in" table:align="margins"/>
    </style:style>
    <style:style style:name="Table56.A" style:family="table-column">
      <style:table-column-properties style:column-width="6.925in" style:rel-column-width="65535*"/>
    </style:style>
    <style:style style:name="Table56.A1" style:family="table-cell">
      <style:table-cell-properties fo:padding="0.0382in" fo:border="0.5pt solid #000000"/>
    </style:style>
    <style:style style:name="Table57" style:family="table">
      <style:table-properties style:width="6.925in" table:align="margins"/>
    </style:style>
    <style:style style:name="Table57.A" style:family="table-column">
      <style:table-column-properties style:column-width="6.925in" style:rel-column-width="65535*"/>
    </style:style>
    <style:style style:name="Table57.A1" style:family="table-cell">
      <style:table-cell-properties fo:padding="0.0382in" fo:border="0.5pt solid #000000"/>
    </style:style>
    <style:style style:name="Table58" style:family="table">
      <style:table-properties style:width="6.925in" table:align="margins"/>
    </style:style>
    <style:style style:name="Table58.A" style:family="table-column">
      <style:table-column-properties style:column-width="6.925in" style:rel-column-width="65535*"/>
    </style:style>
    <style:style style:name="Table58.A1" style:family="table-cell">
      <style:table-cell-properties fo:padding="0.0382in" fo:border="0.5pt solid #000000"/>
    </style:style>
    <style:style style:name="Table59" style:family="table">
      <style:table-properties style:width="6.925in" table:align="margins"/>
    </style:style>
    <style:style style:name="Table59.A" style:family="table-column">
      <style:table-column-properties style:column-width="6.925in" style:rel-column-width="65535*"/>
    </style:style>
    <style:style style:name="Table59.A1" style:family="table-cell">
      <style:table-cell-properties fo:padding="0.0382in" fo:border="0.5pt solid #000000"/>
    </style:style>
    <style:style style:name="Table60" style:family="table">
      <style:table-properties style:width="6.925in" table:align="margins"/>
    </style:style>
    <style:style style:name="Table60.A" style:family="table-column">
      <style:table-column-properties style:column-width="6.925in" style:rel-column-width="65535*"/>
    </style:style>
    <style:style style:name="Table60.A1" style:family="table-cell">
      <style:table-cell-properties fo:padding="0.0382in" fo:border="0.5pt solid #000000"/>
    </style:style>
    <style:style style:name="Table61" style:family="table">
      <style:table-properties style:width="6.925in" table:align="margins"/>
    </style:style>
    <style:style style:name="Table61.A" style:family="table-column">
      <style:table-column-properties style:column-width="6.925in" style:rel-column-width="65535*"/>
    </style:style>
    <style:style style:name="Table61.A1" style:family="table-cell">
      <style:table-cell-properties fo:padding="0.0382in" fo:border="0.5pt solid #000000"/>
    </style:style>
    <style:style style:name="Table62" style:family="table">
      <style:table-properties style:width="6.925in" table:align="margins"/>
    </style:style>
    <style:style style:name="Table62.A" style:family="table-column">
      <style:table-column-properties style:column-width="6.925in" style:rel-column-width="65535*"/>
    </style:style>
    <style:style style:name="Table62.A1" style:family="table-cell">
      <style:table-cell-properties fo:padding="0.0382in" fo:border="0.5pt solid #000000"/>
    </style:style>
    <style:style style:name="Table63" style:family="table">
      <style:table-properties style:width="6.925in" table:align="margins"/>
    </style:style>
    <style:style style:name="Table63.A" style:family="table-column">
      <style:table-column-properties style:column-width="6.925in" style:rel-column-width="65535*"/>
    </style:style>
    <style:style style:name="Table63.A1" style:family="table-cell">
      <style:table-cell-properties fo:padding="0.0382in" fo:border="0.5pt solid #000000"/>
    </style:style>
    <style:style style:name="Table64" style:family="table">
      <style:table-properties style:width="6.925in" table:align="margins"/>
    </style:style>
    <style:style style:name="Table64.A" style:family="table-column">
      <style:table-column-properties style:column-width="6.925in" style:rel-column-width="65535*"/>
    </style:style>
    <style:style style:name="Table64.A1" style:family="table-cell">
      <style:table-cell-properties fo:padding="0.0382in" fo:border="0.5pt solid #000000"/>
    </style:style>
    <style:style style:name="Table65" style:family="table">
      <style:table-properties style:width="6.925in" table:align="margins"/>
    </style:style>
    <style:style style:name="Table65.A" style:family="table-column">
      <style:table-column-properties style:column-width="6.925in" style:rel-column-width="65535*"/>
    </style:style>
    <style:style style:name="Table65.A1" style:family="table-cell">
      <style:table-cell-properties fo:padding="0.0382in" fo:border="0.5pt solid #000000"/>
    </style:style>
    <style:style style:name="Table66" style:family="table">
      <style:table-properties style:width="6.925in" table:align="margins"/>
    </style:style>
    <style:style style:name="Table66.A" style:family="table-column">
      <style:table-column-properties style:column-width="6.925in" style:rel-column-width="65535*"/>
    </style:style>
    <style:style style:name="Table66.A1" style:family="table-cell">
      <style:table-cell-properties fo:padding="0.0382in" fo:border="0.5pt solid #000000"/>
    </style:style>
    <style:style style:name="Table67" style:family="table">
      <style:table-properties style:width="6.925in" table:align="margins"/>
    </style:style>
    <style:style style:name="Table67.A" style:family="table-column">
      <style:table-column-properties style:column-width="6.925in" style:rel-column-width="65535*"/>
    </style:style>
    <style:style style:name="Table67.A1" style:family="table-cell">
      <style:table-cell-properties fo:padding="0.0382in" fo:border="0.5pt solid #000000"/>
    </style:style>
    <style:style style:name="Table68" style:family="table">
      <style:table-properties style:width="6.925in" table:align="margins"/>
    </style:style>
    <style:style style:name="Table68.A" style:family="table-column">
      <style:table-column-properties style:column-width="6.925in" style:rel-column-width="65535*"/>
    </style:style>
    <style:style style:name="Table68.A1" style:family="table-cell">
      <style:table-cell-properties fo:padding="0.0382in" fo:border="0.5pt solid #000000"/>
    </style:style>
    <style:style style:name="Table69" style:family="table">
      <style:table-properties style:width="6.925in" table:align="margins"/>
    </style:style>
    <style:style style:name="Table69.A" style:family="table-column">
      <style:table-column-properties style:column-width="6.925in" style:rel-column-width="65535*"/>
    </style:style>
    <style:style style:name="Table69.A1" style:family="table-cell">
      <style:table-cell-properties fo:padding="0.0382in" fo:border="0.5pt solid #000000"/>
    </style:style>
    <style:style style:name="Table70" style:family="table">
      <style:table-properties style:width="6.925in" table:align="margins"/>
    </style:style>
    <style:style style:name="Table70.A" style:family="table-column">
      <style:table-column-properties style:column-width="6.925in" style:rel-column-width="65535*"/>
    </style:style>
    <style:style style:name="Table70.A1" style:family="table-cell">
      <style:table-cell-properties fo:padding="0.0382in" fo:border="0.5pt solid #000000"/>
    </style:style>
    <style:style style:name="Table71" style:family="table">
      <style:table-properties style:width="6.925in" table:align="margins"/>
    </style:style>
    <style:style style:name="Table71.A" style:family="table-column">
      <style:table-column-properties style:column-width="6.925in" style:rel-column-width="65535*"/>
    </style:style>
    <style:style style:name="Table71.A1" style:family="table-cell">
      <style:table-cell-properties fo:padding="0.0382in" fo:border="0.5pt solid #000000"/>
    </style:style>
    <style:style style:name="Table72" style:family="table">
      <style:table-properties style:width="6.925in" table:align="margins"/>
    </style:style>
    <style:style style:name="Table72.A" style:family="table-column">
      <style:table-column-properties style:column-width="6.925in" style:rel-column-width="65535*"/>
    </style:style>
    <style:style style:name="Table72.A1" style:family="table-cell">
      <style:table-cell-properties fo:padding="0.0382in" fo:border="0.5pt solid #000000"/>
    </style:style>
    <style:style style:name="Table73" style:family="table">
      <style:table-properties style:width="6.925in" table:align="margins"/>
    </style:style>
    <style:style style:name="Table73.A" style:family="table-column">
      <style:table-column-properties style:column-width="6.925in" style:rel-column-width="65535*"/>
    </style:style>
    <style:style style:name="Table73.A1" style:family="table-cell">
      <style:table-cell-properties fo:padding="0.0382in" fo:border="0.5pt solid #000000"/>
    </style:style>
    <style:style style:name="Table74" style:family="table">
      <style:table-properties style:width="6.925in" table:align="margins"/>
    </style:style>
    <style:style style:name="Table74.A" style:family="table-column">
      <style:table-column-properties style:column-width="6.925in" style:rel-column-width="65535*"/>
    </style:style>
    <style:style style:name="Table74.A1" style:family="table-cell">
      <style:table-cell-properties fo:padding="0.0382in" fo:border="0.5pt solid #000000"/>
    </style:style>
    <style:style style:name="Table75" style:family="table">
      <style:table-properties style:width="6.925in" table:align="margins"/>
    </style:style>
    <style:style style:name="Table75.A" style:family="table-column">
      <style:table-column-properties style:column-width="6.925in" style:rel-column-width="65535*"/>
    </style:style>
    <style:style style:name="Table75.A1" style:family="table-cell">
      <style:table-cell-properties fo:padding="0.0382in" fo:border="0.5pt solid #000000"/>
    </style:style>
    <style:style style:name="Table76" style:family="table">
      <style:table-properties style:width="6.925in" table:align="margins"/>
    </style:style>
    <style:style style:name="Table76.A" style:family="table-column">
      <style:table-column-properties style:column-width="6.925in" style:rel-column-width="65535*"/>
    </style:style>
    <style:style style:name="Table76.A1" style:family="table-cell">
      <style:table-cell-properties fo:padding="0.0382in" fo:border="0.5pt solid #000000"/>
    </style:style>
    <style:style style:name="Table77" style:family="table">
      <style:table-properties style:width="6.925in" table:align="margins"/>
    </style:style>
    <style:style style:name="Table77.A" style:family="table-column">
      <style:table-column-properties style:column-width="6.925in" style:rel-column-width="65535*"/>
    </style:style>
    <style:style style:name="Table77.A1" style:family="table-cell">
      <style:table-cell-properties fo:padding="0.0382in" fo:border="0.5pt solid #000000"/>
    </style:style>
    <style:style style:name="Table78" style:family="table">
      <style:table-properties style:width="6.925in" table:align="margins"/>
    </style:style>
    <style:style style:name="Table78.A" style:family="table-column">
      <style:table-column-properties style:column-width="6.925in" style:rel-column-width="65535*"/>
    </style:style>
    <style:style style:name="Table78.A1" style:family="table-cell">
      <style:table-cell-properties fo:padding="0.0382in" fo:border="0.5pt solid #000000"/>
    </style:style>
    <style:style style:name="Table79" style:family="table">
      <style:table-properties style:width="6.925in" table:align="margins"/>
    </style:style>
    <style:style style:name="Table79.A" style:family="table-column">
      <style:table-column-properties style:column-width="6.925in" style:rel-column-width="65535*"/>
    </style:style>
    <style:style style:name="Table79.A1" style:family="table-cell">
      <style:table-cell-properties fo:padding="0.0382in" fo:border="0.5pt solid #000000"/>
    </style:style>
    <style:style style:name="Table80" style:family="table">
      <style:table-properties style:width="6.925in" table:align="margins"/>
    </style:style>
    <style:style style:name="Table80.A" style:family="table-column">
      <style:table-column-properties style:column-width="6.925in" style:rel-column-width="65535*"/>
    </style:style>
    <style:style style:name="Table80.A1" style:family="table-cell">
      <style:table-cell-properties fo:padding="0.0382in" fo:border="0.5pt solid #000000"/>
    </style:style>
    <style:style style:name="Table84" style:family="table">
      <style:table-properties style:width="6.925in" table:align="margins"/>
    </style:style>
    <style:style style:name="Table84.A" style:family="table-column">
      <style:table-column-properties style:column-width="6.925in" style:rel-column-width="65535*"/>
    </style:style>
    <style:style style:name="Table84.A1" style:family="table-cell">
      <style:table-cell-properties fo:padding="0.0382in" fo:border="0.5pt solid #000000"/>
    </style:style>
    <style:style style:name="Table85" style:family="table">
      <style:table-properties style:width="6.925in" table:align="margins"/>
    </style:style>
    <style:style style:name="Table85.A" style:family="table-column">
      <style:table-column-properties style:column-width="6.925in" style:rel-column-width="65535*"/>
    </style:style>
    <style:style style:name="Table85.A1" style:family="table-cell">
      <style:table-cell-properties fo:padding="0.0382in" fo:border="0.5pt solid #000000"/>
    </style:style>
    <style:style style:name="Table86" style:family="table">
      <style:table-properties style:width="6.925in" table:align="margins"/>
    </style:style>
    <style:style style:name="Table86.A" style:family="table-column">
      <style:table-column-properties style:column-width="6.925in" style:rel-column-width="65535*"/>
    </style:style>
    <style:style style:name="Table86.A1" style:family="table-cell">
      <style:table-cell-properties fo:padding="0.0382in" fo:border="0.5pt solid #000000"/>
    </style:style>
    <style:style style:name="Table87" style:family="table">
      <style:table-properties style:width="6.925in" table:align="margins"/>
    </style:style>
    <style:style style:name="Table87.A" style:family="table-column">
      <style:table-column-properties style:column-width="6.925in" style:rel-column-width="65535*"/>
    </style:style>
    <style:style style:name="Table87.A1" style:family="table-cell">
      <style:table-cell-properties fo:padding="0.0382in" fo:border="0.5pt solid #000000"/>
    </style:style>
    <style:style style:name="Table88" style:family="table">
      <style:table-properties style:width="6.925in" table:align="margins"/>
    </style:style>
    <style:style style:name="Table88.A" style:family="table-column">
      <style:table-column-properties style:column-width="6.925in" style:rel-column-width="65535*"/>
    </style:style>
    <style:style style:name="Table88.A1" style:family="table-cell">
      <style:table-cell-properties fo:padding="0.0382in" fo:border="0.5pt solid #000000"/>
    </style:style>
    <style:style style:name="Table89" style:family="table">
      <style:table-properties style:width="6.925in" table:align="margins"/>
    </style:style>
    <style:style style:name="Table89.A" style:family="table-column">
      <style:table-column-properties style:column-width="6.925in" style:rel-column-width="65535*"/>
    </style:style>
    <style:style style:name="Table89.A1" style:family="table-cell">
      <style:table-cell-properties fo:padding="0.0382in" fo:border="0.5pt solid #000000"/>
    </style:style>
    <style:style style:name="Table90" style:family="table">
      <style:table-properties style:width="6.925in" table:align="margins"/>
    </style:style>
    <style:style style:name="Table90.A" style:family="table-column">
      <style:table-column-properties style:column-width="6.925in" style:rel-column-width="65535*"/>
    </style:style>
    <style:style style:name="Table90.A1" style:family="table-cell">
      <style:table-cell-properties fo:padding="0.0382in" fo:border="0.5pt solid #000000"/>
    </style:style>
    <style:style style:name="Table91" style:family="table">
      <style:table-properties style:width="6.925in" table:align="margins"/>
    </style:style>
    <style:style style:name="Table91.A" style:family="table-column">
      <style:table-column-properties style:column-width="6.925in" style:rel-column-width="65535*"/>
    </style:style>
    <style:style style:name="Table91.A1" style:family="table-cell">
      <style:table-cell-properties fo:padding="0.0382in" fo:border="0.5pt solid #000000"/>
    </style:style>
    <style:style style:name="Table92" style:family="table">
      <style:table-properties style:width="6.925in" table:align="margins"/>
    </style:style>
    <style:style style:name="Table92.A" style:family="table-column">
      <style:table-column-properties style:column-width="6.925in" style:rel-column-width="65535*"/>
    </style:style>
    <style:style style:name="Table92.A1" style:family="table-cell">
      <style:table-cell-properties fo:padding="0.0382in" fo:border="0.5pt solid #000000"/>
    </style:style>
    <style:style style:name="Table93" style:family="table">
      <style:table-properties style:width="6.925in" table:align="margins"/>
    </style:style>
    <style:style style:name="Table93.A" style:family="table-column">
      <style:table-column-properties style:column-width="6.925in" style:rel-column-width="65535*"/>
    </style:style>
    <style:style style:name="Table93.A1" style:family="table-cell">
      <style:table-cell-properties fo:padding="0.0382in" fo:border="0.5pt solid #000000"/>
    </style:style>
    <style:style style:name="Table94" style:family="table">
      <style:table-properties style:width="6.925in" table:align="margins"/>
    </style:style>
    <style:style style:name="Table94.A" style:family="table-column">
      <style:table-column-properties style:column-width="6.925in" style:rel-column-width="65535*"/>
    </style:style>
    <style:style style:name="Table94.A1" style:family="table-cell">
      <style:table-cell-properties fo:padding="0.0382in" fo:border="0.5pt solid #000000"/>
    </style:style>
    <style:style style:name="Table95" style:family="table">
      <style:table-properties style:width="6.925in" table:align="margins"/>
    </style:style>
    <style:style style:name="Table95.A" style:family="table-column">
      <style:table-column-properties style:column-width="6.925in" style:rel-column-width="65535*"/>
    </style:style>
    <style:style style:name="Table95.A1" style:family="table-cell">
      <style:table-cell-properties fo:padding="0.0382in" fo:border="0.5pt solid #000000"/>
    </style:style>
    <style:style style:name="Table96" style:family="table">
      <style:table-properties style:width="6.925in" table:align="margins"/>
    </style:style>
    <style:style style:name="Table96.A" style:family="table-column">
      <style:table-column-properties style:column-width="6.925in" style:rel-column-width="65535*"/>
    </style:style>
    <style:style style:name="Table96.A1" style:family="table-cell">
      <style:table-cell-properties fo:padding="0.0382in" fo:border="0.5pt solid #000000"/>
    </style:style>
    <style:style style:name="Table97" style:family="table">
      <style:table-properties style:width="6.925in" table:align="margins"/>
    </style:style>
    <style:style style:name="Table97.A" style:family="table-column">
      <style:table-column-properties style:column-width="6.925in" style:rel-column-width="65535*"/>
    </style:style>
    <style:style style:name="Table97.A1" style:family="table-cell">
      <style:table-cell-properties fo:padding="0.0382in" fo:border="0.5pt solid #000000"/>
    </style:style>
    <style:style style:name="Table98" style:family="table">
      <style:table-properties style:width="6.925in" table:align="margins"/>
    </style:style>
    <style:style style:name="Table98.A" style:family="table-column">
      <style:table-column-properties style:column-width="6.925in" style:rel-column-width="65535*"/>
    </style:style>
    <style:style style:name="Table98.A1" style:family="table-cell">
      <style:table-cell-properties fo:padding="0.0382in" fo:border="0.5pt solid #000000"/>
    </style:style>
    <style:style style:name="Table99" style:family="table">
      <style:table-properties style:width="6.925in" table:align="margins"/>
    </style:style>
    <style:style style:name="Table99.A" style:family="table-column">
      <style:table-column-properties style:column-width="6.925in" style:rel-column-width="65535*"/>
    </style:style>
    <style:style style:name="Table99.A1" style:family="table-cell">
      <style:table-cell-properties fo:padding="0.0382in" fo:border="0.5pt solid #000000"/>
    </style:style>
    <style:style style:name="Table100" style:family="table">
      <style:table-properties style:width="6.925in" table:align="margins"/>
    </style:style>
    <style:style style:name="Table100.A" style:family="table-column">
      <style:table-column-properties style:column-width="6.925in" style:rel-column-width="65535*"/>
    </style:style>
    <style:style style:name="Table100.A1" style:family="table-cell">
      <style:table-cell-properties fo:padding="0.0382in" fo:border="0.5pt solid #000000"/>
    </style:style>
    <style:style style:name="Table101" style:family="table">
      <style:table-properties style:width="6.925in" table:align="margins"/>
    </style:style>
    <style:style style:name="Table101.A" style:family="table-column">
      <style:table-column-properties style:column-width="6.925in" style:rel-column-width="65535*"/>
    </style:style>
    <style:style style:name="Table101.A1" style:family="table-cell">
      <style:table-cell-properties fo:padding="0.0382in" fo:border="0.5pt solid #000000"/>
    </style:style>
    <style:style style:name="Table102" style:family="table">
      <style:table-properties style:width="6.925in" table:align="margins"/>
    </style:style>
    <style:style style:name="Table102.A" style:family="table-column">
      <style:table-column-properties style:column-width="6.925in" style:rel-column-width="65535*"/>
    </style:style>
    <style:style style:name="Table102.A1" style:family="table-cell">
      <style:table-cell-properties fo:padding="0.0382in" fo:border="0.5pt solid #000000"/>
    </style:style>
    <style:style style:name="Table103" style:family="table">
      <style:table-properties style:width="6.925in" table:align="margins"/>
    </style:style>
    <style:style style:name="Table103.A" style:family="table-column">
      <style:table-column-properties style:column-width="6.925in" style:rel-column-width="65535*"/>
    </style:style>
    <style:style style:name="Table103.A1" style:family="table-cell">
      <style:table-cell-properties fo:padding="0.0382in" fo:border="0.5pt solid #000000"/>
    </style:style>
    <style:style style:name="Table104" style:family="table">
      <style:table-properties style:width="6.925in" table:align="margins"/>
    </style:style>
    <style:style style:name="Table104.A" style:family="table-column">
      <style:table-column-properties style:column-width="6.925in" style:rel-column-width="65535*"/>
    </style:style>
    <style:style style:name="Table104.A1" style:family="table-cell">
      <style:table-cell-properties fo:padding="0.0382in" fo:border="0.5pt solid #000000"/>
    </style:style>
    <style:style style:name="Table105" style:family="table">
      <style:table-properties style:width="6.925in" table:align="margins"/>
    </style:style>
    <style:style style:name="Table105.A" style:family="table-column">
      <style:table-column-properties style:column-width="6.925in" style:rel-column-width="65535*"/>
    </style:style>
    <style:style style:name="Table105.A1" style:family="table-cell">
      <style:table-cell-properties fo:padding="0.0382in" fo:border="0.5pt solid #000000"/>
    </style:style>
    <style:style style:name="Table106" style:family="table">
      <style:table-properties style:width="6.925in" table:align="margins"/>
    </style:style>
    <style:style style:name="Table106.A" style:family="table-column">
      <style:table-column-properties style:column-width="6.925in" style:rel-column-width="65535*"/>
    </style:style>
    <style:style style:name="Table106.A1" style:family="table-cell">
      <style:table-cell-properties fo:padding="0.0382in" fo:border="0.5pt solid #000000"/>
    </style:style>
    <style:style style:name="Table107" style:family="table">
      <style:table-properties style:width="6.925in" table:align="margins"/>
    </style:style>
    <style:style style:name="Table107.A" style:family="table-column">
      <style:table-column-properties style:column-width="6.925in" style:rel-column-width="65535*"/>
    </style:style>
    <style:style style:name="Table107.A1" style:family="table-cell">
      <style:table-cell-properties fo:padding="0.0382in" fo:border="0.5pt solid #000000"/>
    </style:style>
    <style:style style:name="Table116" style:family="table">
      <style:table-properties style:width="6.925in" table:align="margins"/>
    </style:style>
    <style:style style:name="Table116.A" style:family="table-column">
      <style:table-column-properties style:column-width="6.925in" style:rel-column-width="65535*"/>
    </style:style>
    <style:style style:name="Table116.A1" style:family="table-cell">
      <style:table-cell-properties fo:padding="0.0382in" fo:border="0.5pt solid #000000"/>
    </style:style>
    <style:style style:name="Table117" style:family="table">
      <style:table-properties style:width="6.925in" table:align="margins"/>
    </style:style>
    <style:style style:name="Table117.A" style:family="table-column">
      <style:table-column-properties style:column-width="6.925in" style:rel-column-width="65535*"/>
    </style:style>
    <style:style style:name="Table117.A1" style:family="table-cell">
      <style:table-cell-properties fo:padding="0.0382in" fo:border="0.5pt solid #000000"/>
    </style:style>
    <style:style style:name="Table118" style:family="table">
      <style:table-properties style:width="6.925in" table:align="margins"/>
    </style:style>
    <style:style style:name="Table118.A" style:family="table-column">
      <style:table-column-properties style:column-width="6.925in" style:rel-column-width="65535*"/>
    </style:style>
    <style:style style:name="Table118.A1" style:family="table-cell">
      <style:table-cell-properties fo:padding="0.0382in" fo:border="0.5pt solid #000000"/>
    </style:style>
    <style:style style:name="Table119" style:family="table">
      <style:table-properties style:width="6.925in" table:align="margins"/>
    </style:style>
    <style:style style:name="Table119.A" style:family="table-column">
      <style:table-column-properties style:column-width="6.925in" style:rel-column-width="65535*"/>
    </style:style>
    <style:style style:name="Table119.A1" style:family="table-cell">
      <style:table-cell-properties fo:padding="0.0382in" fo:border="0.5pt solid #000000"/>
    </style:style>
    <style:style style:name="Table120" style:family="table">
      <style:table-properties style:width="6.925in" table:align="margins"/>
    </style:style>
    <style:style style:name="Table120.A" style:family="table-column">
      <style:table-column-properties style:column-width="6.925in" style:rel-column-width="65535*"/>
    </style:style>
    <style:style style:name="Table120.A1" style:family="table-cell">
      <style:table-cell-properties fo:padding="0.0382in" fo:border="0.5pt solid #000000"/>
    </style:style>
    <style:style style:name="Table121" style:family="table">
      <style:table-properties style:width="6.925in" table:align="margins"/>
    </style:style>
    <style:style style:name="Table121.A" style:family="table-column">
      <style:table-column-properties style:column-width="6.925in" style:rel-column-width="65535*"/>
    </style:style>
    <style:style style:name="Table121.A1" style:family="table-cell">
      <style:table-cell-properties fo:padding="0.0382in" fo:border="0.5pt solid #000000"/>
    </style:style>
    <style:style style:name="Table122" style:family="table">
      <style:table-properties style:width="6.925in" table:align="margins"/>
    </style:style>
    <style:style style:name="Table122.A" style:family="table-column">
      <style:table-column-properties style:column-width="6.925in" style:rel-column-width="65535*"/>
    </style:style>
    <style:style style:name="Table122.A1" style:family="table-cell">
      <style:table-cell-properties fo:padding="0.0382in" fo:border="0.5pt solid #000000"/>
    </style:style>
    <style:style style:name="Table123" style:family="table">
      <style:table-properties style:width="6.925in" table:align="margins"/>
    </style:style>
    <style:style style:name="Table123.A" style:family="table-column">
      <style:table-column-properties style:column-width="6.925in" style:rel-column-width="65535*"/>
    </style:style>
    <style:style style:name="Table123.A1" style:family="table-cell">
      <style:table-cell-properties fo:padding="0.0382in" fo:border="0.5pt solid #000000"/>
    </style:style>
    <style:style style:name="Table124" style:family="table">
      <style:table-properties style:width="6.925in" table:align="margins"/>
    </style:style>
    <style:style style:name="Table124.A" style:family="table-column">
      <style:table-column-properties style:column-width="6.925in" style:rel-column-width="65535*"/>
    </style:style>
    <style:style style:name="Table124.A1" style:family="table-cell">
      <style:table-cell-properties fo:padding="0.0382in" fo:border="0.5pt solid #000000"/>
    </style:style>
    <style:style style:name="Table125" style:family="table">
      <style:table-properties style:width="6.925in" table:align="margins"/>
    </style:style>
    <style:style style:name="Table125.A" style:family="table-column">
      <style:table-column-properties style:column-width="6.925in" style:rel-column-width="65535*"/>
    </style:style>
    <style:style style:name="Table125.A1" style:family="table-cell">
      <style:table-cell-properties fo:padding="0.0382in" fo:border="0.5pt solid #000000"/>
    </style:style>
    <style:style style:name="Table126" style:family="table">
      <style:table-properties style:width="6.925in" table:align="margins"/>
    </style:style>
    <style:style style:name="Table126.A" style:family="table-column">
      <style:table-column-properties style:column-width="6.925in" style:rel-column-width="65535*"/>
    </style:style>
    <style:style style:name="Table126.A1" style:family="table-cell">
      <style:table-cell-properties fo:padding="0.0382in" fo:border="0.5pt solid #000000"/>
    </style:style>
    <style:style style:name="Table127" style:family="table">
      <style:table-properties style:width="6.925in" table:align="margins"/>
    </style:style>
    <style:style style:name="Table127.A" style:family="table-column">
      <style:table-column-properties style:column-width="6.925in" style:rel-column-width="65535*"/>
    </style:style>
    <style:style style:name="Table127.A1" style:family="table-cell">
      <style:table-cell-properties fo:padding="0.0382in" fo:border="0.5pt solid #000000"/>
    </style:style>
    <style:style style:name="Table128" style:family="table">
      <style:table-properties style:width="6.925in" table:align="margins"/>
    </style:style>
    <style:style style:name="Table128.A" style:family="table-column">
      <style:table-column-properties style:column-width="6.925in" style:rel-column-width="65535*"/>
    </style:style>
    <style:style style:name="Table128.A1" style:family="table-cell">
      <style:table-cell-properties fo:padding="0.0382in" fo:border="0.5pt solid #000000"/>
    </style:style>
    <style:style style:name="Table129" style:family="table">
      <style:table-properties style:width="6.925in" table:align="margins"/>
    </style:style>
    <style:style style:name="Table129.A" style:family="table-column">
      <style:table-column-properties style:column-width="6.925in" style:rel-column-width="65535*"/>
    </style:style>
    <style:style style:name="Table129.A1" style:family="table-cell">
      <style:table-cell-properties fo:padding="0.0382in" fo:border="0.5pt solid #000000"/>
    </style:style>
    <style:style style:name="Table130" style:family="table">
      <style:table-properties style:width="6.925in" table:align="margins"/>
    </style:style>
    <style:style style:name="Table130.A" style:family="table-column">
      <style:table-column-properties style:column-width="6.925in" style:rel-column-width="65535*"/>
    </style:style>
    <style:style style:name="Table130.A1" style:family="table-cell">
      <style:table-cell-properties fo:padding="0.0382in" fo:border="0.5pt solid #000000"/>
    </style:style>
    <style:style style:name="Table131" style:family="table">
      <style:table-properties style:width="6.925in" table:align="margins"/>
    </style:style>
    <style:style style:name="Table131.A" style:family="table-column">
      <style:table-column-properties style:column-width="6.925in" style:rel-column-width="65535*"/>
    </style:style>
    <style:style style:name="Table131.A1" style:family="table-cell">
      <style:table-cell-properties fo:padding="0.0382in" fo:border="0.5pt solid #000000"/>
    </style:style>
    <style:style style:name="Table132" style:family="table">
      <style:table-properties style:width="6.925in" table:align="margins"/>
    </style:style>
    <style:style style:name="Table132.A" style:family="table-column">
      <style:table-column-properties style:column-width="6.925in" style:rel-column-width="65535*"/>
    </style:style>
    <style:style style:name="Table132.A1" style:family="table-cell">
      <style:table-cell-properties fo:padding="0.0382in" fo:border="0.5pt solid #000000"/>
    </style:style>
    <style:style style:name="Table133" style:family="table">
      <style:table-properties style:width="6.925in" table:align="margins"/>
    </style:style>
    <style:style style:name="Table133.A" style:family="table-column">
      <style:table-column-properties style:column-width="6.925in" style:rel-column-width="65535*"/>
    </style:style>
    <style:style style:name="Table133.A1" style:family="table-cell">
      <style:table-cell-properties fo:padding="0.0382in" fo:border="0.5pt solid #000000"/>
    </style:style>
    <style:style style:name="Table138" style:family="table">
      <style:table-properties style:width="6.925in" table:align="margins"/>
    </style:style>
    <style:style style:name="Table138.A" style:family="table-column">
      <style:table-column-properties style:column-width="6.925in" style:rel-column-width="65535*"/>
    </style:style>
    <style:style style:name="Table138.A1" style:family="table-cell">
      <style:table-cell-properties fo:padding="0.0382in" fo:border="0.5pt solid #000000"/>
    </style:style>
    <style:style style:name="Table139" style:family="table">
      <style:table-properties style:width="6.925in" table:align="margins"/>
    </style:style>
    <style:style style:name="Table139.A" style:family="table-column">
      <style:table-column-properties style:column-width="6.925in" style:rel-column-width="65535*"/>
    </style:style>
    <style:style style:name="Table139.A1" style:family="table-cell">
      <style:table-cell-properties fo:padding="0.0382in" fo:border="0.5pt solid #000000"/>
    </style:style>
    <style:style style:name="Table140" style:family="table">
      <style:table-properties style:width="6.925in" table:align="margins"/>
    </style:style>
    <style:style style:name="Table140.A" style:family="table-column">
      <style:table-column-properties style:column-width="6.925in" style:rel-column-width="65535*"/>
    </style:style>
    <style:style style:name="Table140.A1" style:family="table-cell">
      <style:table-cell-properties fo:padding="0.0382in" fo:border="0.5pt solid #000000"/>
    </style:style>
    <style:style style:name="Table141" style:family="table">
      <style:table-properties style:width="6.925in" table:align="margins"/>
    </style:style>
    <style:style style:name="Table141.A" style:family="table-column">
      <style:table-column-properties style:column-width="6.925in" style:rel-column-width="65535*"/>
    </style:style>
    <style:style style:name="Table141.A1" style:family="table-cell">
      <style:table-cell-properties fo:padding="0.0382in" fo:border="0.5pt solid #000000"/>
    </style:style>
    <style:style style:name="Table142" style:family="table">
      <style:table-properties style:width="6.925in" table:align="margins"/>
    </style:style>
    <style:style style:name="Table142.A" style:family="table-column">
      <style:table-column-properties style:column-width="6.925in" style:rel-column-width="65535*"/>
    </style:style>
    <style:style style:name="Table142.A1" style:family="table-cell">
      <style:table-cell-properties fo:padding="0.0382in" fo:border="0.5pt solid #000000"/>
    </style:style>
    <style:style style:name="Table143" style:family="table">
      <style:table-properties style:width="6.925in" table:align="margins"/>
    </style:style>
    <style:style style:name="Table143.A" style:family="table-column">
      <style:table-column-properties style:column-width="6.925in" style:rel-column-width="65535*"/>
    </style:style>
    <style:style style:name="Table143.A1" style:family="table-cell">
      <style:table-cell-properties fo:padding="0.0382in" fo:border="0.5pt solid #000000"/>
    </style:style>
    <style:style style:name="Table144" style:family="table">
      <style:table-properties style:width="6.925in" table:align="margins"/>
    </style:style>
    <style:style style:name="Table144.A" style:family="table-column">
      <style:table-column-properties style:column-width="6.925in" style:rel-column-width="65535*"/>
    </style:style>
    <style:style style:name="Table144.A1" style:family="table-cell">
      <style:table-cell-properties fo:padding="0.0382in" fo:border="0.5pt solid #000000"/>
    </style:style>
    <style:style style:name="Table145" style:family="table">
      <style:table-properties style:width="6.925in" table:align="margins"/>
    </style:style>
    <style:style style:name="Table145.A" style:family="table-column">
      <style:table-column-properties style:column-width="6.925in" style:rel-column-width="65535*"/>
    </style:style>
    <style:style style:name="Table145.A1" style:family="table-cell">
      <style:table-cell-properties fo:padding="0.0382in" fo:border="0.5pt solid #000000"/>
    </style:style>
    <style:style style:name="Table146" style:family="table">
      <style:table-properties style:width="6.925in" table:align="margins"/>
    </style:style>
    <style:style style:name="Table146.A" style:family="table-column">
      <style:table-column-properties style:column-width="6.925in" style:rel-column-width="65535*"/>
    </style:style>
    <style:style style:name="Table146.A1" style:family="table-cell">
      <style:table-cell-properties fo:padding="0.0382in" fo:border="0.5pt solid #000000"/>
    </style:style>
    <style:style style:name="Table147" style:family="table">
      <style:table-properties style:width="6.925in" table:align="margins"/>
    </style:style>
    <style:style style:name="Table147.A" style:family="table-column">
      <style:table-column-properties style:column-width="6.925in" style:rel-column-width="65535*"/>
    </style:style>
    <style:style style:name="Table147.A1" style:family="table-cell">
      <style:table-cell-properties fo:padding="0.0382in" fo:border="0.5pt solid #000000"/>
    </style:style>
    <style:style style:name="Table148" style:family="table">
      <style:table-properties style:width="6.925in" table:align="margins"/>
    </style:style>
    <style:style style:name="Table148.A" style:family="table-column">
      <style:table-column-properties style:column-width="6.925in" style:rel-column-width="65535*"/>
    </style:style>
    <style:style style:name="Table148.A1" style:family="table-cell">
      <style:table-cell-properties fo:padding="0.0382in" fo:border="0.5pt solid #000000"/>
    </style:style>
    <style:style style:name="Table149" style:family="table">
      <style:table-properties style:width="6.925in" table:align="margins"/>
    </style:style>
    <style:style style:name="Table149.A" style:family="table-column">
      <style:table-column-properties style:column-width="6.925in" style:rel-column-width="65535*"/>
    </style:style>
    <style:style style:name="Table149.A1" style:family="table-cell">
      <style:table-cell-properties fo:padding="0.0382in" fo:border="0.5pt solid #000000"/>
    </style:style>
    <style:style style:name="Table150" style:family="table">
      <style:table-properties style:width="6.925in" table:align="margins"/>
    </style:style>
    <style:style style:name="Table150.A" style:family="table-column">
      <style:table-column-properties style:column-width="6.925in" style:rel-column-width="65535*"/>
    </style:style>
    <style:style style:name="Table150.A1" style:family="table-cell">
      <style:table-cell-properties fo:padding="0.0382in" fo:border="0.5pt solid #000000"/>
    </style:style>
    <style:style style:name="Table151" style:family="table">
      <style:table-properties style:width="6.925in" table:align="margins"/>
    </style:style>
    <style:style style:name="Table151.A" style:family="table-column">
      <style:table-column-properties style:column-width="6.925in" style:rel-column-width="65535*"/>
    </style:style>
    <style:style style:name="Table151.A1" style:family="table-cell">
      <style:table-cell-properties fo:padding="0.0382in" fo:border="0.5pt solid #000000"/>
    </style:style>
    <style:style style:name="Table152" style:family="table">
      <style:table-properties style:width="6.925in" table:align="margins"/>
    </style:style>
    <style:style style:name="Table152.A" style:family="table-column">
      <style:table-column-properties style:column-width="6.925in" style:rel-column-width="65535*"/>
    </style:style>
    <style:style style:name="Table152.A1" style:family="table-cell">
      <style:table-cell-properties fo:padding="0.0382in" fo:border="0.5pt solid #000000"/>
    </style:style>
    <style:style style:name="Table153" style:family="table">
      <style:table-properties style:width="6.925in" table:align="margins"/>
    </style:style>
    <style:style style:name="Table153.A" style:family="table-column">
      <style:table-column-properties style:column-width="6.925in" style:rel-column-width="65535*"/>
    </style:style>
    <style:style style:name="Table153.A1" style:family="table-cell">
      <style:table-cell-properties fo:padding="0.0382in" fo:border="0.5pt solid #000000"/>
    </style:style>
    <style:style style:name="Table154" style:family="table">
      <style:table-properties style:width="6.925in" table:align="margins"/>
    </style:style>
    <style:style style:name="Table154.A" style:family="table-column">
      <style:table-column-properties style:column-width="6.925in" style:rel-column-width="65535*"/>
    </style:style>
    <style:style style:name="Table154.A1" style:family="table-cell">
      <style:table-cell-properties fo:padding="0.0382in" fo:border="0.5pt solid #000000"/>
    </style:style>
    <style:style style:name="Table155" style:family="table">
      <style:table-properties style:width="6.925in" table:align="margins"/>
    </style:style>
    <style:style style:name="Table155.A" style:family="table-column">
      <style:table-column-properties style:column-width="6.925in" style:rel-column-width="65535*"/>
    </style:style>
    <style:style style:name="Table155.A1" style:family="table-cell">
      <style:table-cell-properties fo:padding="0.0382in" fo:border="0.5pt solid #000000"/>
    </style:style>
    <style:style style:name="Table156" style:family="table">
      <style:table-properties style:width="6.925in" table:align="margins"/>
    </style:style>
    <style:style style:name="Table156.A" style:family="table-column">
      <style:table-column-properties style:column-width="6.925in" style:rel-column-width="65535*"/>
    </style:style>
    <style:style style:name="Table156.A1" style:family="table-cell">
      <style:table-cell-properties fo:padding="0.0382in" fo:border="0.5pt solid #000000"/>
    </style:style>
    <style:style style:name="Table157" style:family="table">
      <style:table-properties style:width="6.925in" table:align="margins"/>
    </style:style>
    <style:style style:name="Table157.A" style:family="table-column">
      <style:table-column-properties style:column-width="6.925in" style:rel-column-width="65535*"/>
    </style:style>
    <style:style style:name="Table157.A1" style:family="table-cell">
      <style:table-cell-properties fo:padding="0.0382in" fo:border="0.5pt solid #000000"/>
    </style:style>
    <style:style style:name="Table158" style:family="table">
      <style:table-properties style:width="6.925in" table:align="margins"/>
    </style:style>
    <style:style style:name="Table158.A" style:family="table-column">
      <style:table-column-properties style:column-width="6.925in" style:rel-column-width="65535*"/>
    </style:style>
    <style:style style:name="Table158.A1" style:family="table-cell">
      <style:table-cell-properties fo:padding="0.0382in" fo:border="0.5pt solid #000000"/>
    </style:style>
    <style:style style:name="Table159" style:family="table">
      <style:table-properties style:width="6.925in" table:align="margins"/>
    </style:style>
    <style:style style:name="Table159.A" style:family="table-column">
      <style:table-column-properties style:column-width="6.925in" style:rel-column-width="65535*"/>
    </style:style>
    <style:style style:name="Table159.A1" style:family="table-cell">
      <style:table-cell-properties fo:padding="0.0382in" fo:border="0.5pt solid #000000"/>
    </style:style>
    <style:style style:name="Table160" style:family="table">
      <style:table-properties style:width="6.925in" table:align="margins"/>
    </style:style>
    <style:style style:name="Table160.A" style:family="table-column">
      <style:table-column-properties style:column-width="6.925in" style:rel-column-width="65535*"/>
    </style:style>
    <style:style style:name="Table160.1" style:family="table-row">
      <style:table-row-properties style:min-row-height="1.034in"/>
    </style:style>
    <style:style style:name="Table160.A1" style:family="table-cell">
      <style:table-cell-properties fo:padding="0.0382in" fo:border="0.5pt solid #000000"/>
    </style:style>
    <style:style style:name="Table161" style:family="table">
      <style:table-properties style:width="6.925in" table:align="margins"/>
    </style:style>
    <style:style style:name="Table161.A" style:family="table-column">
      <style:table-column-properties style:column-width="6.925in" style:rel-column-width="65535*"/>
    </style:style>
    <style:style style:name="Table161.A1" style:family="table-cell">
      <style:table-cell-properties fo:padding="0.0382in" fo:border="0.5pt solid #000000"/>
    </style:style>
    <style:style style:name="Table162" style:family="table">
      <style:table-properties style:width="6.925in" table:align="margins"/>
    </style:style>
    <style:style style:name="Table162.A" style:family="table-column">
      <style:table-column-properties style:column-width="6.925in" style:rel-column-width="65535*"/>
    </style:style>
    <style:style style:name="Table162.A1" style:family="table-cell">
      <style:table-cell-properties fo:padding="0.0382in" fo:border="0.5pt solid #000000"/>
    </style:style>
    <style:style style:name="Table163" style:family="table">
      <style:table-properties style:width="6.925in" table:align="margins"/>
    </style:style>
    <style:style style:name="Table163.A" style:family="table-column">
      <style:table-column-properties style:column-width="6.925in" style:rel-column-width="65535*"/>
    </style:style>
    <style:style style:name="Table163.A1" style:family="table-cell">
      <style:table-cell-properties fo:padding="0.0382in" fo:border="0.5pt solid #000000"/>
    </style:style>
    <style:style style:name="P1" style:family="paragraph" style:parent-style-name="Text_20_body">
      <style:paragraph-properties fo:margin-top="0in" fo:margin-bottom="0.0575in" style:contextual-spacing="false" fo:text-align="center" style:justify-single-word="false"/>
      <style:text-properties officeooo:paragraph-rsid="001a92af"/>
    </style:style>
    <style:style style:name="P2" style:family="paragraph" style:parent-style-name="Title">
      <style:text-properties fo:font-size="26pt" style:font-size-asian="26pt" style:font-size-complex="26pt"/>
    </style:style>
    <style:style style:name="P3" style:family="paragraph" style:parent-style-name="Text_20_body">
      <style:paragraph-properties fo:text-align="center" style:justify-single-word="false"/>
      <style:text-properties officeooo:paragraph-rsid="0013eb52"/>
    </style:style>
    <style:style style:name="P4" style:family="paragraph" style:parent-style-name="Text_20_body">
      <style:paragraph-properties fo:text-align="center" style:justify-single-word="false"/>
      <style:text-properties officeooo:rsid="0013eb52" officeooo:paragraph-rsid="0013eb52"/>
    </style:style>
    <style:style style:name="P5" style:family="paragraph" style:parent-style-name="Text_20_body">
      <style:paragraph-properties fo:text-align="center" style:justify-single-word="false"/>
      <style:text-properties style:font-name="Liberation Sans" fo:font-size="16pt" officeooo:rsid="0016f020" officeooo:paragraph-rsid="0016f020" style:font-size-asian="16pt" style:font-size-complex="16pt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break-before="page"/>
      <style:text-properties style:font-name="Liberation Sans" fo:font-size="18.2000007629395pt" fo:font-weight="bold" officeooo:rsid="079a3640" officeooo:paragraph-rsid="079a3640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10" style:family="paragraph" style:parent-style-name="Heading_20_2">
      <style:text-properties officeooo:rsid="079fe1f2" officeooo:paragraph-rsid="079fe1f2"/>
    </style:style>
    <style:style style:name="P11" style:family="paragraph" style:parent-style-name="Text_20_body">
      <style:text-properties officeooo:rsid="079ff7ba" officeooo:paragraph-rsid="079ff7ba"/>
    </style:style>
    <style:style style:name="P12" style:family="paragraph" style:parent-style-name="Table_20_Contents">
      <style:text-properties fo:font-weight="bold" officeooo:rsid="079b53d1" officeooo:paragraph-rsid="079b53d1" style:font-weight-asian="bold" style:font-weight-complex="bold"/>
    </style:style>
    <style:style style:name="P13" style:family="paragraph" style:parent-style-name="Table_20_Contents">
      <style:text-properties officeooo:rsid="079b53d1" officeooo:paragraph-rsid="079b53d1"/>
    </style:style>
    <style:style style:name="P14" style:family="paragraph" style:parent-style-name="Heading_20_2">
      <style:text-properties officeooo:rsid="079b53d1" officeooo:paragraph-rsid="079b53d1"/>
    </style:style>
    <style:style style:name="P15" style:family="paragraph" style:parent-style-name="Table_20_Contents">
      <style:text-properties officeooo:rsid="079b53d1" officeooo:paragraph-rsid="079b96af"/>
    </style:style>
    <style:style style:name="P16" style:family="paragraph" style:parent-style-name="Table_20_Contents">
      <style:text-properties officeooo:rsid="079b96af" officeooo:paragraph-rsid="079b96af"/>
    </style:style>
    <style:style style:name="P17" style:family="paragraph" style:parent-style-name="Table_20_Contents">
      <style:text-properties officeooo:rsid="07b689c9" officeooo:paragraph-rsid="07b689c9"/>
    </style:style>
    <style:style style:name="P18" style:family="paragraph" style:parent-style-name="Table_20_Contents">
      <style:text-properties officeooo:rsid="07b5b2b0" officeooo:paragraph-rsid="07b5b2b0"/>
    </style:style>
    <style:style style:name="P19" style:family="paragraph" style:parent-style-name="Table_20_Contents">
      <style:text-properties fo:font-weight="bold" officeooo:rsid="079fe1f2" officeooo:paragraph-rsid="079fe1f2" style:font-weight-asian="bold" style:font-weight-complex="bold"/>
    </style:style>
    <style:style style:name="P20" style:family="paragraph" style:parent-style-name="Table_20_Contents">
      <style:text-properties officeooo:rsid="079fe1f2" officeooo:paragraph-rsid="079fe1f2"/>
    </style:style>
    <style:style style:name="P21" style:family="paragraph" style:parent-style-name="Heading_20_1">
      <style:text-properties officeooo:rsid="07bdf9b2" officeooo:paragraph-rsid="07bdf9b2"/>
    </style:style>
    <style:style style:name="P22" style:family="paragraph" style:parent-style-name="Heading_20_2">
      <style:text-properties officeooo:paragraph-rsid="07926796"/>
    </style:style>
    <style:style style:name="P23" style:family="paragraph" style:parent-style-name="Text_20_body">
      <style:text-properties officeooo:paragraph-rsid="07926796"/>
    </style:style>
    <style:style style:name="P24" style:family="paragraph" style:parent-style-name="Table_20_Contents">
      <style:text-properties style:font-name="Cascadia Code Light" officeooo:paragraph-rsid="07926796"/>
    </style:style>
    <style:style style:name="P25" style:family="paragraph" style:parent-style-name="Heading_20_1">
      <style:text-properties officeooo:rsid="07bdf9b2" officeooo:paragraph-rsid="07c07f1c"/>
    </style:style>
    <style:style style:name="P26" style:family="paragraph" style:parent-style-name="Heading_20_2">
      <style:text-properties officeooo:paragraph-rsid="07c07f1c"/>
    </style:style>
    <style:style style:name="P27" style:family="paragraph" style:parent-style-name="Text_20_body">
      <style:text-properties officeooo:paragraph-rsid="07c07f1c"/>
    </style:style>
    <style:style style:name="P28" style:family="paragraph" style:parent-style-name="Table_20_Contents">
      <style:text-properties style:font-name="Cascadia Code Light" officeooo:paragraph-rsid="07c07f1c"/>
    </style:style>
    <style:style style:name="P29" style:family="paragraph" style:parent-style-name="Heading_20_1">
      <style:text-properties officeooo:rsid="07bdf9b2" officeooo:paragraph-rsid="07c3f11a"/>
    </style:style>
    <style:style style:name="P30" style:family="paragraph" style:parent-style-name="Heading_20_2">
      <style:text-properties officeooo:paragraph-rsid="07c3f11a"/>
    </style:style>
    <style:style style:name="P31" style:family="paragraph" style:parent-style-name="Text_20_body">
      <style:text-properties officeooo:paragraph-rsid="07c3f11a"/>
    </style:style>
    <style:style style:name="P32" style:family="paragraph" style:parent-style-name="Table_20_Contents">
      <style:text-properties style:font-name="Cascadia Code Light" officeooo:paragraph-rsid="07c3f11a"/>
    </style:style>
    <style:style style:name="P33" style:family="paragraph" style:parent-style-name="Text_20_body">
      <style:text-properties officeooo:paragraph-rsid="07c6e506"/>
    </style:style>
    <style:style style:name="P34" style:family="paragraph" style:parent-style-name="Heading_20_1">
      <style:text-properties officeooo:rsid="07c3f11a" officeooo:paragraph-rsid="07c3f11a"/>
    </style:style>
    <style:style style:name="P35" style:family="paragraph" style:parent-style-name="Text_20_body">
      <style:text-properties officeooo:paragraph-rsid="07c9a2a3"/>
    </style:style>
    <style:style style:name="P36" style:family="paragraph" style:parent-style-name="Text_20_body">
      <style:text-properties officeooo:paragraph-rsid="07cb95c2"/>
    </style:style>
    <style:style style:name="P37" style:family="paragraph" style:parent-style-name="Text_20_body">
      <style:paragraph-properties style:writing-mode="lr-tb"/>
      <style:text-properties officeooo:paragraph-rsid="07c3f11a"/>
    </style:style>
    <style:style style:name="P38" style:family="paragraph" style:parent-style-name="Text_20_body">
      <style:text-properties officeooo:paragraph-rsid="07ce3042"/>
    </style:style>
    <style:style style:name="P39" style:family="paragraph" style:parent-style-name="Text_20_body">
      <style:text-properties officeooo:paragraph-rsid="07cf3230"/>
    </style:style>
    <style:style style:name="P40" style:family="paragraph" style:parent-style-name="Heading_20_1">
      <style:text-properties officeooo:rsid="07c42688" officeooo:paragraph-rsid="07c42688"/>
    </style:style>
    <style:style style:name="P41" style:family="paragraph" style:parent-style-name="Heading_20_2">
      <style:text-properties officeooo:paragraph-rsid="07c42688"/>
    </style:style>
    <style:style style:name="P42" style:family="paragraph" style:parent-style-name="Text_20_body">
      <style:text-properties officeooo:paragraph-rsid="07c42688"/>
    </style:style>
    <style:style style:name="P43" style:family="paragraph" style:parent-style-name="Table_20_Contents">
      <style:text-properties style:font-name="Cascadia Code Light" officeooo:paragraph-rsid="07c42688"/>
    </style:style>
    <style:style style:name="P44" style:family="paragraph" style:parent-style-name="Text_20_body">
      <style:paragraph-properties style:writing-mode="lr-tb"/>
      <style:text-properties officeooo:paragraph-rsid="07cf3230"/>
    </style:style>
    <style:style style:name="P45" style:family="paragraph" style:parent-style-name="Text_20_body">
      <style:text-properties officeooo:paragraph-rsid="07d0be93"/>
    </style:style>
    <style:style style:name="P46" style:family="paragraph" style:parent-style-name="Text_20_body">
      <style:text-properties officeooo:paragraph-rsid="07d1820f"/>
    </style:style>
    <style:style style:name="P47" style:family="paragraph" style:parent-style-name="Heading_20_1">
      <style:text-properties officeooo:rsid="07bdf9b2" officeooo:paragraph-rsid="07c42688"/>
    </style:style>
    <style:style style:name="P48" style:family="paragraph" style:parent-style-name="Text_20_body">
      <style:text-properties officeooo:paragraph-rsid="07d2ef44"/>
    </style:style>
    <style:style style:name="P49" style:family="paragraph" style:parent-style-name="Text_20_body">
      <style:text-properties officeooo:paragraph-rsid="07d3b66a"/>
    </style:style>
    <style:style style:name="P50" style:family="paragraph" style:parent-style-name="Text_20_body">
      <style:text-properties officeooo:paragraph-rsid="07d59466"/>
    </style:style>
    <style:style style:name="P51" style:family="paragraph" style:parent-style-name="Table_20_Contents">
      <style:text-properties style:font-name="Cascadia Code Light" officeooo:paragraph-rsid="07d59466"/>
    </style:style>
    <style:style style:name="T1" style:family="text">
      <style:text-properties style:font-name="Liberation Sans" fo:font-size="16pt" fo:language="zxx" fo:country="none" officeooo:rsid="0748aed8" style:font-size-asian="16pt" style:language-asian="zxx" style:country-asian="none" style:font-size-complex="16pt" style:language-complex="zxx" style:country-complex="none"/>
    </style:style>
    <style:style style:name="T2" style:family="text">
      <style:text-properties officeooo:rsid="079ff7ba"/>
    </style:style>
    <style:style style:name="T3" style:family="text">
      <style:text-properties officeooo:rsid="079b96af"/>
    </style:style>
    <style:style style:name="T4" style:family="text">
      <style:text-properties officeooo:rsid="079a3640"/>
    </style:style>
    <style:style style:name="T5" style:family="text">
      <style:text-properties style:font-name="Liberation Sans" fo:font-size="18.2000007629395pt" fo:font-weight="bold" officeooo:rsid="07a697c2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T6" style:family="text">
      <style:text-properties style:font-name="Liberation Sans" fo:font-size="18.2000007629395pt" fo:font-weight="bold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T7" style:family="text">
      <style:text-properties officeooo:rsid="078b70a3"/>
    </style:style>
    <style:style style:name="T8" style:family="text">
      <style:text-properties style:font-name="Liberation Sans" officeooo:rsid="078bff70"/>
    </style:style>
    <style:style style:name="T9" style:family="text">
      <style:text-properties fo:font-weight="normal" officeooo:rsid="078bff70" style:font-weight-asian="normal" style:font-weight-complex="normal"/>
    </style:style>
    <style:style style:name="T10" style:family="text">
      <style:text-properties fo:font-style="italic" style:text-underline-style="solid" style:text-underline-width="auto" style:text-underline-color="font-color" fo:font-weight="bold" officeooo:rsid="078bff70" style:font-style-asian="italic" style:font-weight-asian="bold" style:font-style-complex="italic" style:font-weight-complex="bold"/>
    </style:style>
    <style:style style:name="T11" style:family="text">
      <style:text-properties fo:font-weight="normal" officeooo:rsid="07bead65" style:font-weight-asian="normal" style:font-weight-complex="normal"/>
    </style:style>
    <style:style style:name="T12" style:family="text">
      <style:text-properties fo:font-weight="normal" officeooo:rsid="07a83750" style:font-weight-asian="normal" style:font-weight-complex="normal"/>
    </style:style>
    <style:style style:name="T13" style:family="text">
      <style:text-properties fo:font-weight="normal" officeooo:rsid="07b8209e" style:font-weight-asian="normal" style:font-weight-complex="normal"/>
    </style:style>
    <style:style style:name="T14" style:family="text">
      <style:text-properties style:font-name="Liberation Sans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78bff70"/>
    </style:style>
    <style:style style:name="T17" style:family="text">
      <style:text-properties fo:font-weight="normal" officeooo:rsid="078c4a89" style:font-weight-asian="normal" style:font-weight-complex="normal"/>
    </style:style>
    <style:style style:name="T18" style:family="text">
      <style:text-properties officeooo:rsid="078c4a89"/>
    </style:style>
    <style:style style:name="T19" style:family="text">
      <style:text-properties fo:font-weight="normal" officeooo:rsid="078d4d60" style:font-weight-asian="normal" style:font-weight-complex="normal"/>
    </style:style>
    <style:style style:name="T20" style:family="text">
      <style:text-properties fo:font-weight="normal" officeooo:rsid="07baa476" style:font-weight-asian="normal" style:font-weight-complex="normal"/>
    </style:style>
    <style:style style:name="T21" style:family="text">
      <style:text-properties style:font-name="Liberation Sans" fo:font-size="18.2000007629395pt" fo:font-weight="bold" officeooo:rsid="07c07f1c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T22" style:family="text">
      <style:text-properties fo:font-weight="normal" officeooo:rsid="07c07f1c" style:font-weight-asian="normal" style:font-weight-complex="normal"/>
    </style:style>
    <style:style style:name="T23" style:family="text">
      <style:text-properties fo:font-weight="normal" officeooo:rsid="07c1c258" style:font-weight-asian="normal" style:font-weight-complex="normal"/>
    </style:style>
    <style:style style:name="T24" style:family="text">
      <style:text-properties fo:font-weight="normal" officeooo:rsid="07c25223" style:font-weight-asian="normal" style:font-weight-complex="normal"/>
    </style:style>
    <style:style style:name="T25" style:family="text">
      <style:text-properties style:font-name="Liberation Sans" fo:font-size="18.2000007629395pt" fo:font-weight="bold" officeooo:rsid="07c3f11a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T26" style:family="text">
      <style:text-properties fo:font-weight="normal" officeooo:rsid="07c6e506" style:font-weight-asian="normal" style:font-weight-complex="normal"/>
    </style:style>
    <style:style style:name="T27" style:family="text">
      <style:text-properties fo:font-weight="normal" officeooo:rsid="07c9a2a3" style:font-weight-asian="normal" style:font-weight-complex="normal"/>
    </style:style>
    <style:style style:name="T28" style:family="text">
      <style:text-properties style:font-name="Liberation Sans" fo:font-size="18.2000007629395pt" fo:font-weight="bold" officeooo:rsid="07ce3042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T29" style:family="text">
      <style:text-properties fo:font-weight="normal" officeooo:rsid="07ce3042" style:font-weight-asian="normal" style:font-weight-complex="normal"/>
    </style:style>
    <style:style style:name="T30" style:family="text">
      <style:text-properties fo:font-weight="normal" officeooo:rsid="07cf3230" style:font-weight-asian="normal" style:font-weight-complex="normal"/>
    </style:style>
    <style:style style:name="T31" style:family="text">
      <style:text-properties fo:font-weight="normal" officeooo:rsid="07d0be93" style:font-weight-asian="normal" style:font-weight-complex="normal"/>
    </style:style>
    <style:style style:name="T32" style:family="text">
      <style:text-properties style:font-name="Liberation Sans" fo:font-size="18.2000007629395pt" fo:font-weight="bold" officeooo:rsid="07d0be93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T33" style:family="text">
      <style:text-properties fo:font-weight="normal" officeooo:rsid="07d1820f" style:font-weight-asian="normal" style:font-weight-complex="normal"/>
    </style:style>
    <style:style style:name="T34" style:family="text">
      <style:text-properties style:font-name="Liberation Sans" fo:font-size="18.2000007629395pt" style:font-name-asian="Microsoft YaHei" style:font-size-asian="18.2000007629395pt" style:font-name-complex="Lucida Sans1" style:font-size-complex="18.2000007629395pt"/>
    </style:style>
    <style:style style:name="T35" style:family="text">
      <style:text-properties style:font-name="Liberation Sans" fo:font-size="18.2000007629395pt" fo:font-weight="bold" officeooo:rsid="07c42688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T36" style:family="text">
      <style:text-properties fo:font-weight="normal" officeooo:rsid="07d2ef44" style:font-weight-asian="normal" style:font-weight-complex="normal"/>
    </style:style>
    <style:style style:name="T37" style:family="text">
      <style:text-properties fo:font-weight="normal" officeooo:rsid="07d3b66a" style:font-weight-asian="normal" style:font-weight-complex="normal"/>
    </style:style>
    <style:style style:name="T38" style:family="text">
      <style:text-properties fo:font-weight="normal" officeooo:rsid="07d59466" style:font-weight-asian="normal" style:font-weight-complex="normal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10041" number:language="en" number:country="US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1.0&#10;&#10;" text:name="DocumentVersion"/>
      </text:user-field-decls>
      <text:p text:style-name="P1"><draw:frame draw:style-name="fr1" draw:name="Image1" text:anchor-type="char" svg:width="1.8839in" svg:height="1.8811in" draw:z-index="0"><draw:image xlink:href="Pictures/100000010000022600000226C86F0DDF.png" xlink:type="simple" xlink:show="embed" xlink:actuate="onLoad" draw:mime-type="image/png"/></draw:frame></text:p>
      <text:p text:style-name="Text_20_body"/>
      <text:p text:style-name="P2"><text:subject>API Specification for Project Management</text:subject></text:p>
      <text:p text:style-name="P3"><text:span text:style-name="T1"/></text:p>
      <text:p text:style-name="P4"/>
      <text:p text:style-name="P4"/>
      <text:p text:style-name="P4"/>
      <text:p text:style-name="P4"/>
      <text:p text:style-name="P5">Document Version: <text:user-field-get text:name="DocumentVersion">1.0

</text:user-field-get></text:p>
      <text:p text:style-name="P5"/>
      <text:p text:style-name="P5"/>
      <text:p text:style-name="P5"/>
      <text:p text:style-name="P5"/>
      <text:p text:style-name="P5"/>
      <text:p text:style-name="P5"/>
      <text:p text:style-name="P5">Release Date: <text:date style:data-style-name="N10041" text:date-value="2026-05-29T22:40:38.778970856" text:fixed="true">May 29, 2026</text:date></text:p>
      <text:table-of-content text:style-name="Sect1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">Contents</text:p>
          </text:index-title>
          <text:p text:style-name="P7"><text:a xlink:type="simple" xlink:href="#__RefHeading___Toc2526_3019299338" text:style-name="Index_20_Link" text:visited-style-name="Index_20_Link">1 Structure of Response<text:tab/>5</text:a></text:p>
          <text:p text:style-name="P8"><text:a xlink:type="simple" xlink:href="#__RefHeading___Toc2750_3019299338" text:style-name="Index_20_Link" text:visited-style-name="Index_20_Link">1.1 Status Codes<text:tab/>5</text:a></text:p>
          <text:p text:style-name="P8"><text:a xlink:type="simple" xlink:href="#__RefHeading___Toc2528_3019299338" text:style-name="Index_20_Link" text:visited-style-name="Index_20_Link">1.2 Statuses<text:tab/>5</text:a></text:p>
          <text:p text:style-name="P8"><text:a xlink:type="simple" xlink:href="#__RefHeading___Toc2530_3019299338" text:style-name="Index_20_Link" text:visited-style-name="Index_20_Link">1.3 Successful Messages<text:tab/>5</text:a></text:p>
          <text:p text:style-name="P8"><text:a xlink:type="simple" xlink:href="#__RefHeading___Toc255_2732334432" text:style-name="Index_20_Link" text:visited-style-name="Index_20_Link">1.4 Format of Response<text:tab/>5</text:a></text:p>
          <text:p text:style-name="P7"><text:a xlink:type="simple" xlink:href="#__RefHeading___Toc227_771010674%20Copy%201" text:style-name="Index_20_Link" text:visited-style-name="Index_20_Link">2 Project<text:tab/>6</text:a></text:p>
          <text:p text:style-name="P8"><text:a xlink:type="simple" xlink:href="#__RefHeading___Toc908_3206075736%20Copy%201%20Copy%201" text:style-name="Index_20_Link" text:visited-style-name="Index_20_Link">2.1 Delete<text:tab/>6</text:a></text:p>
          <text:p text:style-name="P8"><text:a xlink:type="simple" xlink:href="#__RefHeading___Toc2079_720390006%20Copy%201" text:style-name="Index_20_Link" text:visited-style-name="Index_20_Link">2.2 Active<text:tab/>6</text:a></text:p>
          <text:p text:style-name="P8"><text:a xlink:type="simple" xlink:href="#__RefHeading___Toc2083_720390006%20Copy%201" text:style-name="Index_20_Link" text:visited-style-name="Index_20_Link">2.3 Inactive<text:tab/>7</text:a></text:p>
          <text:p text:style-name="P8"><text:a xlink:type="simple" xlink:href="#__RefHeading___Toc2085_720390006%20Copy%201" text:style-name="Index_20_Link" text:visited-style-name="Index_20_Link">2.4 Fetch Specific Record<text:tab/>7</text:a></text:p>
          <text:p text:style-name="P7"><text:a xlink:type="simple" xlink:href="#__RefHeading___Toc227_771010674%20Copy%201%20Copy%201" text:style-name="Index_20_Link" text:visited-style-name="Index_20_Link">3 Project Profile Member<text:tab/>9</text:a></text:p>
          <text:p text:style-name="P8"><text:a xlink:type="simple" xlink:href="#__RefHeading___Toc908_3206075736%20Copy%201%20Copy%201%20Copy%201" text:style-name="Index_20_Link" text:visited-style-name="Index_20_Link">3.1 Delete<text:tab/>9</text:a></text:p>
          <text:p text:style-name="P8"><text:a xlink:type="simple" xlink:href="#__RefHeading___Toc2079_720390006%20Copy%201%20Copy%201" text:style-name="Index_20_Link" text:visited-style-name="Index_20_Link">3.2 Active<text:tab/>9</text:a></text:p>
          <text:p text:style-name="P8"><text:a xlink:type="simple" xlink:href="#__RefHeading___Toc2083_720390006%20Copy%201%20Copy%201" text:style-name="Index_20_Link" text:visited-style-name="Index_20_Link">3.3 Inactive<text:tab/>10</text:a></text:p>
          <text:p text:style-name="P8"><text:a xlink:type="simple" xlink:href="#__RefHeading___Toc2085_720390006%20Copy%201%20Copy%201" text:style-name="Index_20_Link" text:visited-style-name="Index_20_Link">3.4 Fetch Specific Record<text:tab/>10</text:a></text:p>
          <text:p text:style-name="P7"><text:a xlink:type="simple" xlink:href="#__RefHeading___Toc227_771010674%20Copy%201%20Copy%201%20Copy%201" text:style-name="Index_20_Link" text:visited-style-name="Index_20_Link">4 Project Group Member<text:tab/>12</text:a></text:p>
          <text:p text:style-name="P8"><text:a xlink:type="simple" xlink:href="#__RefHeading___Toc908_3206075736%20Copy%201%20Copy%201%20Copy%201%20Copy%201" text:style-name="Index_20_Link" text:visited-style-name="Index_20_Link">4.1 Delete<text:tab/>12</text:a></text:p>
          <text:p text:style-name="P8"><text:a xlink:type="simple" xlink:href="#__RefHeading___Toc2079_720390006%20Copy%201%20Copy%201%20Copy%201" text:style-name="Index_20_Link" text:visited-style-name="Index_20_Link">4.2 Active<text:tab/>12</text:a></text:p>
          <text:p text:style-name="P8"><text:a xlink:type="simple" xlink:href="#__RefHeading___Toc2083_720390006%20Copy%201%20Copy%201%20Copy%201" text:style-name="Index_20_Link" text:visited-style-name="Index_20_Link">4.3 Inactive<text:tab/>13</text:a></text:p>
          <text:p text:style-name="P8"><text:a xlink:type="simple" xlink:href="#__RefHeading___Toc2085_720390006%20Copy%201%20Copy%201%20Copy%201" text:style-name="Index_20_Link" text:visited-style-name="Index_20_Link">4.4 Fetch Specific Record<text:tab/>13</text:a></text:p>
          <text:p text:style-name="P7"><text:a xlink:type="simple" xlink:href="#__RefHeading___Toc227_771010674%20Copy%201%20Copy%201%20Copy%202" text:style-name="Index_20_Link" text:visited-style-name="Index_20_Link">5 Project Role Member<text:tab/>15</text:a></text:p>
          <text:p text:style-name="P8"><text:a xlink:type="simple" xlink:href="#__RefHeading___Toc908_3206075736%20Copy%201%20Copy%201%20Copy%201%20Copy%202" text:style-name="Index_20_Link" text:visited-style-name="Index_20_Link">5.1 Delete<text:tab/>15</text:a></text:p>
          <text:p text:style-name="P8"><text:a xlink:type="simple" xlink:href="#__RefHeading___Toc2079_720390006%20Copy%201%20Copy%201%20Copy%202" text:style-name="Index_20_Link" text:visited-style-name="Index_20_Link">5.2 Active<text:tab/>15</text:a></text:p>
          <text:p text:style-name="P8"><text:a xlink:type="simple" xlink:href="#__RefHeading___Toc2083_720390006%20Copy%201%20Copy%201%20Copy%202" text:style-name="Index_20_Link" text:visited-style-name="Index_20_Link">5.3 Inactive<text:tab/>16</text:a></text:p>
          <text:p text:style-name="P8"><text:a xlink:type="simple" xlink:href="#__RefHeading___Toc2085_720390006%20Copy%201%20Copy%201%20Copy%202" text:style-name="Index_20_Link" text:visited-style-name="Index_20_Link">5.4 Fetch Specific Record<text:tab/>16</text:a></text:p>
          <text:p text:style-name="P7"><text:a xlink:type="simple" xlink:href="#__RefHeading___Toc227_771010674%20Copy%201%20Copy%201%20Copy%203" text:style-name="Index_20_Link" text:visited-style-name="Index_20_Link">6 Project Department Member<text:tab/>18</text:a></text:p>
          <text:p text:style-name="P8"><text:a xlink:type="simple" xlink:href="#__RefHeading___Toc908_3206075736%20Copy%201%20Copy%201%20Copy%201%20Copy%203" text:style-name="Index_20_Link" text:visited-style-name="Index_20_Link">6.1 Delete<text:tab/>18</text:a></text:p>
          <text:p text:style-name="P8"><text:a xlink:type="simple" xlink:href="#__RefHeading___Toc2079_720390006%20Copy%201%20Copy%201%20Copy%203" text:style-name="Index_20_Link" text:visited-style-name="Index_20_Link">6.2 Active<text:tab/>18</text:a></text:p>
          <text:p text:style-name="P8"><text:a xlink:type="simple" xlink:href="#__RefHeading___Toc2083_720390006%20Copy%201%20Copy%201%20Copy%203" text:style-name="Index_20_Link" text:visited-style-name="Index_20_Link">6.3 Inactive<text:tab/>19</text:a></text:p>
          <text:p text:style-name="P8"><text:a xlink:type="simple" xlink:href="#__RefHeading___Toc2085_720390006%20Copy%201%20Copy%201%20Copy%203" text:style-name="Index_20_Link" text:visited-style-name="Index_20_Link">6.4 Fetch Specific Record<text:tab/>19</text:a></text:p>
          <text:p text:style-name="P7"><text:a xlink:type="simple" xlink:href="#__RefHeading___Toc227_771010674%20Copy%201%20Copy%201%20Copy%203%20Copy%201" text:style-name="Index_20_Link" text:visited-style-name="Index_20_Link">7 Allowed File Extension for Workflow<text:tab/>21</text:a></text:p>
          <text:p text:style-name="P8"><text:a xlink:type="simple" xlink:href="#__RefHeading___Toc908_3206075736%20Copy%201%20Copy%201%20Copy%201%20Copy%203%20Copy%201" text:style-name="Index_20_Link" text:visited-style-name="Index_20_Link">7.1 Delete<text:tab/>21</text:a></text:p>
          <text:p text:style-name="P8"><text:a xlink:type="simple" xlink:href="#__RefHeading___Toc2079_720390006%20Copy%201%20Copy%201%20Copy%203%20Copy%201" text:style-name="Index_20_Link" text:visited-style-name="Index_20_Link">7.2 Active<text:tab/>21</text:a></text:p>
          <text:p text:style-name="P8"><text:a xlink:type="simple" xlink:href="#__RefHeading___Toc2083_720390006%20Copy%201%20Copy%201%20Copy%203%20Copy%201" text:style-name="Index_20_Link" text:visited-style-name="Index_20_Link">7.3 Inactive<text:tab/>22</text:a></text:p>
          <text:p text:style-name="P8"><text:a xlink:type="simple" xlink:href="#__RefHeading___Toc2085_720390006%20Copy%201%20Copy%201%20Copy%203%20Copy%201" text:style-name="Index_20_Link" text:visited-style-name="Index_20_Link">7.4 Fetch Specific Record<text:tab/>22</text:a></text:p>
          <text:p text:style-name="P7"><text:a xlink:type="simple" xlink:href="#__RefHeading___Toc227_771010674%20Copy%201%20Copy%201%20Copy%203%20Copy%202" text:style-name="Index_20_Link" text:visited-style-name="Index_20_Link">8 Allowed Document Type for Workflow<text:tab/>24</text:a></text:p>
          <text:p text:style-name="P8"><text:a xlink:type="simple" xlink:href="#__RefHeading___Toc908_3206075736%20Copy%201%20Copy%201%20Copy%201%20Copy%203%20Copy%202" text:style-name="Index_20_Link" text:visited-style-name="Index_20_Link">8.1 Delete<text:tab/>24</text:a></text:p>
          <text:p text:style-name="P8"><text:a xlink:type="simple" xlink:href="#__RefHeading___Toc2079_720390006%20Copy%201%20Copy%201%20Copy%203%20Copy%202" text:style-name="Index_20_Link" text:visited-style-name="Index_20_Link">8.2 Active<text:tab/>24</text:a></text:p>
          <text:p text:style-name="P8"><text:a xlink:type="simple" xlink:href="#__RefHeading___Toc2083_720390006%20Copy%201%20Copy%201%20Copy%203%20Copy%202" text:style-name="Index_20_Link" text:visited-style-name="Index_20_Link">8.3 Inactive<text:tab/>25</text:a></text:p>
          <text:p text:style-name="P8"><text:a xlink:type="simple" xlink:href="#__RefHeading___Toc2085_720390006%20Copy%201%20Copy%201%20Copy%203%20Copy%202" text:style-name="Index_20_Link" text:visited-style-name="Index_20_Link">8.4 Fetch Specific Record<text:tab/>25</text:a></text:p>
          <text:p text:style-name="P7"><text:a xlink:type="simple" xlink:href="#__RefHeading___Toc227_771010674%20Copy%201%20Copy%201%20Copy%203%20Copy%203" text:style-name="Index_20_Link" text:visited-style-name="Index_20_Link">9 Project Workflow Status<text:tab/>27</text:a></text:p>
          <text:p text:style-name="P8"><text:a xlink:type="simple" xlink:href="#__RefHeading___Toc908_3206075736%20Copy%201%20Copy%201%20Copy%201%20Copy%203%20Copy%203" text:style-name="Index_20_Link" text:visited-style-name="Index_20_Link"><text:soft-page-break/>9.1 Delete<text:tab/>27</text:a></text:p>
          <text:p text:style-name="P8"><text:a xlink:type="simple" xlink:href="#__RefHeading___Toc2079_720390006%20Copy%201%20Copy%201%20Copy%203%20Copy%203" text:style-name="Index_20_Link" text:visited-style-name="Index_20_Link">9.2 Active<text:tab/>27</text:a></text:p>
          <text:p text:style-name="P8"><text:a xlink:type="simple" xlink:href="#__RefHeading___Toc2083_720390006%20Copy%201%20Copy%201%20Copy%203%20Copy%203" text:style-name="Index_20_Link" text:visited-style-name="Index_20_Link">9.3 Inactive<text:tab/>28</text:a></text:p>
          <text:p text:style-name="P8"><text:a xlink:type="simple" xlink:href="#__RefHeading___Toc2085_720390006%20Copy%201%20Copy%201%20Copy%203%20Copy%203" text:style-name="Index_20_Link" text:visited-style-name="Index_20_Link">9.4 Fetch Specific Record<text:tab/>28</text:a></text:p>
          <text:p text:style-name="P7"><text:a xlink:type="simple" xlink:href="#__RefHeading___Toc227_771010674%20Copy%201%20Copy%201%20Copy%203%20Copy%204" text:style-name="Index_20_Link" text:visited-style-name="Index_20_Link">10 Project Workflow Resolution<text:tab/>30</text:a></text:p>
          <text:p text:style-name="P8"><text:a xlink:type="simple" xlink:href="#__RefHeading___Toc908_3206075736%20Copy%201%20Copy%201%20Copy%201%20Copy%203%20Copy%204" text:style-name="Index_20_Link" text:visited-style-name="Index_20_Link">10.1 Delete<text:tab/>30</text:a></text:p>
          <text:p text:style-name="P8"><text:a xlink:type="simple" xlink:href="#__RefHeading___Toc2079_720390006%20Copy%201%20Copy%201%20Copy%203%20Copy%204" text:style-name="Index_20_Link" text:visited-style-name="Index_20_Link">10.2 Active<text:tab/>30</text:a></text:p>
          <text:p text:style-name="P8"><text:a xlink:type="simple" xlink:href="#__RefHeading___Toc2083_720390006%20Copy%201%20Copy%201%20Copy%203%20Copy%204" text:style-name="Index_20_Link" text:visited-style-name="Index_20_Link">10.3 Inactive<text:tab/>31</text:a></text:p>
          <text:p text:style-name="P8"><text:a xlink:type="simple" xlink:href="#__RefHeading___Toc2085_720390006%20Copy%201%20Copy%201%20Copy%203%20Copy%204" text:style-name="Index_20_Link" text:visited-style-name="Index_20_Link">10.4 Fetch Specific Record<text:tab/>31</text:a></text:p>
          <text:p text:style-name="P7"><text:a xlink:type="simple" xlink:href="#__RefHeading___Toc227_771010674%20Copy%201%20Copy%201%20Copy%203%20Copy%205" text:style-name="Index_20_Link" text:visited-style-name="Index_20_Link">11 Project Workflow Progress<text:tab/>33</text:a></text:p>
          <text:p text:style-name="P8"><text:a xlink:type="simple" xlink:href="#__RefHeading___Toc908_3206075736%20Copy%201%20Copy%201%20Copy%201%20Copy%203%20Copy%205" text:style-name="Index_20_Link" text:visited-style-name="Index_20_Link">11.1 Delete<text:tab/>33</text:a></text:p>
          <text:p text:style-name="P8"><text:a xlink:type="simple" xlink:href="#__RefHeading___Toc2079_720390006%20Copy%201%20Copy%201%20Copy%203%20Copy%205" text:style-name="Index_20_Link" text:visited-style-name="Index_20_Link">11.2 Active<text:tab/>33</text:a></text:p>
          <text:p text:style-name="P8"><text:a xlink:type="simple" xlink:href="#__RefHeading___Toc2083_720390006%20Copy%201%20Copy%201%20Copy%203%20Copy%205" text:style-name="Index_20_Link" text:visited-style-name="Index_20_Link">11.3 Inactive<text:tab/>34</text:a></text:p>
          <text:p text:style-name="P8"><text:a xlink:type="simple" xlink:href="#__RefHeading___Toc2085_720390006%20Copy%201%20Copy%201%20Copy%203%20Copy%205" text:style-name="Index_20_Link" text:visited-style-name="Index_20_Link">11.4 Fetch Specific Record<text:tab/>34</text:a></text:p>
          <text:p text:style-name="P7"><text:a xlink:type="simple" xlink:href="#__RefHeading___Toc227_771010674%20Copy%201%20Copy%201%20Copy%203%20Copy%205%20Copy%201" text:style-name="Index_20_Link" text:visited-style-name="Index_20_Link">12 Issue<text:tab/>36</text:a></text:p>
          <text:p text:style-name="P8"><text:a xlink:type="simple" xlink:href="#__RefHeading___Toc908_3206075736%20Copy%201%20Copy%201%20Copy%201%20Copy%203%20Copy%205%20Copy%201" text:style-name="Index_20_Link" text:visited-style-name="Index_20_Link">12.1 Delete<text:tab/>36</text:a></text:p>
          <text:p text:style-name="P8"><text:a xlink:type="simple" xlink:href="#__RefHeading___Toc2079_720390006%20Copy%201%20Copy%201%20Copy%203%20Copy%205%20Copy%201" text:style-name="Index_20_Link" text:visited-style-name="Index_20_Link">12.2 Active<text:tab/>36</text:a></text:p>
          <text:p text:style-name="P8"><text:a xlink:type="simple" xlink:href="#__RefHeading___Toc2083_720390006%20Copy%201%20Copy%201%20Copy%203%20Copy%205%20Copy%201" text:style-name="Index_20_Link" text:visited-style-name="Index_20_Link">12.3 Inactive<text:tab/>37</text:a></text:p>
          <text:p text:style-name="P8"><text:a xlink:type="simple" xlink:href="#__RefHeading___Toc2085_720390006%20Copy%201%20Copy%201%20Copy%203%20Copy%205%20Copy%201" text:style-name="Index_20_Link" text:visited-style-name="Index_20_Link">12.4 Fetch Specific Record<text:tab/>37</text:a></text:p>
          <text:p text:style-name="P7"><text:a xlink:type="simple" xlink:href="#__RefHeading___Toc227_771010674%20Copy%201%20Copy%201%20Copy%203%20Copy%205%20Copy%202" text:style-name="Index_20_Link" text:visited-style-name="Index_20_Link">13 Issue Comment<text:tab/>38</text:a></text:p>
          <text:p text:style-name="P8"><text:a xlink:type="simple" xlink:href="#__RefHeading___Toc908_3206075736%20Copy%201%20Copy%201%20Copy%201%20Copy%203%20Copy%205%20Copy%202" text:style-name="Index_20_Link" text:visited-style-name="Index_20_Link">13.1 Delete<text:tab/>38</text:a></text:p>
          <text:p text:style-name="P8"><text:a xlink:type="simple" xlink:href="#__RefHeading___Toc2079_720390006%20Copy%201%20Copy%201%20Copy%203%20Copy%205%20Copy%202" text:style-name="Index_20_Link" text:visited-style-name="Index_20_Link">13.2 Active<text:tab/>39</text:a></text:p>
          <text:p text:style-name="P8"><text:a xlink:type="simple" xlink:href="#__RefHeading___Toc2083_720390006%20Copy%201%20Copy%201%20Copy%203%20Copy%205%20Copy%202" text:style-name="Index_20_Link" text:visited-style-name="Index_20_Link">13.3 Inactive<text:tab/>40</text:a></text:p>
          <text:p text:style-name="P8"><text:a xlink:type="simple" xlink:href="#__RefHeading___Toc2085_720390006%20Copy%201%20Copy%201%20Copy%203%20Copy%205%20Copy%202" text:style-name="Index_20_Link" text:visited-style-name="Index_20_Link">13.4 Fetch Specific Record<text:tab/>40</text:a></text:p>
          <text:p text:style-name="P7"><text:a xlink:type="simple" xlink:href="#__RefHeading___Toc227_771010674%20Copy%201%20Copy%201%20Copy%203%20Copy%205%20Copy%203" text:style-name="Index_20_Link" text:visited-style-name="Index_20_Link">14 Issue Attachment<text:tab/>41</text:a></text:p>
          <text:p text:style-name="P8"><text:a xlink:type="simple" xlink:href="#__RefHeading___Toc908_3206075736%20Copy%201%20Copy%201%20Copy%201%20Copy%203%20Copy%205%20Copy%203" text:style-name="Index_20_Link" text:visited-style-name="Index_20_Link">14.1 Delete<text:tab/>41</text:a></text:p>
          <text:p text:style-name="P8"><text:a xlink:type="simple" xlink:href="#__RefHeading___Toc2079_720390006%20Copy%201%20Copy%201%20Copy%203%20Copy%205%20Copy%203" text:style-name="Index_20_Link" text:visited-style-name="Index_20_Link">14.2 Active<text:tab/>42</text:a></text:p>
          <text:p text:style-name="P8"><text:a xlink:type="simple" xlink:href="#__RefHeading___Toc2083_720390006%20Copy%201%20Copy%201%20Copy%203%20Copy%205%20Copy%203" text:style-name="Index_20_Link" text:visited-style-name="Index_20_Link">14.3 Inactive<text:tab/>43</text:a></text:p>
          <text:p text:style-name="P8"><text:a xlink:type="simple" xlink:href="#__RefHeading___Toc2085_720390006%20Copy%201%20Copy%201%20Copy%203%20Copy%205%20Copy%203" text:style-name="Index_20_Link" text:visited-style-name="Index_20_Link">14.4 Fetch Specific Record<text:tab/>43</text:a></text:p>
          <text:p text:style-name="P7"><text:a xlink:type="simple" xlink:href="#__RefHeading___Toc227_771010674%20Copy%201%20Copy%201%20Copy%203%20Copy%205%20Copy%205" text:style-name="Index_20_Link" text:visited-style-name="Index_20_Link">15 Project Release<text:tab/>44</text:a></text:p>
          <text:p text:style-name="P8"><text:a xlink:type="simple" xlink:href="#__RefHeading___Toc908_3206075736%20Copy%201%20Copy%201%20Copy%201%20Copy%203%20Copy%205%20Copy%205" text:style-name="Index_20_Link" text:visited-style-name="Index_20_Link">15.1 Delete<text:tab/>44</text:a></text:p>
          <text:p text:style-name="P8"><text:a xlink:type="simple" xlink:href="#__RefHeading___Toc2079_720390006%20Copy%201%20Copy%201%20Copy%203%20Copy%205%20Copy%205" text:style-name="Index_20_Link" text:visited-style-name="Index_20_Link">15.2 Active<text:tab/>45</text:a></text:p>
          <text:p text:style-name="P8"><text:a xlink:type="simple" xlink:href="#__RefHeading___Toc2083_720390006%20Copy%201%20Copy%201%20Copy%203%20Copy%205%20Copy%205" text:style-name="Index_20_Link" text:visited-style-name="Index_20_Link">15.3 Inactive<text:tab/>46</text:a></text:p>
          <text:p text:style-name="P8"><text:a xlink:type="simple" xlink:href="#__RefHeading___Toc2085_720390006%20Copy%201%20Copy%201%20Copy%203%20Copy%205%20Copy%205" text:style-name="Index_20_Link" text:visited-style-name="Index_20_Link">15.4 Fetch Specific Record<text:tab/>46</text:a></text:p>
          <text:p text:style-name="P7"><text:a xlink:type="simple" xlink:href="#__RefHeading___Toc227_771010674%20Copy%201%20Copy%201%20Copy%203%20Copy%205%20Copy%206" text:style-name="Index_20_Link" text:visited-style-name="Index_20_Link">16 Work Log<text:tab/>47</text:a></text:p>
          <text:p text:style-name="P8"><text:a xlink:type="simple" xlink:href="#__RefHeading___Toc908_3206075736%20Copy%201%20Copy%201%20Copy%201%20Copy%203%20Copy%205%20Copy%206" text:style-name="Index_20_Link" text:visited-style-name="Index_20_Link">16.1 Delete<text:tab/>47</text:a></text:p>
          <text:p text:style-name="P8"><text:a xlink:type="simple" xlink:href="#__RefHeading___Toc2079_720390006%20Copy%201%20Copy%201%20Copy%203%20Copy%205%20Copy%206" text:style-name="Index_20_Link" text:visited-style-name="Index_20_Link">16.2 Active<text:tab/>48</text:a></text:p>
          <text:p text:style-name="P8"><text:a xlink:type="simple" xlink:href="#__RefHeading___Toc2083_720390006%20Copy%201%20Copy%201%20Copy%203%20Copy%205%20Copy%206" text:style-name="Index_20_Link" text:visited-style-name="Index_20_Link">16.3 Inactive<text:tab/>48</text:a></text:p>
          <text:p text:style-name="P8"><text:a xlink:type="simple" xlink:href="#__RefHeading___Toc2085_720390006%20Copy%201%20Copy%201%20Copy%203%20Copy%205%20Copy%206" text:style-name="Index_20_Link" text:visited-style-name="Index_20_Link">16.4 Fetch Specific Record<text:tab/>49</text:a></text:p>
          <text:p text:style-name="P7"><text:a xlink:type="simple" xlink:href="#__RefHeading___Toc227_771010674%20Copy%201%20Copy%201%20Copy%203%20Copy%205%20Copy%207" text:style-name="Index_20_Link" text:visited-style-name="Index_20_Link">17 Issue Workflow History<text:tab/>50</text:a></text:p>
          <text:p text:style-name="P8"><text:a xlink:type="simple" xlink:href="#__RefHeading___Toc908_3206075736%20Copy%201%20Copy%201%20Copy%201%20Copy%203%20Copy%205%20Copy%207" text:style-name="Index_20_Link" text:visited-style-name="Index_20_Link">17.1 Delete<text:tab/>50</text:a></text:p>
          <text:p text:style-name="P8"><text:a xlink:type="simple" xlink:href="#__RefHeading___Toc2085_720390006%20Copy%201%20Copy%201%20Copy%203%20Copy%205%20Copy%207" text:style-name="Index_20_Link" text:visited-style-name="Index_20_Link">17.2 Fetch Specific Record<text:tab/>51</text:a></text:p>
          <text:p text:style-name="P7"><text:a xlink:type="simple" xlink:href="#__RefHeading___Toc227_771010674%20Copy%201%20Copy%201%20Copy%203%20Copy%205%20Copy%208" text:style-name="Index_20_Link" text:visited-style-name="Index_20_Link">18 Meeting<text:tab/>52</text:a></text:p>
          <text:p text:style-name="P8"><text:a xlink:type="simple" xlink:href="#__RefHeading___Toc908_3206075736%20Copy%201%20Copy%201%20Copy%201%20Copy%203%20Copy%205%20Copy%208" text:style-name="Index_20_Link" text:visited-style-name="Index_20_Link">18.1 Delete<text:tab/>52</text:a></text:p>
          <text:p text:style-name="P8"><text:a xlink:type="simple" xlink:href="#__RefHeading___Toc2079_720390006%20Copy%201%20Copy%201%20Copy%203%20Copy%205%20Copy%208" text:style-name="Index_20_Link" text:visited-style-name="Index_20_Link"><text:soft-page-break/>18.2 Active<text:tab/>53</text:a></text:p>
          <text:p text:style-name="P8"><text:a xlink:type="simple" xlink:href="#__RefHeading___Toc2083_720390006%20Copy%201%20Copy%201%20Copy%203%20Copy%205%20Copy%208" text:style-name="Index_20_Link" text:visited-style-name="Index_20_Link">18.3 Inactive<text:tab/>53</text:a></text:p>
          <text:p text:style-name="P8"><text:a xlink:type="simple" xlink:href="#__RefHeading___Toc2085_720390006%20Copy%201%20Copy%201%20Copy%203%20Copy%205%20Copy%208" text:style-name="Index_20_Link" text:visited-style-name="Index_20_Link">18.4 Fetch Specific Record<text:tab/>54</text:a></text:p>
          <text:p text:style-name="P7"><text:a xlink:type="simple" xlink:href="#__RefHeading___Toc227_771010674%20Copy%201%20Copy%201%20Copy%203%20Copy%205%20Copy%209" text:style-name="Index_20_Link" text:visited-style-name="Index_20_Link">19 Meeting Invitees<text:tab/>55</text:a></text:p>
          <text:p text:style-name="P8"><text:a xlink:type="simple" xlink:href="#__RefHeading___Toc908_3206075736%20Copy%201%20Copy%201%20Copy%201%20Copy%203%20Copy%205%20Copy%209" text:style-name="Index_20_Link" text:visited-style-name="Index_20_Link">19.1 Delete<text:tab/>55</text:a></text:p>
          <text:p text:style-name="P8"><text:a xlink:type="simple" xlink:href="#__RefHeading___Toc2079_720390006%20Copy%201%20Copy%201%20Copy%203%20Copy%205%20Copy%209" text:style-name="Index_20_Link" text:visited-style-name="Index_20_Link">19.2 Active<text:tab/>56</text:a></text:p>
          <text:p text:style-name="P8"><text:a xlink:type="simple" xlink:href="#__RefHeading___Toc2083_720390006%20Copy%201%20Copy%201%20Copy%203%20Copy%205%20Copy%209" text:style-name="Index_20_Link" text:visited-style-name="Index_20_Link">19.3 Inactive<text:tab/>56</text:a></text:p>
          <text:p text:style-name="P8"><text:a xlink:type="simple" xlink:href="#__RefHeading___Toc2085_720390006%20Copy%201%20Copy%201%20Copy%203%20Copy%205%20Copy%209" text:style-name="Index_20_Link" text:visited-style-name="Index_20_Link">19.4 Fetch Specific Record<text:tab/>57</text:a></text:p>
          <text:p text:style-name="P7"><text:a xlink:type="simple" xlink:href="#__RefHeading___Toc227_771010674%20Copy%201%20Copy%201%20Copy%203%20Copy%205%20Copy%2010" text:style-name="Index_20_Link" text:visited-style-name="Index_20_Link">20 Meeting Minutes<text:tab/>58</text:a></text:p>
          <text:p text:style-name="P8"><text:a xlink:type="simple" xlink:href="#__RefHeading___Toc908_3206075736%20Copy%201%20Copy%201%20Copy%201%20Copy%203%20Copy%205%20Copy%2010" text:style-name="Index_20_Link" text:visited-style-name="Index_20_Link">20.1 Delete<text:tab/>58</text:a></text:p>
          <text:p text:style-name="P8"><text:a xlink:type="simple" xlink:href="#__RefHeading___Toc2079_720390006%20Copy%201%20Copy%201%20Copy%203%20Copy%205%20Copy%2010" text:style-name="Index_20_Link" text:visited-style-name="Index_20_Link">20.2 Active<text:tab/>59</text:a></text:p>
          <text:p text:style-name="P8"><text:a xlink:type="simple" xlink:href="#__RefHeading___Toc2083_720390006%20Copy%201%20Copy%201%20Copy%203%20Copy%205%20Copy%2010" text:style-name="Index_20_Link" text:visited-style-name="Index_20_Link">20.3 Inactive<text:tab/>59</text:a></text:p>
          <text:p text:style-name="P8"><text:a xlink:type="simple" xlink:href="#__RefHeading___Toc2085_720390006%20Copy%201%20Copy%201%20Copy%203%20Copy%205%20Copy%2010" text:style-name="Index_20_Link" text:visited-style-name="Index_20_Link">20.4 Fetch Specific Record<text:tab/>60</text:a></text:p>
        </text:index-body>
      </text:table-of-content>
      <text:h text:style-name="P9" text:outline-level="1"><text:bookmark-start text:name="__RefHeading___Toc2526_3019299338"/>Structure of Response<text:bookmark-end text:name="__RefHeading___Toc2526_3019299338"/></text:h>
      <text:h text:style-name="P10" text:outline-level="2"><text:bookmark-start text:name="__RefHeading___Toc2750_3019299338"/><text:span text:style-name="T2">Status</text:span> Codes<text:bookmark-end text:name="__RefHeading___Toc2750_3019299338"/></text:h>
      <text:p text:style-name="P11">All APIs in Horizon System follow the <text:a xlink:type="simple" xlink:href="https://en.wikipedia.org/wiki/List_of_HTTP_status_codes" text:style-name="Internet_20_link" text:visited-style-name="Visited_20_Internet_20_Link">List of HTTP status Code</text:a>.</text:p>
      <text:h text:style-name="Heading_20_2" text:outline-level="2"><text:bookmark-start text:name="__RefHeading___Toc2528_3019299338"/>Statuses<text:bookmark-end text:name="__RefHeading___Toc2528_3019299338"/></text:h>
      <table:table table:name="Table81" table:style-name="Table81">
        <table:table-column table:style-name="Table81.A"/>
        <table:table-column table:style-name="Table81.B"/>
        <table:table-column table:style-name="Table81.C"/>
        <table:table-row table:style-name="Table81.1">
          <table:table-cell table:style-name="Table81.A1" office:value-type="string">
            <text:p text:style-name="P12">No</text:p>
          </table:table-cell>
          <table:table-cell table:style-name="Table81.A1" office:value-type="string">
            <text:p text:style-name="P12">Status</text:p>
          </table:table-cell>
          <table:table-cell table:style-name="Table81.C1" office:value-type="string">
            <text:p text:style-name="P12">Description</text:p>
          </table:table-cell>
        </table:table-row>
        <table:table-row>
          <table:table-cell table:style-name="Table81.A2" office:value-type="string">
            <text:p text:style-name="P13">1</text:p>
          </table:table-cell>
          <table:table-cell table:style-name="Table81.B2" office:value-type="string">
            <text:p text:style-name="P13">success</text:p>
          </table:table-cell>
          <table:table-cell table:style-name="Table81.C2" office:value-type="string">
            <text:p text:style-name="P13">When the API returns successful result.</text:p>
          </table:table-cell>
        </table:table-row>
        <table:table-row table:style-name="Table81.3">
          <table:table-cell table:style-name="Table81.A3" office:value-type="string">
            <text:p text:style-name="P13">2</text:p>
          </table:table-cell>
          <table:table-cell table:style-name="Table81.B3" office:value-type="string">
            <text:p text:style-name="P13">error</text:p>
          </table:table-cell>
          <table:table-cell table:style-name="Table81.C3" office:value-type="string">
            <text:p text:style-name="P13">When the API returns fault result.</text:p>
          </table:table-cell>
        </table:table-row>
      </table:table>
      <text:p text:style-name="Text_20_body"/>
      <text:h text:style-name="P14" text:outline-level="2"><text:bookmark-start text:name="__RefHeading___Toc2530_3019299338"/>Successful Messages<text:bookmark-end text:name="__RefHeading___Toc2530_3019299338"/></text:h>
      <table:table table:name="Table82" table:style-name="Table82">
        <table:table-column table:style-name="Table82.A"/>
        <table:table-column table:style-name="Table82.B"/>
        <table:table-column table:style-name="Table82.C"/>
        <table:table-row>
          <table:table-cell table:style-name="Table82.A1" office:value-type="string">
            <text:p text:style-name="P12">No</text:p>
          </table:table-cell>
          <table:table-cell table:style-name="Table82.A1" office:value-type="string">
            <text:p text:style-name="P12">Messages</text:p>
          </table:table-cell>
          <table:table-cell table:style-name="Table82.C1" office:value-type="string">
            <text:p text:style-name="P12">Reason</text:p>
          </table:table-cell>
        </table:table-row>
        <table:table-row>
          <table:table-cell table:style-name="Table82.A2" office:value-type="string">
            <text:p text:style-name="P13">1</text:p>
          </table:table-cell>
          <table:table-cell table:style-name="Table82.B2" office:value-type="string">
            <text:p text:style-name="P13">The record is added successfully.</text:p>
          </table:table-cell>
          <table:table-cell table:style-name="Table82.C2" office:value-type="string">
            <text:p text:style-name="P13"><text:span text:style-name="T3">New Item</text:span> Insertion.</text:p>
          </table:table-cell>
        </table:table-row>
        <table:table-row>
          <table:table-cell table:style-name="Table82.A2" office:value-type="string">
            <text:p text:style-name="P13">2</text:p>
          </table:table-cell>
          <table:table-cell table:style-name="Table82.B3" office:value-type="string">
            <text:p text:style-name="P13">The record is updated successfully.</text:p>
          </table:table-cell>
          <table:table-cell table:style-name="Table82.C3" office:value-type="string">
            <text:p text:style-name="P13">Updating <text:span text:style-name="T3">Specific Item</text:span></text:p>
          </table:table-cell>
        </table:table-row>
        <table:table-row>
          <table:table-cell table:style-name="Table82.A2" office:value-type="string">
            <text:p text:style-name="P13">3</text:p>
          </table:table-cell>
          <table:table-cell table:style-name="Table82.B4" office:value-type="string">
            <text:p text:style-name="P13">The record is deleted successfully.</text:p>
          </table:table-cell>
          <table:table-cell table:style-name="Table82.C4" office:value-type="string">
            <text:p text:style-name="P15"><text:span text:style-name="T3">Dele</text:span>ting <text:span text:style-name="T3">Specific Item</text:span></text:p>
          </table:table-cell>
        </table:table-row>
        <table:table-row>
          <table:table-cell table:style-name="Table82.A2" office:value-type="string">
            <text:p text:style-name="P13">4</text:p>
          </table:table-cell>
          <table:table-cell table:style-name="Table82.B5" office:value-type="string">
            <text:p text:style-name="P13">The record is activated successfully.</text:p>
          </table:table-cell>
          <table:table-cell table:style-name="Table82.C5" office:value-type="string">
            <text:p text:style-name="P16">Activating Specific Inactive Item</text:p>
          </table:table-cell>
        </table:table-row>
        <table:table-row>
          <table:table-cell table:style-name="Table82.A6" office:value-type="string">
            <text:p text:style-name="P13">5</text:p>
          </table:table-cell>
          <table:table-cell table:style-name="Table82.B6" office:value-type="string">
            <text:p text:style-name="P13">The record is inactivated successfully.</text:p>
          </table:table-cell>
          <table:table-cell table:style-name="Table82.C6" office:value-type="string">
            <text:p text:style-name="P16">Inactivating Specific active Item</text:p>
          </table:table-cell>
        </table:table-row>
        <table:table-row>
          <table:table-cell table:style-name="Table82.A6" office:value-type="string">
            <text:p text:style-name="P17">6</text:p>
          </table:table-cell>
          <table:table-cell table:style-name="Table82.B6" office:value-type="string">
            <text:p text:style-name="P13">The data is returned successfully.</text:p>
          </table:table-cell>
          <table:table-cell table:style-name="Table82.C6" office:value-type="string">
            <text:p text:style-name="P18">Fetching Data (Specific Row or All Rows)</text:p>
          </table:table-cell>
        </table:table-row>
        <table:table-row>
          <table:table-cell table:style-name="Table82.A6" office:value-type="string">
            <text:p text:style-name="P17">7</text:p>
          </table:table-cell>
          <table:table-cell table:style-name="Table82.B6" office:value-type="string">
            <text:p text:style-name="P13">The token is generated successfully.</text:p>
          </table:table-cell>
          <table:table-cell table:style-name="Table82.C6" office:value-type="string">
            <text:p text:style-name="P18">User Login and Getting Token</text:p>
          </table:table-cell>
        </table:table-row>
        <table:table-row>
          <table:table-cell table:style-name="Table82.A9" office:value-type="string">
            <text:p text:style-name="P17">8</text:p>
          </table:table-cell>
          <table:table-cell table:style-name="Table82.B9" office:value-type="string">
            <text:p text:style-name="P13">The token is refreshed successfully.</text:p>
          </table:table-cell>
          <table:table-cell table:style-name="Table82.C9" office:value-type="string">
            <text:p text:style-name="P18">Extending The Expire Time of Token</text:p>
          </table:table-cell>
        </table:table-row>
        <table:table-row>
          <table:table-cell table:style-name="Table82.A10" office:value-type="string">
            <text:p text:style-name="P17">9</text:p>
          </table:table-cell>
          <table:table-cell table:style-name="Table82.B10" office:value-type="string">
            <text:p text:style-name="P13">The password is changed successfully.</text:p>
          </table:table-cell>
          <table:table-cell table:style-name="Table82.C10" office:value-type="string">
            <text:p text:style-name="P18">Changing Password</text:p>
          </table:table-cell>
        </table:table-row>
      </table:table>
      <text:p text:style-name="Text_20_body"/>
      <text:h text:style-name="Heading_20_2" text:outline-level="2"><text:bookmark-start text:name="__RefHeading___Toc255_2732334432"/>Format <text:span text:style-name="T4">of Response</text:span><text:bookmark-end text:name="__RefHeading___Toc255_2732334432"/></text:h>
      <table:table table:name="Table83" table:style-name="Table83">
        <table:table-column table:style-name="Table83.A"/>
        <table:table-column table:style-name="Table83.B"/>
        <table:table-column table:style-name="Table83.C"/>
        <table:table-column table:style-name="Table83.D"/>
        <table:table-header-rows>
          <table:table-row>
            <table:table-cell table:style-name="Table83.A1" office:value-type="string">
              <text:p text:style-name="P19">No</text:p>
            </table:table-cell>
            <table:table-cell table:style-name="Table83.A1" office:value-type="string">
              <text:p text:style-name="P19">Property Name</text:p>
            </table:table-cell>
            <table:table-cell table:style-name="Table83.A1" office:value-type="string">
              <text:p text:style-name="P19">Data Type</text:p>
            </table:table-cell>
            <table:table-cell table:style-name="Table83.D1" office:value-type="string">
              <text:p text:style-name="P19">Description</text:p>
            </table:table-cell>
          </table:table-row>
        </table:table-header-rows>
        <table:table-row>
          <table:table-cell table:style-name="Table83.A2" office:value-type="string">
            <text:p text:style-name="P20">1</text:p>
          </table:table-cell>
          <table:table-cell table:style-name="Table83.B2" office:value-type="string">
            <text:p text:style-name="P20">statusCode</text:p>
          </table:table-cell>
          <table:table-cell table:style-name="Table83.C2" office:value-type="string">
            <text:p text:style-name="P20">integer</text:p>
          </table:table-cell>
          <table:table-cell table:style-name="Table83.D2" office:value-type="string">
            <text:p text:style-name="P18">HTTP Status Code</text:p>
          </table:table-cell>
        </table:table-row>
        <table:table-row>
          <table:table-cell table:style-name="Table83.A2" office:value-type="string">
            <text:p text:style-name="P20">2</text:p>
          </table:table-cell>
          <table:table-cell table:style-name="Table83.B2" office:value-type="string">
            <text:p text:style-name="P20">status</text:p>
          </table:table-cell>
          <table:table-cell table:style-name="Table83.C2" office:value-type="string">
            <text:p text:style-name="P20">string</text:p>
          </table:table-cell>
          <table:table-cell table:style-name="Table83.D2" office:value-type="string">
            <text:p text:style-name="P20">It presented in section 1.1.</text:p>
          </table:table-cell>
        </table:table-row>
        <table:table-row>
          <table:table-cell table:style-name="Table83.A2" office:value-type="string">
            <text:p text:style-name="P20">3</text:p>
          </table:table-cell>
          <table:table-cell table:style-name="Table83.B2" office:value-type="string">
            <text:p text:style-name="P20">message</text:p>
          </table:table-cell>
          <table:table-cell table:style-name="Table83.C2" office:value-type="string">
            <text:p text:style-name="P20">string</text:p>
          </table:table-cell>
          <table:table-cell table:style-name="Table83.D2" office:value-type="string">
            <text:p text:style-name="P20">Successful (section 1.2) and error message.</text:p>
          </table:table-cell>
        </table:table-row>
        <table:table-row>
          <table:table-cell table:style-name="Table83.A2" office:value-type="string">
            <text:p text:style-name="P20">4</text:p>
          </table:table-cell>
          <table:table-cell table:style-name="Table83.B2" office:value-type="string">
            <text:p text:style-name="P20">errorCode</text:p>
          </table:table-cell>
          <table:table-cell table:style-name="Table83.C2" office:value-type="string">
            <text:p text:style-name="P20">integer</text:p>
          </table:table-cell>
          <table:table-cell table:style-name="Table83.D2" office:value-type="string">
            <text:p text:style-name="P20">Error code based on “System Error List” document.</text:p>
          </table:table-cell>
        </table:table-row>
        <text:soft-page-break/>
        <table:table-row>
          <table:table-cell table:style-name="Table83.A2" office:value-type="string">
            <text:p text:style-name="P20">5</text:p>
          </table:table-cell>
          <table:table-cell table:style-name="Table83.B2" office:value-type="string">
            <text:p text:style-name="P20">data</text:p>
          </table:table-cell>
          <table:table-cell table:style-name="Table83.C2" office:value-type="string">
            <text:p text:style-name="P20">object</text:p>
          </table:table-cell>
          <table:table-cell table:style-name="Table83.D2" office:value-type="string">
            <text:p text:style-name="P20">To return data objects and properties.</text:p>
          </table:table-cell>
        </table:table-row>
      </table:table>
      <text:p text:style-name="Text_20_body"><text:span text:style-name="Strong_20_Emphasis"/></text:p>
      <text:h text:style-name="P21" text:outline-level="1"><text:bookmark-start text:name="__RefHeading___Toc227_771010674 Copy 1"/><text:span text:style-name="T5">P</text:span><text:span text:style-name="T6">roject</text:span><text:bookmark-end text:name="__RefHeading___Toc227_771010674 Copy 1"/></text:h>
      <text:h text:style-name="P22" text:outline-level="2"><text:bookmark-start text:name="__RefHeading___Toc908_3206075736 Copy 1 Copy 1"/><text:span text:style-name="Strong_20_Emphasis"><text:span text:style-name="T7">Delete</text:span></text:span><text:bookmark-end text:name="__RefHeading___Toc908_3206075736 Copy 1 Copy 1"/></text:h>
      <text:p text:style-name="P23"><text:span text:style-name="Strong_20_Emphasis"><text:span text:style-name="T8">Description</text:span></text:span></text:p>
      <text:p text:style-name="P23"><text:span text:style-name="Strong_20_Emphasis"><text:span text:style-name="T9">This API </text:span></text:span><text:span text:style-name="Strong_20_Emphasis"><text:span text:style-name="T10">logically</text:span></text:span><text:span text:style-name="Strong_20_Emphasis"><text:span text:style-name="T9"> deletes a “</text:span></text:span><text:span text:style-name="Strong_20_Emphasis"><text:span text:style-name="T11">project</text:span></text:span><text:span text:style-name="Strong_20_Emphasis"><text:span text:style-name="T9">” from the </text:span></text:span><text:span text:style-name="Strong_20_Emphasis"><text:span text:style-name="T11">project</text:span></text:span><text:span text:style-name="Strong_20_Emphasis"><text:span text:style-name="T12"> man</text:span></text:span><text:span text:style-name="Strong_20_Emphasis"><text:span text:style-name="T13">a</text:span></text:span><text:span text:style-name="Strong_20_Emphasis"><text:span text:style-name="T12">gement</text:span></text:span><text:span text:style-name="Strong_20_Emphasis"><text:span text:style-name="T9">.</text:span></text:span></text:p>
      <text:p text:style-name="P23"><text:span text:style-name="Strong_20_Emphasis"><text:span text:style-name="T14">Request CURL Sample</text:span></text:span></text:p>
      <table:table table:name="Table21" table:style-name="Table21">
        <table:table-column table:style-name="Table21.A"/>
        <table:table-row>
          <table:table-cell table:style-name="Table21.A1" office:value-type="string">
            <text:p text:style-name="P24">curl --request DELETE \</text:p>
            <text:p text:style-name="P24"><text:s text:c="2"/>--url 'https://[maindomian]/api/projectManagement/project/[id]' \</text:p>
            <text:p text:style-name="P24"><text:s text:c="2"/>--header 'Authorization: Bearer [token]'</text:p>
          </table:table-cell>
        </table:table-row>
      </table:table>
      <text:p text:style-name="P23"><text:span text:style-name="Strong_20_Emphasis"><text:span text:style-name="T15"/></text:span></text:p>
      <text:p text:style-name="P23"><text:span text:style-name="Strong_20_Emphasis"><text:span text:style-name="T14">Response Sample</text:span></text:span></text:p>
      <table:table table:name="Table22" table:style-name="Table22">
        <table:table-column table:style-name="Table22.A"/>
        <table:table-row>
          <table:table-cell table:style-name="Table22.A1" office:value-type="string">
            <text:p text:style-name="P24">{</text:p>
            <text:p text:style-name="P24"><text:tab/>"statusCode" : 200,</text:p>
            <text:p text:style-name="P24"><text:tab/>"status" : "success",</text:p>
            <text:p text:style-name="P24"><text:tab/>"message" : "The record is <text:span text:style-name="T16">deleted</text:span> successfully.",</text:p>
            <text:p text:style-name="P24"><text:tab/>"errorCode" : 0,</text:p>
            <text:p text:style-name="P24"><text:tab/>"data" : <text:span text:style-name="T16">null</text:span></text:p>
            <text:p text:style-name="P24">}</text:p>
          </table:table-cell>
        </table:table-row>
      </table:table>
      <text:p text:style-name="P23"><text:span text:style-name="Strong_20_Emphasis"/></text:p>
      <text:h text:style-name="P22" text:outline-level="2"><text:bookmark-start text:name="__RefHeading___Toc2079_720390006 Copy 1"/><text:span text:style-name="Strong_20_Emphasis"><text:span text:style-name="T7">Active</text:span></text:span><text:bookmark-end text:name="__RefHeading___Toc2079_720390006 Copy 1"/></text:h>
      <text:p text:style-name="P23"><text:span text:style-name="Strong_20_Emphasis"><text:span text:style-name="T8">Description</text:span></text:span></text:p>
      <text:p text:style-name="P23"><text:span text:style-name="Strong_20_Emphasis"><text:span text:style-name="T9">This API actives a “</text:span></text:span><text:span text:style-name="Strong_20_Emphasis"><text:span text:style-name="T11">project</text:span></text:span><text:span text:style-name="Strong_20_Emphasis"><text:span text:style-name="T9">” in the </text:span></text:span><text:span text:style-name="Strong_20_Emphasis"><text:span text:style-name="T11">project</text:span></text:span><text:span text:style-name="Strong_20_Emphasis"><text:span text:style-name="T12"> management</text:span></text:span><text:span text:style-name="Strong_20_Emphasis"><text:span text:style-name="T9">.</text:span></text:span></text:p>
      <text:p text:style-name="P23"><text:span text:style-name="Strong_20_Emphasis"><text:span text:style-name="T14">Request CURL Sample</text:span></text:span></text:p>
      <table:table table:name="Table23" table:style-name="Table23">
        <table:table-column table:style-name="Table23.A"/>
        <table:table-row>
          <table:table-cell table:style-name="Table23.A1" office:value-type="string">
            <text:p text:style-name="P24">curl --request PUT \</text:p>
            <text:p text:style-name="P24"><text:s text:c="2"/>--url 'https://[maindomian]/api/projectManagement/project/active/[id]' \</text:p>
            <text:p text:style-name="P24"><text:s text:c="2"/>--header 'Authorization: Bearer [token]'</text:p>
          </table:table-cell>
        </table:table-row>
      </table:table>
      <text:p text:style-name="P23"><text:span text:style-name="Strong_20_Emphasis"><text:span text:style-name="T15"/></text:span></text:p>
      <text:p text:style-name="P23"><text:soft-page-break/><text:span text:style-name="Strong_20_Emphasis"><text:span text:style-name="T14">Response Sample</text:span></text:span></text:p>
      <table:table table:name="Table24" table:style-name="Table24">
        <table:table-column table:style-name="Table24.A"/>
        <table:table-row>
          <table:table-cell table:style-name="Table24.A1" office:value-type="string">
            <text:p text:style-name="P24">{</text:p>
            <text:p text:style-name="P24"><text:tab/>"statusCode" : 200,</text:p>
            <text:p text:style-name="P24"><text:tab/>"status" : "success",</text:p>
            <text:p text:style-name="P24"><text:tab/>"message" : "The record is <text:span text:style-name="T16">activated</text:span> successfully.",</text:p>
            <text:p text:style-name="P24"><text:tab/>"errorCode" : 0,</text:p>
            <text:p text:style-name="P24"><text:tab/>"data" : <text:span text:style-name="T16">null</text:span></text:p>
            <text:p text:style-name="P24">}</text:p>
          </table:table-cell>
        </table:table-row>
      </table:table>
      <text:p text:style-name="P23"><text:span text:style-name="Strong_20_Emphasis"/></text:p>
      <text:h text:style-name="P22" text:outline-level="2"><text:bookmark-start text:name="__RefHeading___Toc2083_720390006 Copy 1"/><text:span text:style-name="Strong_20_Emphasis"><text:span text:style-name="T7">Inactive</text:span></text:span><text:bookmark-end text:name="__RefHeading___Toc2083_720390006 Copy 1"/></text:h>
      <text:p text:style-name="P23"><text:span text:style-name="Strong_20_Emphasis"><text:span text:style-name="T8">Description</text:span></text:span></text:p>
      <text:p text:style-name="P23"><text:span text:style-name="Strong_20_Emphasis"><text:span text:style-name="T9">This API </text:span></text:span><text:span text:style-name="Strong_20_Emphasis"><text:span text:style-name="T17">in</text:span></text:span><text:span text:style-name="Strong_20_Emphasis"><text:span text:style-name="T9">-actives a specific “</text:span></text:span><text:span text:style-name="Strong_20_Emphasis"><text:span text:style-name="T11">project</text:span></text:span><text:span text:style-name="Strong_20_Emphasis"><text:span text:style-name="T9">” in the </text:span></text:span><text:span text:style-name="Strong_20_Emphasis"><text:span text:style-name="T11">project</text:span></text:span><text:span text:style-name="Strong_20_Emphasis"><text:span text:style-name="T12"> management</text:span></text:span><text:span text:style-name="Strong_20_Emphasis"><text:span text:style-name="T9">.</text:span></text:span></text:p>
      <text:p text:style-name="P23"><text:span text:style-name="Strong_20_Emphasis"><text:span text:style-name="T14">Request CURL Sample</text:span></text:span></text:p>
      <table:table table:name="Table25" table:style-name="Table25">
        <table:table-column table:style-name="Table25.A"/>
        <table:table-row>
          <table:table-cell table:style-name="Table25.A1" office:value-type="string">
            <text:p text:style-name="P24">curl --request PUT \</text:p>
            <text:p text:style-name="P24"><text:s text:c="2"/>--url 'https://[maindomian]/api/projectManagement/project/Inactive/[id]' \</text:p>
            <text:p text:style-name="P24"><text:s text:c="2"/>--header 'Authorization: Bearer [token]'</text:p>
          </table:table-cell>
        </table:table-row>
      </table:table>
      <text:p text:style-name="P23"><text:span text:style-name="Strong_20_Emphasis"><text:span text:style-name="T15"/></text:span></text:p>
      <text:p text:style-name="P23"><text:span text:style-name="Strong_20_Emphasis"><text:span text:style-name="T14">Response Sample</text:span></text:span></text:p>
      <table:table table:name="Table26" table:style-name="Table26">
        <table:table-column table:style-name="Table26.A"/>
        <table:table-row>
          <table:table-cell table:style-name="Table26.A1" office:value-type="string">
            <text:p text:style-name="P24">{</text:p>
            <text:p text:style-name="P24"><text:tab/>"statusCode" : 200,</text:p>
            <text:p text:style-name="P24"><text:tab/>"status" : "success",</text:p>
            <text:p text:style-name="P24"><text:tab/>"message" : "The record is <text:span text:style-name="T18">in</text:span><text:span text:style-name="T16">activated</text:span> successfully.",</text:p>
            <text:p text:style-name="P24"><text:tab/>"errorCode" : 0,</text:p>
            <text:p text:style-name="P24"><text:tab/>"data" : <text:span text:style-name="T16">null</text:span></text:p>
            <text:p text:style-name="P24">}</text:p>
          </table:table-cell>
        </table:table-row>
      </table:table>
      <text:p text:style-name="P23"><text:span text:style-name="Strong_20_Emphasis"/></text:p>
      <text:h text:style-name="P22" text:outline-level="2"><text:bookmark-start text:name="__RefHeading___Toc2085_720390006 Copy 1"/><text:span text:style-name="Strong_20_Emphasis"><text:span text:style-name="T7">Fetch Specific Record</text:span></text:span><text:bookmark-end text:name="__RefHeading___Toc2085_720390006 Copy 1"/></text:h>
      <text:p text:style-name="P23"><text:span text:style-name="Strong_20_Emphasis"><text:span text:style-name="T8">Description</text:span></text:span></text:p>
      <text:p text:style-name="P23"><text:span text:style-name="Strong_20_Emphasis"><text:span text:style-name="T9">This API </text:span></text:span><text:span text:style-name="Strong_20_Emphasis"><text:span text:style-name="T19">returns</text:span></text:span><text:span text:style-name="Strong_20_Emphasis"><text:span text:style-name="T9"> a specific “</text:span></text:span><text:span text:style-name="Strong_20_Emphasis"><text:span text:style-name="T11">project</text:span></text:span><text:span text:style-name="Strong_20_Emphasis"><text:span text:style-name="T9">” </text:span></text:span><text:span text:style-name="Strong_20_Emphasis"><text:span text:style-name="T19">from</text:span></text:span><text:span text:style-name="Strong_20_Emphasis"><text:span text:style-name="T9"> the </text:span></text:span><text:span text:style-name="Strong_20_Emphasis"><text:span text:style-name="T11">project</text:span></text:span><text:span text:style-name="Strong_20_Emphasis"><text:span text:style-name="T20"> management</text:span></text:span><text:span text:style-name="Strong_20_Emphasis"><text:span text:style-name="T9">.</text:span></text:span></text:p>
      <text:p text:style-name="P23"><text:span text:style-name="Strong_20_Emphasis"><text:span text:style-name="T14">Request CURL Sample</text:span></text:span></text:p>
      <table:table table:name="Table27" table:style-name="Table27">
        <table:table-column table:style-name="Table27.A"/>
        <text:soft-page-break/>
        <table:table-row>
          <table:table-cell table:style-name="Table27.A1" office:value-type="string">
            <text:p text:style-name="P24">curl --request GET \</text:p>
            <text:p text:style-name="P24"><text:s text:c="2"/>--url 'https://[maindomian]/api/projectManagement/project/[id]' \</text:p>
            <text:p text:style-name="P24"><text:s text:c="2"/>--header 'Authorization: Bearer [token]'</text:p>
          </table:table-cell>
        </table:table-row>
      </table:table>
      <text:p text:style-name="P23"><text:span text:style-name="Strong_20_Emphasis"><text:span text:style-name="T15"/></text:span></text:p>
      <text:p text:style-name="P23"><text:span text:style-name="Strong_20_Emphasis"><text:span text:style-name="T14">Response Sample</text:span></text:span></text:p>
      <table:table table:name="Table28" table:style-name="Table28">
        <table:table-column table:style-name="Table28.A"/>
        <table:table-row>
          <table:table-cell table:style-name="Table28.A1" office:value-type="string">
            <text:p text:style-name="P24">{</text:p>
            <text:p text:style-name="P24"><text:tab/>"statusCode" : 200,</text:p>
            <text:p text:style-name="P24"><text:tab/>"status" : "success",</text:p>
            <text:p text:style-name="P24"><text:tab/>"message" : "The data is returned successfully.",</text:p>
            <text:p text:style-name="P24"><text:tab/>"errorCode" : 0,</text:p>
            <text:p text:style-name="P24"><text:tab/>"data" : {</text:p>
            <text:p text:style-name="P24"><text:tab/><text:tab/>"id" : 16621244611384550112, </text:p>
            <text:p text:style-name="P24"><text:tab/><text:tab/>"title" : "test",</text:p>
            <text:p text:style-name="P24"><text:tab/><text:tab/>"code" : "123",</text:p>
            <text:p text:style-name="P24"><text:tab/><text:tab/>"description" : "test",</text:p>
            <text:p text:style-name="P24"><text:tab/><text:tab/>"profileId": [{</text:p>
            <text:p text:style-name="P24"><text:tab/><text:tab/><text:tab/>"id" : 16621244611384550113,</text:p>
            <text:p text:style-name="P24"><text:tab/><text:tab/><text:tab/>"firstName": "David",</text:p>
            <text:p text:style-name="P24"><text:tab/><text:tab/><text:tab/>"lastName": "Talor"</text:p>
            <text:p text:style-name="P24"><text:tab/><text:tab/>}],</text:p>
            <text:p text:style-name="P24"><text:tab/><text:tab/>"roleFormPermissionId": [{</text:p>
            <text:p text:style-name="P24"><text:tab/><text:tab/><text:tab/>"id" : 16621244611384550114,</text:p>
            <text:p text:style-name="P24"><text:tab/><text:tab/><text:tab/>"formPermissionId": {</text:p>
            <text:p text:style-name="P24"><text:tab/><text:tab/><text:tab/><text:tab/>"id" : 16621244611384550114,</text:p>
            <text:p text:style-name="P24"><text:tab/><text:tab/><text:tab/><text:tab/>"formId": {</text:p>
            <text:p text:style-name="P24"><text:tab/><text:tab/><text:tab/><text:tab/><text:tab/>"id" : 16621244611384550115,</text:p>
            <text:p text:style-name="P24"><text:tab/><text:tab/><text:tab/><text:tab/><text:tab/>"title": "Project"</text:p>
            <text:p text:style-name="P24"><text:tab/><text:tab/><text:tab/><text:tab/>},</text:p>
            <text:p text:style-name="P24"><text:tab/><text:tab/><text:tab/><text:tab/>"permissionId": {</text:p>
            <text:p text:style-name="P24"><text:tab/><text:tab/><text:tab/><text:tab/><text:tab/>"id" : 16621244611384550116,</text:p>
            <text:p text:style-name="P24"><text:tab/><text:tab/><text:tab/><text:tab/><text:tab/>"title": "Add"</text:p>
            <text:p text:style-name="P24"><text:tab/><text:tab/><text:tab/><text:tab/>}</text:p>
            <text:p text:style-name="P24"><text:tab/><text:tab/><text:tab/>}</text:p>
            <text:p text:style-name="P24"><text:tab/><text:tab/>}],</text:p>
            <text:p text:style-name="P24"><text:tab/><text:tab/>"createdAt" : "2025-8-25 12:00:00",</text:p>
            <text:p text:style-name="P24"><text:tab/><text:tab/>"createdBy" : "John Davis" </text:p>
            <text:p text:style-name="P24"><text:tab/>}</text:p>
            <text:p text:style-name="P24">}</text:p>
          </table:table-cell>
        </table:table-row>
      </table:table>
      <text:p text:style-name="P23"/>
      <text:h text:style-name="P25" text:outline-level="1"><text:bookmark-start text:name="__RefHeading___Toc227_771010674 Copy 1 Copy 1"/><text:soft-page-break/><text:span text:style-name="T5">P</text:span><text:span text:style-name="T6">roject </text:span><text:span text:style-name="T21">Profile Member</text:span><text:bookmark-end text:name="__RefHeading___Toc227_771010674 Copy 1 Copy 1"/></text:h>
      <text:h text:style-name="P26" text:outline-level="2"><text:bookmark-start text:name="__RefHeading___Toc908_3206075736 Copy 1 Copy 1 Copy 1"/><text:span text:style-name="Strong_20_Emphasis"><text:span text:style-name="T7">Delete</text:span></text:span><text:bookmark-end text:name="__RefHeading___Toc908_3206075736 Copy 1 Copy 1 Copy 1"/></text:h>
      <text:p text:style-name="P27"><text:span text:style-name="Strong_20_Emphasis"><text:span text:style-name="T8">Description</text:span></text:span></text:p>
      <text:p text:style-name="P27"><text:span text:style-name="Strong_20_Emphasis"><text:span text:style-name="T9">This API </text:span></text:span><text:span text:style-name="Strong_20_Emphasis"><text:span text:style-name="T10">logically</text:span></text:span><text:span text:style-name="Strong_20_Emphasis"><text:span text:style-name="T9"> deletes a “</text:span></text:span><text:span text:style-name="Strong_20_Emphasis"><text:span text:style-name="T11">project </text:span></text:span><text:span text:style-name="Strong_20_Emphasis"><text:span text:style-name="T22">profile member</text:span></text:span><text:span text:style-name="Strong_20_Emphasis"><text:span text:style-name="T9">” from the </text:span></text:span><text:span text:style-name="Strong_20_Emphasis"><text:span text:style-name="T11">project</text:span></text:span><text:span text:style-name="Strong_20_Emphasis"><text:span text:style-name="T12"> man</text:span></text:span><text:span text:style-name="Strong_20_Emphasis"><text:span text:style-name="T13">a</text:span></text:span><text:span text:style-name="Strong_20_Emphasis"><text:span text:style-name="T12">gement</text:span></text:span><text:span text:style-name="Strong_20_Emphasis"><text:span text:style-name="T9">.</text:span></text:span></text:p>
      <text:p text:style-name="P27"><text:span text:style-name="Strong_20_Emphasis"><text:span text:style-name="T14">Request CURL Sample</text:span>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8">curl --request DELETE \</text:p>
            <text:p text:style-name="P28"><text:s text:c="2"/>--url 'https://[maindomian]/api/projectManagement/projectProfileMember/[id]' \</text:p>
            <text:p text:style-name="P28"><text:s text:c="2"/>--header 'Authorization: Bearer [token]'</text:p>
          </table:table-cell>
        </table:table-row>
      </table:table>
      <text:p text:style-name="P27"><text:span text:style-name="Strong_20_Emphasis"><text:span text:style-name="T15"/></text:span></text:p>
      <text:p text:style-name="P27"><text:span text:style-name="Strong_20_Emphasis"><text:span text:style-name="T14">Response Sample</text:span>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8">{</text:p>
            <text:p text:style-name="P28"><text:tab/>"statusCode" : 200,</text:p>
            <text:p text:style-name="P28"><text:tab/>"status" : "success",</text:p>
            <text:p text:style-name="P28"><text:tab/>"message" : "The record is <text:span text:style-name="T16">deleted</text:span> successfully.",</text:p>
            <text:p text:style-name="P28"><text:tab/>"errorCode" : 0,</text:p>
            <text:p text:style-name="P28"><text:tab/>"data" : <text:span text:style-name="T16">null</text:span></text:p>
            <text:p text:style-name="P28">}</text:p>
          </table:table-cell>
        </table:table-row>
      </table:table>
      <text:p text:style-name="P27"><text:span text:style-name="Strong_20_Emphasis"/></text:p>
      <text:h text:style-name="P26" text:outline-level="2"><text:bookmark-start text:name="__RefHeading___Toc2079_720390006 Copy 1 Copy 1"/><text:span text:style-name="Strong_20_Emphasis"><text:span text:style-name="T7">Active</text:span></text:span><text:bookmark-end text:name="__RefHeading___Toc2079_720390006 Copy 1 Copy 1"/></text:h>
      <text:p text:style-name="P27"><text:span text:style-name="Strong_20_Emphasis"><text:span text:style-name="T8">Description</text:span></text:span></text:p>
      <text:p text:style-name="P27"><text:span text:style-name="Strong_20_Emphasis"><text:span text:style-name="T9">This API actives a “</text:span></text:span><text:span text:style-name="Strong_20_Emphasis"><text:span text:style-name="T11">project </text:span></text:span><text:span text:style-name="Strong_20_Emphasis"><text:span text:style-name="T22">profile member</text:span></text:span><text:span text:style-name="Strong_20_Emphasis"><text:span text:style-name="T9">” in the </text:span></text:span><text:span text:style-name="Strong_20_Emphasis"><text:span text:style-name="T11">project</text:span></text:span><text:span text:style-name="Strong_20_Emphasis"><text:span text:style-name="T12"> management</text:span></text:span><text:span text:style-name="Strong_20_Emphasis"><text:span text:style-name="T9">.</text:span></text:span></text:p>
      <text:p text:style-name="P27"><text:span text:style-name="Strong_20_Emphasis"><text:span text:style-name="T14">Request CURL Sample</text:span>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8">curl --request PUT \</text:p>
            <text:p text:style-name="P28"><text:s text:c="2"/>--url 'https://[maindomian]/api/projectManagement/projectProfileMember/active/[id]' \</text:p>
            <text:p text:style-name="P28"><text:s text:c="2"/>--header 'Authorization: Bearer [token]'</text:p>
          </table:table-cell>
        </table:table-row>
      </table:table>
      <text:p text:style-name="P27"><text:span text:style-name="Strong_20_Emphasis"><text:span text:style-name="T15"/></text:span></text:p>
      <text:p text:style-name="P27"><text:span text:style-name="Strong_20_Emphasis"><text:span text:style-name="T14">Response Sample</text:span></text:span></text:p>
      <table:table table:name="Table4" table:style-name="Table4">
        <table:table-column table:style-name="Table4.A"/>
        <text:soft-page-break/>
        <table:table-row>
          <table:table-cell table:style-name="Table4.A1" office:value-type="string">
            <text:p text:style-name="P28">{</text:p>
            <text:p text:style-name="P28"><text:tab/>"statusCode" : 200,</text:p>
            <text:p text:style-name="P28"><text:tab/>"status" : "success",</text:p>
            <text:p text:style-name="P28"><text:tab/>"message" : "The record is <text:span text:style-name="T16">activated</text:span> successfully.",</text:p>
            <text:p text:style-name="P28"><text:tab/>"errorCode" : 0,</text:p>
            <text:p text:style-name="P28"><text:tab/>"data" : <text:span text:style-name="T16">null</text:span></text:p>
            <text:p text:style-name="P28">}</text:p>
          </table:table-cell>
        </table:table-row>
      </table:table>
      <text:p text:style-name="P27"><text:span text:style-name="Strong_20_Emphasis"/></text:p>
      <text:h text:style-name="P26" text:outline-level="2"><text:bookmark-start text:name="__RefHeading___Toc2083_720390006 Copy 1 Copy 1"/><text:span text:style-name="Strong_20_Emphasis"><text:span text:style-name="T7">Inactive</text:span></text:span><text:bookmark-end text:name="__RefHeading___Toc2083_720390006 Copy 1 Copy 1"/></text:h>
      <text:p text:style-name="P27"><text:span text:style-name="Strong_20_Emphasis"><text:span text:style-name="T8">Description</text:span></text:span></text:p>
      <text:p text:style-name="P27"><text:span text:style-name="Strong_20_Emphasis"><text:span text:style-name="T9">This API </text:span></text:span><text:span text:style-name="Strong_20_Emphasis"><text:span text:style-name="T17">in</text:span></text:span><text:span text:style-name="Strong_20_Emphasis"><text:span text:style-name="T9">-actives a specific “</text:span></text:span><text:span text:style-name="Strong_20_Emphasis"><text:span text:style-name="T11">project </text:span></text:span><text:span text:style-name="Strong_20_Emphasis"><text:span text:style-name="T22">profile member</text:span></text:span><text:span text:style-name="Strong_20_Emphasis"><text:span text:style-name="T9">” in the </text:span></text:span><text:span text:style-name="Strong_20_Emphasis"><text:span text:style-name="T11">project</text:span></text:span><text:span text:style-name="Strong_20_Emphasis"><text:span text:style-name="T12"> management</text:span></text:span><text:span text:style-name="Strong_20_Emphasis"><text:span text:style-name="T9">.</text:span></text:span></text:p>
      <text:p text:style-name="P27"><text:span text:style-name="Strong_20_Emphasis"><text:span text:style-name="T14">Request CURL Sample</text:span>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28">curl --request PUT \</text:p>
            <text:p text:style-name="P28"><text:s text:c="2"/>--url 'https://[maindomian]/api/projectManagement/projectProfileMember/inactive/[id]' \</text:p>
            <text:p text:style-name="P28"><text:s text:c="2"/>--header 'Authorization: Bearer [token]'</text:p>
          </table:table-cell>
        </table:table-row>
      </table:table>
      <text:p text:style-name="P27"><text:span text:style-name="Strong_20_Emphasis"><text:span text:style-name="T15"/></text:span></text:p>
      <text:p text:style-name="P27"><text:span text:style-name="Strong_20_Emphasis"><text:span text:style-name="T14">Response Sample</text:span>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28">{</text:p>
            <text:p text:style-name="P28"><text:tab/>"statusCode" : 200,</text:p>
            <text:p text:style-name="P28"><text:tab/>"status" : "success",</text:p>
            <text:p text:style-name="P28"><text:tab/>"message" : "The record is <text:span text:style-name="T18">in</text:span><text:span text:style-name="T16">activated</text:span> successfully.",</text:p>
            <text:p text:style-name="P28"><text:tab/>"errorCode" : 0,</text:p>
            <text:p text:style-name="P28"><text:tab/>"data" : <text:span text:style-name="T16">null</text:span></text:p>
            <text:p text:style-name="P28">}</text:p>
          </table:table-cell>
        </table:table-row>
      </table:table>
      <text:p text:style-name="P27"><text:span text:style-name="Strong_20_Emphasis"/></text:p>
      <text:h text:style-name="P26" text:outline-level="2"><text:bookmark-start text:name="__RefHeading___Toc2085_720390006 Copy 1 Copy 1"/><text:span text:style-name="Strong_20_Emphasis"><text:span text:style-name="T7">Fetch Specific Record</text:span></text:span><text:bookmark-end text:name="__RefHeading___Toc2085_720390006 Copy 1 Copy 1"/></text:h>
      <text:p text:style-name="P27"><text:span text:style-name="Strong_20_Emphasis"><text:span text:style-name="T8">Description</text:span></text:span></text:p>
      <text:p text:style-name="P27"><text:span text:style-name="Strong_20_Emphasis"><text:span text:style-name="T9">This API </text:span></text:span><text:span text:style-name="Strong_20_Emphasis"><text:span text:style-name="T19">returns</text:span></text:span><text:span text:style-name="Strong_20_Emphasis"><text:span text:style-name="T9"> a specific “</text:span></text:span><text:span text:style-name="Strong_20_Emphasis"><text:span text:style-name="T11">project </text:span></text:span><text:span text:style-name="Strong_20_Emphasis"><text:span text:style-name="T22">profile member</text:span></text:span><text:span text:style-name="Strong_20_Emphasis"><text:span text:style-name="T9">” </text:span></text:span><text:span text:style-name="Strong_20_Emphasis"><text:span text:style-name="T19">from</text:span></text:span><text:span text:style-name="Strong_20_Emphasis"><text:span text:style-name="T9"> the </text:span></text:span><text:span text:style-name="Strong_20_Emphasis"><text:span text:style-name="T11">project</text:span></text:span><text:span text:style-name="Strong_20_Emphasis"><text:span text:style-name="T20"> management</text:span></text:span><text:span text:style-name="Strong_20_Emphasis"><text:span text:style-name="T9">.</text:span></text:span></text:p>
      <text:p text:style-name="P27"><text:span text:style-name="Strong_20_Emphasis"><text:span text:style-name="T14">Request CURL Sample</text:span>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28">curl --request GET \</text:p>
            <text:p text:style-name="P28"><text:soft-page-break/><text:s text:c="2"/>--url 'https://[maindomian]/api/projectManagement/projectProfileMember/[id]' \</text:p>
            <text:p text:style-name="P28"><text:s text:c="2"/>--header 'Authorization: Bearer [token]'</text:p>
          </table:table-cell>
        </table:table-row>
      </table:table>
      <text:p text:style-name="P27"><text:span text:style-name="Strong_20_Emphasis"><text:span text:style-name="T15"/></text:span></text:p>
      <text:p text:style-name="P27"><text:span text:style-name="Strong_20_Emphasis"><text:span text:style-name="T14">Response Sample</text:span>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28">{</text:p>
            <text:p text:style-name="P28"><text:tab/>"statusCode" : 200,</text:p>
            <text:p text:style-name="P28"><text:tab/>"status" : "success",</text:p>
            <text:p text:style-name="P28"><text:tab/>"message" : "The data is returned successfully.",</text:p>
            <text:p text:style-name="P28"><text:tab/>"errorCode" : 0,</text:p>
            <text:p text:style-name="P28"><text:tab/>"data" : {</text:p>
            <text:p text:style-name="P28"><text:tab/><text:tab/>"id" : 16621244611384550112, </text:p>
            <text:p text:style-name="P28"><text:tab/><text:tab/>"title" : "test",</text:p>
            <text:p text:style-name="P28"><text:tab/><text:tab/>"code" : "123",</text:p>
            <text:p text:style-name="P28"><text:tab/><text:tab/>"description" : "test",</text:p>
            <text:p text:style-name="P28"><text:tab/><text:tab/>"profileId": [{</text:p>
            <text:p text:style-name="P28"><text:tab/><text:tab/><text:tab/>"id" : 16621244611384550113,</text:p>
            <text:p text:style-name="P28"><text:tab/><text:tab/><text:tab/>"firstName": "David",</text:p>
            <text:p text:style-name="P28"><text:tab/><text:tab/><text:tab/>"lastName": "Talor"</text:p>
            <text:p text:style-name="P28"><text:tab/><text:tab/>}],</text:p>
            <text:p text:style-name="P28"><text:tab/><text:tab/>"roleFormPermissionId": [{</text:p>
            <text:p text:style-name="P28"><text:tab/><text:tab/><text:tab/>"id" : 16621244611384550114,</text:p>
            <text:p text:style-name="P28"><text:tab/><text:tab/><text:tab/>"formPermissionId": {</text:p>
            <text:p text:style-name="P28"><text:tab/><text:tab/><text:tab/><text:tab/>"id" : 16621244611384550114,</text:p>
            <text:p text:style-name="P28"><text:tab/><text:tab/><text:tab/><text:tab/>"formId": {</text:p>
            <text:p text:style-name="P28"><text:tab/><text:tab/><text:tab/><text:tab/><text:tab/>"id" : 16621244611384550115,</text:p>
            <text:p text:style-name="P28"><text:tab/><text:tab/><text:tab/><text:tab/><text:tab/>"title": "Project"</text:p>
            <text:p text:style-name="P28"><text:tab/><text:tab/><text:tab/><text:tab/>},</text:p>
            <text:p text:style-name="P28"><text:tab/><text:tab/><text:tab/><text:tab/>"permissionId": {</text:p>
            <text:p text:style-name="P28"><text:tab/><text:tab/><text:tab/><text:tab/><text:tab/>"id" : 16621244611384550116,</text:p>
            <text:p text:style-name="P28"><text:tab/><text:tab/><text:tab/><text:tab/><text:tab/>"title": "Add"</text:p>
            <text:p text:style-name="P28"><text:tab/><text:tab/><text:tab/><text:tab/>}</text:p>
            <text:p text:style-name="P28"><text:tab/><text:tab/><text:tab/>}</text:p>
            <text:p text:style-name="P28"><text:tab/><text:tab/>}],</text:p>
            <text:p text:style-name="P28"><text:tab/><text:tab/>"createdAt" : "2025-8-25 12:00:00",</text:p>
            <text:p text:style-name="P28"><text:tab/><text:tab/>"createdBy" : "John Davis" </text:p>
            <text:p text:style-name="P28"><text:tab/>}</text:p>
            <text:p text:style-name="P28">}</text:p>
          </table:table-cell>
        </table:table-row>
      </table:table>
      <text:p text:style-name="P27"><text:span text:style-name="Strong_20_Emphasis"/></text:p>
      <text:h text:style-name="P25" text:outline-level="1"><text:bookmark-start text:name="__RefHeading___Toc227_771010674 Copy 1 Copy 1 Copy 1"/><text:soft-page-break/><text:span text:style-name="T5">P</text:span><text:span text:style-name="T6">roject </text:span><text:span text:style-name="T21">Group Member</text:span><text:bookmark-end text:name="__RefHeading___Toc227_771010674 Copy 1 Copy 1 Copy 1"/></text:h>
      <text:h text:style-name="P26" text:outline-level="2"><text:bookmark-start text:name="__RefHeading___Toc908_3206075736 Copy 1 Copy 1 Copy 1 Copy 1"/><text:span text:style-name="Strong_20_Emphasis"><text:span text:style-name="T7">Delete</text:span></text:span><text:bookmark-end text:name="__RefHeading___Toc908_3206075736 Copy 1 Copy 1 Copy 1 Copy 1"/></text:h>
      <text:p text:style-name="P27"><text:span text:style-name="Strong_20_Emphasis"><text:span text:style-name="T8">Description</text:span></text:span></text:p>
      <text:p text:style-name="P27"><text:span text:style-name="Strong_20_Emphasis"><text:span text:style-name="T9">This API </text:span></text:span><text:span text:style-name="Strong_20_Emphasis"><text:span text:style-name="T10">logically</text:span></text:span><text:span text:style-name="Strong_20_Emphasis"><text:span text:style-name="T9"> deletes a “</text:span></text:span><text:span text:style-name="Strong_20_Emphasis"><text:span text:style-name="T11">project </text:span></text:span><text:span text:style-name="Strong_20_Emphasis"><text:span text:style-name="T22">group member</text:span></text:span><text:span text:style-name="Strong_20_Emphasis"><text:span text:style-name="T9">” from the </text:span></text:span><text:span text:style-name="Strong_20_Emphasis"><text:span text:style-name="T11">project</text:span></text:span><text:span text:style-name="Strong_20_Emphasis"><text:span text:style-name="T12"> man</text:span></text:span><text:span text:style-name="Strong_20_Emphasis"><text:span text:style-name="T13">a</text:span></text:span><text:span text:style-name="Strong_20_Emphasis"><text:span text:style-name="T12">gement</text:span></text:span><text:span text:style-name="Strong_20_Emphasis"><text:span text:style-name="T9">.</text:span></text:span></text:p>
      <text:p text:style-name="P27"><text:span text:style-name="Strong_20_Emphasis"><text:span text:style-name="T14">Request CURL Sample</text:span>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28">curl --request DELETE \</text:p>
            <text:p text:style-name="P28"><text:s text:c="2"/>--url 'https://[maindomian]/api/projectManagement/projectGroupMember/[id]' \</text:p>
            <text:p text:style-name="P28"><text:s text:c="2"/>--header 'Authorization: Bearer [token]'</text:p>
          </table:table-cell>
        </table:table-row>
      </table:table>
      <text:p text:style-name="P27"><text:span text:style-name="Strong_20_Emphasis"><text:span text:style-name="T15"/></text:span></text:p>
      <text:p text:style-name="P27"><text:span text:style-name="Strong_20_Emphasis"><text:span text:style-name="T14">Response Sample</text:span>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28">{</text:p>
            <text:p text:style-name="P28"><text:tab/>"statusCode" : 200,</text:p>
            <text:p text:style-name="P28"><text:tab/>"status" : "success",</text:p>
            <text:p text:style-name="P28"><text:tab/>"message" : "The record is <text:span text:style-name="T16">deleted</text:span> successfully.",</text:p>
            <text:p text:style-name="P28"><text:tab/>"errorCode" : 0,</text:p>
            <text:p text:style-name="P28"><text:tab/>"data" : <text:span text:style-name="T16">null</text:span></text:p>
            <text:p text:style-name="P28">}</text:p>
          </table:table-cell>
        </table:table-row>
      </table:table>
      <text:p text:style-name="P27"><text:span text:style-name="Strong_20_Emphasis"/></text:p>
      <text:h text:style-name="P26" text:outline-level="2"><text:bookmark-start text:name="__RefHeading___Toc2079_720390006 Copy 1 Copy 1 Copy 1"/><text:span text:style-name="Strong_20_Emphasis"><text:span text:style-name="T7">Active</text:span></text:span><text:bookmark-end text:name="__RefHeading___Toc2079_720390006 Copy 1 Copy 1 Copy 1"/></text:h>
      <text:p text:style-name="P27"><text:span text:style-name="Strong_20_Emphasis"><text:span text:style-name="T8">Description</text:span></text:span></text:p>
      <text:p text:style-name="P27"><text:span text:style-name="Strong_20_Emphasis"><text:span text:style-name="T9">This API actives a “</text:span></text:span><text:span text:style-name="Strong_20_Emphasis"><text:span text:style-name="T11">project </text:span></text:span><text:span text:style-name="Strong_20_Emphasis"><text:span text:style-name="T22">group member</text:span></text:span><text:span text:style-name="Strong_20_Emphasis"><text:span text:style-name="T9">” in the </text:span></text:span><text:span text:style-name="Strong_20_Emphasis"><text:span text:style-name="T11">project</text:span></text:span><text:span text:style-name="Strong_20_Emphasis"><text:span text:style-name="T12"> management</text:span></text:span><text:span text:style-name="Strong_20_Emphasis"><text:span text:style-name="T9">.</text:span></text:span></text:p>
      <text:p text:style-name="P27"><text:span text:style-name="Strong_20_Emphasis"><text:span text:style-name="T14">Request CURL Sample</text:span></text:span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28">curl --request PUT \</text:p>
            <text:p text:style-name="P28"><text:s text:c="2"/>--url 'https://[maindomian]/api/projectManagement/projectGroupMember/active/[id]' \</text:p>
            <text:p text:style-name="P28"><text:s text:c="2"/>--header 'Authorization: Bearer [token]'</text:p>
          </table:table-cell>
        </table:table-row>
      </table:table>
      <text:p text:style-name="P27"><text:span text:style-name="Strong_20_Emphasis"><text:span text:style-name="T15"/></text:span></text:p>
      <text:p text:style-name="P27"><text:span text:style-name="Strong_20_Emphasis"><text:span text:style-name="T14">Response Sample</text:span></text:span></text:p>
      <table:table table:name="Table12" table:style-name="Table12">
        <table:table-column table:style-name="Table12.A"/>
        <text:soft-page-break/>
        <table:table-row>
          <table:table-cell table:style-name="Table12.A1" office:value-type="string">
            <text:p text:style-name="P28">{</text:p>
            <text:p text:style-name="P28"><text:tab/>"statusCode" : 200,</text:p>
            <text:p text:style-name="P28"><text:tab/>"status" : "success",</text:p>
            <text:p text:style-name="P28"><text:tab/>"message" : "The record is <text:span text:style-name="T16">activated</text:span> successfully.",</text:p>
            <text:p text:style-name="P28"><text:tab/>"errorCode" : 0,</text:p>
            <text:p text:style-name="P28"><text:tab/>"data" : <text:span text:style-name="T16">null</text:span></text:p>
            <text:p text:style-name="P28">}</text:p>
          </table:table-cell>
        </table:table-row>
      </table:table>
      <text:p text:style-name="P27"><text:span text:style-name="Strong_20_Emphasis"/></text:p>
      <text:h text:style-name="P26" text:outline-level="2"><text:bookmark-start text:name="__RefHeading___Toc2083_720390006 Copy 1 Copy 1 Copy 1"/><text:span text:style-name="Strong_20_Emphasis"><text:span text:style-name="T7">Inactive</text:span></text:span><text:bookmark-end text:name="__RefHeading___Toc2083_720390006 Copy 1 Copy 1 Copy 1"/></text:h>
      <text:p text:style-name="P27"><text:span text:style-name="Strong_20_Emphasis"><text:span text:style-name="T8">Description</text:span></text:span></text:p>
      <text:p text:style-name="P27"><text:span text:style-name="Strong_20_Emphasis"><text:span text:style-name="T9">This API </text:span></text:span><text:span text:style-name="Strong_20_Emphasis"><text:span text:style-name="T17">in</text:span></text:span><text:span text:style-name="Strong_20_Emphasis"><text:span text:style-name="T9">-actives a specific “</text:span></text:span><text:span text:style-name="Strong_20_Emphasis"><text:span text:style-name="T11">project </text:span></text:span><text:span text:style-name="Strong_20_Emphasis"><text:span text:style-name="T22">group member</text:span></text:span><text:span text:style-name="Strong_20_Emphasis"><text:span text:style-name="T9">” in the </text:span></text:span><text:span text:style-name="Strong_20_Emphasis"><text:span text:style-name="T11">project</text:span></text:span><text:span text:style-name="Strong_20_Emphasis"><text:span text:style-name="T12"> management</text:span></text:span><text:span text:style-name="Strong_20_Emphasis"><text:span text:style-name="T9">.</text:span></text:span></text:p>
      <text:p text:style-name="P27"><text:span text:style-name="Strong_20_Emphasis"><text:span text:style-name="T14">Request CURL Sample</text:span></text:span>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28">curl --request PUT \</text:p>
            <text:p text:style-name="P28"><text:s text:c="2"/>--url 'https://[maindomian]/api/projectManagement/projectGroupMember/inactive/[id]' \</text:p>
            <text:p text:style-name="P28"><text:s text:c="2"/>--header 'Authorization: Bearer [token]'</text:p>
          </table:table-cell>
        </table:table-row>
      </table:table>
      <text:p text:style-name="P27"><text:span text:style-name="Strong_20_Emphasis"><text:span text:style-name="T15"/></text:span></text:p>
      <text:p text:style-name="P27"><text:span text:style-name="Strong_20_Emphasis"><text:span text:style-name="T14">Response Sample</text:span></text:span>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28">{</text:p>
            <text:p text:style-name="P28"><text:tab/>"statusCode" : 200,</text:p>
            <text:p text:style-name="P28"><text:tab/>"status" : "success",</text:p>
            <text:p text:style-name="P28"><text:tab/>"message" : "The record is <text:span text:style-name="T18">in</text:span><text:span text:style-name="T16">activated</text:span> successfully.",</text:p>
            <text:p text:style-name="P28"><text:tab/>"errorCode" : 0,</text:p>
            <text:p text:style-name="P28"><text:tab/>"data" : <text:span text:style-name="T16">null</text:span></text:p>
            <text:p text:style-name="P28">}</text:p>
          </table:table-cell>
        </table:table-row>
      </table:table>
      <text:p text:style-name="P27"><text:span text:style-name="Strong_20_Emphasis"/></text:p>
      <text:h text:style-name="P26" text:outline-level="2"><text:bookmark-start text:name="__RefHeading___Toc2085_720390006 Copy 1 Copy 1 Copy 1"/><text:span text:style-name="Strong_20_Emphasis"><text:span text:style-name="T7">Fetch Specific Record</text:span></text:span><text:bookmark-end text:name="__RefHeading___Toc2085_720390006 Copy 1 Copy 1 Copy 1"/></text:h>
      <text:p text:style-name="P27"><text:span text:style-name="Strong_20_Emphasis"><text:span text:style-name="T8">Description</text:span></text:span></text:p>
      <text:p text:style-name="P27"><text:span text:style-name="Strong_20_Emphasis"><text:span text:style-name="T9">This API </text:span></text:span><text:span text:style-name="Strong_20_Emphasis"><text:span text:style-name="T19">returns</text:span></text:span><text:span text:style-name="Strong_20_Emphasis"><text:span text:style-name="T9"> a specific “</text:span></text:span><text:span text:style-name="Strong_20_Emphasis"><text:span text:style-name="T11">project </text:span></text:span><text:span text:style-name="Strong_20_Emphasis"><text:span text:style-name="T22">group member</text:span></text:span><text:span text:style-name="Strong_20_Emphasis"><text:span text:style-name="T9">” </text:span></text:span><text:span text:style-name="Strong_20_Emphasis"><text:span text:style-name="T19">from</text:span></text:span><text:span text:style-name="Strong_20_Emphasis"><text:span text:style-name="T9"> the </text:span></text:span><text:span text:style-name="Strong_20_Emphasis"><text:span text:style-name="T11">project</text:span></text:span><text:span text:style-name="Strong_20_Emphasis"><text:span text:style-name="T20"> management</text:span></text:span><text:span text:style-name="Strong_20_Emphasis"><text:span text:style-name="T9">.</text:span></text:span></text:p>
      <text:p text:style-name="P27"><text:span text:style-name="Strong_20_Emphasis"><text:span text:style-name="T14">Request CURL Sample</text:span></text:span>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28">curl --request GET \</text:p>
            <text:p text:style-name="P28"><text:soft-page-break/><text:s text:c="2"/>--url 'https://[maindomian]/api/projectManagement/projectGroupMember/[id]' \</text:p>
            <text:p text:style-name="P28"><text:s text:c="2"/>--header 'Authorization: Bearer [token]'</text:p>
          </table:table-cell>
        </table:table-row>
      </table:table>
      <text:p text:style-name="P27"><text:span text:style-name="Strong_20_Emphasis"><text:span text:style-name="T15"/></text:span></text:p>
      <text:p text:style-name="P27"><text:span text:style-name="Strong_20_Emphasis"><text:span text:style-name="T14">Response Sample</text:span></text:span>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28">{</text:p>
            <text:p text:style-name="P28"><text:tab/>"statusCode" : 200,</text:p>
            <text:p text:style-name="P28"><text:tab/>"status" : "success",</text:p>
            <text:p text:style-name="P28"><text:tab/>"message" : "The data is returned successfully.",</text:p>
            <text:p text:style-name="P28"><text:tab/>"errorCode" : 0,</text:p>
            <text:p text:style-name="P28"><text:tab/>"data" : {</text:p>
            <text:p text:style-name="P28"><text:tab/><text:tab/>"id" : 16621244611384550112, </text:p>
            <text:p text:style-name="P28"><text:tab/><text:tab/>"title" : "test",</text:p>
            <text:p text:style-name="P28"><text:tab/><text:tab/>"code" : "123",</text:p>
            <text:p text:style-name="P28"><text:tab/><text:tab/>"description" : "test",</text:p>
            <text:p text:style-name="P28"><text:tab/><text:tab/>"profileId": [{</text:p>
            <text:p text:style-name="P28"><text:tab/><text:tab/><text:tab/>"id" : 16621244611384550113,</text:p>
            <text:p text:style-name="P28"><text:tab/><text:tab/><text:tab/>"firstName": "David",</text:p>
            <text:p text:style-name="P28"><text:tab/><text:tab/><text:tab/>"lastName": "Talor"</text:p>
            <text:p text:style-name="P28"><text:tab/><text:tab/>}],</text:p>
            <text:p text:style-name="P28"><text:tab/><text:tab/>"roleFormPermissionId": [{</text:p>
            <text:p text:style-name="P28"><text:tab/><text:tab/><text:tab/>"id" : 16621244611384550114,</text:p>
            <text:p text:style-name="P28"><text:tab/><text:tab/><text:tab/>"formPermissionId": {</text:p>
            <text:p text:style-name="P28"><text:tab/><text:tab/><text:tab/><text:tab/>"id" : 16621244611384550114,</text:p>
            <text:p text:style-name="P28"><text:tab/><text:tab/><text:tab/><text:tab/>"formId": {</text:p>
            <text:p text:style-name="P28"><text:tab/><text:tab/><text:tab/><text:tab/><text:tab/>"id" : 16621244611384550115,</text:p>
            <text:p text:style-name="P28"><text:tab/><text:tab/><text:tab/><text:tab/><text:tab/>"title": "Project"</text:p>
            <text:p text:style-name="P28"><text:tab/><text:tab/><text:tab/><text:tab/>},</text:p>
            <text:p text:style-name="P28"><text:tab/><text:tab/><text:tab/><text:tab/>"permissionId": {</text:p>
            <text:p text:style-name="P28"><text:tab/><text:tab/><text:tab/><text:tab/><text:tab/>"id" : 16621244611384550116,</text:p>
            <text:p text:style-name="P28"><text:tab/><text:tab/><text:tab/><text:tab/><text:tab/>"title": "Add"</text:p>
            <text:p text:style-name="P28"><text:tab/><text:tab/><text:tab/><text:tab/>}</text:p>
            <text:p text:style-name="P28"><text:tab/><text:tab/><text:tab/>}</text:p>
            <text:p text:style-name="P28"><text:tab/><text:tab/>}],</text:p>
            <text:p text:style-name="P28"><text:tab/><text:tab/>"createdAt" : "2025-8-25 12:00:00",</text:p>
            <text:p text:style-name="P28"><text:tab/><text:tab/>"createdBy" : "John Davis" </text:p>
            <text:p text:style-name="P28"><text:tab/>}</text:p>
            <text:p text:style-name="P28">}</text:p>
          </table:table-cell>
        </table:table-row>
      </table:table>
      <text:p text:style-name="P27"><text:span text:style-name="Strong_20_Emphasis"/></text:p>
      <text:p text:style-name="P27"><text:span text:style-name="Strong_20_Emphasis"/></text:p>
      <text:h text:style-name="P25" text:outline-level="1"><text:bookmark-start text:name="__RefHeading___Toc227_771010674 Copy 1 Copy 1 Copy 2"/><text:soft-page-break/><text:span text:style-name="T5">P</text:span><text:span text:style-name="T6">roject </text:span><text:span text:style-name="T21">Role Member</text:span><text:bookmark-end text:name="__RefHeading___Toc227_771010674 Copy 1 Copy 1 Copy 2"/></text:h>
      <text:h text:style-name="P26" text:outline-level="2"><text:bookmark-start text:name="__RefHeading___Toc908_3206075736 Copy 1 Copy 1 Copy 1 Copy 2"/><text:span text:style-name="Strong_20_Emphasis"><text:span text:style-name="T7">Delete</text:span></text:span><text:bookmark-end text:name="__RefHeading___Toc908_3206075736 Copy 1 Copy 1 Copy 1 Copy 2"/></text:h>
      <text:p text:style-name="P27"><text:span text:style-name="Strong_20_Emphasis"><text:span text:style-name="T8">Description</text:span></text:span></text:p>
      <text:p text:style-name="P27"><text:span text:style-name="Strong_20_Emphasis"><text:span text:style-name="T9">This API </text:span></text:span><text:span text:style-name="Strong_20_Emphasis"><text:span text:style-name="T10">logically</text:span></text:span><text:span text:style-name="Strong_20_Emphasis"><text:span text:style-name="T9"> deletes a “</text:span></text:span><text:span text:style-name="Strong_20_Emphasis"><text:span text:style-name="T11">project </text:span></text:span><text:span text:style-name="Strong_20_Emphasis"><text:span text:style-name="T22">role member</text:span></text:span><text:span text:style-name="Strong_20_Emphasis"><text:span text:style-name="T9">” from the </text:span></text:span><text:span text:style-name="Strong_20_Emphasis"><text:span text:style-name="T11">project</text:span></text:span><text:span text:style-name="Strong_20_Emphasis"><text:span text:style-name="T12"> man</text:span></text:span><text:span text:style-name="Strong_20_Emphasis"><text:span text:style-name="T13">a</text:span></text:span><text:span text:style-name="Strong_20_Emphasis"><text:span text:style-name="T12">gement</text:span></text:span><text:span text:style-name="Strong_20_Emphasis"><text:span text:style-name="T9">.</text:span></text:span></text:p>
      <text:p text:style-name="P27"><text:span text:style-name="Strong_20_Emphasis"><text:span text:style-name="T14">Request CURL Sample</text:span></text:span>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28">curl --request DELETE \</text:p>
            <text:p text:style-name="P28"><text:s text:c="2"/>--url 'https://[maindomian]/api/projectManagement/projectRoleMember/[id]' \</text:p>
            <text:p text:style-name="P28"><text:s text:c="2"/>--header 'Authorization: Bearer [token]'</text:p>
          </table:table-cell>
        </table:table-row>
      </table:table>
      <text:p text:style-name="P27"><text:span text:style-name="Strong_20_Emphasis"><text:span text:style-name="T15"/></text:span></text:p>
      <text:p text:style-name="P27"><text:span text:style-name="Strong_20_Emphasis"><text:span text:style-name="T14">Response Sample</text:span></text:span></text:p>
      <table:table table:name="Table18" table:style-name="Table18">
        <table:table-column table:style-name="Table18.A"/>
        <table:table-row>
          <table:table-cell table:style-name="Table18.A1" office:value-type="string">
            <text:p text:style-name="P28">{</text:p>
            <text:p text:style-name="P28"><text:tab/>"statusCode" : 200,</text:p>
            <text:p text:style-name="P28"><text:tab/>"status" : "success",</text:p>
            <text:p text:style-name="P28"><text:tab/>"message" : "The record is <text:span text:style-name="T16">deleted</text:span> successfully.",</text:p>
            <text:p text:style-name="P28"><text:tab/>"errorCode" : 0,</text:p>
            <text:p text:style-name="P28"><text:tab/>"data" : <text:span text:style-name="T16">null</text:span></text:p>
            <text:p text:style-name="P28">}</text:p>
          </table:table-cell>
        </table:table-row>
      </table:table>
      <text:p text:style-name="P27"><text:span text:style-name="Strong_20_Emphasis"/></text:p>
      <text:h text:style-name="P26" text:outline-level="2"><text:bookmark-start text:name="__RefHeading___Toc2079_720390006 Copy 1 Copy 1 Copy 2"/><text:span text:style-name="Strong_20_Emphasis"><text:span text:style-name="T7">Active</text:span></text:span><text:bookmark-end text:name="__RefHeading___Toc2079_720390006 Copy 1 Copy 1 Copy 2"/></text:h>
      <text:p text:style-name="P27"><text:span text:style-name="Strong_20_Emphasis"><text:span text:style-name="T8">Description</text:span></text:span></text:p>
      <text:p text:style-name="P27"><text:span text:style-name="Strong_20_Emphasis"><text:span text:style-name="T9">This API actives a “</text:span></text:span><text:span text:style-name="Strong_20_Emphasis"><text:span text:style-name="T11">project </text:span></text:span><text:span text:style-name="Strong_20_Emphasis"><text:span text:style-name="T22">role member</text:span></text:span><text:span text:style-name="Strong_20_Emphasis"><text:span text:style-name="T9">” in the </text:span></text:span><text:span text:style-name="Strong_20_Emphasis"><text:span text:style-name="T11">project</text:span></text:span><text:span text:style-name="Strong_20_Emphasis"><text:span text:style-name="T12"> management</text:span></text:span><text:span text:style-name="Strong_20_Emphasis"><text:span text:style-name="T9">.</text:span></text:span></text:p>
      <text:p text:style-name="P27"><text:span text:style-name="Strong_20_Emphasis"><text:span text:style-name="T14">Request CURL Sample</text:span></text:span></text:p>
      <table:table table:name="Table19" table:style-name="Table19">
        <table:table-column table:style-name="Table19.A"/>
        <table:table-row>
          <table:table-cell table:style-name="Table19.A1" office:value-type="string">
            <text:p text:style-name="P28">curl --request PUT \</text:p>
            <text:p text:style-name="P28"><text:s text:c="2"/>--url 'https://[maindomian]/api/projectManagement/projectRoleMember/active/[id]' \</text:p>
            <text:p text:style-name="P28"><text:s text:c="2"/>--header 'Authorization: Bearer [token]'</text:p>
          </table:table-cell>
        </table:table-row>
      </table:table>
      <text:p text:style-name="P27"><text:span text:style-name="Strong_20_Emphasis"><text:span text:style-name="T15"/></text:span></text:p>
      <text:p text:style-name="P27"><text:span text:style-name="Strong_20_Emphasis"><text:span text:style-name="T14">Response Sample</text:span></text:span></text:p>
      <table:table table:name="Table20" table:style-name="Table20">
        <table:table-column table:style-name="Table20.A"/>
        <text:soft-page-break/>
        <table:table-row>
          <table:table-cell table:style-name="Table20.A1" office:value-type="string">
            <text:p text:style-name="P28">{</text:p>
            <text:p text:style-name="P28"><text:tab/>"statusCode" : 200,</text:p>
            <text:p text:style-name="P28"><text:tab/>"status" : "success",</text:p>
            <text:p text:style-name="P28"><text:tab/>"message" : "The record is <text:span text:style-name="T16">activated</text:span> successfully.",</text:p>
            <text:p text:style-name="P28"><text:tab/>"errorCode" : 0,</text:p>
            <text:p text:style-name="P28"><text:tab/>"data" : <text:span text:style-name="T16">null</text:span></text:p>
            <text:p text:style-name="P28">}</text:p>
          </table:table-cell>
        </table:table-row>
      </table:table>
      <text:p text:style-name="P27"><text:span text:style-name="Strong_20_Emphasis"/></text:p>
      <text:h text:style-name="P26" text:outline-level="2"><text:bookmark-start text:name="__RefHeading___Toc2083_720390006 Copy 1 Copy 1 Copy 2"/><text:span text:style-name="Strong_20_Emphasis"><text:span text:style-name="T7">Inactive</text:span></text:span><text:bookmark-end text:name="__RefHeading___Toc2083_720390006 Copy 1 Copy 1 Copy 2"/></text:h>
      <text:p text:style-name="P27"><text:span text:style-name="Strong_20_Emphasis"><text:span text:style-name="T8">Description</text:span></text:span></text:p>
      <text:p text:style-name="P27"><text:span text:style-name="Strong_20_Emphasis"><text:span text:style-name="T9">This API </text:span></text:span><text:span text:style-name="Strong_20_Emphasis"><text:span text:style-name="T17">in</text:span></text:span><text:span text:style-name="Strong_20_Emphasis"><text:span text:style-name="T9">-actives a specific “</text:span></text:span><text:span text:style-name="Strong_20_Emphasis"><text:span text:style-name="T11">project </text:span></text:span><text:span text:style-name="Strong_20_Emphasis"><text:span text:style-name="T22">role member</text:span></text:span><text:span text:style-name="Strong_20_Emphasis"><text:span text:style-name="T9">” in the </text:span></text:span><text:span text:style-name="Strong_20_Emphasis"><text:span text:style-name="T11">project</text:span></text:span><text:span text:style-name="Strong_20_Emphasis"><text:span text:style-name="T12"> management</text:span></text:span><text:span text:style-name="Strong_20_Emphasis"><text:span text:style-name="T9">.</text:span></text:span></text:p>
      <text:p text:style-name="P27"><text:span text:style-name="Strong_20_Emphasis"><text:span text:style-name="T14">Request CURL Sample</text:span></text:span></text:p>
      <table:table table:name="Table29" table:style-name="Table29">
        <table:table-column table:style-name="Table29.A"/>
        <table:table-row>
          <table:table-cell table:style-name="Table29.A1" office:value-type="string">
            <text:p text:style-name="P28">curl --request PUT \</text:p>
            <text:p text:style-name="P28"><text:s text:c="2"/>--url 'https://[maindomian]/api/projectManagement/projectRoleMember/inactive/[id]' \</text:p>
            <text:p text:style-name="P28"><text:s text:c="2"/>--header 'Authorization: Bearer [token]'</text:p>
          </table:table-cell>
        </table:table-row>
      </table:table>
      <text:p text:style-name="P27"><text:span text:style-name="Strong_20_Emphasis"><text:span text:style-name="T15"/></text:span></text:p>
      <text:p text:style-name="P27"><text:span text:style-name="Strong_20_Emphasis"><text:span text:style-name="T14">Response Sample</text:span></text:span></text:p>
      <table:table table:name="Table30" table:style-name="Table30">
        <table:table-column table:style-name="Table30.A"/>
        <table:table-row>
          <table:table-cell table:style-name="Table30.A1" office:value-type="string">
            <text:p text:style-name="P28">{</text:p>
            <text:p text:style-name="P28"><text:tab/>"statusCode" : 200,</text:p>
            <text:p text:style-name="P28"><text:tab/>"status" : "success",</text:p>
            <text:p text:style-name="P28"><text:tab/>"message" : "The record is <text:span text:style-name="T18">in</text:span><text:span text:style-name="T16">activated</text:span> successfully.",</text:p>
            <text:p text:style-name="P28"><text:tab/>"errorCode" : 0,</text:p>
            <text:p text:style-name="P28"><text:tab/>"data" : <text:span text:style-name="T16">null</text:span></text:p>
            <text:p text:style-name="P28">}</text:p>
          </table:table-cell>
        </table:table-row>
      </table:table>
      <text:p text:style-name="P27"><text:span text:style-name="Strong_20_Emphasis"/></text:p>
      <text:h text:style-name="P26" text:outline-level="2"><text:bookmark-start text:name="__RefHeading___Toc2085_720390006 Copy 1 Copy 1 Copy 2"/><text:span text:style-name="Strong_20_Emphasis"><text:span text:style-name="T7">Fetch Specific Record</text:span></text:span><text:bookmark-end text:name="__RefHeading___Toc2085_720390006 Copy 1 Copy 1 Copy 2"/></text:h>
      <text:p text:style-name="P27"><text:span text:style-name="Strong_20_Emphasis"><text:span text:style-name="T8">Description</text:span></text:span></text:p>
      <text:p text:style-name="P27"><text:span text:style-name="Strong_20_Emphasis"><text:span text:style-name="T9">This API </text:span></text:span><text:span text:style-name="Strong_20_Emphasis"><text:span text:style-name="T19">returns</text:span></text:span><text:span text:style-name="Strong_20_Emphasis"><text:span text:style-name="T9"> a specific “</text:span></text:span><text:span text:style-name="Strong_20_Emphasis"><text:span text:style-name="T11">project </text:span></text:span><text:span text:style-name="Strong_20_Emphasis"><text:span text:style-name="T23">role</text:span></text:span><text:span text:style-name="Strong_20_Emphasis"><text:span text:style-name="T22"> member</text:span></text:span><text:span text:style-name="Strong_20_Emphasis"><text:span text:style-name="T9">” </text:span></text:span><text:span text:style-name="Strong_20_Emphasis"><text:span text:style-name="T19">from</text:span></text:span><text:span text:style-name="Strong_20_Emphasis"><text:span text:style-name="T9"> the </text:span></text:span><text:span text:style-name="Strong_20_Emphasis"><text:span text:style-name="T11">project</text:span></text:span><text:span text:style-name="Strong_20_Emphasis"><text:span text:style-name="T20"> management</text:span></text:span><text:span text:style-name="Strong_20_Emphasis"><text:span text:style-name="T9">.</text:span></text:span></text:p>
      <text:p text:style-name="P27"><text:span text:style-name="Strong_20_Emphasis"><text:span text:style-name="T14">Request CURL Sample</text:span></text:span></text:p>
      <table:table table:name="Table31" table:style-name="Table31">
        <table:table-column table:style-name="Table31.A"/>
        <table:table-row>
          <table:table-cell table:style-name="Table31.A1" office:value-type="string">
            <text:p text:style-name="P28">curl --request GET \</text:p>
            <text:p text:style-name="P28"><text:soft-page-break/><text:s text:c="2"/>--url 'https://[maindomian]/api/projectManagement/projectRoleMember/[id]' \</text:p>
            <text:p text:style-name="P28"><text:s text:c="2"/>--header 'Authorization: Bearer [token]'</text:p>
          </table:table-cell>
        </table:table-row>
      </table:table>
      <text:p text:style-name="P27"><text:span text:style-name="Strong_20_Emphasis"><text:span text:style-name="T15"/></text:span></text:p>
      <text:p text:style-name="P27"><text:span text:style-name="Strong_20_Emphasis"><text:span text:style-name="T14">Response Sample</text:span></text:span></text:p>
      <table:table table:name="Table32" table:style-name="Table32">
        <table:table-column table:style-name="Table32.A"/>
        <table:table-row>
          <table:table-cell table:style-name="Table32.A1" office:value-type="string">
            <text:p text:style-name="P28">{</text:p>
            <text:p text:style-name="P28"><text:tab/>"statusCode" : 200,</text:p>
            <text:p text:style-name="P28"><text:tab/>"status" : "success",</text:p>
            <text:p text:style-name="P28"><text:tab/>"message" : "The data is returned successfully.",</text:p>
            <text:p text:style-name="P28"><text:tab/>"errorCode" : 0,</text:p>
            <text:p text:style-name="P28"><text:tab/>"data" : {</text:p>
            <text:p text:style-name="P28"><text:tab/><text:tab/>"id" : 16621244611384550112, </text:p>
            <text:p text:style-name="P28"><text:tab/><text:tab/>"title" : "test",</text:p>
            <text:p text:style-name="P28"><text:tab/><text:tab/>"code" : "123",</text:p>
            <text:p text:style-name="P28"><text:tab/><text:tab/>"description" : "test",</text:p>
            <text:p text:style-name="P28"><text:tab/><text:tab/>"profileId": [{</text:p>
            <text:p text:style-name="P28"><text:tab/><text:tab/><text:tab/>"id" : 16621244611384550113,</text:p>
            <text:p text:style-name="P28"><text:tab/><text:tab/><text:tab/>"firstName": "David",</text:p>
            <text:p text:style-name="P28"><text:tab/><text:tab/><text:tab/>"lastName": "Talor"</text:p>
            <text:p text:style-name="P28"><text:tab/><text:tab/>}],</text:p>
            <text:p text:style-name="P28"><text:tab/><text:tab/>"roleFormPermissionId": [{</text:p>
            <text:p text:style-name="P28"><text:tab/><text:tab/><text:tab/>"id" : 16621244611384550114,</text:p>
            <text:p text:style-name="P28"><text:tab/><text:tab/><text:tab/>"formPermissionId": {</text:p>
            <text:p text:style-name="P28"><text:tab/><text:tab/><text:tab/><text:tab/>"id" : 16621244611384550114,</text:p>
            <text:p text:style-name="P28"><text:tab/><text:tab/><text:tab/><text:tab/>"formId": {</text:p>
            <text:p text:style-name="P28"><text:tab/><text:tab/><text:tab/><text:tab/><text:tab/>"id" : 16621244611384550115,</text:p>
            <text:p text:style-name="P28"><text:tab/><text:tab/><text:tab/><text:tab/><text:tab/>"title": "Project"</text:p>
            <text:p text:style-name="P28"><text:tab/><text:tab/><text:tab/><text:tab/>},</text:p>
            <text:p text:style-name="P28"><text:tab/><text:tab/><text:tab/><text:tab/>"permissionId": {</text:p>
            <text:p text:style-name="P28"><text:tab/><text:tab/><text:tab/><text:tab/><text:tab/>"id" : 16621244611384550116,</text:p>
            <text:p text:style-name="P28"><text:tab/><text:tab/><text:tab/><text:tab/><text:tab/>"title": "Add"</text:p>
            <text:p text:style-name="P28"><text:tab/><text:tab/><text:tab/><text:tab/>}</text:p>
            <text:p text:style-name="P28"><text:tab/><text:tab/><text:tab/>}</text:p>
            <text:p text:style-name="P28"><text:tab/><text:tab/>}],</text:p>
            <text:p text:style-name="P28"><text:tab/><text:tab/>"createdAt" : "2025-8-25 12:00:00",</text:p>
            <text:p text:style-name="P28"><text:tab/><text:tab/>"createdBy" : "John Davis" </text:p>
            <text:p text:style-name="P28"><text:tab/>}</text:p>
            <text:p text:style-name="P28">}</text:p>
          </table:table-cell>
        </table:table-row>
      </table:table>
      <text:p text:style-name="P27"><text:span text:style-name="Strong_20_Emphasis"/></text:p>
      <text:h text:style-name="P25" text:outline-level="1"><text:bookmark-start text:name="__RefHeading___Toc227_771010674 Copy 1 Copy 1 Copy 3"/><text:soft-page-break/><text:span text:style-name="T5">P</text:span><text:span text:style-name="T6">roject </text:span><text:span text:style-name="T21">Department Member</text:span><text:bookmark-end text:name="__RefHeading___Toc227_771010674 Copy 1 Copy 1 Copy 3"/></text:h>
      <text:h text:style-name="P26" text:outline-level="2"><text:bookmark-start text:name="__RefHeading___Toc908_3206075736 Copy 1 Copy 1 Copy 1 Copy 3"/><text:span text:style-name="Strong_20_Emphasis"><text:span text:style-name="T7">Delete</text:span></text:span><text:bookmark-end text:name="__RefHeading___Toc908_3206075736 Copy 1 Copy 1 Copy 1 Copy 3"/></text:h>
      <text:p text:style-name="P27"><text:span text:style-name="Strong_20_Emphasis"><text:span text:style-name="T8">Description</text:span></text:span></text:p>
      <text:p text:style-name="P27"><text:span text:style-name="Strong_20_Emphasis"><text:span text:style-name="T9">This API </text:span></text:span><text:span text:style-name="Strong_20_Emphasis"><text:span text:style-name="T10">logically</text:span></text:span><text:span text:style-name="Strong_20_Emphasis"><text:span text:style-name="T9"> deletes a “</text:span></text:span><text:span text:style-name="Strong_20_Emphasis"><text:span text:style-name="T11">project </text:span></text:span><text:span text:style-name="Strong_20_Emphasis"><text:span text:style-name="T24">department</text:span></text:span><text:span text:style-name="Strong_20_Emphasis"><text:span text:style-name="T22"> member</text:span></text:span><text:span text:style-name="Strong_20_Emphasis"><text:span text:style-name="T9">” from the </text:span></text:span><text:span text:style-name="Strong_20_Emphasis"><text:span text:style-name="T11">project</text:span></text:span><text:span text:style-name="Strong_20_Emphasis"><text:span text:style-name="T12"> man</text:span></text:span><text:span text:style-name="Strong_20_Emphasis"><text:span text:style-name="T13">a</text:span></text:span><text:span text:style-name="Strong_20_Emphasis"><text:span text:style-name="T12">gement</text:span></text:span><text:span text:style-name="Strong_20_Emphasis"><text:span text:style-name="T9">.</text:span></text:span></text:p>
      <text:p text:style-name="P27"><text:span text:style-name="Strong_20_Emphasis"><text:span text:style-name="T14">Request CURL Sample</text:span></text:span></text:p>
      <table:table table:name="Table33" table:style-name="Table33">
        <table:table-column table:style-name="Table33.A"/>
        <table:table-row>
          <table:table-cell table:style-name="Table33.A1" office:value-type="string">
            <text:p text:style-name="P28">curl --request DELETE \</text:p>
            <text:p text:style-name="P28"><text:s text:c="2"/>--url 'https://[maindomian]/api/projectManagement/projectDepartmentMember/[id]' \</text:p>
            <text:p text:style-name="P28"><text:s text:c="2"/>--header 'Authorization: Bearer [token]'</text:p>
          </table:table-cell>
        </table:table-row>
      </table:table>
      <text:p text:style-name="P27"><text:span text:style-name="Strong_20_Emphasis"><text:span text:style-name="T15"/></text:span></text:p>
      <text:p text:style-name="P27"><text:span text:style-name="Strong_20_Emphasis"><text:span text:style-name="T14">Response Sample</text:span></text:span></text:p>
      <table:table table:name="Table34" table:style-name="Table34">
        <table:table-column table:style-name="Table34.A"/>
        <table:table-row>
          <table:table-cell table:style-name="Table34.A1" office:value-type="string">
            <text:p text:style-name="P28">{</text:p>
            <text:p text:style-name="P28"><text:tab/>"statusCode" : 200,</text:p>
            <text:p text:style-name="P28"><text:tab/>"status" : "success",</text:p>
            <text:p text:style-name="P28"><text:tab/>"message" : "The record is <text:span text:style-name="T16">deleted</text:span> successfully.",</text:p>
            <text:p text:style-name="P28"><text:tab/>"errorCode" : 0,</text:p>
            <text:p text:style-name="P28"><text:tab/>"data" : <text:span text:style-name="T16">null</text:span></text:p>
            <text:p text:style-name="P28">}</text:p>
          </table:table-cell>
        </table:table-row>
      </table:table>
      <text:p text:style-name="P27"><text:span text:style-name="Strong_20_Emphasis"/></text:p>
      <text:h text:style-name="P26" text:outline-level="2"><text:bookmark-start text:name="__RefHeading___Toc2079_720390006 Copy 1 Copy 1 Copy 3"/><text:span text:style-name="Strong_20_Emphasis"><text:span text:style-name="T7">Active</text:span></text:span><text:bookmark-end text:name="__RefHeading___Toc2079_720390006 Copy 1 Copy 1 Copy 3"/></text:h>
      <text:p text:style-name="P27"><text:span text:style-name="Strong_20_Emphasis"><text:span text:style-name="T8">Description</text:span></text:span></text:p>
      <text:p text:style-name="P27"><text:span text:style-name="Strong_20_Emphasis"><text:span text:style-name="T9">This API actives a “</text:span></text:span><text:span text:style-name="Strong_20_Emphasis"><text:span text:style-name="T11">project </text:span></text:span><text:span text:style-name="Strong_20_Emphasis"><text:span text:style-name="T24">department</text:span></text:span><text:span text:style-name="Strong_20_Emphasis"><text:span text:style-name="T22"> member</text:span></text:span><text:span text:style-name="Strong_20_Emphasis"><text:span text:style-name="T9">” in the </text:span></text:span><text:span text:style-name="Strong_20_Emphasis"><text:span text:style-name="T11">project</text:span></text:span><text:span text:style-name="Strong_20_Emphasis"><text:span text:style-name="T12"> management</text:span></text:span><text:span text:style-name="Strong_20_Emphasis"><text:span text:style-name="T9">.</text:span></text:span></text:p>
      <text:p text:style-name="P27"><text:span text:style-name="Strong_20_Emphasis"><text:span text:style-name="T14">Request CURL Sample</text:span></text:span></text:p>
      <table:table table:name="Table35" table:style-name="Table35">
        <table:table-column table:style-name="Table35.A"/>
        <table:table-row>
          <table:table-cell table:style-name="Table35.A1" office:value-type="string">
            <text:p text:style-name="P28">curl --request PUT \</text:p>
            <text:p text:style-name="P28"><text:s text:c="2"/>--url 'https://[maindomian]/api/projectManagement/projectDepartmentMember/active/[id]' \</text:p>
            <text:p text:style-name="P28"><text:s text:c="2"/>--header 'Authorization: Bearer [token]'</text:p>
          </table:table-cell>
        </table:table-row>
      </table:table>
      <text:p text:style-name="P27"><text:span text:style-name="Strong_20_Emphasis"><text:span text:style-name="T15"/></text:span></text:p>
      <text:p text:style-name="P27"><text:span text:style-name="Strong_20_Emphasis"><text:span text:style-name="T14">Response Sample</text:span></text:span></text:p>
      <table:table table:name="Table36" table:style-name="Table36">
        <table:table-column table:style-name="Table36.A"/>
        <text:soft-page-break/>
        <table:table-row>
          <table:table-cell table:style-name="Table36.A1" office:value-type="string">
            <text:p text:style-name="P28">{</text:p>
            <text:p text:style-name="P28"><text:tab/>"statusCode" : 200,</text:p>
            <text:p text:style-name="P28"><text:tab/>"status" : "success",</text:p>
            <text:p text:style-name="P28"><text:tab/>"message" : "The record is <text:span text:style-name="T16">activated</text:span> successfully.",</text:p>
            <text:p text:style-name="P28"><text:tab/>"errorCode" : 0,</text:p>
            <text:p text:style-name="P28"><text:tab/>"data" : <text:span text:style-name="T16">null</text:span></text:p>
            <text:p text:style-name="P28">}</text:p>
          </table:table-cell>
        </table:table-row>
      </table:table>
      <text:p text:style-name="P27"><text:span text:style-name="Strong_20_Emphasis"/></text:p>
      <text:h text:style-name="P26" text:outline-level="2"><text:bookmark-start text:name="__RefHeading___Toc2083_720390006 Copy 1 Copy 1 Copy 3"/><text:span text:style-name="Strong_20_Emphasis"><text:span text:style-name="T7">Inactive</text:span></text:span><text:bookmark-end text:name="__RefHeading___Toc2083_720390006 Copy 1 Copy 1 Copy 3"/></text:h>
      <text:p text:style-name="P27"><text:span text:style-name="Strong_20_Emphasis"><text:span text:style-name="T8">Description</text:span></text:span></text:p>
      <text:p text:style-name="P27"><text:span text:style-name="Strong_20_Emphasis"><text:span text:style-name="T9">This API </text:span></text:span><text:span text:style-name="Strong_20_Emphasis"><text:span text:style-name="T17">in</text:span></text:span><text:span text:style-name="Strong_20_Emphasis"><text:span text:style-name="T9">-actives a specific “</text:span></text:span><text:span text:style-name="Strong_20_Emphasis"><text:span text:style-name="T11">project </text:span></text:span><text:span text:style-name="Strong_20_Emphasis"><text:span text:style-name="T24">department</text:span></text:span><text:span text:style-name="Strong_20_Emphasis"><text:span text:style-name="T22"> member</text:span></text:span><text:span text:style-name="Strong_20_Emphasis"><text:span text:style-name="T9">” in the </text:span></text:span><text:span text:style-name="Strong_20_Emphasis"><text:span text:style-name="T11">project</text:span></text:span><text:span text:style-name="Strong_20_Emphasis"><text:span text:style-name="T12"> management</text:span></text:span><text:span text:style-name="Strong_20_Emphasis"><text:span text:style-name="T9">.</text:span></text:span></text:p>
      <text:p text:style-name="P27"><text:span text:style-name="Strong_20_Emphasis"><text:span text:style-name="T14">Request CURL Sample</text:span></text:span></text:p>
      <table:table table:name="Table37" table:style-name="Table37">
        <table:table-column table:style-name="Table37.A"/>
        <table:table-row>
          <table:table-cell table:style-name="Table37.A1" office:value-type="string">
            <text:p text:style-name="P28">curl --request PUT \</text:p>
            <text:p text:style-name="P28"><text:s text:c="2"/>--url 'https://[maindomian]/api/projectManagement/projectDepartmentMember/inactive/[id]' \</text:p>
            <text:p text:style-name="P28"><text:s text:c="2"/>--header 'Authorization: Bearer [token]'</text:p>
          </table:table-cell>
        </table:table-row>
      </table:table>
      <text:p text:style-name="P27"><text:span text:style-name="Strong_20_Emphasis"><text:span text:style-name="T15"/></text:span></text:p>
      <text:p text:style-name="P27"><text:span text:style-name="Strong_20_Emphasis"><text:span text:style-name="T14">Response Sample</text:span></text:span></text:p>
      <table:table table:name="Table38" table:style-name="Table38">
        <table:table-column table:style-name="Table38.A"/>
        <table:table-row>
          <table:table-cell table:style-name="Table38.A1" office:value-type="string">
            <text:p text:style-name="P28">{</text:p>
            <text:p text:style-name="P28"><text:tab/>"statusCode" : 200,</text:p>
            <text:p text:style-name="P28"><text:tab/>"status" : "success",</text:p>
            <text:p text:style-name="P28"><text:tab/>"message" : "The record is <text:span text:style-name="T18">in</text:span><text:span text:style-name="T16">activated</text:span> successfully.",</text:p>
            <text:p text:style-name="P28"><text:tab/>"errorCode" : 0,</text:p>
            <text:p text:style-name="P28"><text:tab/>"data" : <text:span text:style-name="T16">null</text:span></text:p>
            <text:p text:style-name="P28">}</text:p>
          </table:table-cell>
        </table:table-row>
      </table:table>
      <text:p text:style-name="P27"><text:span text:style-name="Strong_20_Emphasis"/></text:p>
      <text:h text:style-name="P26" text:outline-level="2"><text:bookmark-start text:name="__RefHeading___Toc2085_720390006 Copy 1 Copy 1 Copy 3"/><text:span text:style-name="Strong_20_Emphasis"><text:span text:style-name="T7">Fetch Specific Record</text:span></text:span><text:bookmark-end text:name="__RefHeading___Toc2085_720390006 Copy 1 Copy 1 Copy 3"/></text:h>
      <text:p text:style-name="P27"><text:span text:style-name="Strong_20_Emphasis"><text:span text:style-name="T8">Description</text:span></text:span></text:p>
      <text:p text:style-name="P27"><text:span text:style-name="Strong_20_Emphasis"><text:span text:style-name="T9">This API </text:span></text:span><text:span text:style-name="Strong_20_Emphasis"><text:span text:style-name="T19">returns</text:span></text:span><text:span text:style-name="Strong_20_Emphasis"><text:span text:style-name="T9"> a specific “</text:span></text:span><text:span text:style-name="Strong_20_Emphasis"><text:span text:style-name="T11">project </text:span></text:span><text:span text:style-name="Strong_20_Emphasis"><text:span text:style-name="T24">department</text:span></text:span><text:span text:style-name="Strong_20_Emphasis"><text:span text:style-name="T22"> member</text:span></text:span><text:span text:style-name="Strong_20_Emphasis"><text:span text:style-name="T9">” </text:span></text:span><text:span text:style-name="Strong_20_Emphasis"><text:span text:style-name="T19">from</text:span></text:span><text:span text:style-name="Strong_20_Emphasis"><text:span text:style-name="T9"> the </text:span></text:span><text:span text:style-name="Strong_20_Emphasis"><text:span text:style-name="T11">project</text:span></text:span><text:span text:style-name="Strong_20_Emphasis"><text:span text:style-name="T20"> management</text:span></text:span><text:span text:style-name="Strong_20_Emphasis"><text:span text:style-name="T9">.</text:span></text:span></text:p>
      <text:p text:style-name="P27"><text:span text:style-name="Strong_20_Emphasis"><text:span text:style-name="T14">Request CURL Sample</text:span></text:span></text:p>
      <table:table table:name="Table39" table:style-name="Table39">
        <table:table-column table:style-name="Table39.A"/>
        <table:table-row>
          <table:table-cell table:style-name="Table39.A1" office:value-type="string">
            <text:p text:style-name="P28">curl --request GET \</text:p>
            <text:p text:style-name="P28"><text:soft-page-break/><text:s text:c="2"/>--url 'https://[maindomian]/api/projectManagement/projectDepartmentMember/[id]' \</text:p>
            <text:p text:style-name="P28"><text:s text:c="2"/>--header 'Authorization: Bearer [token]'</text:p>
          </table:table-cell>
        </table:table-row>
      </table:table>
      <text:p text:style-name="P27"><text:span text:style-name="Strong_20_Emphasis"><text:span text:style-name="T15"/></text:span></text:p>
      <text:p text:style-name="P27"><text:span text:style-name="Strong_20_Emphasis"><text:span text:style-name="T14">Response Sample</text:span></text:span></text:p>
      <table:table table:name="Table40" table:style-name="Table40">
        <table:table-column table:style-name="Table40.A"/>
        <table:table-row>
          <table:table-cell table:style-name="Table40.A1" office:value-type="string">
            <text:p text:style-name="P28">{</text:p>
            <text:p text:style-name="P28"><text:tab/>"statusCode" : 200,</text:p>
            <text:p text:style-name="P28"><text:tab/>"status" : "success",</text:p>
            <text:p text:style-name="P28"><text:tab/>"message" : "The data is returned successfully.",</text:p>
            <text:p text:style-name="P28"><text:tab/>"errorCode" : 0,</text:p>
            <text:p text:style-name="P28"><text:tab/>"data" : {</text:p>
            <text:p text:style-name="P28"><text:tab/><text:tab/>"id" : 16621244611384550112, </text:p>
            <text:p text:style-name="P28"><text:tab/><text:tab/>"title" : "test",</text:p>
            <text:p text:style-name="P28"><text:tab/><text:tab/>"code" : "123",</text:p>
            <text:p text:style-name="P28"><text:tab/><text:tab/>"description" : "test",</text:p>
            <text:p text:style-name="P28"><text:tab/><text:tab/>"profileId": [{</text:p>
            <text:p text:style-name="P28"><text:tab/><text:tab/><text:tab/>"id" : 16621244611384550113,</text:p>
            <text:p text:style-name="P28"><text:tab/><text:tab/><text:tab/>"firstName": "David",</text:p>
            <text:p text:style-name="P28"><text:tab/><text:tab/><text:tab/>"lastName": "Talor"</text:p>
            <text:p text:style-name="P28"><text:tab/><text:tab/>}],</text:p>
            <text:p text:style-name="P28"><text:tab/><text:tab/>"roleFormPermissionId": [{</text:p>
            <text:p text:style-name="P28"><text:tab/><text:tab/><text:tab/>"id" : 16621244611384550114,</text:p>
            <text:p text:style-name="P28"><text:tab/><text:tab/><text:tab/>"formPermissionId": {</text:p>
            <text:p text:style-name="P28"><text:tab/><text:tab/><text:tab/><text:tab/>"id" : 16621244611384550114,</text:p>
            <text:p text:style-name="P28"><text:tab/><text:tab/><text:tab/><text:tab/>"formId": {</text:p>
            <text:p text:style-name="P28"><text:tab/><text:tab/><text:tab/><text:tab/><text:tab/>"id" : 16621244611384550115,</text:p>
            <text:p text:style-name="P28"><text:tab/><text:tab/><text:tab/><text:tab/><text:tab/>"title": "Project"</text:p>
            <text:p text:style-name="P28"><text:tab/><text:tab/><text:tab/><text:tab/>},</text:p>
            <text:p text:style-name="P28"><text:tab/><text:tab/><text:tab/><text:tab/>"permissionId": {</text:p>
            <text:p text:style-name="P28"><text:tab/><text:tab/><text:tab/><text:tab/><text:tab/>"id" : 16621244611384550116,</text:p>
            <text:p text:style-name="P28"><text:tab/><text:tab/><text:tab/><text:tab/><text:tab/>"title": "Add"</text:p>
            <text:p text:style-name="P28"><text:tab/><text:tab/><text:tab/><text:tab/>}</text:p>
            <text:p text:style-name="P28"><text:tab/><text:tab/><text:tab/>}</text:p>
            <text:p text:style-name="P28"><text:tab/><text:tab/>}],</text:p>
            <text:p text:style-name="P28"><text:tab/><text:tab/>"createdAt" : "2025-8-25 12:00:00",</text:p>
            <text:p text:style-name="P28"><text:tab/><text:tab/>"createdBy" : "John Davis" </text:p>
            <text:p text:style-name="P28"><text:tab/>}</text:p>
            <text:p text:style-name="P28">}</text:p>
          </table:table-cell>
        </table:table-row>
      </table:table>
      <text:p text:style-name="P27"><text:span text:style-name="Strong_20_Emphasis"/></text:p>
      <text:h text:style-name="P29" text:outline-level="1"><text:bookmark-start text:name="__RefHeading___Toc227_771010674 Copy 1 Copy 1 Copy 3 Copy 1"/><text:soft-page-break/><text:span text:style-name="T25">Allowed File Extension for Workflow</text:span><text:bookmark-end text:name="__RefHeading___Toc227_771010674 Copy 1 Copy 1 Copy 3 Copy 1"/></text:h>
      <text:h text:style-name="P30" text:outline-level="2"><text:bookmark-start text:name="__RefHeading___Toc908_3206075736 Copy 1 Copy 1 Copy 1 Copy 3 Copy 1"/><text:span text:style-name="Strong_20_Emphasis"><text:span text:style-name="T7">Delete</text:span></text:span><text:bookmark-end text:name="__RefHeading___Toc908_3206075736 Copy 1 Copy 1 Copy 1 Copy 3 Copy 1"/></text:h>
      <text:p text:style-name="P31"><text:span text:style-name="Strong_20_Emphasis"><text:span text:style-name="T8">Description</text:span></text:span></text:p>
      <text:p text:style-name="P31"><text:span text:style-name="Strong_20_Emphasis"><text:span text:style-name="T9">This API </text:span></text:span><text:span text:style-name="Strong_20_Emphasis"><text:span text:style-name="T10">logically</text:span></text:span><text:span text:style-name="Strong_20_Emphasis"><text:span text:style-name="T9"> deletes a</text:span></text:span><text:span text:style-name="Strong_20_Emphasis"><text:span text:style-name="T26">n</text:span></text:span><text:span text:style-name="Strong_20_Emphasis"><text:span text:style-name="T9"> “</text:span></text:span><text:span text:style-name="Strong_20_Emphasis"><text:span text:style-name="T26">allowed file extension for workflow</text:span></text:span><text:span text:style-name="Strong_20_Emphasis"><text:span text:style-name="T9">” from the </text:span></text:span><text:span text:style-name="Strong_20_Emphasis"><text:span text:style-name="T11">project</text:span></text:span><text:span text:style-name="Strong_20_Emphasis"><text:span text:style-name="T12"> man</text:span></text:span><text:span text:style-name="Strong_20_Emphasis"><text:span text:style-name="T13">a</text:span></text:span><text:span text:style-name="Strong_20_Emphasis"><text:span text:style-name="T12">gement</text:span></text:span><text:span text:style-name="Strong_20_Emphasis"><text:span text:style-name="T9">.</text:span></text:span></text:p>
      <text:p text:style-name="P31"><text:span text:style-name="Strong_20_Emphasis"><text:span text:style-name="T14">Request CURL Sample</text:span></text:span></text:p>
      <table:table table:name="Table41" table:style-name="Table41">
        <table:table-column table:style-name="Table41.A"/>
        <table:table-row>
          <table:table-cell table:style-name="Table41.A1" office:value-type="string">
            <text:p text:style-name="P32">curl --request DELETE \</text:p>
            <text:p text:style-name="P32"><text:s text:c="2"/>--url 'https://[maindomian]/api/projectMangement/workflowAllowedFileExtension/[id]' \</text:p>
            <text:p text:style-name="P32"><text:s text:c="2"/>--header 'Authorization: Bearer [token]'</text:p>
          </table:table-cell>
        </table:table-row>
      </table:table>
      <text:p text:style-name="P31"><text:span text:style-name="Strong_20_Emphasis"><text:span text:style-name="T15"/></text:span></text:p>
      <text:p text:style-name="P31"><text:span text:style-name="Strong_20_Emphasis"><text:span text:style-name="T14">Response Sample</text:span></text:span></text:p>
      <table:table table:name="Table42" table:style-name="Table42">
        <table:table-column table:style-name="Table42.A"/>
        <table:table-row>
          <table:table-cell table:style-name="Table42.A1" office:value-type="string">
            <text:p text:style-name="P32">{</text:p>
            <text:p text:style-name="P32"><text:tab/>"statusCode" : 200,</text:p>
            <text:p text:style-name="P32"><text:tab/>"status" : "success",</text:p>
            <text:p text:style-name="P32"><text:tab/>"message" : "The record is <text:span text:style-name="T16">deleted</text:span> successfully.",</text:p>
            <text:p text:style-name="P32"><text:tab/>"errorCode" : 0,</text:p>
            <text:p text:style-name="P32"><text:tab/>"data" : <text:span text:style-name="T16">null</text:span></text:p>
            <text:p text:style-name="P32">}</text:p>
          </table:table-cell>
        </table:table-row>
      </table:table>
      <text:p text:style-name="P31"><text:span text:style-name="Strong_20_Emphasis"/></text:p>
      <text:h text:style-name="P30" text:outline-level="2"><text:bookmark-start text:name="__RefHeading___Toc2079_720390006 Copy 1 Copy 1 Copy 3 Copy 1"/><text:span text:style-name="Strong_20_Emphasis"><text:span text:style-name="T7">Active</text:span></text:span><text:bookmark-end text:name="__RefHeading___Toc2079_720390006 Copy 1 Copy 1 Copy 3 Copy 1"/></text:h>
      <text:p text:style-name="P31"><text:span text:style-name="Strong_20_Emphasis"><text:span text:style-name="T8">Description</text:span></text:span></text:p>
      <text:p text:style-name="P33"><text:span text:style-name="Strong_20_Emphasis"><text:span text:style-name="T9">This API actives a</text:span></text:span><text:span text:style-name="Strong_20_Emphasis"><text:span text:style-name="T26">n</text:span></text:span><text:span text:style-name="Strong_20_Emphasis"><text:span text:style-name="T9"> “</text:span></text:span><text:span text:style-name="Strong_20_Emphasis"><text:span text:style-name="T26">allowed file extension for workflow</text:span></text:span><text:span text:style-name="Strong_20_Emphasis"><text:span text:style-name="T9">” in the </text:span></text:span><text:span text:style-name="Strong_20_Emphasis"><text:span text:style-name="T11">project</text:span></text:span><text:span text:style-name="Strong_20_Emphasis"><text:span text:style-name="T12"> management</text:span></text:span><text:span text:style-name="Strong_20_Emphasis"><text:span text:style-name="T9">.</text:span></text:span></text:p>
      <text:p text:style-name="P31"><text:span text:style-name="Strong_20_Emphasis"><text:span text:style-name="T14">Request CURL Sample</text:span></text:span></text:p>
      <table:table table:name="Table43" table:style-name="Table43">
        <table:table-column table:style-name="Table43.A"/>
        <table:table-row>
          <table:table-cell table:style-name="Table43.A1" office:value-type="string">
            <text:p text:style-name="P32">curl --request PUT \</text:p>
            <text:p text:style-name="P32"><text:s text:c="2"/>--url 'https://[maindomian]/api/projectMangement/workflowAllowedFileExtension/active/[id]' \</text:p>
            <text:p text:style-name="P32"><text:s text:c="2"/>--header 'Authorization: Bearer [token]'</text:p>
          </table:table-cell>
        </table:table-row>
      </table:table>
      <text:p text:style-name="P31"><text:span text:style-name="Strong_20_Emphasis"><text:span text:style-name="T15"/></text:span></text:p>
      <text:p text:style-name="P31"><text:span text:style-name="Strong_20_Emphasis"><text:span text:style-name="T14">Response Sample</text:span></text:span></text:p>
      <table:table table:name="Table44" table:style-name="Table44">
        <table:table-column table:style-name="Table44.A"/>
        <text:soft-page-break/>
        <table:table-row>
          <table:table-cell table:style-name="Table44.A1" office:value-type="string">
            <text:p text:style-name="P32">{</text:p>
            <text:p text:style-name="P32"><text:tab/>"statusCode" : 200,</text:p>
            <text:p text:style-name="P32"><text:tab/>"status" : "success",</text:p>
            <text:p text:style-name="P32"><text:tab/>"message" : "The record is <text:span text:style-name="T16">activated</text:span> successfully."</text:p>
            <text:p text:style-name="P32"><text:tab/>"errorCode" : 0,</text:p>
            <text:p text:style-name="P32"><text:tab/>"data" : <text:span text:style-name="T16">null</text:span></text:p>
            <text:p text:style-name="P32">}</text:p>
          </table:table-cell>
        </table:table-row>
      </table:table>
      <text:p text:style-name="P31"><text:span text:style-name="Strong_20_Emphasis"/></text:p>
      <text:h text:style-name="P30" text:outline-level="2"><text:bookmark-start text:name="__RefHeading___Toc2083_720390006 Copy 1 Copy 1 Copy 3 Copy 1"/><text:span text:style-name="Strong_20_Emphasis"><text:span text:style-name="T7">Inactive</text:span></text:span><text:bookmark-end text:name="__RefHeading___Toc2083_720390006 Copy 1 Copy 1 Copy 3 Copy 1"/></text:h>
      <text:p text:style-name="P31"><text:span text:style-name="Strong_20_Emphasis"><text:span text:style-name="T8">Description</text:span></text:span></text:p>
      <text:p text:style-name="P33"><text:span text:style-name="Strong_20_Emphasis"><text:span text:style-name="T9">This API </text:span></text:span><text:span text:style-name="Strong_20_Emphasis"><text:span text:style-name="T17">in</text:span></text:span><text:span text:style-name="Strong_20_Emphasis"><text:span text:style-name="T9">-actives a specific “</text:span></text:span><text:span text:style-name="Strong_20_Emphasis"><text:span text:style-name="T26">allowed file extension for workflow</text:span></text:span><text:span text:style-name="Strong_20_Emphasis"><text:span text:style-name="T9">” in the </text:span></text:span><text:span text:style-name="Strong_20_Emphasis"><text:span text:style-name="T11">project</text:span></text:span><text:span text:style-name="Strong_20_Emphasis"><text:span text:style-name="T12"> management</text:span></text:span><text:span text:style-name="Strong_20_Emphasis"><text:span text:style-name="T9">.</text:span></text:span></text:p>
      <text:p text:style-name="P31"><text:span text:style-name="Strong_20_Emphasis"><text:span text:style-name="T14">Request CURL Sample</text:span></text:span></text:p>
      <table:table table:name="Table45" table:style-name="Table45">
        <table:table-column table:style-name="Table45.A"/>
        <table:table-row>
          <table:table-cell table:style-name="Table45.A1" office:value-type="string">
            <text:p text:style-name="P32">curl --request PUT \</text:p>
            <text:p text:style-name="P32"><text:s text:c="2"/>--url 'https://[maindomian]/api/projectMangement/workflowAllowedFileExtension/inactive/[id]' \</text:p>
            <text:p text:style-name="P32"><text:s text:c="2"/>--header 'Authorization: Bearer [token]'</text:p>
          </table:table-cell>
        </table:table-row>
      </table:table>
      <text:p text:style-name="P31"><text:span text:style-name="Strong_20_Emphasis"><text:span text:style-name="T15"/></text:span></text:p>
      <text:p text:style-name="P31"><text:span text:style-name="Strong_20_Emphasis"><text:span text:style-name="T14">Response Sample</text:span></text:span></text:p>
      <table:table table:name="Table46" table:style-name="Table46">
        <table:table-column table:style-name="Table46.A"/>
        <table:table-row>
          <table:table-cell table:style-name="Table46.A1" office:value-type="string">
            <text:p text:style-name="P32">{</text:p>
            <text:p text:style-name="P32"><text:tab/>"statusCode" : 200,</text:p>
            <text:p text:style-name="P32"><text:tab/>"status" : "success",</text:p>
            <text:p text:style-name="P32"><text:tab/>"message" : "The record is <text:span text:style-name="T18">in</text:span><text:span text:style-name="T16">activated</text:span> successfully.",</text:p>
            <text:p text:style-name="P32"><text:tab/>"errorCode" : 0,</text:p>
            <text:p text:style-name="P32"><text:tab/>"data" : <text:span text:style-name="T16">null</text:span></text:p>
            <text:p text:style-name="P32">}</text:p>
          </table:table-cell>
        </table:table-row>
      </table:table>
      <text:p text:style-name="P31"><text:span text:style-name="Strong_20_Emphasis"/></text:p>
      <text:h text:style-name="P30" text:outline-level="2"><text:bookmark-start text:name="__RefHeading___Toc2085_720390006 Copy 1 Copy 1 Copy 3 Copy 1"/><text:span text:style-name="Strong_20_Emphasis"><text:span text:style-name="T7">Fetch Specific Record</text:span></text:span><text:bookmark-end text:name="__RefHeading___Toc2085_720390006 Copy 1 Copy 1 Copy 3 Copy 1"/></text:h>
      <text:p text:style-name="P31"><text:span text:style-name="Strong_20_Emphasis"><text:span text:style-name="T8">Description</text:span></text:span></text:p>
      <text:p text:style-name="P33"><text:span text:style-name="Strong_20_Emphasis"><text:span text:style-name="T9">This API </text:span></text:span><text:span text:style-name="Strong_20_Emphasis"><text:span text:style-name="T19">returns</text:span></text:span><text:span text:style-name="Strong_20_Emphasis"><text:span text:style-name="T9"> a specific “</text:span></text:span><text:span text:style-name="Strong_20_Emphasis"><text:span text:style-name="T26">allowed file extension for workflow</text:span></text:span><text:span text:style-name="Strong_20_Emphasis"><text:span text:style-name="T9">” </text:span></text:span><text:span text:style-name="Strong_20_Emphasis"><text:span text:style-name="T19">from</text:span></text:span><text:span text:style-name="Strong_20_Emphasis"><text:span text:style-name="T9"> the </text:span></text:span><text:span text:style-name="Strong_20_Emphasis"><text:span text:style-name="T11">project</text:span></text:span><text:span text:style-name="Strong_20_Emphasis"><text:span text:style-name="T20"> management</text:span></text:span><text:span text:style-name="Strong_20_Emphasis"><text:span text:style-name="T9">.</text:span></text:span></text:p>
      <text:p text:style-name="P31"><text:span text:style-name="Strong_20_Emphasis"><text:span text:style-name="T14">Request CURL Sample</text:span></text:span></text:p>
      <table:table table:name="Table47" table:style-name="Table47">
        <table:table-column table:style-name="Table47.A"/>
        <table:table-row>
          <table:table-cell table:style-name="Table47.A1" office:value-type="string">
            <text:p text:style-name="P32">curl --request GET \</text:p>
            <text:p text:style-name="P32"><text:soft-page-break/><text:s text:c="2"/>--url 'https://[maindomian]/api/projectMangement/workflowAllowedFileExtension/[id]' \</text:p>
            <text:p text:style-name="P32"><text:s text:c="2"/>--header 'Authorization: Bearer [token]'</text:p>
          </table:table-cell>
        </table:table-row>
      </table:table>
      <text:p text:style-name="P31"><text:span text:style-name="Strong_20_Emphasis"><text:span text:style-name="T15"/></text:span></text:p>
      <text:p text:style-name="P31"><text:span text:style-name="Strong_20_Emphasis"><text:span text:style-name="T14">Response Sample</text:span></text:span></text:p>
      <table:table table:name="Table48" table:style-name="Table48">
        <table:table-column table:style-name="Table48.A"/>
        <table:table-row>
          <table:table-cell table:style-name="Table48.A1" office:value-type="string">
            <text:p text:style-name="P32">{</text:p>
            <text:p text:style-name="P32"><text:tab/>"statusCode" : 200,</text:p>
            <text:p text:style-name="P32"><text:tab/>"status" : "success",</text:p>
            <text:p text:style-name="P32"><text:tab/>"message" : "The data is returned successfully.",</text:p>
            <text:p text:style-name="P32"><text:tab/>"errorCode" : 0,</text:p>
            <text:p text:style-name="P32"><text:tab/>"data" : {</text:p>
            <text:p text:style-name="P32"><text:tab/><text:tab/>"id" : 16621244611384550112, </text:p>
            <text:p text:style-name="P32"><text:tab/><text:tab/>"title" : "test",</text:p>
            <text:p text:style-name="P32"><text:tab/><text:tab/>"code" : "123",</text:p>
            <text:p text:style-name="P32"><text:tab/><text:tab/>"description" : "test",</text:p>
            <text:p text:style-name="P32"><text:tab/><text:tab/>"profileId": [{</text:p>
            <text:p text:style-name="P32"><text:tab/><text:tab/><text:tab/>"id" : 16621244611384550113,</text:p>
            <text:p text:style-name="P32"><text:tab/><text:tab/><text:tab/>"firstName": "David",</text:p>
            <text:p text:style-name="P32"><text:tab/><text:tab/><text:tab/>"lastName": "Talor"</text:p>
            <text:p text:style-name="P32"><text:tab/><text:tab/>}],</text:p>
            <text:p text:style-name="P32"><text:tab/><text:tab/>"roleFormPermissionId": [{</text:p>
            <text:p text:style-name="P32"><text:tab/><text:tab/><text:tab/>"id" : 16621244611384550114,</text:p>
            <text:p text:style-name="P32"><text:tab/><text:tab/><text:tab/>"formPermissionId": {</text:p>
            <text:p text:style-name="P32"><text:tab/><text:tab/><text:tab/><text:tab/>"id" : 16621244611384550114,</text:p>
            <text:p text:style-name="P32"><text:tab/><text:tab/><text:tab/><text:tab/>"formId": {</text:p>
            <text:p text:style-name="P32"><text:tab/><text:tab/><text:tab/><text:tab/><text:tab/>"id" : 16621244611384550115,</text:p>
            <text:p text:style-name="P32"><text:tab/><text:tab/><text:tab/><text:tab/><text:tab/>"title": "Project"</text:p>
            <text:p text:style-name="P32"><text:tab/><text:tab/><text:tab/><text:tab/>},</text:p>
            <text:p text:style-name="P32"><text:tab/><text:tab/><text:tab/><text:tab/>"permissionId": {</text:p>
            <text:p text:style-name="P32"><text:tab/><text:tab/><text:tab/><text:tab/><text:tab/>"id" : 16621244611384550116,</text:p>
            <text:p text:style-name="P32"><text:tab/><text:tab/><text:tab/><text:tab/><text:tab/>"title": "Add"</text:p>
            <text:p text:style-name="P32"><text:tab/><text:tab/><text:tab/><text:tab/>}</text:p>
            <text:p text:style-name="P32"><text:tab/><text:tab/><text:tab/>}</text:p>
            <text:p text:style-name="P32"><text:tab/><text:tab/>}],</text:p>
            <text:p text:style-name="P32"><text:tab/><text:tab/>"createdAt" : "2025-8-25 12:00:00",</text:p>
            <text:p text:style-name="P32"><text:tab/><text:tab/>"createdBy" : "John Davis" </text:p>
            <text:p text:style-name="P32"><text:tab/>}</text:p>
            <text:p text:style-name="P32">}</text:p>
          </table:table-cell>
        </table:table-row>
      </table:table>
      <text:p text:style-name="P31"><text:span text:style-name="Strong_20_Emphasis"/></text:p>
      <text:h text:style-name="P34" text:outline-level="1"><text:bookmark-start text:name="__RefHeading___Toc227_771010674 Copy 1 Copy 1 Copy 3 Copy 2"/><text:soft-page-break/><text:span text:style-name="T21">A</text:span><text:span text:style-name="T6">llowed Document Type for Workflow</text:span><text:bookmark-end text:name="__RefHeading___Toc227_771010674 Copy 1 Copy 1 Copy 3 Copy 2"/></text:h>
      <text:h text:style-name="P30" text:outline-level="2"><text:bookmark-start text:name="__RefHeading___Toc908_3206075736 Copy 1 Copy 1 Copy 1 Copy 3 Copy 2"/><text:span text:style-name="Strong_20_Emphasis"><text:span text:style-name="T7">Delete</text:span></text:span><text:bookmark-end text:name="__RefHeading___Toc908_3206075736 Copy 1 Copy 1 Copy 1 Copy 3 Copy 2"/></text:h>
      <text:p text:style-name="P31"><text:span text:style-name="Strong_20_Emphasis"><text:span text:style-name="T8">Description</text:span></text:span></text:p>
      <text:p text:style-name="P35"><text:span text:style-name="Strong_20_Emphasis"><text:span text:style-name="T9">This API </text:span></text:span><text:span text:style-name="Strong_20_Emphasis"><text:span text:style-name="T10">logically</text:span></text:span><text:span text:style-name="Strong_20_Emphasis"><text:span text:style-name="T9"> deletes a</text:span></text:span><text:span text:style-name="Strong_20_Emphasis"><text:span text:style-name="T27">n</text:span></text:span><text:span text:style-name="Strong_20_Emphasis"><text:span text:style-name="T9"> “</text:span></text:span><text:span text:style-name="Strong_20_Emphasis"><text:span text:style-name="T26">allowed </text:span></text:span><text:span text:style-name="Strong_20_Emphasis"><text:span text:style-name="T27">document type</text:span></text:span><text:span text:style-name="Strong_20_Emphasis"><text:span text:style-name="T26"> for workflow</text:span></text:span><text:span text:style-name="Strong_20_Emphasis"><text:span text:style-name="T9">” from the </text:span></text:span><text:span text:style-name="Strong_20_Emphasis"><text:span text:style-name="T11">project</text:span></text:span><text:span text:style-name="Strong_20_Emphasis"><text:span text:style-name="T12"> man</text:span></text:span><text:span text:style-name="Strong_20_Emphasis"><text:span text:style-name="T13">a</text:span></text:span><text:span text:style-name="Strong_20_Emphasis"><text:span text:style-name="T12">gement</text:span></text:span><text:span text:style-name="Strong_20_Emphasis"><text:span text:style-name="T9">.</text:span></text:span></text:p>
      <text:p text:style-name="P31"><text:span text:style-name="Strong_20_Emphasis"><text:span text:style-name="T14">Request CURL Sample</text:span></text:span></text:p>
      <table:table table:name="Table49" table:style-name="Table49">
        <table:table-column table:style-name="Table49.A"/>
        <table:table-row>
          <table:table-cell table:style-name="Table49.A1" office:value-type="string">
            <text:p text:style-name="P32">curl --request DELETE \</text:p>
            <text:p text:style-name="P32"><text:s text:c="2"/>--url 'https://[maindomian]/api/projectMangement/addWorkflowAllowedDocumentType/[id]' \</text:p>
            <text:p text:style-name="P32"><text:s text:c="2"/>--header 'Authorization: Bearer [token]'</text:p>
          </table:table-cell>
        </table:table-row>
      </table:table>
      <text:p text:style-name="P31"><text:span text:style-name="Strong_20_Emphasis"><text:span text:style-name="T15"/></text:span></text:p>
      <text:p text:style-name="P31"><text:span text:style-name="Strong_20_Emphasis"><text:span text:style-name="T14">Response Sample</text:span></text:span></text:p>
      <table:table table:name="Table50" table:style-name="Table50">
        <table:table-column table:style-name="Table50.A"/>
        <table:table-row>
          <table:table-cell table:style-name="Table50.A1" office:value-type="string">
            <text:p text:style-name="P32">{</text:p>
            <text:p text:style-name="P32"><text:tab/>"statusCode" : 200,</text:p>
            <text:p text:style-name="P32"><text:tab/>"status" : "success",</text:p>
            <text:p text:style-name="P32"><text:tab/>"message" : "The record is <text:span text:style-name="T16">deleted</text:span> successfully.",</text:p>
            <text:p text:style-name="P32"><text:tab/>"errorCode" : 0,</text:p>
            <text:p text:style-name="P32"><text:tab/>"data" : <text:span text:style-name="T16">null</text:span></text:p>
            <text:p text:style-name="P32">}</text:p>
          </table:table-cell>
        </table:table-row>
      </table:table>
      <text:p text:style-name="P31"><text:span text:style-name="Strong_20_Emphasis"/></text:p>
      <text:h text:style-name="P30" text:outline-level="2"><text:bookmark-start text:name="__RefHeading___Toc2079_720390006 Copy 1 Copy 1 Copy 3 Copy 2"/><text:span text:style-name="Strong_20_Emphasis"><text:span text:style-name="T7">Active</text:span></text:span><text:bookmark-end text:name="__RefHeading___Toc2079_720390006 Copy 1 Copy 1 Copy 3 Copy 2"/></text:h>
      <text:p text:style-name="P31"><text:span text:style-name="Strong_20_Emphasis"><text:span text:style-name="T8">Description</text:span></text:span></text:p>
      <text:p text:style-name="P31"><text:span text:style-name="Strong_20_Emphasis"><text:span text:style-name="T9">This API actives a “</text:span></text:span><text:span text:style-name="Strong_20_Emphasis"><text:span text:style-name="T11">project </text:span></text:span><text:span text:style-name="Strong_20_Emphasis"><text:span text:style-name="T24">department</text:span></text:span><text:span text:style-name="Strong_20_Emphasis"><text:span text:style-name="T22"> member</text:span></text:span><text:span text:style-name="Strong_20_Emphasis"><text:span text:style-name="T9">” in the </text:span></text:span><text:span text:style-name="Strong_20_Emphasis"><text:span text:style-name="T11">project</text:span></text:span><text:span text:style-name="Strong_20_Emphasis"><text:span text:style-name="T12"> management</text:span></text:span><text:span text:style-name="Strong_20_Emphasis"><text:span text:style-name="T9">.</text:span></text:span></text:p>
      <text:p text:style-name="P31"><text:span text:style-name="Strong_20_Emphasis"><text:span text:style-name="T14">Request CURL Sample</text:span></text:span></text:p>
      <table:table table:name="Table51" table:style-name="Table51">
        <table:table-column table:style-name="Table51.A"/>
        <table:table-row>
          <table:table-cell table:style-name="Table51.A1" office:value-type="string">
            <text:p text:style-name="P32">curl --request PUT \<text:line-break/> <text:s/>--url 'https://[maindomian]/api/projectMangement/addWorkflowAllowedDocumentType/active/[id]' \<text:line-break/> <text:s/>--header 'Authorization: Bearer [token]'</text:p>
          </table:table-cell>
        </table:table-row>
      </table:table>
      <text:p text:style-name="P31"><text:span text:style-name="Strong_20_Emphasis"><text:span text:style-name="T15"/></text:span></text:p>
      <text:p text:style-name="P31"><text:span text:style-name="Strong_20_Emphasis"><text:span text:style-name="T14">Response Sample</text:span></text:span></text:p>
      <table:table table:name="Table52" table:style-name="Table52">
        <table:table-column table:style-name="Table52.A"/>
        <text:soft-page-break/>
        <table:table-row>
          <table:table-cell table:style-name="Table52.A1" office:value-type="string">
            <text:p text:style-name="P32">{</text:p>
            <text:p text:style-name="P32"><text:tab/>"statusCode" : 200,</text:p>
            <text:p text:style-name="P32"><text:tab/>"status" : "success",</text:p>
            <text:p text:style-name="P32"><text:tab/>"message" : "The record is <text:span text:style-name="T16">activated</text:span> successfully.",</text:p>
            <text:p text:style-name="P32"><text:tab/>"errorCode" : 0,</text:p>
            <text:p text:style-name="P32"><text:tab/>"data" : <text:span text:style-name="T16">null</text:span></text:p>
            <text:p text:style-name="P32">}</text:p>
          </table:table-cell>
        </table:table-row>
      </table:table>
      <text:p text:style-name="P31"><text:span text:style-name="Strong_20_Emphasis"/></text:p>
      <text:h text:style-name="P30" text:outline-level="2"><text:bookmark-start text:name="__RefHeading___Toc2083_720390006 Copy 1 Copy 1 Copy 3 Copy 2"/><text:span text:style-name="Strong_20_Emphasis"><text:span text:style-name="T7">Inactive</text:span></text:span><text:bookmark-end text:name="__RefHeading___Toc2083_720390006 Copy 1 Copy 1 Copy 3 Copy 2"/></text:h>
      <text:p text:style-name="P31"><text:span text:style-name="Strong_20_Emphasis"><text:span text:style-name="T8">Description</text:span></text:span></text:p>
      <text:p text:style-name="P35"><text:span text:style-name="Strong_20_Emphasis"><text:span text:style-name="T9">This API </text:span></text:span><text:span text:style-name="Strong_20_Emphasis"><text:span text:style-name="T17">in</text:span></text:span><text:span text:style-name="Strong_20_Emphasis"><text:span text:style-name="T9">-actives a specific “</text:span></text:span><text:span text:style-name="Strong_20_Emphasis"><text:span text:style-name="T26">allowed </text:span></text:span><text:span text:style-name="Strong_20_Emphasis"><text:span text:style-name="T27">document type</text:span></text:span><text:span text:style-name="Strong_20_Emphasis"><text:span text:style-name="T26"> for workflow</text:span></text:span><text:span text:style-name="Strong_20_Emphasis"><text:span text:style-name="T9">” in the </text:span></text:span><text:span text:style-name="Strong_20_Emphasis"><text:span text:style-name="T11">project</text:span></text:span><text:span text:style-name="Strong_20_Emphasis"><text:span text:style-name="T12"> management</text:span></text:span><text:span text:style-name="Strong_20_Emphasis"><text:span text:style-name="T9">.</text:span></text:span></text:p>
      <text:p text:style-name="P31"><text:span text:style-name="Strong_20_Emphasis"><text:span text:style-name="T14">Request CURL Sample</text:span></text:span></text:p>
      <table:table table:name="Table53" table:style-name="Table53">
        <table:table-column table:style-name="Table53.A"/>
        <table:table-row>
          <table:table-cell table:style-name="Table53.A1" office:value-type="string">
            <text:p text:style-name="P32">curl --request PUT \</text:p>
            <text:p text:style-name="P32"><text:s text:c="2"/>--url 'https://[maindomian]/api/projectMangement/addWorkflowAllowedDocumentType/inactive/[id]' \</text:p>
            <text:p text:style-name="P32"><text:s text:c="2"/>--header 'Authorization: Bearer [token]'</text:p>
          </table:table-cell>
        </table:table-row>
      </table:table>
      <text:p text:style-name="P31"><text:span text:style-name="Strong_20_Emphasis"><text:span text:style-name="T15"/></text:span></text:p>
      <text:p text:style-name="P31"><text:span text:style-name="Strong_20_Emphasis"><text:span text:style-name="T14">Response Sample</text:span></text:span></text:p>
      <table:table table:name="Table54" table:style-name="Table54">
        <table:table-column table:style-name="Table54.A"/>
        <table:table-row>
          <table:table-cell table:style-name="Table54.A1" office:value-type="string">
            <text:p text:style-name="P32">{</text:p>
            <text:p text:style-name="P32"><text:tab/>"statusCode" : 200,</text:p>
            <text:p text:style-name="P32"><text:tab/>"status" : "success",</text:p>
            <text:p text:style-name="P32"><text:tab/>"message" : "The record is <text:span text:style-name="T18">in</text:span><text:span text:style-name="T16">activated</text:span> successfully.",</text:p>
            <text:p text:style-name="P32"><text:tab/>"errorCode" : 0,</text:p>
            <text:p text:style-name="P32"><text:tab/>"data" : <text:span text:style-name="T16">null</text:span></text:p>
            <text:p text:style-name="P32">}</text:p>
          </table:table-cell>
        </table:table-row>
      </table:table>
      <text:p text:style-name="P31"><text:span text:style-name="Strong_20_Emphasis"/></text:p>
      <text:h text:style-name="P30" text:outline-level="2"><text:bookmark-start text:name="__RefHeading___Toc2085_720390006 Copy 1 Copy 1 Copy 3 Copy 2"/><text:span text:style-name="Strong_20_Emphasis"><text:span text:style-name="T7">Fetch Specific Record</text:span></text:span><text:bookmark-end text:name="__RefHeading___Toc2085_720390006 Copy 1 Copy 1 Copy 3 Copy 2"/></text:h>
      <text:p text:style-name="P31"><text:span text:style-name="Strong_20_Emphasis"><text:span text:style-name="T8">Description</text:span></text:span></text:p>
      <text:p text:style-name="P35"><text:span text:style-name="Strong_20_Emphasis"><text:span text:style-name="T9">This API </text:span></text:span><text:span text:style-name="Strong_20_Emphasis"><text:span text:style-name="T19">returns</text:span></text:span><text:span text:style-name="Strong_20_Emphasis"><text:span text:style-name="T9"> a specific “</text:span></text:span><text:span text:style-name="Strong_20_Emphasis"><text:span text:style-name="T26">allowed </text:span></text:span><text:span text:style-name="Strong_20_Emphasis"><text:span text:style-name="T27">document type</text:span></text:span><text:span text:style-name="Strong_20_Emphasis"><text:span text:style-name="T26"> for workflow</text:span></text:span><text:span text:style-name="Strong_20_Emphasis"><text:span text:style-name="T9">” </text:span></text:span><text:span text:style-name="Strong_20_Emphasis"><text:span text:style-name="T19">from</text:span></text:span><text:span text:style-name="Strong_20_Emphasis"><text:span text:style-name="T9"> the </text:span></text:span><text:span text:style-name="Strong_20_Emphasis"><text:span text:style-name="T11">project</text:span></text:span><text:span text:style-name="Strong_20_Emphasis"><text:span text:style-name="T20"> management</text:span></text:span><text:span text:style-name="Strong_20_Emphasis"><text:span text:style-name="T9">.</text:span></text:span></text:p>
      <text:p text:style-name="P31"><text:span text:style-name="Strong_20_Emphasis"><text:span text:style-name="T14">Request CURL Sample</text:span></text:span></text:p>
      <table:table table:name="Table55" table:style-name="Table55">
        <table:table-column table:style-name="Table55.A"/>
        <table:table-row>
          <table:table-cell table:style-name="Table55.A1" office:value-type="string">
            <text:p text:style-name="P32">curl --request GET \</text:p>
            <text:p text:style-name="P32"><text:soft-page-break/><text:s text:c="2"/>--url 'https://[maindomian]/api/projectMangement/addWorkflowAllowedDocumentType/[id]' \</text:p>
            <text:p text:style-name="P32"><text:s text:c="2"/>--header 'Authorization: Bearer [token]'</text:p>
          </table:table-cell>
        </table:table-row>
      </table:table>
      <text:p text:style-name="P31"><text:span text:style-name="Strong_20_Emphasis"><text:span text:style-name="T15"/></text:span></text:p>
      <text:p text:style-name="P31"><text:span text:style-name="Strong_20_Emphasis"><text:span text:style-name="T14">Response Sample</text:span></text:span></text:p>
      <table:table table:name="Table56" table:style-name="Table56">
        <table:table-column table:style-name="Table56.A"/>
        <table:table-row>
          <table:table-cell table:style-name="Table56.A1" office:value-type="string">
            <text:p text:style-name="P32">{</text:p>
            <text:p text:style-name="P32"><text:tab/>"statusCode" : 200,</text:p>
            <text:p text:style-name="P32"><text:tab/>"status" : "success",</text:p>
            <text:p text:style-name="P32"><text:tab/>"message" : "The data is returned successfully.",</text:p>
            <text:p text:style-name="P32"><text:tab/>"errorCode" : 0,</text:p>
            <text:p text:style-name="P32"><text:tab/>"data" : {</text:p>
            <text:p text:style-name="P32"><text:tab/><text:tab/>"id" : 16621244611384550112, </text:p>
            <text:p text:style-name="P32"><text:tab/><text:tab/>"title" : "test",</text:p>
            <text:p text:style-name="P32"><text:tab/><text:tab/>"code" : "123",</text:p>
            <text:p text:style-name="P32"><text:tab/><text:tab/>"description" : "test",</text:p>
            <text:p text:style-name="P32"><text:tab/><text:tab/>"profileId": [{</text:p>
            <text:p text:style-name="P32"><text:tab/><text:tab/><text:tab/>"id" : 16621244611384550113,</text:p>
            <text:p text:style-name="P32"><text:tab/><text:tab/><text:tab/>"firstName": "David",</text:p>
            <text:p text:style-name="P32"><text:tab/><text:tab/><text:tab/>"lastName": "Talor"</text:p>
            <text:p text:style-name="P32"><text:tab/><text:tab/>}],</text:p>
            <text:p text:style-name="P32"><text:tab/><text:tab/>"roleFormPermissionId": [{</text:p>
            <text:p text:style-name="P32"><text:tab/><text:tab/><text:tab/>"id" : 16621244611384550114,</text:p>
            <text:p text:style-name="P32"><text:tab/><text:tab/><text:tab/>"formPermissionId": {</text:p>
            <text:p text:style-name="P32"><text:tab/><text:tab/><text:tab/><text:tab/>"id" : 16621244611384550114,</text:p>
            <text:p text:style-name="P32"><text:tab/><text:tab/><text:tab/><text:tab/>"formId": {</text:p>
            <text:p text:style-name="P32"><text:tab/><text:tab/><text:tab/><text:tab/><text:tab/>"id" : 16621244611384550115,</text:p>
            <text:p text:style-name="P32"><text:tab/><text:tab/><text:tab/><text:tab/><text:tab/>"title": "Project"</text:p>
            <text:p text:style-name="P32"><text:tab/><text:tab/><text:tab/><text:tab/>},</text:p>
            <text:p text:style-name="P32"><text:tab/><text:tab/><text:tab/><text:tab/>"permissionId": {</text:p>
            <text:p text:style-name="P32"><text:tab/><text:tab/><text:tab/><text:tab/><text:tab/>"id" : 16621244611384550116,</text:p>
            <text:p text:style-name="P32"><text:tab/><text:tab/><text:tab/><text:tab/><text:tab/>"title": "Add"</text:p>
            <text:p text:style-name="P32"><text:tab/><text:tab/><text:tab/><text:tab/>}</text:p>
            <text:p text:style-name="P32"><text:tab/><text:tab/><text:tab/>}</text:p>
            <text:p text:style-name="P32"><text:tab/><text:tab/>}],</text:p>
            <text:p text:style-name="P32"><text:tab/><text:tab/>"createdAt" : "2025-8-25 12:00:00",</text:p>
            <text:p text:style-name="P32"><text:tab/><text:tab/>"createdBy" : "John Davis" </text:p>
            <text:p text:style-name="P32"><text:tab/>}</text:p>
            <text:p text:style-name="P32">}</text:p>
          </table:table-cell>
        </table:table-row>
      </table:table>
      <text:p text:style-name="P31"><text:span text:style-name="Strong_20_Emphasis"/></text:p>
      <text:h text:style-name="P29" text:outline-level="1"><text:bookmark-start text:name="__RefHeading___Toc227_771010674 Copy 1 Copy 1 Copy 3 Copy 3"/><text:soft-page-break/><text:span text:style-name="T5">P</text:span><text:span text:style-name="T6">roject </text:span><text:span text:style-name="T25">Workflow Status</text:span><text:bookmark-end text:name="__RefHeading___Toc227_771010674 Copy 1 Copy 1 Copy 3 Copy 3"/></text:h>
      <text:h text:style-name="P30" text:outline-level="2"><text:bookmark-start text:name="__RefHeading___Toc908_3206075736 Copy 1 Copy 1 Copy 1 Copy 3 Copy 3"/><text:span text:style-name="Strong_20_Emphasis"><text:span text:style-name="T7">Delete</text:span></text:span><text:bookmark-end text:name="__RefHeading___Toc908_3206075736 Copy 1 Copy 1 Copy 1 Copy 3 Copy 3"/></text:h>
      <text:p text:style-name="P31"><text:span text:style-name="Strong_20_Emphasis"><text:span text:style-name="T8">Description</text:span></text:span></text:p>
      <text:p text:style-name="P31"><text:span text:style-name="Strong_20_Emphasis"><text:span text:style-name="T9">This API </text:span></text:span><text:span text:style-name="Strong_20_Emphasis"><text:span text:style-name="T10">logically</text:span></text:span><text:span text:style-name="Strong_20_Emphasis"><text:span text:style-name="T9"> deletes a “</text:span></text:span><text:span text:style-name="Strong_20_Emphasis"><text:span text:style-name="T11">project </text:span></text:span><text:span text:style-name="Strong_20_Emphasis"><text:span text:style-name="T27">workflow status</text:span></text:span><text:span text:style-name="Strong_20_Emphasis"><text:span text:style-name="T9">” from the </text:span></text:span><text:span text:style-name="Strong_20_Emphasis"><text:span text:style-name="T11">project</text:span></text:span><text:span text:style-name="Strong_20_Emphasis"><text:span text:style-name="T12"> man</text:span></text:span><text:span text:style-name="Strong_20_Emphasis"><text:span text:style-name="T13">a</text:span></text:span><text:span text:style-name="Strong_20_Emphasis"><text:span text:style-name="T12">gement</text:span></text:span><text:span text:style-name="Strong_20_Emphasis"><text:span text:style-name="T9">.</text:span></text:span></text:p>
      <text:p text:style-name="P31"><text:span text:style-name="Strong_20_Emphasis"><text:span text:style-name="T14">Request CURL Sample</text:span></text:span></text:p>
      <table:table table:name="Table57" table:style-name="Table57">
        <table:table-column table:style-name="Table57.A"/>
        <table:table-row>
          <table:table-cell table:style-name="Table57.A1" office:value-type="string">
            <text:p text:style-name="P32">curl --request DELETE \</text:p>
            <text:p text:style-name="P32"><text:s text:c="2"/>--url 'https://[maindomian]/api/projectManagement/projectWorkflowStatus/[id]' \</text:p>
            <text:p text:style-name="P32"><text:s text:c="2"/>--header 'Authorization: Bearer [token]'</text:p>
          </table:table-cell>
        </table:table-row>
      </table:table>
      <text:p text:style-name="P31"><text:span text:style-name="Strong_20_Emphasis"><text:span text:style-name="T15"/></text:span></text:p>
      <text:p text:style-name="P31"><text:span text:style-name="Strong_20_Emphasis"><text:span text:style-name="T14">Response Sample</text:span></text:span></text:p>
      <table:table table:name="Table58" table:style-name="Table58">
        <table:table-column table:style-name="Table58.A"/>
        <table:table-row>
          <table:table-cell table:style-name="Table58.A1" office:value-type="string">
            <text:p text:style-name="P32">{</text:p>
            <text:p text:style-name="P32"><text:tab/>"statusCode" : 200,</text:p>
            <text:p text:style-name="P32"><text:tab/>"status" : "success",</text:p>
            <text:p text:style-name="P32"><text:tab/>"message" : "The record is <text:span text:style-name="T16">deleted</text:span> successfully.",</text:p>
            <text:p text:style-name="P32"><text:tab/>"errorCode" : 0,</text:p>
            <text:p text:style-name="P32"><text:tab/>"data" : <text:span text:style-name="T16">null</text:span></text:p>
            <text:p text:style-name="P32">}</text:p>
          </table:table-cell>
        </table:table-row>
      </table:table>
      <text:p text:style-name="P31"><text:span text:style-name="Strong_20_Emphasis"/></text:p>
      <text:h text:style-name="P30" text:outline-level="2"><text:bookmark-start text:name="__RefHeading___Toc2079_720390006 Copy 1 Copy 1 Copy 3 Copy 3"/><text:span text:style-name="Strong_20_Emphasis"><text:span text:style-name="T7">Active</text:span></text:span><text:bookmark-end text:name="__RefHeading___Toc2079_720390006 Copy 1 Copy 1 Copy 3 Copy 3"/></text:h>
      <text:p text:style-name="P31"><text:span text:style-name="Strong_20_Emphasis"><text:span text:style-name="T8">Description</text:span></text:span></text:p>
      <text:p text:style-name="P35"><text:span text:style-name="Strong_20_Emphasis"><text:span text:style-name="T9">This API actives a “</text:span></text:span><text:span text:style-name="Strong_20_Emphasis"><text:span text:style-name="T11">project </text:span></text:span><text:span text:style-name="Strong_20_Emphasis"><text:span text:style-name="T27">workflow status</text:span></text:span><text:span text:style-name="Strong_20_Emphasis"><text:span text:style-name="T9">” in the </text:span></text:span><text:span text:style-name="Strong_20_Emphasis"><text:span text:style-name="T11">project</text:span></text:span><text:span text:style-name="Strong_20_Emphasis"><text:span text:style-name="T12"> management</text:span></text:span><text:span text:style-name="Strong_20_Emphasis"><text:span text:style-name="T9">.</text:span></text:span></text:p>
      <text:p text:style-name="P31"><text:span text:style-name="Strong_20_Emphasis"><text:span text:style-name="T14">Request CURL Sample</text:span></text:span></text:p>
      <table:table table:name="Table59" table:style-name="Table59">
        <table:table-column table:style-name="Table59.A"/>
        <table:table-row>
          <table:table-cell table:style-name="Table59.A1" office:value-type="string">
            <text:p text:style-name="P32">curl --request PUT \</text:p>
            <text:p text:style-name="P32"><text:s text:c="2"/>--url 'https://[maindomian]/api/projectManagement/projectWorkflowStatus/active/[id]' \</text:p>
            <text:p text:style-name="P32"><text:s text:c="2"/>--header 'Authorization: Bearer [token]'</text:p>
          </table:table-cell>
        </table:table-row>
      </table:table>
      <text:p text:style-name="P31"><text:span text:style-name="Strong_20_Emphasis"><text:span text:style-name="T15"/></text:span></text:p>
      <text:p text:style-name="P31"><text:span text:style-name="Strong_20_Emphasis"><text:span text:style-name="T14">Response Sample</text:span></text:span></text:p>
      <table:table table:name="Table60" table:style-name="Table60">
        <table:table-column table:style-name="Table60.A"/>
        <text:soft-page-break/>
        <table:table-row>
          <table:table-cell table:style-name="Table60.A1" office:value-type="string">
            <text:p text:style-name="P32">{</text:p>
            <text:p text:style-name="P32"><text:tab/>"statusCode" : 200,</text:p>
            <text:p text:style-name="P32"><text:tab/>"status" : "success",</text:p>
            <text:p text:style-name="P32"><text:tab/>"message" : "The record is <text:span text:style-name="T16">activated</text:span> successfully.",</text:p>
            <text:p text:style-name="P32"><text:tab/>"errorCode" : 0,</text:p>
            <text:p text:style-name="P32"><text:tab/>"data" : <text:span text:style-name="T16">null</text:span></text:p>
            <text:p text:style-name="P32">}</text:p>
          </table:table-cell>
        </table:table-row>
      </table:table>
      <text:p text:style-name="P31"><text:span text:style-name="Strong_20_Emphasis"/></text:p>
      <text:h text:style-name="P30" text:outline-level="2"><text:bookmark-start text:name="__RefHeading___Toc2083_720390006 Copy 1 Copy 1 Copy 3 Copy 3"/><text:span text:style-name="Strong_20_Emphasis"><text:span text:style-name="T7">Inactive</text:span></text:span><text:bookmark-end text:name="__RefHeading___Toc2083_720390006 Copy 1 Copy 1 Copy 3 Copy 3"/></text:h>
      <text:p text:style-name="P31"><text:span text:style-name="Strong_20_Emphasis"><text:span text:style-name="T8">Description</text:span></text:span></text:p>
      <text:p text:style-name="P35"><text:span text:style-name="Strong_20_Emphasis"><text:span text:style-name="T9">This API </text:span></text:span><text:span text:style-name="Strong_20_Emphasis"><text:span text:style-name="T17">in</text:span></text:span><text:span text:style-name="Strong_20_Emphasis"><text:span text:style-name="T9">-actives a specific “</text:span></text:span><text:span text:style-name="Strong_20_Emphasis"><text:span text:style-name="T11">project </text:span></text:span><text:span text:style-name="Strong_20_Emphasis"><text:span text:style-name="T27">workflow status</text:span></text:span><text:span text:style-name="Strong_20_Emphasis"><text:span text:style-name="T9">” in the </text:span></text:span><text:span text:style-name="Strong_20_Emphasis"><text:span text:style-name="T11">project</text:span></text:span><text:span text:style-name="Strong_20_Emphasis"><text:span text:style-name="T12"> management</text:span></text:span><text:span text:style-name="Strong_20_Emphasis"><text:span text:style-name="T9">.</text:span></text:span></text:p>
      <text:p text:style-name="P31"><text:span text:style-name="Strong_20_Emphasis"><text:span text:style-name="T14">Request CURL Sample</text:span></text:span></text:p>
      <table:table table:name="Table61" table:style-name="Table61">
        <table:table-column table:style-name="Table61.A"/>
        <table:table-row>
          <table:table-cell table:style-name="Table61.A1" office:value-type="string">
            <text:p text:style-name="P32">curl --request PUT \</text:p>
            <text:p text:style-name="P32"><text:s text:c="2"/>--url 'https://[maindomian]/api/projectManagement/projectWorkflowStatus/inactive/[id]' \</text:p>
            <text:p text:style-name="P32"><text:s text:c="2"/>--header 'Authorization: Bearer [token]'</text:p>
          </table:table-cell>
        </table:table-row>
      </table:table>
      <text:p text:style-name="P31"><text:span text:style-name="Strong_20_Emphasis"><text:span text:style-name="T15"/></text:span></text:p>
      <text:p text:style-name="P31"><text:span text:style-name="Strong_20_Emphasis"><text:span text:style-name="T14">Response Sample</text:span></text:span></text:p>
      <table:table table:name="Table62" table:style-name="Table62">
        <table:table-column table:style-name="Table62.A"/>
        <table:table-row>
          <table:table-cell table:style-name="Table62.A1" office:value-type="string">
            <text:p text:style-name="P32">{</text:p>
            <text:p text:style-name="P32"><text:tab/>"statusCode" : 200,</text:p>
            <text:p text:style-name="P32"><text:tab/>"status" : "success",</text:p>
            <text:p text:style-name="P32"><text:tab/>"message" : "The record is <text:span text:style-name="T18">in</text:span><text:span text:style-name="T16">activated</text:span> successfully.",</text:p>
            <text:p text:style-name="P32"><text:tab/>"errorCode" : 0,</text:p>
            <text:p text:style-name="P32"><text:tab/>"data" : <text:span text:style-name="T16">null</text:span></text:p>
            <text:p text:style-name="P32">}</text:p>
          </table:table-cell>
        </table:table-row>
      </table:table>
      <text:p text:style-name="P31"><text:span text:style-name="Strong_20_Emphasis"/></text:p>
      <text:h text:style-name="P30" text:outline-level="2"><text:bookmark-start text:name="__RefHeading___Toc2085_720390006 Copy 1 Copy 1 Copy 3 Copy 3"/><text:span text:style-name="Strong_20_Emphasis"><text:span text:style-name="T7">Fetch Specific Record</text:span></text:span><text:bookmark-end text:name="__RefHeading___Toc2085_720390006 Copy 1 Copy 1 Copy 3 Copy 3"/></text:h>
      <text:p text:style-name="P31"><text:span text:style-name="Strong_20_Emphasis"><text:span text:style-name="T8">Description</text:span></text:span></text:p>
      <text:p text:style-name="P36"><text:span text:style-name="Strong_20_Emphasis"><text:span text:style-name="T9">This API </text:span></text:span><text:span text:style-name="Strong_20_Emphasis"><text:span text:style-name="T19">returns</text:span></text:span><text:span text:style-name="Strong_20_Emphasis"><text:span text:style-name="T9"> a specific “</text:span></text:span><text:span text:style-name="Strong_20_Emphasis"><text:span text:style-name="T11">project </text:span></text:span><text:span text:style-name="Strong_20_Emphasis"><text:span text:style-name="T27">workflow status</text:span></text:span><text:span text:style-name="Strong_20_Emphasis"><text:span text:style-name="T9">” </text:span></text:span><text:span text:style-name="Strong_20_Emphasis"><text:span text:style-name="T19">from</text:span></text:span><text:span text:style-name="Strong_20_Emphasis"><text:span text:style-name="T9"> the </text:span></text:span><text:span text:style-name="Strong_20_Emphasis"><text:span text:style-name="T11">project</text:span></text:span><text:span text:style-name="Strong_20_Emphasis"><text:span text:style-name="T20"> management</text:span></text:span><text:span text:style-name="Strong_20_Emphasis"><text:span text:style-name="T9">.</text:span></text:span></text:p>
      <text:p text:style-name="P31"><text:span text:style-name="Strong_20_Emphasis"><text:span text:style-name="T14">Request CURL Sample</text:span></text:span></text:p>
      <table:table table:name="Table63" table:style-name="Table63">
        <table:table-column table:style-name="Table63.A"/>
        <table:table-row>
          <table:table-cell table:style-name="Table63.A1" office:value-type="string">
            <text:p text:style-name="P32">curl --request GET \</text:p>
            <text:p text:style-name="P32"><text:soft-page-break/><text:s text:c="2"/>--url 'https://[maindomian]/api/projectManagement/projectWorkflowStatus/[id]' \</text:p>
            <text:p text:style-name="P32"><text:s text:c="2"/>--header 'Authorization: Bearer [token]'</text:p>
          </table:table-cell>
        </table:table-row>
      </table:table>
      <text:p text:style-name="P31"><text:span text:style-name="Strong_20_Emphasis"><text:span text:style-name="T15"/></text:span></text:p>
      <text:p text:style-name="P31"><text:span text:style-name="Strong_20_Emphasis"><text:span text:style-name="T14">Response Sample</text:span></text:span></text:p>
      <table:table table:name="Table64" table:style-name="Table64">
        <table:table-column table:style-name="Table64.A"/>
        <table:table-row>
          <table:table-cell table:style-name="Table64.A1" office:value-type="string">
            <text:p text:style-name="P32">{</text:p>
            <text:p text:style-name="P32"><text:tab/>"statusCode" : 200,</text:p>
            <text:p text:style-name="P32"><text:tab/>"status" : "success",</text:p>
            <text:p text:style-name="P32"><text:tab/>"message" : "The data is returned successfully.",</text:p>
            <text:p text:style-name="P32"><text:tab/>"errorCode" : 0,</text:p>
            <text:p text:style-name="P32"><text:tab/>"data" : {</text:p>
            <text:p text:style-name="P32"><text:tab/><text:tab/>"id" : 16621244611384550112, </text:p>
            <text:p text:style-name="P32"><text:tab/><text:tab/>"title" : "test",</text:p>
            <text:p text:style-name="P32"><text:tab/><text:tab/>"code" : "123",</text:p>
            <text:p text:style-name="P32"><text:tab/><text:tab/>"description" : "test",</text:p>
            <text:p text:style-name="P32"><text:tab/><text:tab/>"profileId": [{</text:p>
            <text:p text:style-name="P32"><text:tab/><text:tab/><text:tab/>"id" : 16621244611384550113,</text:p>
            <text:p text:style-name="P32"><text:tab/><text:tab/><text:tab/>"firstName": "David",</text:p>
            <text:p text:style-name="P32"><text:tab/><text:tab/><text:tab/>"lastName": "Talor"</text:p>
            <text:p text:style-name="P32"><text:tab/><text:tab/>}],</text:p>
            <text:p text:style-name="P32"><text:tab/><text:tab/>"roleFormPermissionId": [{</text:p>
            <text:p text:style-name="P32"><text:tab/><text:tab/><text:tab/>"id" : 16621244611384550114,</text:p>
            <text:p text:style-name="P32"><text:tab/><text:tab/><text:tab/>"formPermissionId": {</text:p>
            <text:p text:style-name="P32"><text:tab/><text:tab/><text:tab/><text:tab/>"id" : 16621244611384550114,</text:p>
            <text:p text:style-name="P32"><text:tab/><text:tab/><text:tab/><text:tab/>"formId": {</text:p>
            <text:p text:style-name="P32"><text:tab/><text:tab/><text:tab/><text:tab/><text:tab/>"id" : 16621244611384550115,</text:p>
            <text:p text:style-name="P32"><text:tab/><text:tab/><text:tab/><text:tab/><text:tab/>"title": "Project"</text:p>
            <text:p text:style-name="P32"><text:tab/><text:tab/><text:tab/><text:tab/>},</text:p>
            <text:p text:style-name="P32"><text:tab/><text:tab/><text:tab/><text:tab/>"permissionId": {</text:p>
            <text:p text:style-name="P32"><text:tab/><text:tab/><text:tab/><text:tab/><text:tab/>"id" : 16621244611384550116,</text:p>
            <text:p text:style-name="P32"><text:tab/><text:tab/><text:tab/><text:tab/><text:tab/>"title": "Add"</text:p>
            <text:p text:style-name="P32"><text:tab/><text:tab/><text:tab/><text:tab/>}</text:p>
            <text:p text:style-name="P32"><text:tab/><text:tab/><text:tab/>}</text:p>
            <text:p text:style-name="P32"><text:tab/><text:tab/>}],</text:p>
            <text:p text:style-name="P32"><text:tab/><text:tab/>"createdAt" : "2025-8-25 12:00:00",</text:p>
            <text:p text:style-name="P32"><text:tab/><text:tab/>"createdBy" : "John Davis" </text:p>
            <text:p text:style-name="P32"><text:tab/>}</text:p>
            <text:p text:style-name="P32">}</text:p>
          </table:table-cell>
        </table:table-row>
      </table:table>
      <text:p text:style-name="P31"><text:span text:style-name="Strong_20_Emphasis"/></text:p>
      <text:h text:style-name="P29" text:outline-level="1"><text:bookmark-start text:name="__RefHeading___Toc227_771010674 Copy 1 Copy 1 Copy 3 Copy 4"/><text:soft-page-break/><text:span text:style-name="T5">P</text:span><text:span text:style-name="T6">roject </text:span><text:span text:style-name="T25">Workflow Resol</text:span><text:span text:style-name="T28">u</text:span><text:span text:style-name="T25">tion</text:span><text:bookmark-end text:name="__RefHeading___Toc227_771010674 Copy 1 Copy 1 Copy 3 Copy 4"/></text:h>
      <text:h text:style-name="P30" text:outline-level="2"><text:bookmark-start text:name="__RefHeading___Toc908_3206075736 Copy 1 Copy 1 Copy 1 Copy 3 Copy 4"/><text:span text:style-name="Strong_20_Emphasis"><text:span text:style-name="T7">Delete</text:span></text:span><text:bookmark-end text:name="__RefHeading___Toc908_3206075736 Copy 1 Copy 1 Copy 1 Copy 3 Copy 4"/></text:h>
      <text:p text:style-name="P31"><text:span text:style-name="Strong_20_Emphasis"><text:span text:style-name="T8">Description</text:span></text:span></text:p>
      <text:p text:style-name="P37"><text:span text:style-name="Strong_20_Emphasis"><text:span text:style-name="T9">This API </text:span></text:span><text:span text:style-name="Strong_20_Emphasis"><text:span text:style-name="T10">logically</text:span></text:span><text:span text:style-name="Strong_20_Emphasis"><text:span text:style-name="T9"> deletes a “</text:span></text:span><text:span text:style-name="Strong_20_Emphasis"><text:span text:style-name="T11">project </text:span></text:span><text:span text:style-name="Strong_20_Emphasis"><text:span text:style-name="T29">workflow resolution</text:span></text:span><text:span text:style-name="Strong_20_Emphasis"><text:span text:style-name="T9">” from the </text:span></text:span><text:span text:style-name="Strong_20_Emphasis"><text:span text:style-name="T11">project</text:span></text:span><text:span text:style-name="Strong_20_Emphasis"><text:span text:style-name="T12"> man</text:span></text:span><text:span text:style-name="Strong_20_Emphasis"><text:span text:style-name="T13">a</text:span></text:span><text:span text:style-name="Strong_20_Emphasis"><text:span text:style-name="T12">gement</text:span></text:span><text:span text:style-name="Strong_20_Emphasis"><text:span text:style-name="T9">.</text:span></text:span></text:p>
      <text:p text:style-name="P31"><text:span text:style-name="Strong_20_Emphasis"><text:span text:style-name="T14">Request CURL Sample</text:span></text:span></text:p>
      <table:table table:name="Table65" table:style-name="Table65">
        <table:table-column table:style-name="Table65.A"/>
        <table:table-row>
          <table:table-cell table:style-name="Table65.A1" office:value-type="string">
            <text:p text:style-name="P32">curl --request DELETE \</text:p>
            <text:p text:style-name="P32"><text:s text:c="2"/>--url 'https://[maindomian]/api/projectManagement/projectWorkflowResolution/[id]' \</text:p>
            <text:p text:style-name="P32"><text:s text:c="2"/>--header 'Authorization: Bearer [token]'</text:p>
          </table:table-cell>
        </table:table-row>
      </table:table>
      <text:p text:style-name="P31"><text:span text:style-name="Strong_20_Emphasis"><text:span text:style-name="T15"/></text:span></text:p>
      <text:p text:style-name="P31"><text:span text:style-name="Strong_20_Emphasis"><text:span text:style-name="T14">Response Sample</text:span></text:span></text:p>
      <table:table table:name="Table66" table:style-name="Table66">
        <table:table-column table:style-name="Table66.A"/>
        <table:table-row>
          <table:table-cell table:style-name="Table66.A1" office:value-type="string">
            <text:p text:style-name="P32">{</text:p>
            <text:p text:style-name="P32"><text:tab/>"statusCode" : 200,</text:p>
            <text:p text:style-name="P32"><text:tab/>"status" : "success",</text:p>
            <text:p text:style-name="P32"><text:tab/>"message" : "The record is <text:span text:style-name="T16">deleted</text:span> successfully.",</text:p>
            <text:p text:style-name="P32"><text:tab/>"errorCode" : 0,</text:p>
            <text:p text:style-name="P32"><text:tab/>"data" : <text:span text:style-name="T16">null</text:span></text:p>
            <text:p text:style-name="P32">}</text:p>
          </table:table-cell>
        </table:table-row>
      </table:table>
      <text:p text:style-name="P31"><text:span text:style-name="Strong_20_Emphasis"/></text:p>
      <text:h text:style-name="P30" text:outline-level="2"><text:bookmark-start text:name="__RefHeading___Toc2079_720390006 Copy 1 Copy 1 Copy 3 Copy 4"/><text:span text:style-name="Strong_20_Emphasis"><text:span text:style-name="T7">Active</text:span></text:span><text:bookmark-end text:name="__RefHeading___Toc2079_720390006 Copy 1 Copy 1 Copy 3 Copy 4"/></text:h>
      <text:p text:style-name="P31"><text:span text:style-name="Strong_20_Emphasis"><text:span text:style-name="T8">Description</text:span></text:span></text:p>
      <text:p text:style-name="P38"><text:span text:style-name="Strong_20_Emphasis"><text:span text:style-name="T9">This API actives a “</text:span></text:span><text:span text:style-name="Strong_20_Emphasis"><text:span text:style-name="T11">project </text:span></text:span><text:span text:style-name="Strong_20_Emphasis"><text:span text:style-name="T29">workflow resolution</text:span></text:span><text:span text:style-name="Strong_20_Emphasis"><text:span text:style-name="T9">” in the </text:span></text:span><text:span text:style-name="Strong_20_Emphasis"><text:span text:style-name="T11">project</text:span></text:span><text:span text:style-name="Strong_20_Emphasis"><text:span text:style-name="T12"> management</text:span></text:span><text:span text:style-name="Strong_20_Emphasis"><text:span text:style-name="T9">.</text:span></text:span></text:p>
      <text:p text:style-name="P31"><text:span text:style-name="Strong_20_Emphasis"><text:span text:style-name="T14">Request CURL Sample</text:span></text:span></text:p>
      <table:table table:name="Table67" table:style-name="Table67">
        <table:table-column table:style-name="Table67.A"/>
        <table:table-row>
          <table:table-cell table:style-name="Table67.A1" office:value-type="string">
            <text:p text:style-name="P32">curl --request PUT \</text:p>
            <text:p text:style-name="P32"><text:s text:c="2"/>--url 'https://[maindomian]/api/projectManagement/projectWorkflowResolution/active/[id]' \</text:p>
            <text:p text:style-name="P32"><text:s text:c="2"/>--header 'Authorization: Bearer [token]'</text:p>
          </table:table-cell>
        </table:table-row>
      </table:table>
      <text:p text:style-name="P31"><text:span text:style-name="Strong_20_Emphasis"><text:span text:style-name="T15"/></text:span></text:p>
      <text:p text:style-name="P31"><text:span text:style-name="Strong_20_Emphasis"><text:span text:style-name="T14">Response Sample</text:span></text:span></text:p>
      <table:table table:name="Table68" table:style-name="Table68">
        <table:table-column table:style-name="Table68.A"/>
        <text:soft-page-break/>
        <table:table-row>
          <table:table-cell table:style-name="Table68.A1" office:value-type="string">
            <text:p text:style-name="P32">{</text:p>
            <text:p text:style-name="P32"><text:tab/>"statusCode" : 200,</text:p>
            <text:p text:style-name="P32"><text:tab/>"status" : "success",</text:p>
            <text:p text:style-name="P32"><text:tab/>"message" : "The record is <text:span text:style-name="T16">activated</text:span> successfully.",</text:p>
            <text:p text:style-name="P32"><text:tab/>"errorCode" : 0,</text:p>
            <text:p text:style-name="P32"><text:tab/>"data" : <text:span text:style-name="T16">null</text:span></text:p>
            <text:p text:style-name="P32">}</text:p>
          </table:table-cell>
        </table:table-row>
      </table:table>
      <text:p text:style-name="P31"><text:span text:style-name="Strong_20_Emphasis"/></text:p>
      <text:h text:style-name="P30" text:outline-level="2"><text:bookmark-start text:name="__RefHeading___Toc2083_720390006 Copy 1 Copy 1 Copy 3 Copy 4"/><text:span text:style-name="Strong_20_Emphasis"><text:span text:style-name="T7">Inactive</text:span></text:span><text:bookmark-end text:name="__RefHeading___Toc2083_720390006 Copy 1 Copy 1 Copy 3 Copy 4"/></text:h>
      <text:p text:style-name="P31"><text:span text:style-name="Strong_20_Emphasis"><text:span text:style-name="T8">Description</text:span></text:span></text:p>
      <text:p text:style-name="P38"><text:span text:style-name="Strong_20_Emphasis"><text:span text:style-name="T9">This API </text:span></text:span><text:span text:style-name="Strong_20_Emphasis"><text:span text:style-name="T17">in</text:span></text:span><text:span text:style-name="Strong_20_Emphasis"><text:span text:style-name="T9">-actives a specific “</text:span></text:span><text:span text:style-name="Strong_20_Emphasis"><text:span text:style-name="T11">project </text:span></text:span><text:span text:style-name="Strong_20_Emphasis"><text:span text:style-name="T29">workflow resolution</text:span></text:span><text:span text:style-name="Strong_20_Emphasis"><text:span text:style-name="T9">” in the </text:span></text:span><text:span text:style-name="Strong_20_Emphasis"><text:span text:style-name="T11">project</text:span></text:span><text:span text:style-name="Strong_20_Emphasis"><text:span text:style-name="T12"> management</text:span></text:span><text:span text:style-name="Strong_20_Emphasis"><text:span text:style-name="T9">.</text:span></text:span></text:p>
      <text:p text:style-name="P31"><text:span text:style-name="Strong_20_Emphasis"><text:span text:style-name="T14">Request CURL Sample</text:span></text:span></text:p>
      <table:table table:name="Table69" table:style-name="Table69">
        <table:table-column table:style-name="Table69.A"/>
        <table:table-row>
          <table:table-cell table:style-name="Table69.A1" office:value-type="string">
            <text:p text:style-name="P32">curl --request PUT \</text:p>
            <text:p text:style-name="P32"><text:s text:c="2"/>--url 'https://[maindomian]/api/projectManagement/projectWorkflowResolution/inactive/[id]' \</text:p>
            <text:p text:style-name="P32"><text:s text:c="2"/>--header 'Authorization: Bearer [token]'</text:p>
          </table:table-cell>
        </table:table-row>
      </table:table>
      <text:p text:style-name="P31"><text:span text:style-name="Strong_20_Emphasis"><text:span text:style-name="T15"/></text:span></text:p>
      <text:p text:style-name="P31"><text:span text:style-name="Strong_20_Emphasis"><text:span text:style-name="T14">Response Sample</text:span></text:span></text:p>
      <table:table table:name="Table70" table:style-name="Table70">
        <table:table-column table:style-name="Table70.A"/>
        <table:table-row>
          <table:table-cell table:style-name="Table70.A1" office:value-type="string">
            <text:p text:style-name="P32">{</text:p>
            <text:p text:style-name="P32"><text:tab/>"statusCode" : 200,</text:p>
            <text:p text:style-name="P32"><text:tab/>"status" : "success",</text:p>
            <text:p text:style-name="P32"><text:tab/>"message" : "The record is <text:span text:style-name="T18">in</text:span><text:span text:style-name="T16">activated</text:span> successfully.",</text:p>
            <text:p text:style-name="P32"><text:tab/>"errorCode" : 0,</text:p>
            <text:p text:style-name="P32"><text:tab/>"data" : <text:span text:style-name="T16">null</text:span></text:p>
            <text:p text:style-name="P32">}</text:p>
          </table:table-cell>
        </table:table-row>
      </table:table>
      <text:p text:style-name="P31"><text:span text:style-name="Strong_20_Emphasis"/></text:p>
      <text:h text:style-name="P30" text:outline-level="2"><text:bookmark-start text:name="__RefHeading___Toc2085_720390006 Copy 1 Copy 1 Copy 3 Copy 4"/><text:span text:style-name="Strong_20_Emphasis"><text:span text:style-name="T7">Fetch Specific Record</text:span></text:span><text:bookmark-end text:name="__RefHeading___Toc2085_720390006 Copy 1 Copy 1 Copy 3 Copy 4"/></text:h>
      <text:p text:style-name="P31"><text:span text:style-name="Strong_20_Emphasis"><text:span text:style-name="T8">Description</text:span></text:span></text:p>
      <text:p text:style-name="P38"><text:span text:style-name="Strong_20_Emphasis"><text:span text:style-name="T9">This API </text:span></text:span><text:span text:style-name="Strong_20_Emphasis"><text:span text:style-name="T19">returns</text:span></text:span><text:span text:style-name="Strong_20_Emphasis"><text:span text:style-name="T9"> a specific “</text:span></text:span><text:span text:style-name="Strong_20_Emphasis"><text:span text:style-name="T11">project </text:span></text:span><text:span text:style-name="Strong_20_Emphasis"><text:span text:style-name="T29">workflow resolution</text:span></text:span><text:span text:style-name="Strong_20_Emphasis"><text:span text:style-name="T9">” </text:span></text:span><text:span text:style-name="Strong_20_Emphasis"><text:span text:style-name="T19">from</text:span></text:span><text:span text:style-name="Strong_20_Emphasis"><text:span text:style-name="T9"> the </text:span></text:span><text:span text:style-name="Strong_20_Emphasis"><text:span text:style-name="T11">project</text:span></text:span><text:span text:style-name="Strong_20_Emphasis"><text:span text:style-name="T20"> management</text:span></text:span><text:span text:style-name="Strong_20_Emphasis"><text:span text:style-name="T9">.</text:span></text:span></text:p>
      <text:p text:style-name="P31"><text:span text:style-name="Strong_20_Emphasis"><text:span text:style-name="T14">Request CURL Sample</text:span></text:span></text:p>
      <table:table table:name="Table71" table:style-name="Table71">
        <table:table-column table:style-name="Table71.A"/>
        <table:table-row>
          <table:table-cell table:style-name="Table71.A1" office:value-type="string">
            <text:p text:style-name="P32">curl --request GET \</text:p>
            <text:p text:style-name="P32"><text:soft-page-break/><text:s text:c="2"/>--url 'https://[maindomian]/api/projectManagement/projectWorkflowResolution/[id]' \</text:p>
            <text:p text:style-name="P32"><text:s text:c="2"/>--header 'Authorization: Bearer [token]'</text:p>
          </table:table-cell>
        </table:table-row>
      </table:table>
      <text:p text:style-name="P31"><text:span text:style-name="Strong_20_Emphasis"><text:span text:style-name="T15"/></text:span></text:p>
      <text:p text:style-name="P31"><text:span text:style-name="Strong_20_Emphasis"><text:span text:style-name="T14">Response Sample</text:span></text:span></text:p>
      <table:table table:name="Table72" table:style-name="Table72">
        <table:table-column table:style-name="Table72.A"/>
        <table:table-row>
          <table:table-cell table:style-name="Table72.A1" office:value-type="string">
            <text:p text:style-name="P32">{</text:p>
            <text:p text:style-name="P32"><text:tab/>"statusCode" : 200,</text:p>
            <text:p text:style-name="P32"><text:tab/>"status" : "success",</text:p>
            <text:p text:style-name="P32"><text:tab/>"message" : "The data is returned successfully.",</text:p>
            <text:p text:style-name="P32"><text:tab/>"errorCode" : 0,</text:p>
            <text:p text:style-name="P32"><text:tab/>"data" : {</text:p>
            <text:p text:style-name="P32"><text:tab/><text:tab/>"id" : 16621244611384550112, </text:p>
            <text:p text:style-name="P32"><text:tab/><text:tab/>"title" : "test",</text:p>
            <text:p text:style-name="P32"><text:tab/><text:tab/>"code" : "123",</text:p>
            <text:p text:style-name="P32"><text:tab/><text:tab/>"description" : "test",</text:p>
            <text:p text:style-name="P32"><text:tab/><text:tab/>"profileId": [{</text:p>
            <text:p text:style-name="P32"><text:tab/><text:tab/><text:tab/>"id" : 16621244611384550113,</text:p>
            <text:p text:style-name="P32"><text:tab/><text:tab/><text:tab/>"firstName": "David",</text:p>
            <text:p text:style-name="P32"><text:tab/><text:tab/><text:tab/>"lastName": "Talor"</text:p>
            <text:p text:style-name="P32"><text:tab/><text:tab/>}],</text:p>
            <text:p text:style-name="P32"><text:tab/><text:tab/>"roleFormPermissionId": [{</text:p>
            <text:p text:style-name="P32"><text:tab/><text:tab/><text:tab/>"id" : 16621244611384550114,</text:p>
            <text:p text:style-name="P32"><text:tab/><text:tab/><text:tab/>"formPermissionId": {</text:p>
            <text:p text:style-name="P32"><text:tab/><text:tab/><text:tab/><text:tab/>"id" : 16621244611384550114,</text:p>
            <text:p text:style-name="P32"><text:tab/><text:tab/><text:tab/><text:tab/>"formId": {</text:p>
            <text:p text:style-name="P32"><text:tab/><text:tab/><text:tab/><text:tab/><text:tab/>"id" : 16621244611384550115,</text:p>
            <text:p text:style-name="P32"><text:tab/><text:tab/><text:tab/><text:tab/><text:tab/>"title": "Project"</text:p>
            <text:p text:style-name="P32"><text:tab/><text:tab/><text:tab/><text:tab/>},</text:p>
            <text:p text:style-name="P32"><text:tab/><text:tab/><text:tab/><text:tab/>"permissionId": {</text:p>
            <text:p text:style-name="P32"><text:tab/><text:tab/><text:tab/><text:tab/><text:tab/>"id" : 16621244611384550116,</text:p>
            <text:p text:style-name="P32"><text:tab/><text:tab/><text:tab/><text:tab/><text:tab/>"title": "Add"</text:p>
            <text:p text:style-name="P32"><text:tab/><text:tab/><text:tab/><text:tab/>}</text:p>
            <text:p text:style-name="P32"><text:tab/><text:tab/><text:tab/>}</text:p>
            <text:p text:style-name="P32"><text:tab/><text:tab/>}],</text:p>
            <text:p text:style-name="P32"><text:tab/><text:tab/>"createdAt" : "2025-8-25 12:00:00",</text:p>
            <text:p text:style-name="P32"><text:tab/><text:tab/>"createdBy" : "John Davis" </text:p>
            <text:p text:style-name="P32"><text:tab/>}</text:p>
            <text:p text:style-name="P32">}</text:p>
          </table:table-cell>
        </table:table-row>
      </table:table>
      <text:p text:style-name="P31"><text:span text:style-name="Strong_20_Emphasis"/></text:p>
      <text:h text:style-name="P29" text:outline-level="1"><text:bookmark-start text:name="__RefHeading___Toc227_771010674 Copy 1 Copy 1 Copy 3 Copy 5"/><text:soft-page-break/><text:span text:style-name="T5">P</text:span><text:span text:style-name="T6">roject </text:span><text:span text:style-name="T25">Workflow Progress</text:span><text:bookmark-end text:name="__RefHeading___Toc227_771010674 Copy 1 Copy 1 Copy 3 Copy 5"/></text:h>
      <text:h text:style-name="P30" text:outline-level="2"><text:bookmark-start text:name="__RefHeading___Toc908_3206075736 Copy 1 Copy 1 Copy 1 Copy 3 Copy 5"/><text:span text:style-name="Strong_20_Emphasis"><text:span text:style-name="T7">Delete</text:span></text:span><text:bookmark-end text:name="__RefHeading___Toc908_3206075736 Copy 1 Copy 1 Copy 1 Copy 3 Copy 5"/></text:h>
      <text:p text:style-name="P31"><text:span text:style-name="Strong_20_Emphasis"><text:span text:style-name="T8">Description</text:span></text:span></text:p>
      <text:p text:style-name="P31"><text:span text:style-name="Strong_20_Emphasis"><text:span text:style-name="T9">This API </text:span></text:span><text:span text:style-name="Strong_20_Emphasis"><text:span text:style-name="T10">logically</text:span></text:span><text:span text:style-name="Strong_20_Emphasis"><text:span text:style-name="T9"> deletes a “</text:span></text:span><text:span text:style-name="Strong_20_Emphasis"><text:span text:style-name="T11">project </text:span></text:span><text:span text:style-name="Strong_20_Emphasis"><text:span text:style-name="T30">workflow progress</text:span></text:span><text:span text:style-name="Strong_20_Emphasis"><text:span text:style-name="T9">” from the </text:span></text:span><text:span text:style-name="Strong_20_Emphasis"><text:span text:style-name="T11">project</text:span></text:span><text:span text:style-name="Strong_20_Emphasis"><text:span text:style-name="T12"> man</text:span></text:span><text:span text:style-name="Strong_20_Emphasis"><text:span text:style-name="T13">a</text:span></text:span><text:span text:style-name="Strong_20_Emphasis"><text:span text:style-name="T12">gement</text:span></text:span><text:span text:style-name="Strong_20_Emphasis"><text:span text:style-name="T9">.</text:span></text:span></text:p>
      <text:p text:style-name="P31"><text:span text:style-name="Strong_20_Emphasis"><text:span text:style-name="T14">Request CURL Sample</text:span></text:span></text:p>
      <table:table table:name="Table73" table:style-name="Table73">
        <table:table-column table:style-name="Table73.A"/>
        <table:table-row>
          <table:table-cell table:style-name="Table73.A1" office:value-type="string">
            <text:p text:style-name="P32">curl --request DELETE \</text:p>
            <text:p text:style-name="P32"><text:s text:c="2"/>--url 'https://[maindomian]/api/projectManagement/projectWorkflowProgress/[id]' \</text:p>
            <text:p text:style-name="P32"><text:s text:c="2"/>--header 'Authorization: Bearer [token]'</text:p>
          </table:table-cell>
        </table:table-row>
      </table:table>
      <text:p text:style-name="P31"><text:span text:style-name="Strong_20_Emphasis"><text:span text:style-name="T15"/></text:span></text:p>
      <text:p text:style-name="P31"><text:span text:style-name="Strong_20_Emphasis"><text:span text:style-name="T14">Response Sample</text:span></text:span></text:p>
      <table:table table:name="Table74" table:style-name="Table74">
        <table:table-column table:style-name="Table74.A"/>
        <table:table-row>
          <table:table-cell table:style-name="Table74.A1" office:value-type="string">
            <text:p text:style-name="P32">{</text:p>
            <text:p text:style-name="P32"><text:tab/>"statusCode" : 200,</text:p>
            <text:p text:style-name="P32"><text:tab/>"status" : "success",</text:p>
            <text:p text:style-name="P32"><text:tab/>"message" : "The record is <text:span text:style-name="T16">deleted</text:span> successfully.",</text:p>
            <text:p text:style-name="P32"><text:tab/>"errorCode" : 0,</text:p>
            <text:p text:style-name="P32"><text:tab/>"data" : <text:span text:style-name="T16">null</text:span></text:p>
            <text:p text:style-name="P32">}</text:p>
          </table:table-cell>
        </table:table-row>
      </table:table>
      <text:p text:style-name="P31"><text:span text:style-name="Strong_20_Emphasis"/></text:p>
      <text:h text:style-name="P30" text:outline-level="2"><text:bookmark-start text:name="__RefHeading___Toc2079_720390006 Copy 1 Copy 1 Copy 3 Copy 5"/><text:span text:style-name="Strong_20_Emphasis"><text:span text:style-name="T7">Active</text:span></text:span><text:bookmark-end text:name="__RefHeading___Toc2079_720390006 Copy 1 Copy 1 Copy 3 Copy 5"/></text:h>
      <text:p text:style-name="P31"><text:span text:style-name="Strong_20_Emphasis"><text:span text:style-name="T8">Description</text:span></text:span></text:p>
      <text:p text:style-name="P39"><text:span text:style-name="Strong_20_Emphasis"><text:span text:style-name="T9">This API actives a “</text:span></text:span><text:span text:style-name="Strong_20_Emphasis"><text:span text:style-name="T11">project </text:span></text:span><text:span text:style-name="Strong_20_Emphasis"><text:span text:style-name="T30">workflow progress</text:span></text:span><text:span text:style-name="Strong_20_Emphasis"><text:span text:style-name="T9">” in the </text:span></text:span><text:span text:style-name="Strong_20_Emphasis"><text:span text:style-name="T11">project</text:span></text:span><text:span text:style-name="Strong_20_Emphasis"><text:span text:style-name="T12"> management</text:span></text:span><text:span text:style-name="Strong_20_Emphasis"><text:span text:style-name="T9">.</text:span></text:span></text:p>
      <text:p text:style-name="P31"><text:span text:style-name="Strong_20_Emphasis"><text:span text:style-name="T14">Request CURL Sample</text:span></text:span></text:p>
      <table:table table:name="Table75" table:style-name="Table75">
        <table:table-column table:style-name="Table75.A"/>
        <table:table-row>
          <table:table-cell table:style-name="Table75.A1" office:value-type="string">
            <text:p text:style-name="P32">curl --request PUT \</text:p>
            <text:p text:style-name="P32"><text:s text:c="2"/>--url 'https://[maindomian]/api/projectManagement/projectWorkflowProgress/active/[id]' \</text:p>
            <text:p text:style-name="P32"><text:s text:c="2"/>--header 'Authorization: Bearer [token]'</text:p>
          </table:table-cell>
        </table:table-row>
      </table:table>
      <text:p text:style-name="P31"><text:span text:style-name="Strong_20_Emphasis"><text:span text:style-name="T15"/></text:span></text:p>
      <text:p text:style-name="P31"><text:span text:style-name="Strong_20_Emphasis"><text:span text:style-name="T14">Response Sample</text:span></text:span></text:p>
      <table:table table:name="Table76" table:style-name="Table76">
        <table:table-column table:style-name="Table76.A"/>
        <text:soft-page-break/>
        <table:table-row>
          <table:table-cell table:style-name="Table76.A1" office:value-type="string">
            <text:p text:style-name="P32">{</text:p>
            <text:p text:style-name="P32"><text:tab/>"statusCode" : 200,</text:p>
            <text:p text:style-name="P32"><text:tab/>"status" : "success",</text:p>
            <text:p text:style-name="P32"><text:tab/>"message" : "The record is <text:span text:style-name="T16">activated</text:span> successfully.",</text:p>
            <text:p text:style-name="P32"><text:tab/>"errorCode" : 0,</text:p>
            <text:p text:style-name="P32"><text:tab/>"data" : <text:span text:style-name="T16">null</text:span></text:p>
            <text:p text:style-name="P32">}</text:p>
          </table:table-cell>
        </table:table-row>
      </table:table>
      <text:p text:style-name="P31"><text:span text:style-name="Strong_20_Emphasis"/></text:p>
      <text:h text:style-name="P30" text:outline-level="2"><text:bookmark-start text:name="__RefHeading___Toc2083_720390006 Copy 1 Copy 1 Copy 3 Copy 5"/><text:span text:style-name="Strong_20_Emphasis"><text:span text:style-name="T7">Inactive</text:span></text:span><text:bookmark-end text:name="__RefHeading___Toc2083_720390006 Copy 1 Copy 1 Copy 3 Copy 5"/></text:h>
      <text:p text:style-name="P31"><text:span text:style-name="Strong_20_Emphasis"><text:span text:style-name="T8">Description</text:span></text:span></text:p>
      <text:p text:style-name="P39"><text:span text:style-name="Strong_20_Emphasis"><text:span text:style-name="T9">This API </text:span></text:span><text:span text:style-name="Strong_20_Emphasis"><text:span text:style-name="T17">in</text:span></text:span><text:span text:style-name="Strong_20_Emphasis"><text:span text:style-name="T9">-actives a specific “</text:span></text:span><text:span text:style-name="Strong_20_Emphasis"><text:span text:style-name="T11">project </text:span></text:span><text:span text:style-name="Strong_20_Emphasis"><text:span text:style-name="T30">workflow progress</text:span></text:span><text:span text:style-name="Strong_20_Emphasis"><text:span text:style-name="T9">” in the </text:span></text:span><text:span text:style-name="Strong_20_Emphasis"><text:span text:style-name="T11">project</text:span></text:span><text:span text:style-name="Strong_20_Emphasis"><text:span text:style-name="T12"> management</text:span></text:span><text:span text:style-name="Strong_20_Emphasis"><text:span text:style-name="T9">.</text:span></text:span></text:p>
      <text:p text:style-name="P31"><text:span text:style-name="Strong_20_Emphasis"><text:span text:style-name="T14">Request CURL Sample</text:span></text:span></text:p>
      <table:table table:name="Table77" table:style-name="Table77">
        <table:table-column table:style-name="Table77.A"/>
        <table:table-row>
          <table:table-cell table:style-name="Table77.A1" office:value-type="string">
            <text:p text:style-name="P32">curl --request PUT \</text:p>
            <text:p text:style-name="P32"><text:s text:c="2"/>--url 'https://[maindomian]/api/projectManagement/projectWorkflowProgress/inactive/[id]' \</text:p>
            <text:p text:style-name="P32"><text:s text:c="2"/>--header 'Authorization: Bearer [token]'</text:p>
          </table:table-cell>
        </table:table-row>
      </table:table>
      <text:p text:style-name="P31"><text:span text:style-name="Strong_20_Emphasis"><text:span text:style-name="T15"/></text:span></text:p>
      <text:p text:style-name="P31"><text:span text:style-name="Strong_20_Emphasis"><text:span text:style-name="T14">Response Sample</text:span></text:span></text:p>
      <table:table table:name="Table78" table:style-name="Table78">
        <table:table-column table:style-name="Table78.A"/>
        <table:table-row>
          <table:table-cell table:style-name="Table78.A1" office:value-type="string">
            <text:p text:style-name="P32">{</text:p>
            <text:p text:style-name="P32"><text:tab/>"statusCode" : 200,</text:p>
            <text:p text:style-name="P32"><text:tab/>"status" : "success",</text:p>
            <text:p text:style-name="P32"><text:tab/>"message" : "The record is <text:span text:style-name="T18">in</text:span><text:span text:style-name="T16">activated</text:span> successfully.",</text:p>
            <text:p text:style-name="P32"><text:tab/>"errorCode" : 0,</text:p>
            <text:p text:style-name="P32"><text:tab/>"data" : <text:span text:style-name="T16">null</text:span></text:p>
            <text:p text:style-name="P32">}</text:p>
          </table:table-cell>
        </table:table-row>
      </table:table>
      <text:p text:style-name="P31"><text:span text:style-name="Strong_20_Emphasis"/></text:p>
      <text:h text:style-name="P30" text:outline-level="2"><text:bookmark-start text:name="__RefHeading___Toc2085_720390006 Copy 1 Copy 1 Copy 3 Copy 5"/><text:span text:style-name="Strong_20_Emphasis"><text:span text:style-name="T7">Fetch Specific Record</text:span></text:span><text:bookmark-end text:name="__RefHeading___Toc2085_720390006 Copy 1 Copy 1 Copy 3 Copy 5"/></text:h>
      <text:p text:style-name="P31"><text:span text:style-name="Strong_20_Emphasis"><text:span text:style-name="T8">Description</text:span></text:span></text:p>
      <text:p text:style-name="P39"><text:span text:style-name="Strong_20_Emphasis"><text:span text:style-name="T9">This API </text:span></text:span><text:span text:style-name="Strong_20_Emphasis"><text:span text:style-name="T19">returns</text:span></text:span><text:span text:style-name="Strong_20_Emphasis"><text:span text:style-name="T9"> a specific “</text:span></text:span><text:span text:style-name="Strong_20_Emphasis"><text:span text:style-name="T11">project </text:span></text:span><text:span text:style-name="Strong_20_Emphasis"><text:span text:style-name="T30">workflow progress</text:span></text:span><text:span text:style-name="Strong_20_Emphasis"><text:span text:style-name="T9">” </text:span></text:span><text:span text:style-name="Strong_20_Emphasis"><text:span text:style-name="T19">from</text:span></text:span><text:span text:style-name="Strong_20_Emphasis"><text:span text:style-name="T9"> the </text:span></text:span><text:span text:style-name="Strong_20_Emphasis"><text:span text:style-name="T11">project</text:span></text:span><text:span text:style-name="Strong_20_Emphasis"><text:span text:style-name="T20"> management</text:span></text:span><text:span text:style-name="Strong_20_Emphasis"><text:span text:style-name="T9">.</text:span></text:span></text:p>
      <text:p text:style-name="P31"><text:span text:style-name="Strong_20_Emphasis"><text:span text:style-name="T14">Request CURL Sample</text:span></text:span></text:p>
      <table:table table:name="Table79" table:style-name="Table79">
        <table:table-column table:style-name="Table79.A"/>
        <table:table-row>
          <table:table-cell table:style-name="Table79.A1" office:value-type="string">
            <text:p text:style-name="P32">curl --request GET \</text:p>
            <text:p text:style-name="P32"><text:soft-page-break/><text:s text:c="2"/>--url 'https://[maindomian]/api/projectManagement/projectWorkflowProgress/[id]' \</text:p>
            <text:p text:style-name="P32"><text:s text:c="2"/>--header 'Authorization: Bearer [token]'</text:p>
          </table:table-cell>
        </table:table-row>
      </table:table>
      <text:p text:style-name="P31"><text:span text:style-name="Strong_20_Emphasis"><text:span text:style-name="T15"/></text:span></text:p>
      <text:p text:style-name="P31"><text:span text:style-name="Strong_20_Emphasis"><text:span text:style-name="T14">Response Sample</text:span></text:span></text:p>
      <table:table table:name="Table80" table:style-name="Table80">
        <table:table-column table:style-name="Table80.A"/>
        <table:table-row>
          <table:table-cell table:style-name="Table80.A1" office:value-type="string">
            <text:p text:style-name="P32">{</text:p>
            <text:p text:style-name="P32"><text:tab/>"statusCode" : 200,</text:p>
            <text:p text:style-name="P32"><text:tab/>"status" : "success",</text:p>
            <text:p text:style-name="P32"><text:tab/>"message" : "The data is returned successfully.",</text:p>
            <text:p text:style-name="P32"><text:tab/>"errorCode" : 0,</text:p>
            <text:p text:style-name="P32"><text:tab/>"data" : {</text:p>
            <text:p text:style-name="P32"><text:tab/><text:tab/>"id" : 16621244611384550112, </text:p>
            <text:p text:style-name="P32"><text:tab/><text:tab/>"title" : "test",</text:p>
            <text:p text:style-name="P32"><text:tab/><text:tab/>"code" : "123",</text:p>
            <text:p text:style-name="P32"><text:tab/><text:tab/>"description" : "test",</text:p>
            <text:p text:style-name="P32"><text:tab/><text:tab/>"profileId": [{</text:p>
            <text:p text:style-name="P32"><text:tab/><text:tab/><text:tab/>"id" : 16621244611384550113,</text:p>
            <text:p text:style-name="P32"><text:tab/><text:tab/><text:tab/>"firstName": "David",</text:p>
            <text:p text:style-name="P32"><text:tab/><text:tab/><text:tab/>"lastName": "Talor"</text:p>
            <text:p text:style-name="P32"><text:tab/><text:tab/>}],</text:p>
            <text:p text:style-name="P32"><text:tab/><text:tab/>"roleFormPermissionId": [{</text:p>
            <text:p text:style-name="P32"><text:tab/><text:tab/><text:tab/>"id" : 16621244611384550114,</text:p>
            <text:p text:style-name="P32"><text:tab/><text:tab/><text:tab/>"formPermissionId": {</text:p>
            <text:p text:style-name="P32"><text:tab/><text:tab/><text:tab/><text:tab/>"id" : 16621244611384550114,</text:p>
            <text:p text:style-name="P32"><text:tab/><text:tab/><text:tab/><text:tab/>"formId": {</text:p>
            <text:p text:style-name="P32"><text:tab/><text:tab/><text:tab/><text:tab/><text:tab/>"id" : 16621244611384550115,</text:p>
            <text:p text:style-name="P32"><text:tab/><text:tab/><text:tab/><text:tab/><text:tab/>"title": "Project"</text:p>
            <text:p text:style-name="P32"><text:tab/><text:tab/><text:tab/><text:tab/>},</text:p>
            <text:p text:style-name="P32"><text:tab/><text:tab/><text:tab/><text:tab/>"permissionId": {</text:p>
            <text:p text:style-name="P32"><text:tab/><text:tab/><text:tab/><text:tab/><text:tab/>"id" : 16621244611384550116,</text:p>
            <text:p text:style-name="P32"><text:tab/><text:tab/><text:tab/><text:tab/><text:tab/>"title": "Add"</text:p>
            <text:p text:style-name="P32"><text:tab/><text:tab/><text:tab/><text:tab/>}</text:p>
            <text:p text:style-name="P32"><text:tab/><text:tab/><text:tab/>}</text:p>
            <text:p text:style-name="P32"><text:tab/><text:tab/>}],</text:p>
            <text:p text:style-name="P32"><text:tab/><text:tab/>"createdAt" : "2025-8-25 12:00:00",</text:p>
            <text:p text:style-name="P32"><text:tab/><text:tab/>"createdBy" : "John Davis" </text:p>
            <text:p text:style-name="P32"><text:tab/>}</text:p>
            <text:p text:style-name="P32">}</text:p>
          </table:table-cell>
        </table:table-row>
      </table:table>
      <text:p text:style-name="P31"><text:span text:style-name="Strong_20_Emphasis"/></text:p>
      <text:h text:style-name="P40" text:outline-level="1"><text:bookmark-start text:name="__RefHeading___Toc227_771010674 Copy 1 Copy 1 Copy 3 Copy 5 Copy 1"/><text:soft-page-break/><text:span text:style-name="T25">I</text:span><text:span text:style-name="T6">ssue</text:span><text:bookmark-end text:name="__RefHeading___Toc227_771010674 Copy 1 Copy 1 Copy 3 Copy 5 Copy 1"/></text:h>
      <text:h text:style-name="P41" text:outline-level="2"><text:bookmark-start text:name="__RefHeading___Toc908_3206075736 Copy 1 Copy 1 Copy 1 Copy 3 Copy 5 Copy 1"/><text:span text:style-name="Strong_20_Emphasis"><text:span text:style-name="T7">Delete</text:span></text:span><text:bookmark-end text:name="__RefHeading___Toc908_3206075736 Copy 1 Copy 1 Copy 1 Copy 3 Copy 5 Copy 1"/></text:h>
      <text:p text:style-name="P42"><text:span text:style-name="Strong_20_Emphasis"><text:span text:style-name="T8">Description</text:span></text:span></text:p>
      <text:p text:style-name="P39"><text:span text:style-name="Strong_20_Emphasis"><text:span text:style-name="T9">This API </text:span></text:span><text:span text:style-name="Strong_20_Emphasis"><text:span text:style-name="T10">logically</text:span></text:span><text:span text:style-name="Strong_20_Emphasis"><text:span text:style-name="T9"> deletes a</text:span></text:span><text:span text:style-name="Strong_20_Emphasis"><text:span text:style-name="T31">n</text:span></text:span><text:span text:style-name="Strong_20_Emphasis"><text:span text:style-name="T9"> “</text:span></text:span><text:span text:style-name="Strong_20_Emphasis"><text:span text:style-name="T31">issue</text:span></text:span><text:span text:style-name="Strong_20_Emphasis"><text:span text:style-name="T9">” from the </text:span></text:span><text:span text:style-name="Strong_20_Emphasis"><text:span text:style-name="T11">project</text:span></text:span><text:span text:style-name="Strong_20_Emphasis"><text:span text:style-name="T12"> man</text:span></text:span><text:span text:style-name="Strong_20_Emphasis"><text:span text:style-name="T13">a</text:span></text:span><text:span text:style-name="Strong_20_Emphasis"><text:span text:style-name="T12">gement</text:span></text:span><text:span text:style-name="Strong_20_Emphasis"><text:span text:style-name="T9">.</text:span></text:span></text:p>
      <text:p text:style-name="P42"><text:span text:style-name="Strong_20_Emphasis"><text:span text:style-name="T14">Request CURL Sample</text:span></text:span></text:p>
      <table:table table:name="Table84" table:style-name="Table84">
        <table:table-column table:style-name="Table84.A"/>
        <table:table-row>
          <table:table-cell table:style-name="Table84.A1" office:value-type="string">
            <text:p text:style-name="P43">curl --request DELETE \</text:p>
            <text:p text:style-name="P43"><text:s text:c="2"/>--url 'https://[maindomian]/api/projectManagement/issue/[id]' \</text:p>
            <text:p text:style-name="P43"><text:s text:c="2"/>--header 'Authorization: Bearer [token]'</text:p>
          </table:table-cell>
        </table:table-row>
      </table:table>
      <text:p text:style-name="P42"><text:span text:style-name="Strong_20_Emphasis"><text:span text:style-name="T15"/></text:span></text:p>
      <text:p text:style-name="P42"><text:span text:style-name="Strong_20_Emphasis"><text:span text:style-name="T14">Response Sample</text:span></text:span></text:p>
      <table:table table:name="Table85" table:style-name="Table85">
        <table:table-column table:style-name="Table85.A"/>
        <table:table-row>
          <table:table-cell table:style-name="Table85.A1" office:value-type="string">
            <text:p text:style-name="P43">{</text:p>
            <text:p text:style-name="P43"><text:tab/>"statusCode" : 200,</text:p>
            <text:p text:style-name="P43"><text:tab/>"status" : "success",</text:p>
            <text:p text:style-name="P43"><text:tab/>"message" : "The record is <text:span text:style-name="T16">deleted</text:span> successfully.",</text:p>
            <text:p text:style-name="P43"><text:tab/>"errorCode" : 0,</text:p>
            <text:p text:style-name="P43"><text:tab/>"data" : <text:span text:style-name="T16">null</text:span></text:p>
            <text:p text:style-name="P43">}</text:p>
          </table:table-cell>
        </table:table-row>
      </table:table>
      <text:p text:style-name="P42"><text:span text:style-name="Strong_20_Emphasis"/></text:p>
      <text:h text:style-name="P41" text:outline-level="2"><text:bookmark-start text:name="__RefHeading___Toc2079_720390006 Copy 1 Copy 1 Copy 3 Copy 5 Copy 1"/><text:span text:style-name="Strong_20_Emphasis"><text:span text:style-name="T7">Active</text:span></text:span><text:bookmark-end text:name="__RefHeading___Toc2079_720390006 Copy 1 Copy 1 Copy 3 Copy 5 Copy 1"/></text:h>
      <text:p text:style-name="P42"><text:span text:style-name="Strong_20_Emphasis"><text:span text:style-name="T8">Description</text:span></text:span></text:p>
      <text:p text:style-name="P39"><text:span text:style-name="Strong_20_Emphasis"><text:span text:style-name="T9">This API actives a</text:span></text:span><text:span text:style-name="Strong_20_Emphasis"><text:span text:style-name="T31">n</text:span></text:span><text:span text:style-name="Strong_20_Emphasis"><text:span text:style-name="T9"> “</text:span></text:span><text:span text:style-name="Strong_20_Emphasis"><text:span text:style-name="T31">issue</text:span></text:span><text:span text:style-name="Strong_20_Emphasis"><text:span text:style-name="T9">” in the </text:span></text:span><text:span text:style-name="Strong_20_Emphasis"><text:span text:style-name="T11">project</text:span></text:span><text:span text:style-name="Strong_20_Emphasis"><text:span text:style-name="T12"> management</text:span></text:span><text:span text:style-name="Strong_20_Emphasis"><text:span text:style-name="T9">.</text:span></text:span></text:p>
      <text:p text:style-name="P42"><text:span text:style-name="Strong_20_Emphasis"><text:span text:style-name="T14">Request CURL Sample</text:span></text:span></text:p>
      <table:table table:name="Table86" table:style-name="Table86">
        <table:table-column table:style-name="Table86.A"/>
        <table:table-row>
          <table:table-cell table:style-name="Table86.A1" office:value-type="string">
            <text:p text:style-name="P43">curl --request PUT \</text:p>
            <text:p text:style-name="P43"><text:s text:c="2"/>--url 'https://[maindomian]/api/projectManagement/issue/active/[id]' \</text:p>
            <text:p text:style-name="P43"><text:s text:c="2"/>--header 'Authorization: Bearer [token]'</text:p>
          </table:table-cell>
        </table:table-row>
      </table:table>
      <text:p text:style-name="P42"><text:span text:style-name="Strong_20_Emphasis"><text:span text:style-name="T15"/></text:span></text:p>
      <text:p text:style-name="P42"><text:span text:style-name="Strong_20_Emphasis"><text:span text:style-name="T14">Response Sample</text:span></text:span></text:p>
      <table:table table:name="Table87" table:style-name="Table87">
        <table:table-column table:style-name="Table87.A"/>
        <table:table-row>
          <table:table-cell table:style-name="Table87.A1" office:value-type="string">
            <text:p text:style-name="P43">{</text:p>
            <text:p text:style-name="P43"><text:tab/>"statusCode" : 200,</text:p>
            <text:p text:style-name="P43"><text:soft-page-break/><text:tab/>"status" : "success",</text:p>
            <text:p text:style-name="P43"><text:tab/>"message" : "The record is <text:span text:style-name="T16">activated</text:span> successfully.",</text:p>
            <text:p text:style-name="P43"><text:tab/>"errorCode" : 0,</text:p>
            <text:p text:style-name="P43"><text:tab/>"data" : <text:span text:style-name="T16">null</text:span></text:p>
            <text:p text:style-name="P43">}</text:p>
          </table:table-cell>
        </table:table-row>
      </table:table>
      <text:p text:style-name="P42"><text:span text:style-name="Strong_20_Emphasis"/></text:p>
      <text:h text:style-name="P41" text:outline-level="2"><text:bookmark-start text:name="__RefHeading___Toc2083_720390006 Copy 1 Copy 1 Copy 3 Copy 5 Copy 1"/><text:span text:style-name="Strong_20_Emphasis"><text:span text:style-name="T7">Inactive</text:span></text:span><text:bookmark-end text:name="__RefHeading___Toc2083_720390006 Copy 1 Copy 1 Copy 3 Copy 5 Copy 1"/></text:h>
      <text:p text:style-name="P42"><text:span text:style-name="Strong_20_Emphasis"><text:span text:style-name="T8">Description</text:span></text:span></text:p>
      <text:p text:style-name="P44"><text:span text:style-name="Strong_20_Emphasis"><text:span text:style-name="T9">This API </text:span></text:span><text:span text:style-name="Strong_20_Emphasis"><text:span text:style-name="T17">in</text:span></text:span><text:span text:style-name="Strong_20_Emphasis"><text:span text:style-name="T9">-actives a specific “</text:span></text:span><text:span text:style-name="Strong_20_Emphasis"><text:span text:style-name="T31">issue</text:span></text:span><text:span text:style-name="Strong_20_Emphasis"><text:span text:style-name="T9">” in the </text:span></text:span><text:span text:style-name="Strong_20_Emphasis"><text:span text:style-name="T11">project</text:span></text:span><text:span text:style-name="Strong_20_Emphasis"><text:span text:style-name="T12"> management</text:span></text:span><text:span text:style-name="Strong_20_Emphasis"><text:span text:style-name="T9">.</text:span></text:span></text:p>
      <text:p text:style-name="P42"><text:span text:style-name="Strong_20_Emphasis"><text:span text:style-name="T14">Request CURL Sample</text:span></text:span></text:p>
      <table:table table:name="Table88" table:style-name="Table88">
        <table:table-column table:style-name="Table88.A"/>
        <table:table-row>
          <table:table-cell table:style-name="Table88.A1" office:value-type="string">
            <text:p text:style-name="P43">curl --request PUT \</text:p>
            <text:p text:style-name="P43"><text:s text:c="2"/>--url 'https://[maindomian]/api/projectManagement/issue/incative/[id]' \</text:p>
            <text:p text:style-name="P43"><text:s text:c="2"/>--header 'Authorization: Bearer [token]'</text:p>
          </table:table-cell>
        </table:table-row>
      </table:table>
      <text:p text:style-name="P42"><text:span text:style-name="Strong_20_Emphasis"><text:span text:style-name="T15"/></text:span></text:p>
      <text:p text:style-name="P42"><text:span text:style-name="Strong_20_Emphasis"><text:span text:style-name="T14">Response Sample</text:span></text:span></text:p>
      <table:table table:name="Table89" table:style-name="Table89">
        <table:table-column table:style-name="Table89.A"/>
        <table:table-row>
          <table:table-cell table:style-name="Table89.A1" office:value-type="string">
            <text:p text:style-name="P43">{</text:p>
            <text:p text:style-name="P43"><text:tab/>"statusCode" : 200,</text:p>
            <text:p text:style-name="P43"><text:tab/>"status" : "success",</text:p>
            <text:p text:style-name="P43"><text:tab/>"message" : "The record is <text:span text:style-name="T18">in</text:span><text:span text:style-name="T16">activated</text:span> successfully.",</text:p>
            <text:p text:style-name="P43"><text:tab/>"errorCode" : 0,</text:p>
            <text:p text:style-name="P43"><text:tab/>"data" : <text:span text:style-name="T16">null</text:span></text:p>
            <text:p text:style-name="P43">}</text:p>
          </table:table-cell>
        </table:table-row>
      </table:table>
      <text:p text:style-name="P42"><text:span text:style-name="Strong_20_Emphasis"/></text:p>
      <text:h text:style-name="P41" text:outline-level="2"><text:bookmark-start text:name="__RefHeading___Toc2085_720390006 Copy 1 Copy 1 Copy 3 Copy 5 Copy 1"/><text:span text:style-name="Strong_20_Emphasis"><text:span text:style-name="T7">Fetch Specific Record</text:span></text:span><text:bookmark-end text:name="__RefHeading___Toc2085_720390006 Copy 1 Copy 1 Copy 3 Copy 5 Copy 1"/></text:h>
      <text:p text:style-name="P42"><text:span text:style-name="Strong_20_Emphasis"><text:span text:style-name="T8">Description</text:span></text:span></text:p>
      <text:p text:style-name="P39"><text:span text:style-name="Strong_20_Emphasis"><text:span text:style-name="T9">This API </text:span></text:span><text:span text:style-name="Strong_20_Emphasis"><text:span text:style-name="T19">returns</text:span></text:span><text:span text:style-name="Strong_20_Emphasis"><text:span text:style-name="T9"> a specific “</text:span></text:span><text:span text:style-name="Strong_20_Emphasis"><text:span text:style-name="T31">issue</text:span></text:span><text:span text:style-name="Strong_20_Emphasis"><text:span text:style-name="T9">” </text:span></text:span><text:span text:style-name="Strong_20_Emphasis"><text:span text:style-name="T19">from</text:span></text:span><text:span text:style-name="Strong_20_Emphasis"><text:span text:style-name="T9"> the </text:span></text:span><text:span text:style-name="Strong_20_Emphasis"><text:span text:style-name="T11">project</text:span></text:span><text:span text:style-name="Strong_20_Emphasis"><text:span text:style-name="T20"> management</text:span></text:span><text:span text:style-name="Strong_20_Emphasis"><text:span text:style-name="T9">.</text:span></text:span></text:p>
      <text:p text:style-name="P42"><text:span text:style-name="Strong_20_Emphasis"><text:span text:style-name="T14">Request CURL Sample</text:span></text:span></text:p>
      <table:table table:name="Table90" table:style-name="Table90">
        <table:table-column table:style-name="Table90.A"/>
        <table:table-row>
          <table:table-cell table:style-name="Table90.A1" office:value-type="string">
            <text:p text:style-name="P43">curl --request GET \</text:p>
            <text:p text:style-name="P43"><text:s text:c="2"/>--url 'https://[maindomian]/api/projectManagement/issue/[id]' \</text:p>
            <text:p text:style-name="P43"><text:s text:c="2"/>--header 'Authorization: Bearer [token]'</text:p>
          </table:table-cell>
        </table:table-row>
      </table:table>
      <text:p text:style-name="P42"><text:span text:style-name="Strong_20_Emphasis"><text:span text:style-name="T15"/></text:span></text:p>
      <text:p text:style-name="P42"><text:soft-page-break/><text:span text:style-name="Strong_20_Emphasis"><text:span text:style-name="T14">Response Sample</text:span></text:span></text:p>
      <table:table table:name="Table91" table:style-name="Table91">
        <table:table-column table:style-name="Table91.A"/>
        <table:table-row>
          <table:table-cell table:style-name="Table91.A1" office:value-type="string">
            <text:p text:style-name="P43">{</text:p>
            <text:p text:style-name="P43"><text:tab/>"statusCode" : 200,</text:p>
            <text:p text:style-name="P43"><text:tab/>"status" : "success",</text:p>
            <text:p text:style-name="P43"><text:tab/>"message" : "The data is returned successfully.",</text:p>
            <text:p text:style-name="P43"><text:tab/>"errorCode" : 0,</text:p>
            <text:p text:style-name="P43"><text:tab/>"data" : {</text:p>
            <text:p text:style-name="P43"><text:tab/><text:tab/>"id" : 16621244611384550112, </text:p>
            <text:p text:style-name="P43"><text:tab/><text:tab/>"title" : "test",</text:p>
            <text:p text:style-name="P43"><text:tab/><text:tab/>"code" : "123",</text:p>
            <text:p text:style-name="P43"><text:tab/><text:tab/>"description" : "test",</text:p>
            <text:p text:style-name="P43"><text:tab/><text:tab/>"profileId": [{</text:p>
            <text:p text:style-name="P43"><text:tab/><text:tab/><text:tab/>"id" : 16621244611384550113,</text:p>
            <text:p text:style-name="P43"><text:tab/><text:tab/><text:tab/>"firstName": "David",</text:p>
            <text:p text:style-name="P43"><text:tab/><text:tab/><text:tab/>"lastName": "Talor"</text:p>
            <text:p text:style-name="P43"><text:tab/><text:tab/>}],</text:p>
            <text:p text:style-name="P43"><text:tab/><text:tab/>"roleFormPermissionId": [{</text:p>
            <text:p text:style-name="P43"><text:tab/><text:tab/><text:tab/>"id" : 16621244611384550114,</text:p>
            <text:p text:style-name="P43"><text:tab/><text:tab/><text:tab/>"formPermissionId": {</text:p>
            <text:p text:style-name="P43"><text:tab/><text:tab/><text:tab/><text:tab/>"id" : 16621244611384550114,</text:p>
            <text:p text:style-name="P43"><text:tab/><text:tab/><text:tab/><text:tab/>"formId": {</text:p>
            <text:p text:style-name="P43"><text:tab/><text:tab/><text:tab/><text:tab/><text:tab/>"id" : 16621244611384550115,</text:p>
            <text:p text:style-name="P43"><text:tab/><text:tab/><text:tab/><text:tab/><text:tab/>"title": "Project"</text:p>
            <text:p text:style-name="P43"><text:tab/><text:tab/><text:tab/><text:tab/>},</text:p>
            <text:p text:style-name="P43"><text:tab/><text:tab/><text:tab/><text:tab/>"permissionId": {</text:p>
            <text:p text:style-name="P43"><text:tab/><text:tab/><text:tab/><text:tab/><text:tab/>"id" : 16621244611384550116,</text:p>
            <text:p text:style-name="P43"><text:tab/><text:tab/><text:tab/><text:tab/><text:tab/>"title": "Add"</text:p>
            <text:p text:style-name="P43"><text:tab/><text:tab/><text:tab/><text:tab/>}</text:p>
            <text:p text:style-name="P43"><text:tab/><text:tab/><text:tab/>}</text:p>
            <text:p text:style-name="P43"><text:tab/><text:tab/>}],</text:p>
            <text:p text:style-name="P43"><text:tab/><text:tab/>"createdAt" : "2025-8-25 12:00:00",</text:p>
            <text:p text:style-name="P43"><text:tab/><text:tab/>"createdBy" : "John Davis" </text:p>
            <text:p text:style-name="P43"><text:tab/>}</text:p>
            <text:p text:style-name="P43">}</text:p>
          </table:table-cell>
        </table:table-row>
      </table:table>
      <text:p text:style-name="P42"><text:span text:style-name="Strong_20_Emphasis"/></text:p>
      <text:h text:style-name="P40" text:outline-level="1"><text:bookmark-start text:name="__RefHeading___Toc227_771010674 Copy 1 Copy 1 Copy 3 Copy 5 Copy 2"/><text:span text:style-name="T5">I</text:span><text:span text:style-name="T6">ssue Comment</text:span><text:bookmark-end text:name="__RefHeading___Toc227_771010674 Copy 1 Copy 1 Copy 3 Copy 5 Copy 2"/></text:h>
      <text:h text:style-name="P41" text:outline-level="2"><text:bookmark-start text:name="__RefHeading___Toc908_3206075736 Copy 1 Copy 1 Copy 1 Copy 3 Copy 5 Copy 2"/><text:span text:style-name="Strong_20_Emphasis"><text:span text:style-name="T7">Delete</text:span></text:span><text:bookmark-end text:name="__RefHeading___Toc908_3206075736 Copy 1 Copy 1 Copy 1 Copy 3 Copy 5 Copy 2"/></text:h>
      <text:p text:style-name="P42"><text:span text:style-name="Strong_20_Emphasis"><text:span text:style-name="T8">Description</text:span></text:span></text:p>
      <text:p text:style-name="P42"><text:soft-page-break/><text:span text:style-name="Strong_20_Emphasis"><text:span text:style-name="T9">This API </text:span></text:span><text:span text:style-name="Strong_20_Emphasis"><text:span text:style-name="T10">logically</text:span></text:span><text:span text:style-name="Strong_20_Emphasis"><text:span text:style-name="T9"> deletes a “</text:span></text:span><text:span text:style-name="Strong_20_Emphasis"><text:span text:style-name="T31">comment of issue</text:span></text:span><text:span text:style-name="Strong_20_Emphasis"><text:span text:style-name="T9">” from the </text:span></text:span><text:span text:style-name="Strong_20_Emphasis"><text:span text:style-name="T11">project</text:span></text:span><text:span text:style-name="Strong_20_Emphasis"><text:span text:style-name="T12"> man</text:span></text:span><text:span text:style-name="Strong_20_Emphasis"><text:span text:style-name="T13">a</text:span></text:span><text:span text:style-name="Strong_20_Emphasis"><text:span text:style-name="T12">gement</text:span></text:span><text:span text:style-name="Strong_20_Emphasis"><text:span text:style-name="T9">.</text:span></text:span></text:p>
      <text:p text:style-name="P42"><text:span text:style-name="Strong_20_Emphasis"><text:span text:style-name="T14">Request CURL Sample</text:span></text:span></text:p>
      <table:table table:name="Table92" table:style-name="Table92">
        <table:table-column table:style-name="Table92.A"/>
        <table:table-row>
          <table:table-cell table:style-name="Table92.A1" office:value-type="string">
            <text:p text:style-name="P43">curl --request DELETE \</text:p>
            <text:p text:style-name="P43"><text:s text:c="2"/>--url 'https://[maindomian]/api/projectManagement/issueComment/[id]' \</text:p>
            <text:p text:style-name="P43"><text:s text:c="2"/>--header 'Authorization: Bearer [token]'</text:p>
          </table:table-cell>
        </table:table-row>
      </table:table>
      <text:p text:style-name="P42"><text:span text:style-name="Strong_20_Emphasis"><text:span text:style-name="T15"/></text:span></text:p>
      <text:p text:style-name="P42"><text:span text:style-name="Strong_20_Emphasis"><text:span text:style-name="T14">Response Sample</text:span></text:span></text:p>
      <table:table table:name="Table93" table:style-name="Table93">
        <table:table-column table:style-name="Table93.A"/>
        <table:table-row>
          <table:table-cell table:style-name="Table93.A1" office:value-type="string">
            <text:p text:style-name="P43">{</text:p>
            <text:p text:style-name="P43"><text:tab/>"statusCode" : 200,</text:p>
            <text:p text:style-name="P43"><text:tab/>"status" : "success",</text:p>
            <text:p text:style-name="P43"><text:tab/>"message" : "The record is <text:span text:style-name="T16">deleted</text:span> successfully.",</text:p>
            <text:p text:style-name="P43"><text:tab/>"errorCode" : 0,</text:p>
            <text:p text:style-name="P43"><text:tab/>"data" : <text:span text:style-name="T16">null</text:span></text:p>
            <text:p text:style-name="P43">}</text:p>
          </table:table-cell>
        </table:table-row>
      </table:table>
      <text:p text:style-name="P42"><text:span text:style-name="Strong_20_Emphasis"/></text:p>
      <text:h text:style-name="P41" text:outline-level="2"><text:bookmark-start text:name="__RefHeading___Toc2079_720390006 Copy 1 Copy 1 Copy 3 Copy 5 Copy 2"/><text:span text:style-name="Strong_20_Emphasis"><text:span text:style-name="T7">Active</text:span></text:span><text:bookmark-end text:name="__RefHeading___Toc2079_720390006 Copy 1 Copy 1 Copy 3 Copy 5 Copy 2"/></text:h>
      <text:p text:style-name="P42"><text:span text:style-name="Strong_20_Emphasis"><text:span text:style-name="T8">Description</text:span></text:span></text:p>
      <text:p text:style-name="P45"><text:span text:style-name="Strong_20_Emphasis"><text:span text:style-name="T9">This API actives a “</text:span></text:span><text:span text:style-name="Strong_20_Emphasis"><text:span text:style-name="T31">comment of issue</text:span></text:span><text:span text:style-name="Strong_20_Emphasis"><text:span text:style-name="T9">” in the </text:span></text:span><text:span text:style-name="Strong_20_Emphasis"><text:span text:style-name="T11">project</text:span></text:span><text:span text:style-name="Strong_20_Emphasis"><text:span text:style-name="T12"> management</text:span></text:span><text:span text:style-name="Strong_20_Emphasis"><text:span text:style-name="T9">.</text:span></text:span></text:p>
      <text:p text:style-name="P42"><text:span text:style-name="Strong_20_Emphasis"><text:span text:style-name="T14">Request CURL Sample</text:span></text:span></text:p>
      <table:table table:name="Table94" table:style-name="Table94">
        <table:table-column table:style-name="Table94.A"/>
        <table:table-row>
          <table:table-cell table:style-name="Table94.A1" office:value-type="string">
            <text:p text:style-name="P43">curl --request PUT \</text:p>
            <text:p text:style-name="P43"><text:s text:c="2"/>--url 'https://[maindomian]/api/projectManagement/issueComment/active/[id]' \</text:p>
            <text:p text:style-name="P43"><text:s text:c="2"/>--header 'Authorization: Bearer [token]'</text:p>
          </table:table-cell>
        </table:table-row>
      </table:table>
      <text:p text:style-name="P42"><text:span text:style-name="Strong_20_Emphasis"><text:span text:style-name="T15"/></text:span></text:p>
      <text:p text:style-name="P42"><text:span text:style-name="Strong_20_Emphasis"><text:span text:style-name="T14">Response Sample</text:span></text:span></text:p>
      <table:table table:name="Table95" table:style-name="Table95">
        <table:table-column table:style-name="Table95.A"/>
        <table:table-row>
          <table:table-cell table:style-name="Table95.A1" office:value-type="string">
            <text:p text:style-name="P43">{</text:p>
            <text:p text:style-name="P43"><text:tab/>"statusCode" : 200,</text:p>
            <text:p text:style-name="P43"><text:tab/>"status" : "success",</text:p>
            <text:p text:style-name="P43"><text:tab/>"message" : "The record is <text:span text:style-name="T16">activated</text:span> successfully.",</text:p>
            <text:p text:style-name="P43"><text:tab/>"errorCode" : 0,</text:p>
            <text:p text:style-name="P43"><text:tab/>"data" : <text:span text:style-name="T16">null</text:span></text:p>
            <text:p text:style-name="P43"><text:soft-page-break/>}</text:p>
          </table:table-cell>
        </table:table-row>
      </table:table>
      <text:p text:style-name="P42"><text:span text:style-name="Strong_20_Emphasis"/></text:p>
      <text:h text:style-name="P41" text:outline-level="2"><text:bookmark-start text:name="__RefHeading___Toc2083_720390006 Copy 1 Copy 1 Copy 3 Copy 5 Copy 2"/><text:span text:style-name="Strong_20_Emphasis"><text:span text:style-name="T7">Inactive</text:span></text:span><text:bookmark-end text:name="__RefHeading___Toc2083_720390006 Copy 1 Copy 1 Copy 3 Copy 5 Copy 2"/></text:h>
      <text:p text:style-name="P42"><text:span text:style-name="Strong_20_Emphasis"><text:span text:style-name="T8">Description</text:span></text:span></text:p>
      <text:p text:style-name="P45"><text:span text:style-name="Strong_20_Emphasis"><text:span text:style-name="T9">This API </text:span></text:span><text:span text:style-name="Strong_20_Emphasis"><text:span text:style-name="T17">in</text:span></text:span><text:span text:style-name="Strong_20_Emphasis"><text:span text:style-name="T9">-actives a specific “</text:span></text:span><text:span text:style-name="Strong_20_Emphasis"><text:span text:style-name="T31">comment of issue</text:span></text:span><text:span text:style-name="Strong_20_Emphasis"><text:span text:style-name="T9">” in the </text:span></text:span><text:span text:style-name="Strong_20_Emphasis"><text:span text:style-name="T11">project</text:span></text:span><text:span text:style-name="Strong_20_Emphasis"><text:span text:style-name="T12"> management</text:span></text:span><text:span text:style-name="Strong_20_Emphasis"><text:span text:style-name="T9">.</text:span></text:span></text:p>
      <text:p text:style-name="P42"><text:span text:style-name="Strong_20_Emphasis"><text:span text:style-name="T14">Request CURL Sample</text:span></text:span></text:p>
      <table:table table:name="Table96" table:style-name="Table96">
        <table:table-column table:style-name="Table96.A"/>
        <table:table-row>
          <table:table-cell table:style-name="Table96.A1" office:value-type="string">
            <text:p text:style-name="P43">curl --request PUT \</text:p>
            <text:p text:style-name="P43"><text:s text:c="2"/>--url 'https://[maindomian]/api/projectManagement/issueComment/inactive/[id]' \</text:p>
            <text:p text:style-name="P43"><text:s text:c="2"/>--header 'Authorization: Bearer [token]'</text:p>
          </table:table-cell>
        </table:table-row>
      </table:table>
      <text:p text:style-name="P42"><text:span text:style-name="Strong_20_Emphasis"><text:span text:style-name="T15"/></text:span></text:p>
      <text:p text:style-name="P42"><text:span text:style-name="Strong_20_Emphasis"><text:span text:style-name="T14">Response Sample</text:span></text:span></text:p>
      <table:table table:name="Table97" table:style-name="Table97">
        <table:table-column table:style-name="Table97.A"/>
        <table:table-row>
          <table:table-cell table:style-name="Table97.A1" office:value-type="string">
            <text:p text:style-name="P43">{</text:p>
            <text:p text:style-name="P43"><text:tab/>"statusCode" : 200,</text:p>
            <text:p text:style-name="P43"><text:tab/>"status" : "success",</text:p>
            <text:p text:style-name="P43"><text:tab/>"message" : "The record is <text:span text:style-name="T18">in</text:span><text:span text:style-name="T16">activated</text:span> successfully.",</text:p>
            <text:p text:style-name="P43"><text:tab/>"errorCode" : 0,</text:p>
            <text:p text:style-name="P43"><text:tab/>"data" : <text:span text:style-name="T16">null</text:span></text:p>
            <text:p text:style-name="P43">}</text:p>
          </table:table-cell>
        </table:table-row>
      </table:table>
      <text:p text:style-name="P42"><text:span text:style-name="Strong_20_Emphasis"/></text:p>
      <text:h text:style-name="P41" text:outline-level="2"><text:bookmark-start text:name="__RefHeading___Toc2085_720390006 Copy 1 Copy 1 Copy 3 Copy 5 Copy 2"/><text:span text:style-name="Strong_20_Emphasis"><text:span text:style-name="T7">Fetch Specific Record</text:span></text:span><text:bookmark-end text:name="__RefHeading___Toc2085_720390006 Copy 1 Copy 1 Copy 3 Copy 5 Copy 2"/></text:h>
      <text:p text:style-name="P42"><text:span text:style-name="Strong_20_Emphasis"><text:span text:style-name="T8">Description</text:span></text:span></text:p>
      <text:p text:style-name="P45"><text:span text:style-name="Strong_20_Emphasis"><text:span text:style-name="T9">This API </text:span></text:span><text:span text:style-name="Strong_20_Emphasis"><text:span text:style-name="T19">returns</text:span></text:span><text:span text:style-name="Strong_20_Emphasis"><text:span text:style-name="T9"> a specific “</text:span></text:span><text:span text:style-name="Strong_20_Emphasis"><text:span text:style-name="T31">comment of issue</text:span></text:span><text:span text:style-name="Strong_20_Emphasis"><text:span text:style-name="T9">” </text:span></text:span><text:span text:style-name="Strong_20_Emphasis"><text:span text:style-name="T19">from</text:span></text:span><text:span text:style-name="Strong_20_Emphasis"><text:span text:style-name="T9"> the </text:span></text:span><text:span text:style-name="Strong_20_Emphasis"><text:span text:style-name="T11">project</text:span></text:span><text:span text:style-name="Strong_20_Emphasis"><text:span text:style-name="T20"> management</text:span></text:span><text:span text:style-name="Strong_20_Emphasis"><text:span text:style-name="T9">.</text:span></text:span></text:p>
      <text:p text:style-name="P42"><text:span text:style-name="Strong_20_Emphasis"><text:span text:style-name="T14">Request CURL Sample</text:span></text:span></text:p>
      <table:table table:name="Table98" table:style-name="Table98">
        <table:table-column table:style-name="Table98.A"/>
        <table:table-row>
          <table:table-cell table:style-name="Table98.A1" office:value-type="string">
            <text:p text:style-name="P43">curl --request GET \</text:p>
            <text:p text:style-name="P43"><text:s text:c="2"/>--url 'https://[maindomian]/api/projectManagement/issueComment/[id]' \</text:p>
            <text:p text:style-name="P43"><text:s text:c="2"/>--header 'Authorization: Bearer [token]'</text:p>
          </table:table-cell>
        </table:table-row>
      </table:table>
      <text:p text:style-name="P42"><text:span text:style-name="Strong_20_Emphasis"><text:span text:style-name="T15"/></text:span></text:p>
      <text:p text:style-name="P42"><text:span text:style-name="Strong_20_Emphasis"><text:span text:style-name="T14">Response Sample</text:span></text:span></text:p>
      <table:table table:name="Table99" table:style-name="Table99">
        <table:table-column table:style-name="Table99.A"/>
        <text:soft-page-break/>
        <table:table-row>
          <table:table-cell table:style-name="Table99.A1" office:value-type="string">
            <text:p text:style-name="P43">{</text:p>
            <text:p text:style-name="P43"><text:tab/>"statusCode" : 200,</text:p>
            <text:p text:style-name="P43"><text:tab/>"status" : "success",</text:p>
            <text:p text:style-name="P43"><text:tab/>"message" : "The data is returned successfully.",</text:p>
            <text:p text:style-name="P43"><text:tab/>"errorCode" : 0,</text:p>
            <text:p text:style-name="P43"><text:tab/>"data" : {</text:p>
            <text:p text:style-name="P43"><text:tab/><text:tab/>"id" : 16621244611384550112, </text:p>
            <text:p text:style-name="P43"><text:tab/><text:tab/>"title" : "test",</text:p>
            <text:p text:style-name="P43"><text:tab/><text:tab/>"code" : "123",</text:p>
            <text:p text:style-name="P43"><text:tab/><text:tab/>"description" : "test",</text:p>
            <text:p text:style-name="P43"><text:tab/><text:tab/>"profileId": [{</text:p>
            <text:p text:style-name="P43"><text:tab/><text:tab/><text:tab/>"id" : 16621244611384550113,</text:p>
            <text:p text:style-name="P43"><text:tab/><text:tab/><text:tab/>"firstName": "David",</text:p>
            <text:p text:style-name="P43"><text:tab/><text:tab/><text:tab/>"lastName": "Talor"</text:p>
            <text:p text:style-name="P43"><text:tab/><text:tab/>}],</text:p>
            <text:p text:style-name="P43"><text:tab/><text:tab/>"roleFormPermissionId": [{</text:p>
            <text:p text:style-name="P43"><text:tab/><text:tab/><text:tab/>"id" : 16621244611384550114,</text:p>
            <text:p text:style-name="P43"><text:tab/><text:tab/><text:tab/>"formPermissionId": {</text:p>
            <text:p text:style-name="P43"><text:tab/><text:tab/><text:tab/><text:tab/>"id" : 16621244611384550114,</text:p>
            <text:p text:style-name="P43"><text:tab/><text:tab/><text:tab/><text:tab/>"formId": {</text:p>
            <text:p text:style-name="P43"><text:tab/><text:tab/><text:tab/><text:tab/><text:tab/>"id" : 16621244611384550115,</text:p>
            <text:p text:style-name="P43"><text:tab/><text:tab/><text:tab/><text:tab/><text:tab/>"title": "Project"</text:p>
            <text:p text:style-name="P43"><text:tab/><text:tab/><text:tab/><text:tab/>},</text:p>
            <text:p text:style-name="P43"><text:tab/><text:tab/><text:tab/><text:tab/>"permissionId": {</text:p>
            <text:p text:style-name="P43"><text:tab/><text:tab/><text:tab/><text:tab/><text:tab/>"id" : 16621244611384550116,</text:p>
            <text:p text:style-name="P43"><text:tab/><text:tab/><text:tab/><text:tab/><text:tab/>"title": "Add"</text:p>
            <text:p text:style-name="P43"><text:tab/><text:tab/><text:tab/><text:tab/>}</text:p>
            <text:p text:style-name="P43"><text:tab/><text:tab/><text:tab/>}</text:p>
            <text:p text:style-name="P43"><text:tab/><text:tab/>}],</text:p>
            <text:p text:style-name="P43"><text:tab/><text:tab/>"createdAt" : "2025-8-25 12:00:00",</text:p>
            <text:p text:style-name="P43"><text:tab/><text:tab/>"createdBy" : "John Davis" </text:p>
            <text:p text:style-name="P43"><text:tab/>}</text:p>
            <text:p text:style-name="P43">}</text:p>
          </table:table-cell>
        </table:table-row>
      </table:table>
      <text:p text:style-name="P42"><text:span text:style-name="Strong_20_Emphasis"/></text:p>
      <text:h text:style-name="P40" text:outline-level="1"><text:bookmark-start text:name="__RefHeading___Toc227_771010674 Copy 1 Copy 1 Copy 3 Copy 5 Copy 3"/><text:span text:style-name="T5">I</text:span><text:span text:style-name="T6">ssue </text:span><text:span text:style-name="T32">Attachment</text:span><text:bookmark-end text:name="__RefHeading___Toc227_771010674 Copy 1 Copy 1 Copy 3 Copy 5 Copy 3"/></text:h>
      <text:h text:style-name="P41" text:outline-level="2"><text:bookmark-start text:name="__RefHeading___Toc908_3206075736 Copy 1 Copy 1 Copy 1 Copy 3 Copy 5 Copy 3"/><text:span text:style-name="Strong_20_Emphasis"><text:span text:style-name="T7">Delete</text:span></text:span><text:bookmark-end text:name="__RefHeading___Toc908_3206075736 Copy 1 Copy 1 Copy 1 Copy 3 Copy 5 Copy 3"/></text:h>
      <text:p text:style-name="P42"><text:span text:style-name="Strong_20_Emphasis"><text:span text:style-name="T8">Description</text:span></text:span></text:p>
      <text:p text:style-name="P42"><text:span text:style-name="Strong_20_Emphasis"><text:span text:style-name="T9">This API </text:span></text:span><text:span text:style-name="Strong_20_Emphasis"><text:span text:style-name="T10">logically</text:span></text:span><text:span text:style-name="Strong_20_Emphasis"><text:span text:style-name="T9"> deletes a</text:span></text:span><text:span text:style-name="Strong_20_Emphasis"><text:span text:style-name="T33">n</text:span></text:span><text:span text:style-name="Strong_20_Emphasis"><text:span text:style-name="T9"> “</text:span></text:span><text:span text:style-name="Strong_20_Emphasis"><text:span text:style-name="T33">attachment of issue</text:span></text:span><text:span text:style-name="Strong_20_Emphasis"><text:span text:style-name="T9">” from the </text:span></text:span><text:span text:style-name="Strong_20_Emphasis"><text:span text:style-name="T11">project</text:span></text:span><text:span text:style-name="Strong_20_Emphasis"><text:span text:style-name="T12"> man</text:span></text:span><text:span text:style-name="Strong_20_Emphasis"><text:span text:style-name="T13">a</text:span></text:span><text:span text:style-name="Strong_20_Emphasis"><text:span text:style-name="T12">gement</text:span></text:span><text:span text:style-name="Strong_20_Emphasis"><text:span text:style-name="T9">.</text:span></text:span></text:p>
      <text:p text:style-name="P42"><text:soft-page-break/><text:span text:style-name="Strong_20_Emphasis"><text:span text:style-name="T14">Request CURL Sample</text:span></text:span></text:p>
      <table:table table:name="Table100" table:style-name="Table100">
        <table:table-column table:style-name="Table100.A"/>
        <table:table-row>
          <table:table-cell table:style-name="Table100.A1" office:value-type="string">
            <text:p text:style-name="P43">curl --request DELETE \</text:p>
            <text:p text:style-name="P43"><text:s text:c="2"/>--url 'https://[maindomian]/api/projectManagement/issueAttachment/[id]' \</text:p>
            <text:p text:style-name="P43"><text:s text:c="2"/>--header 'Authorization: Bearer [token]'</text:p>
          </table:table-cell>
        </table:table-row>
      </table:table>
      <text:p text:style-name="P42"><text:span text:style-name="Strong_20_Emphasis"><text:span text:style-name="T15"/></text:span></text:p>
      <text:p text:style-name="P42"><text:span text:style-name="Strong_20_Emphasis"><text:span text:style-name="T14">Response Sample</text:span></text:span></text:p>
      <table:table table:name="Table101" table:style-name="Table101">
        <table:table-column table:style-name="Table101.A"/>
        <table:table-row>
          <table:table-cell table:style-name="Table101.A1" office:value-type="string">
            <text:p text:style-name="P43">{</text:p>
            <text:p text:style-name="P43"><text:tab/>"statusCode" : 200,</text:p>
            <text:p text:style-name="P43"><text:tab/>"status" : "success",</text:p>
            <text:p text:style-name="P43"><text:tab/>"message" : "The record is <text:span text:style-name="T16">deleted</text:span> successfully.",</text:p>
            <text:p text:style-name="P43"><text:tab/>"errorCode" : 0,</text:p>
            <text:p text:style-name="P43"><text:tab/>"data" : <text:span text:style-name="T16">null</text:span></text:p>
            <text:p text:style-name="P43">}</text:p>
          </table:table-cell>
        </table:table-row>
      </table:table>
      <text:p text:style-name="P42"><text:span text:style-name="Strong_20_Emphasis"/></text:p>
      <text:h text:style-name="P41" text:outline-level="2"><text:bookmark-start text:name="__RefHeading___Toc2079_720390006 Copy 1 Copy 1 Copy 3 Copy 5 Copy 3"/><text:span text:style-name="Strong_20_Emphasis"><text:span text:style-name="T7">Active</text:span></text:span><text:bookmark-end text:name="__RefHeading___Toc2079_720390006 Copy 1 Copy 1 Copy 3 Copy 5 Copy 3"/></text:h>
      <text:p text:style-name="P42"><text:span text:style-name="Strong_20_Emphasis"><text:span text:style-name="T8">Description</text:span></text:span></text:p>
      <text:p text:style-name="P46"><text:span text:style-name="Strong_20_Emphasis"><text:span text:style-name="T9">This API actives a</text:span></text:span><text:span text:style-name="Strong_20_Emphasis"><text:span text:style-name="T33">n</text:span></text:span><text:span text:style-name="Strong_20_Emphasis"><text:span text:style-name="T9"> “</text:span></text:span><text:span text:style-name="Strong_20_Emphasis"><text:span text:style-name="T33">attachment of issue</text:span></text:span><text:span text:style-name="Strong_20_Emphasis"><text:span text:style-name="T9">” in the </text:span></text:span><text:span text:style-name="Strong_20_Emphasis"><text:span text:style-name="T11">project</text:span></text:span><text:span text:style-name="Strong_20_Emphasis"><text:span text:style-name="T12"> management</text:span></text:span><text:span text:style-name="Strong_20_Emphasis"><text:span text:style-name="T9">.</text:span></text:span></text:p>
      <text:p text:style-name="P42"><text:span text:style-name="Strong_20_Emphasis"><text:span text:style-name="T14">Request CURL Sample</text:span></text:span></text:p>
      <table:table table:name="Table102" table:style-name="Table102">
        <table:table-column table:style-name="Table102.A"/>
        <table:table-row>
          <table:table-cell table:style-name="Table102.A1" office:value-type="string">
            <text:p text:style-name="P43">curl --request PUT \</text:p>
            <text:p text:style-name="P43"><text:s text:c="2"/>--url 'https://[maindomian]/api/projectManagement/issueAttachment/active/[id]' \</text:p>
            <text:p text:style-name="P43"><text:s text:c="2"/>--header 'Authorization: Bearer [token]'</text:p>
          </table:table-cell>
        </table:table-row>
      </table:table>
      <text:p text:style-name="P42"><text:span text:style-name="Strong_20_Emphasis"><text:span text:style-name="T15"/></text:span></text:p>
      <text:p text:style-name="P42"><text:span text:style-name="Strong_20_Emphasis"><text:span text:style-name="T14">Response Sample</text:span></text:span></text:p>
      <table:table table:name="Table103" table:style-name="Table103">
        <table:table-column table:style-name="Table103.A"/>
        <table:table-row>
          <table:table-cell table:style-name="Table103.A1" office:value-type="string">
            <text:p text:style-name="P43">{</text:p>
            <text:p text:style-name="P43"><text:tab/>"statusCode" : 200,</text:p>
            <text:p text:style-name="P43"><text:tab/>"status" : "success",</text:p>
            <text:p text:style-name="P43"><text:tab/>"message" : "The record is <text:span text:style-name="T16">activated</text:span> successfully.",</text:p>
            <text:p text:style-name="P43"><text:tab/>"errorCode" : 0,</text:p>
            <text:p text:style-name="P43"><text:tab/>"data" : <text:span text:style-name="T16">null</text:span></text:p>
            <text:p text:style-name="P43">}</text:p>
          </table:table-cell>
        </table:table-row>
      </table:table>
      <text:p text:style-name="P42"><text:span text:style-name="Strong_20_Emphasis"/></text:p>
      <text:h text:style-name="P41" text:outline-level="2"><text:bookmark-start text:name="__RefHeading___Toc2083_720390006 Copy 1 Copy 1 Copy 3 Copy 5 Copy 3"/><text:soft-page-break/><text:span text:style-name="Strong_20_Emphasis"><text:span text:style-name="T7">Inactive</text:span></text:span><text:bookmark-end text:name="__RefHeading___Toc2083_720390006 Copy 1 Copy 1 Copy 3 Copy 5 Copy 3"/></text:h>
      <text:p text:style-name="P42"><text:span text:style-name="Strong_20_Emphasis"><text:span text:style-name="T8">Description</text:span></text:span></text:p>
      <text:p text:style-name="P46"><text:span text:style-name="Strong_20_Emphasis"><text:span text:style-name="T9">This API </text:span></text:span><text:span text:style-name="Strong_20_Emphasis"><text:span text:style-name="T17">in</text:span></text:span><text:span text:style-name="Strong_20_Emphasis"><text:span text:style-name="T9">-actives a specific “</text:span></text:span><text:span text:style-name="Strong_20_Emphasis"><text:span text:style-name="T33">attachment of issue</text:span></text:span><text:span text:style-name="Strong_20_Emphasis"><text:span text:style-name="T9">” in the </text:span></text:span><text:span text:style-name="Strong_20_Emphasis"><text:span text:style-name="T11">project</text:span></text:span><text:span text:style-name="Strong_20_Emphasis"><text:span text:style-name="T12"> management</text:span></text:span><text:span text:style-name="Strong_20_Emphasis"><text:span text:style-name="T9">.</text:span></text:span></text:p>
      <text:p text:style-name="P42"><text:span text:style-name="Strong_20_Emphasis"><text:span text:style-name="T14">Request CURL Sample</text:span></text:span></text:p>
      <table:table table:name="Table104" table:style-name="Table104">
        <table:table-column table:style-name="Table104.A"/>
        <table:table-row>
          <table:table-cell table:style-name="Table104.A1" office:value-type="string">
            <text:p text:style-name="P43">curl --request PUT \</text:p>
            <text:p text:style-name="P43"><text:s text:c="2"/>--url 'https://[maindomian]/api/projectManagement/issueAttachment/inactive/[id]' \</text:p>
            <text:p text:style-name="P43"><text:s text:c="2"/>--header 'Authorization: Bearer [token]'</text:p>
          </table:table-cell>
        </table:table-row>
      </table:table>
      <text:p text:style-name="P42"><text:span text:style-name="Strong_20_Emphasis"><text:span text:style-name="T15"/></text:span></text:p>
      <text:p text:style-name="P42"><text:span text:style-name="Strong_20_Emphasis"><text:span text:style-name="T14">Response Sample</text:span></text:span></text:p>
      <table:table table:name="Table105" table:style-name="Table105">
        <table:table-column table:style-name="Table105.A"/>
        <table:table-row>
          <table:table-cell table:style-name="Table105.A1" office:value-type="string">
            <text:p text:style-name="P43">{</text:p>
            <text:p text:style-name="P43"><text:tab/>"statusCode" : 200,</text:p>
            <text:p text:style-name="P43"><text:tab/>"status" : "success",</text:p>
            <text:p text:style-name="P43"><text:tab/>"message" : "The record is <text:span text:style-name="T18">in</text:span><text:span text:style-name="T16">activated</text:span> successfully.",</text:p>
            <text:p text:style-name="P43"><text:tab/>"errorCode" : 0,</text:p>
            <text:p text:style-name="P43"><text:tab/>"data" : <text:span text:style-name="T16">null</text:span></text:p>
            <text:p text:style-name="P43">}</text:p>
          </table:table-cell>
        </table:table-row>
      </table:table>
      <text:p text:style-name="P42"><text:span text:style-name="Strong_20_Emphasis"/></text:p>
      <text:h text:style-name="P41" text:outline-level="2"><text:bookmark-start text:name="__RefHeading___Toc2085_720390006 Copy 1 Copy 1 Copy 3 Copy 5 Copy 3"/><text:span text:style-name="Strong_20_Emphasis"><text:span text:style-name="T7">Fetch Specific Record</text:span></text:span><text:bookmark-end text:name="__RefHeading___Toc2085_720390006 Copy 1 Copy 1 Copy 3 Copy 5 Copy 3"/></text:h>
      <text:p text:style-name="P42"><text:span text:style-name="Strong_20_Emphasis"><text:span text:style-name="T8">Description</text:span></text:span></text:p>
      <text:p text:style-name="P46"><text:span text:style-name="Strong_20_Emphasis"><text:span text:style-name="T9">This API </text:span></text:span><text:span text:style-name="Strong_20_Emphasis"><text:span text:style-name="T19">returns</text:span></text:span><text:span text:style-name="Strong_20_Emphasis"><text:span text:style-name="T9"> a specific “</text:span></text:span><text:span text:style-name="Strong_20_Emphasis"><text:span text:style-name="T33">attachment of issue</text:span></text:span><text:span text:style-name="Strong_20_Emphasis"><text:span text:style-name="T9">” </text:span></text:span><text:span text:style-name="Strong_20_Emphasis"><text:span text:style-name="T19">from</text:span></text:span><text:span text:style-name="Strong_20_Emphasis"><text:span text:style-name="T9"> the </text:span></text:span><text:span text:style-name="Strong_20_Emphasis"><text:span text:style-name="T11">project</text:span></text:span><text:span text:style-name="Strong_20_Emphasis"><text:span text:style-name="T20"> management</text:span></text:span><text:span text:style-name="Strong_20_Emphasis"><text:span text:style-name="T9">.</text:span></text:span></text:p>
      <text:p text:style-name="P42"><text:span text:style-name="Strong_20_Emphasis"><text:span text:style-name="T14">Request CURL Sample</text:span></text:span></text:p>
      <table:table table:name="Table106" table:style-name="Table106">
        <table:table-column table:style-name="Table106.A"/>
        <table:table-row>
          <table:table-cell table:style-name="Table106.A1" office:value-type="string">
            <text:p text:style-name="P43">curl --request GET \</text:p>
            <text:p text:style-name="P43"><text:s text:c="2"/>--url 'https://[maindomian]/api/projectManagement/issueAttachment/[id]' \</text:p>
            <text:p text:style-name="P43"><text:s text:c="2"/>--header 'Authorization: Bearer [token]'</text:p>
          </table:table-cell>
        </table:table-row>
      </table:table>
      <text:p text:style-name="P42"><text:span text:style-name="Strong_20_Emphasis"><text:span text:style-name="T15"/></text:span></text:p>
      <text:p text:style-name="P42"><text:span text:style-name="Strong_20_Emphasis"><text:span text:style-name="T14">Response Sample</text:span></text:span></text:p>
      <table:table table:name="Table107" table:style-name="Table107">
        <table:table-column table:style-name="Table107.A"/>
        <table:table-row>
          <table:table-cell table:style-name="Table107.A1" office:value-type="string">
            <text:p text:style-name="P43">{</text:p>
            <text:p text:style-name="P43"><text:tab/>"statusCode" : 200,</text:p>
            <text:p text:style-name="P43"><text:tab/>"status" : "success",</text:p>
            <text:p text:style-name="P43"><text:soft-page-break/><text:tab/>"message" : "The data is returned successfully.",</text:p>
            <text:p text:style-name="P43"><text:tab/>"errorCode" : 0,</text:p>
            <text:p text:style-name="P43"><text:tab/>"data" : {</text:p>
            <text:p text:style-name="P43"><text:tab/><text:tab/>"id" : 16621244611384550112, </text:p>
            <text:p text:style-name="P43"><text:tab/><text:tab/>"title" : "test",</text:p>
            <text:p text:style-name="P43"><text:tab/><text:tab/>"code" : "123",</text:p>
            <text:p text:style-name="P43"><text:tab/><text:tab/>"description" : "test",</text:p>
            <text:p text:style-name="P43"><text:tab/><text:tab/>"profileId": [{</text:p>
            <text:p text:style-name="P43"><text:tab/><text:tab/><text:tab/>"id" : 16621244611384550113,</text:p>
            <text:p text:style-name="P43"><text:tab/><text:tab/><text:tab/>"firstName": "David",</text:p>
            <text:p text:style-name="P43"><text:tab/><text:tab/><text:tab/>"lastName": "Talor"</text:p>
            <text:p text:style-name="P43"><text:tab/><text:tab/>}],</text:p>
            <text:p text:style-name="P43"><text:tab/><text:tab/>"roleFormPermissionId": [{</text:p>
            <text:p text:style-name="P43"><text:tab/><text:tab/><text:tab/>"id" : 16621244611384550114,</text:p>
            <text:p text:style-name="P43"><text:tab/><text:tab/><text:tab/>"formPermissionId": {</text:p>
            <text:p text:style-name="P43"><text:tab/><text:tab/><text:tab/><text:tab/>"id" : 16621244611384550114,</text:p>
            <text:p text:style-name="P43"><text:tab/><text:tab/><text:tab/><text:tab/>"formId": {</text:p>
            <text:p text:style-name="P43"><text:tab/><text:tab/><text:tab/><text:tab/><text:tab/>"id" : 16621244611384550115,</text:p>
            <text:p text:style-name="P43"><text:tab/><text:tab/><text:tab/><text:tab/><text:tab/>"title": "Project"</text:p>
            <text:p text:style-name="P43"><text:tab/><text:tab/><text:tab/><text:tab/>},</text:p>
            <text:p text:style-name="P43"><text:tab/><text:tab/><text:tab/><text:tab/>"permissionId": {</text:p>
            <text:p text:style-name="P43"><text:tab/><text:tab/><text:tab/><text:tab/><text:tab/>"id" : 16621244611384550116,</text:p>
            <text:p text:style-name="P43"><text:tab/><text:tab/><text:tab/><text:tab/><text:tab/>"title": "Add"</text:p>
            <text:p text:style-name="P43"><text:tab/><text:tab/><text:tab/><text:tab/>}</text:p>
            <text:p text:style-name="P43"><text:tab/><text:tab/><text:tab/>}</text:p>
            <text:p text:style-name="P43"><text:tab/><text:tab/>}],</text:p>
            <text:p text:style-name="P43"><text:tab/><text:tab/>"createdAt" : "2025-8-25 12:00:00",</text:p>
            <text:p text:style-name="P43"><text:tab/><text:tab/>"createdBy" : "John Davis" </text:p>
            <text:p text:style-name="P43"><text:tab/>}</text:p>
            <text:p text:style-name="P43">}</text:p>
          </table:table-cell>
        </table:table-row>
      </table:table>
      <text:p text:style-name="P42"><text:span text:style-name="Strong_20_Emphasis"><text:span text:style-name="T34"/></text:span></text:p>
      <text:h text:style-name="P47" text:outline-level="1"><text:bookmark-start text:name="__RefHeading___Toc227_771010674 Copy 1 Copy 1 Copy 3 Copy 5 Copy 5"/><text:span text:style-name="T5">P</text:span><text:span text:style-name="T6">roject </text:span><text:span text:style-name="T35">Release</text:span><text:bookmark-end text:name="__RefHeading___Toc227_771010674 Copy 1 Copy 1 Copy 3 Copy 5 Copy 5"/></text:h>
      <text:h text:style-name="P41" text:outline-level="2"><text:bookmark-start text:name="__RefHeading___Toc908_3206075736 Copy 1 Copy 1 Copy 1 Copy 3 Copy 5 Copy 5"/><text:span text:style-name="Strong_20_Emphasis"><text:span text:style-name="T7">Delete</text:span></text:span><text:bookmark-end text:name="__RefHeading___Toc908_3206075736 Copy 1 Copy 1 Copy 1 Copy 3 Copy 5 Copy 5"/></text:h>
      <text:p text:style-name="P42"><text:span text:style-name="Strong_20_Emphasis"><text:span text:style-name="T8">Description</text:span></text:span></text:p>
      <text:p text:style-name="P42"><text:span text:style-name="Strong_20_Emphasis"><text:span text:style-name="T9">This API </text:span></text:span><text:span text:style-name="Strong_20_Emphasis"><text:span text:style-name="T10">logically</text:span></text:span><text:span text:style-name="Strong_20_Emphasis"><text:span text:style-name="T9"> deletes a “</text:span></text:span><text:span text:style-name="Strong_20_Emphasis"><text:span text:style-name="T11">project </text:span></text:span><text:span text:style-name="Strong_20_Emphasis"><text:span text:style-name="T33">release</text:span></text:span><text:span text:style-name="Strong_20_Emphasis"><text:span text:style-name="T9">” from the </text:span></text:span><text:span text:style-name="Strong_20_Emphasis"><text:span text:style-name="T11">project</text:span></text:span><text:span text:style-name="Strong_20_Emphasis"><text:span text:style-name="T12"> man</text:span></text:span><text:span text:style-name="Strong_20_Emphasis"><text:span text:style-name="T13">a</text:span></text:span><text:span text:style-name="Strong_20_Emphasis"><text:span text:style-name="T12">gement</text:span></text:span><text:span text:style-name="Strong_20_Emphasis"><text:span text:style-name="T9">.</text:span></text:span></text:p>
      <text:p text:style-name="P42"><text:span text:style-name="Strong_20_Emphasis"><text:span text:style-name="T14">Request CURL Sample</text:span></text:span></text:p>
      <table:table table:name="Table116" table:style-name="Table116">
        <table:table-column table:style-name="Table116.A"/>
        <text:soft-page-break/>
        <table:table-row>
          <table:table-cell table:style-name="Table116.A1" office:value-type="string">
            <text:p text:style-name="P43">curl --request DELETE \</text:p>
            <text:p text:style-name="P43"><text:s text:c="2"/>--url 'https://[maindomian]/api/projectManagement/projectRelease/[id]' \</text:p>
            <text:p text:style-name="P43"><text:s text:c="2"/>--header 'Authorization: Bearer [token]'</text:p>
          </table:table-cell>
        </table:table-row>
      </table:table>
      <text:p text:style-name="P42"><text:span text:style-name="Strong_20_Emphasis"><text:span text:style-name="T15"/></text:span></text:p>
      <text:p text:style-name="P42"><text:span text:style-name="Strong_20_Emphasis"><text:span text:style-name="T14">Response Sample</text:span></text:span></text:p>
      <table:table table:name="Table117" table:style-name="Table117">
        <table:table-column table:style-name="Table117.A"/>
        <table:table-row>
          <table:table-cell table:style-name="Table117.A1" office:value-type="string">
            <text:p text:style-name="P43">{</text:p>
            <text:p text:style-name="P43"><text:tab/>"statusCode" : 200,</text:p>
            <text:p text:style-name="P43"><text:tab/>"status" : "success",</text:p>
            <text:p text:style-name="P43"><text:tab/>"message" : "The record is <text:span text:style-name="T16">deleted</text:span> successfully.",</text:p>
            <text:p text:style-name="P43"><text:tab/>"errorCode" : 0,</text:p>
            <text:p text:style-name="P43"><text:tab/>"data" : <text:span text:style-name="T16">null</text:span></text:p>
            <text:p text:style-name="P43">}</text:p>
          </table:table-cell>
        </table:table-row>
      </table:table>
      <text:p text:style-name="P42"><text:span text:style-name="Strong_20_Emphasis"/></text:p>
      <text:h text:style-name="P41" text:outline-level="2"><text:bookmark-start text:name="__RefHeading___Toc2079_720390006 Copy 1 Copy 1 Copy 3 Copy 5 Copy 5"/><text:span text:style-name="Strong_20_Emphasis"><text:span text:style-name="T7">Active</text:span></text:span><text:bookmark-end text:name="__RefHeading___Toc2079_720390006 Copy 1 Copy 1 Copy 3 Copy 5 Copy 5"/></text:h>
      <text:p text:style-name="P42"><text:span text:style-name="Strong_20_Emphasis"><text:span text:style-name="T8">Description</text:span></text:span></text:p>
      <text:p text:style-name="P46"><text:span text:style-name="Strong_20_Emphasis"><text:span text:style-name="T9">This API actives a “</text:span></text:span><text:span text:style-name="Strong_20_Emphasis"><text:span text:style-name="T11">project </text:span></text:span><text:span text:style-name="Strong_20_Emphasis"><text:span text:style-name="T33">release</text:span></text:span><text:span text:style-name="Strong_20_Emphasis"><text:span text:style-name="T9">” in the </text:span></text:span><text:span text:style-name="Strong_20_Emphasis"><text:span text:style-name="T11">project</text:span></text:span><text:span text:style-name="Strong_20_Emphasis"><text:span text:style-name="T12"> management</text:span></text:span><text:span text:style-name="Strong_20_Emphasis"><text:span text:style-name="T9">.</text:span></text:span></text:p>
      <text:p text:style-name="P42"><text:span text:style-name="Strong_20_Emphasis"><text:span text:style-name="T14">Request CURL Sample</text:span></text:span></text:p>
      <table:table table:name="Table118" table:style-name="Table118">
        <table:table-column table:style-name="Table118.A"/>
        <table:table-row>
          <table:table-cell table:style-name="Table118.A1" office:value-type="string">
            <text:p text:style-name="P43">curl --request PUT \</text:p>
            <text:p text:style-name="P43"><text:s text:c="2"/>--url 'https://[maindomian]/api/projectManagement/projectRelease/active/[id]' \</text:p>
            <text:p text:style-name="P43"><text:s text:c="2"/>--header 'Authorization: Bearer [token]'</text:p>
          </table:table-cell>
        </table:table-row>
      </table:table>
      <text:p text:style-name="P42"><text:span text:style-name="Strong_20_Emphasis"><text:span text:style-name="T15"/></text:span></text:p>
      <text:p text:style-name="P42"><text:span text:style-name="Strong_20_Emphasis"><text:span text:style-name="T14">Response Sample</text:span></text:span></text:p>
      <table:table table:name="Table119" table:style-name="Table119">
        <table:table-column table:style-name="Table119.A"/>
        <table:table-row>
          <table:table-cell table:style-name="Table119.A1" office:value-type="string">
            <text:p text:style-name="P43">{</text:p>
            <text:p text:style-name="P43"><text:tab/>"statusCode" : 200,</text:p>
            <text:p text:style-name="P43"><text:tab/>"status" : "success",</text:p>
            <text:p text:style-name="P43"><text:tab/>"message" : "The record is <text:span text:style-name="T16">activated</text:span> successfully.",</text:p>
            <text:p text:style-name="P43"><text:tab/>"errorCode" : 0,</text:p>
            <text:p text:style-name="P43"><text:tab/>"data" : <text:span text:style-name="T16">null</text:span></text:p>
            <text:p text:style-name="P43">}</text:p>
          </table:table-cell>
        </table:table-row>
      </table:table>
      <text:p text:style-name="P42"><text:span text:style-name="Strong_20_Emphasis"/></text:p>
      <text:h text:style-name="P41" text:outline-level="2"><text:bookmark-start text:name="__RefHeading___Toc2083_720390006 Copy 1 Copy 1 Copy 3 Copy 5 Copy 5"/><text:soft-page-break/><text:span text:style-name="Strong_20_Emphasis"><text:span text:style-name="T7">Inactive</text:span></text:span><text:bookmark-end text:name="__RefHeading___Toc2083_720390006 Copy 1 Copy 1 Copy 3 Copy 5 Copy 5"/></text:h>
      <text:p text:style-name="P42"><text:span text:style-name="Strong_20_Emphasis"><text:span text:style-name="T8">Description</text:span></text:span></text:p>
      <text:p text:style-name="P46"><text:span text:style-name="Strong_20_Emphasis"><text:span text:style-name="T9">This API </text:span></text:span><text:span text:style-name="Strong_20_Emphasis"><text:span text:style-name="T17">in</text:span></text:span><text:span text:style-name="Strong_20_Emphasis"><text:span text:style-name="T9">-actives a specific “</text:span></text:span><text:span text:style-name="Strong_20_Emphasis"><text:span text:style-name="T11">project </text:span></text:span><text:span text:style-name="Strong_20_Emphasis"><text:span text:style-name="T33">release</text:span></text:span><text:span text:style-name="Strong_20_Emphasis"><text:span text:style-name="T9">” in the </text:span></text:span><text:span text:style-name="Strong_20_Emphasis"><text:span text:style-name="T11">project</text:span></text:span><text:span text:style-name="Strong_20_Emphasis"><text:span text:style-name="T12"> management</text:span></text:span><text:span text:style-name="Strong_20_Emphasis"><text:span text:style-name="T9">.</text:span></text:span></text:p>
      <text:p text:style-name="P42"><text:span text:style-name="Strong_20_Emphasis"><text:span text:style-name="T14">Request CURL Sample</text:span></text:span></text:p>
      <table:table table:name="Table120" table:style-name="Table120">
        <table:table-column table:style-name="Table120.A"/>
        <table:table-row>
          <table:table-cell table:style-name="Table120.A1" office:value-type="string">
            <text:p text:style-name="P43">curl --request PUT \</text:p>
            <text:p text:style-name="P43"><text:s text:c="2"/>--url 'https://[maindomian]/api/projectManagement/projectRelease/inactive/[id]' \</text:p>
            <text:p text:style-name="P43"><text:s text:c="2"/>--header 'Authorization: Bearer [token]'</text:p>
          </table:table-cell>
        </table:table-row>
      </table:table>
      <text:p text:style-name="P42"><text:span text:style-name="Strong_20_Emphasis"><text:span text:style-name="T15"/></text:span></text:p>
      <text:p text:style-name="P42"><text:span text:style-name="Strong_20_Emphasis"><text:span text:style-name="T14">Response Sample</text:span></text:span></text:p>
      <table:table table:name="Table121" table:style-name="Table121">
        <table:table-column table:style-name="Table121.A"/>
        <table:table-row>
          <table:table-cell table:style-name="Table121.A1" office:value-type="string">
            <text:p text:style-name="P43">{</text:p>
            <text:p text:style-name="P43"><text:tab/>"statusCode" : 200,</text:p>
            <text:p text:style-name="P43"><text:tab/>"status" : "success",</text:p>
            <text:p text:style-name="P43"><text:tab/>"message" : "The record is <text:span text:style-name="T18">in</text:span><text:span text:style-name="T16">activated</text:span> successfully.",</text:p>
            <text:p text:style-name="P43"><text:tab/>"errorCode" : 0,</text:p>
            <text:p text:style-name="P43"><text:tab/>"data" : <text:span text:style-name="T16">null</text:span></text:p>
            <text:p text:style-name="P43">}</text:p>
          </table:table-cell>
        </table:table-row>
      </table:table>
      <text:p text:style-name="P42"><text:span text:style-name="Strong_20_Emphasis"/></text:p>
      <text:h text:style-name="P41" text:outline-level="2"><text:bookmark-start text:name="__RefHeading___Toc2085_720390006 Copy 1 Copy 1 Copy 3 Copy 5 Copy 5"/><text:span text:style-name="Strong_20_Emphasis"><text:span text:style-name="T7">Fetch Specific Record</text:span></text:span><text:bookmark-end text:name="__RefHeading___Toc2085_720390006 Copy 1 Copy 1 Copy 3 Copy 5 Copy 5"/></text:h>
      <text:p text:style-name="P42"><text:span text:style-name="Strong_20_Emphasis"><text:span text:style-name="T8">Description</text:span></text:span></text:p>
      <text:p text:style-name="P46"><text:span text:style-name="Strong_20_Emphasis"><text:span text:style-name="T9">This API </text:span></text:span><text:span text:style-name="Strong_20_Emphasis"><text:span text:style-name="T19">returns</text:span></text:span><text:span text:style-name="Strong_20_Emphasis"><text:span text:style-name="T9"> a specific “</text:span></text:span><text:span text:style-name="Strong_20_Emphasis"><text:span text:style-name="T11">project </text:span></text:span><text:span text:style-name="Strong_20_Emphasis"><text:span text:style-name="T33">release</text:span></text:span><text:span text:style-name="Strong_20_Emphasis"><text:span text:style-name="T9">” </text:span></text:span><text:span text:style-name="Strong_20_Emphasis"><text:span text:style-name="T19">from</text:span></text:span><text:span text:style-name="Strong_20_Emphasis"><text:span text:style-name="T9"> the </text:span></text:span><text:span text:style-name="Strong_20_Emphasis"><text:span text:style-name="T11">project</text:span></text:span><text:span text:style-name="Strong_20_Emphasis"><text:span text:style-name="T20"> management</text:span></text:span><text:span text:style-name="Strong_20_Emphasis"><text:span text:style-name="T9">.</text:span></text:span></text:p>
      <text:p text:style-name="P42"><text:span text:style-name="Strong_20_Emphasis"><text:span text:style-name="T14">Request CURL Sample</text:span></text:span></text:p>
      <table:table table:name="Table122" table:style-name="Table122">
        <table:table-column table:style-name="Table122.A"/>
        <table:table-row>
          <table:table-cell table:style-name="Table122.A1" office:value-type="string">
            <text:p text:style-name="P43">curl --request GET \</text:p>
            <text:p text:style-name="P43"><text:s text:c="2"/>--url 'https://[maindomian]/api/projectManagement/projectRelease/[id]' \</text:p>
            <text:p text:style-name="P43"><text:s text:c="2"/>--header 'Authorization: Bearer [token]'</text:p>
          </table:table-cell>
        </table:table-row>
      </table:table>
      <text:p text:style-name="P42"><text:span text:style-name="Strong_20_Emphasis"><text:span text:style-name="T15"/></text:span></text:p>
      <text:p text:style-name="P42"><text:span text:style-name="Strong_20_Emphasis"><text:span text:style-name="T14">Response Sample</text:span></text:span></text:p>
      <table:table table:name="Table123" table:style-name="Table123">
        <table:table-column table:style-name="Table123.A"/>
        <table:table-row>
          <table:table-cell table:style-name="Table123.A1" office:value-type="string">
            <text:p text:style-name="P43">{</text:p>
            <text:p text:style-name="P43"><text:tab/>"statusCode" : 200,</text:p>
            <text:p text:style-name="P43"><text:tab/>"status" : "success",</text:p>
            <text:p text:style-name="P43"><text:soft-page-break/><text:tab/>"message" : "The data is returned successfully.",</text:p>
            <text:p text:style-name="P43"><text:tab/>"errorCode" : 0,</text:p>
            <text:p text:style-name="P43"><text:tab/>"data" : {</text:p>
            <text:p text:style-name="P43"><text:tab/><text:tab/>"id" : 16621244611384550112, </text:p>
            <text:p text:style-name="P43"><text:tab/><text:tab/>"title" : "test",</text:p>
            <text:p text:style-name="P43"><text:tab/><text:tab/>"code" : "123",</text:p>
            <text:p text:style-name="P43"><text:tab/><text:tab/>"description" : "test",</text:p>
            <text:p text:style-name="P43"><text:tab/><text:tab/>"profileId": [{</text:p>
            <text:p text:style-name="P43"><text:tab/><text:tab/><text:tab/>"id" : 16621244611384550113,</text:p>
            <text:p text:style-name="P43"><text:tab/><text:tab/><text:tab/>"firstName": "David",</text:p>
            <text:p text:style-name="P43"><text:tab/><text:tab/><text:tab/>"lastName": "Talor"</text:p>
            <text:p text:style-name="P43"><text:tab/><text:tab/>}],</text:p>
            <text:p text:style-name="P43"><text:tab/><text:tab/>"roleFormPermissionId": [{</text:p>
            <text:p text:style-name="P43"><text:tab/><text:tab/><text:tab/>"id" : 16621244611384550114,</text:p>
            <text:p text:style-name="P43"><text:tab/><text:tab/><text:tab/>"formPermissionId": {</text:p>
            <text:p text:style-name="P43"><text:tab/><text:tab/><text:tab/><text:tab/>"id" : 16621244611384550114,</text:p>
            <text:p text:style-name="P43"><text:tab/><text:tab/><text:tab/><text:tab/>"formId": {</text:p>
            <text:p text:style-name="P43"><text:tab/><text:tab/><text:tab/><text:tab/><text:tab/>"id" : 16621244611384550115,</text:p>
            <text:p text:style-name="P43"><text:tab/><text:tab/><text:tab/><text:tab/><text:tab/>"title": "Project"</text:p>
            <text:p text:style-name="P43"><text:tab/><text:tab/><text:tab/><text:tab/>},</text:p>
            <text:p text:style-name="P43"><text:tab/><text:tab/><text:tab/><text:tab/>"permissionId": {</text:p>
            <text:p text:style-name="P43"><text:tab/><text:tab/><text:tab/><text:tab/><text:tab/>"id" : 16621244611384550116,</text:p>
            <text:p text:style-name="P43"><text:tab/><text:tab/><text:tab/><text:tab/><text:tab/>"title": "Add"</text:p>
            <text:p text:style-name="P43"><text:tab/><text:tab/><text:tab/><text:tab/>}</text:p>
            <text:p text:style-name="P43"><text:tab/><text:tab/><text:tab/>}</text:p>
            <text:p text:style-name="P43"><text:tab/><text:tab/>}],</text:p>
            <text:p text:style-name="P43"><text:tab/><text:tab/>"createdAt" : "2025-8-25 12:00:00",</text:p>
            <text:p text:style-name="P43"><text:tab/><text:tab/>"createdBy" : "John Davis" </text:p>
            <text:p text:style-name="P43"><text:tab/>}</text:p>
            <text:p text:style-name="P43">}</text:p>
          </table:table-cell>
        </table:table-row>
      </table:table>
      <text:p text:style-name="P42"><text:span text:style-name="Strong_20_Emphasis"/></text:p>
      <text:h text:style-name="P40" text:outline-level="1"><text:bookmark-start text:name="__RefHeading___Toc227_771010674 Copy 1 Copy 1 Copy 3 Copy 5 Copy 6"/><text:span text:style-name="T25">W</text:span><text:span text:style-name="T6">ork Log</text:span><text:bookmark-end text:name="__RefHeading___Toc227_771010674 Copy 1 Copy 1 Copy 3 Copy 5 Copy 6"/></text:h>
      <text:h text:style-name="P41" text:outline-level="2"><text:bookmark-start text:name="__RefHeading___Toc908_3206075736 Copy 1 Copy 1 Copy 1 Copy 3 Copy 5 Copy 6"/><text:span text:style-name="Strong_20_Emphasis"><text:span text:style-name="T7">Delete</text:span></text:span><text:bookmark-end text:name="__RefHeading___Toc908_3206075736 Copy 1 Copy 1 Copy 1 Copy 3 Copy 5 Copy 6"/></text:h>
      <text:p text:style-name="P42"><text:span text:style-name="Strong_20_Emphasis"><text:span text:style-name="T8">Description</text:span></text:span></text:p>
      <text:p text:style-name="P42"><text:span text:style-name="Strong_20_Emphasis"><text:span text:style-name="T9">This API </text:span></text:span><text:span text:style-name="Strong_20_Emphasis"><text:span text:style-name="T10">logically</text:span></text:span><text:span text:style-name="Strong_20_Emphasis"><text:span text:style-name="T9"> deletes a “</text:span></text:span><text:span text:style-name="Strong_20_Emphasis"><text:span text:style-name="T36">work log</text:span></text:span><text:span text:style-name="Strong_20_Emphasis"><text:span text:style-name="T9">” from the </text:span></text:span><text:span text:style-name="Strong_20_Emphasis"><text:span text:style-name="T11">project</text:span></text:span><text:span text:style-name="Strong_20_Emphasis"><text:span text:style-name="T12"> man</text:span></text:span><text:span text:style-name="Strong_20_Emphasis"><text:span text:style-name="T13">a</text:span></text:span><text:span text:style-name="Strong_20_Emphasis"><text:span text:style-name="T12">gement</text:span></text:span><text:span text:style-name="Strong_20_Emphasis"><text:span text:style-name="T9">.</text:span></text:span></text:p>
      <text:p text:style-name="P42"><text:span text:style-name="Strong_20_Emphasis"><text:span text:style-name="T14">Request CURL Sample</text:span></text:span></text:p>
      <table:table table:name="Table124" table:style-name="Table124">
        <table:table-column table:style-name="Table124.A"/>
        <text:soft-page-break/>
        <table:table-row>
          <table:table-cell table:style-name="Table124.A1" office:value-type="string">
            <text:p text:style-name="P43">curl --request DELETE \</text:p>
            <text:p text:style-name="P43"><text:s text:c="2"/>--url 'https://[maindomian]/api/projectManagement/workLog/[id]' \</text:p>
            <text:p text:style-name="P43"><text:s text:c="2"/>--header 'Authorization: Bearer [token]'</text:p>
          </table:table-cell>
        </table:table-row>
      </table:table>
      <text:p text:style-name="P42"><text:span text:style-name="Strong_20_Emphasis"><text:span text:style-name="T15"/></text:span></text:p>
      <text:p text:style-name="P42"><text:span text:style-name="Strong_20_Emphasis"><text:span text:style-name="T14">Response Sample</text:span></text:span></text:p>
      <table:table table:name="Table125" table:style-name="Table125">
        <table:table-column table:style-name="Table125.A"/>
        <table:table-row>
          <table:table-cell table:style-name="Table125.A1" office:value-type="string">
            <text:p text:style-name="P43">{</text:p>
            <text:p text:style-name="P43"><text:tab/>"statusCode" : 200,</text:p>
            <text:p text:style-name="P43"><text:tab/>"status" : "success",</text:p>
            <text:p text:style-name="P43"><text:tab/>"message" : "The record is <text:span text:style-name="T16">deleted</text:span> successfully.",</text:p>
            <text:p text:style-name="P43"><text:tab/>"errorCode" : 0,</text:p>
            <text:p text:style-name="P43"><text:tab/>"data" : <text:span text:style-name="T16">null</text:span></text:p>
            <text:p text:style-name="P43">}</text:p>
          </table:table-cell>
        </table:table-row>
      </table:table>
      <text:p text:style-name="P42"><text:span text:style-name="Strong_20_Emphasis"/></text:p>
      <text:h text:style-name="P41" text:outline-level="2"><text:bookmark-start text:name="__RefHeading___Toc2079_720390006 Copy 1 Copy 1 Copy 3 Copy 5 Copy 6"/><text:span text:style-name="Strong_20_Emphasis"><text:span text:style-name="T7">Active</text:span></text:span><text:bookmark-end text:name="__RefHeading___Toc2079_720390006 Copy 1 Copy 1 Copy 3 Copy 5 Copy 6"/></text:h>
      <text:p text:style-name="P42"><text:span text:style-name="Strong_20_Emphasis"><text:span text:style-name="T8">Description</text:span></text:span></text:p>
      <text:p text:style-name="P42"><text:span text:style-name="Strong_20_Emphasis"><text:span text:style-name="T9">This API actives a “</text:span></text:span><text:span text:style-name="Strong_20_Emphasis"><text:span text:style-name="T36">work log</text:span></text:span><text:span text:style-name="Strong_20_Emphasis"><text:span text:style-name="T9">” in the </text:span></text:span><text:span text:style-name="Strong_20_Emphasis"><text:span text:style-name="T11">project</text:span></text:span><text:span text:style-name="Strong_20_Emphasis"><text:span text:style-name="T12"> management</text:span></text:span><text:span text:style-name="Strong_20_Emphasis"><text:span text:style-name="T9">.</text:span></text:span></text:p>
      <text:p text:style-name="P42"><text:span text:style-name="Strong_20_Emphasis"><text:span text:style-name="T14">Request CURL Sample</text:span></text:span></text:p>
      <table:table table:name="Table126" table:style-name="Table126">
        <table:table-column table:style-name="Table126.A"/>
        <table:table-row>
          <table:table-cell table:style-name="Table126.A1" office:value-type="string">
            <text:p text:style-name="P43">curl --request PUT \</text:p>
            <text:p text:style-name="P43"><text:s text:c="2"/>--url 'https://[maindomian]/api/projectManagement/workLog/active/[id]' \</text:p>
            <text:p text:style-name="P43"><text:s text:c="2"/>--header 'Authorization: Bearer [token]'</text:p>
          </table:table-cell>
        </table:table-row>
      </table:table>
      <text:p text:style-name="P42"><text:span text:style-name="Strong_20_Emphasis"><text:span text:style-name="T15"/></text:span></text:p>
      <text:p text:style-name="P42"><text:span text:style-name="Strong_20_Emphasis"><text:span text:style-name="T14">Response Sample</text:span></text:span></text:p>
      <table:table table:name="Table127" table:style-name="Table127">
        <table:table-column table:style-name="Table127.A"/>
        <table:table-row>
          <table:table-cell table:style-name="Table127.A1" office:value-type="string">
            <text:p text:style-name="P43">{</text:p>
            <text:p text:style-name="P43"><text:tab/>"statusCode" : 200,</text:p>
            <text:p text:style-name="P43"><text:tab/>"status" : "success",</text:p>
            <text:p text:style-name="P43"><text:tab/>"message" : "The record is <text:span text:style-name="T16">activated</text:span> successfully.",</text:p>
            <text:p text:style-name="P43"><text:tab/>"errorCode" : 0,</text:p>
            <text:p text:style-name="P43"><text:tab/>"data" : <text:span text:style-name="T16">null</text:span></text:p>
            <text:p text:style-name="P43">}</text:p>
          </table:table-cell>
        </table:table-row>
      </table:table>
      <text:p text:style-name="P42"><text:span text:style-name="Strong_20_Emphasis"/></text:p>
      <text:h text:style-name="P41" text:outline-level="2"><text:bookmark-start text:name="__RefHeading___Toc2083_720390006 Copy 1 Copy 1 Copy 3 Copy 5 Copy 6"/><text:span text:style-name="Strong_20_Emphasis"><text:span text:style-name="T7">Inactive</text:span></text:span><text:bookmark-end text:name="__RefHeading___Toc2083_720390006 Copy 1 Copy 1 Copy 3 Copy 5 Copy 6"/></text:h>
      <text:p text:style-name="P42"><text:span text:style-name="Strong_20_Emphasis"><text:span text:style-name="T8">Description</text:span></text:span></text:p>
      <text:p text:style-name="P42"><text:soft-page-break/><text:span text:style-name="Strong_20_Emphasis"><text:span text:style-name="T9">This API </text:span></text:span><text:span text:style-name="Strong_20_Emphasis"><text:span text:style-name="T17">in</text:span></text:span><text:span text:style-name="Strong_20_Emphasis"><text:span text:style-name="T9">-actives a specific “</text:span></text:span><text:span text:style-name="Strong_20_Emphasis"><text:span text:style-name="T36">work log</text:span></text:span><text:span text:style-name="Strong_20_Emphasis"><text:span text:style-name="T9">” in the </text:span></text:span><text:span text:style-name="Strong_20_Emphasis"><text:span text:style-name="T11">project</text:span></text:span><text:span text:style-name="Strong_20_Emphasis"><text:span text:style-name="T12"> management</text:span></text:span><text:span text:style-name="Strong_20_Emphasis"><text:span text:style-name="T9">.</text:span></text:span></text:p>
      <text:p text:style-name="P42"><text:span text:style-name="Strong_20_Emphasis"><text:span text:style-name="T14">Request CURL Sample</text:span></text:span></text:p>
      <table:table table:name="Table128" table:style-name="Table128">
        <table:table-column table:style-name="Table128.A"/>
        <table:table-row>
          <table:table-cell table:style-name="Table128.A1" office:value-type="string">
            <text:p text:style-name="P43">curl --request PUT \</text:p>
            <text:p text:style-name="P43"><text:s text:c="2"/>--url 'https://[maindomian]/api/projectManagement/workLog/inactive/[id]' \</text:p>
            <text:p text:style-name="P43"><text:s text:c="2"/>--header 'Authorization: Bearer [token]'</text:p>
          </table:table-cell>
        </table:table-row>
      </table:table>
      <text:p text:style-name="P42"><text:span text:style-name="Strong_20_Emphasis"><text:span text:style-name="T15"/></text:span></text:p>
      <text:p text:style-name="P42"><text:span text:style-name="Strong_20_Emphasis"><text:span text:style-name="T14">Response Sample</text:span></text:span></text:p>
      <table:table table:name="Table129" table:style-name="Table129">
        <table:table-column table:style-name="Table129.A"/>
        <table:table-row>
          <table:table-cell table:style-name="Table129.A1" office:value-type="string">
            <text:p text:style-name="P43">{</text:p>
            <text:p text:style-name="P43"><text:tab/>"statusCode" : 200,</text:p>
            <text:p text:style-name="P43"><text:tab/>"status" : "success",</text:p>
            <text:p text:style-name="P43"><text:tab/>"message" : "The record is <text:span text:style-name="T18">in</text:span><text:span text:style-name="T16">activated</text:span> successfully.",</text:p>
            <text:p text:style-name="P43"><text:tab/>"errorCode" : 0,</text:p>
            <text:p text:style-name="P43"><text:tab/>"data" : <text:span text:style-name="T16">null</text:span></text:p>
            <text:p text:style-name="P43">}</text:p>
          </table:table-cell>
        </table:table-row>
      </table:table>
      <text:p text:style-name="P42"><text:span text:style-name="Strong_20_Emphasis"/></text:p>
      <text:h text:style-name="P41" text:outline-level="2"><text:bookmark-start text:name="__RefHeading___Toc2085_720390006 Copy 1 Copy 1 Copy 3 Copy 5 Copy 6"/><text:span text:style-name="Strong_20_Emphasis"><text:span text:style-name="T7">Fetch Specific Record</text:span></text:span><text:bookmark-end text:name="__RefHeading___Toc2085_720390006 Copy 1 Copy 1 Copy 3 Copy 5 Copy 6"/></text:h>
      <text:p text:style-name="P42"><text:span text:style-name="Strong_20_Emphasis"><text:span text:style-name="T8">Description</text:span></text:span></text:p>
      <text:p text:style-name="P42"><text:span text:style-name="Strong_20_Emphasis"><text:span text:style-name="T9">This API </text:span></text:span><text:span text:style-name="Strong_20_Emphasis"><text:span text:style-name="T19">returns</text:span></text:span><text:span text:style-name="Strong_20_Emphasis"><text:span text:style-name="T9"> a specific “</text:span></text:span><text:span text:style-name="Strong_20_Emphasis"><text:span text:style-name="T36">work log</text:span></text:span><text:span text:style-name="Strong_20_Emphasis"><text:span text:style-name="T9">” </text:span></text:span><text:span text:style-name="Strong_20_Emphasis"><text:span text:style-name="T19">from</text:span></text:span><text:span text:style-name="Strong_20_Emphasis"><text:span text:style-name="T9"> the </text:span></text:span><text:span text:style-name="Strong_20_Emphasis"><text:span text:style-name="T11">project</text:span></text:span><text:span text:style-name="Strong_20_Emphasis"><text:span text:style-name="T20"> management</text:span></text:span><text:span text:style-name="Strong_20_Emphasis"><text:span text:style-name="T9">.</text:span></text:span></text:p>
      <text:p text:style-name="P42"><text:span text:style-name="Strong_20_Emphasis"><text:span text:style-name="T14">Request CURL Sample</text:span></text:span></text:p>
      <table:table table:name="Table130" table:style-name="Table130">
        <table:table-column table:style-name="Table130.A"/>
        <table:table-row>
          <table:table-cell table:style-name="Table130.A1" office:value-type="string">
            <text:p text:style-name="P43">curl --request GET \</text:p>
            <text:p text:style-name="P43"><text:s text:c="2"/>--url 'https://[maindomian]/api/projectManagement/workLog/[id]' \</text:p>
            <text:p text:style-name="P43"><text:s text:c="2"/>--header 'Authorization: Bearer [token]'</text:p>
          </table:table-cell>
        </table:table-row>
      </table:table>
      <text:p text:style-name="P42"><text:span text:style-name="Strong_20_Emphasis"><text:span text:style-name="T15"/></text:span></text:p>
      <text:p text:style-name="P42"><text:span text:style-name="Strong_20_Emphasis"><text:span text:style-name="T14">Response Sample</text:span></text:span></text:p>
      <table:table table:name="Table131" table:style-name="Table131">
        <table:table-column table:style-name="Table131.A"/>
        <table:table-row>
          <table:table-cell table:style-name="Table131.A1" office:value-type="string">
            <text:p text:style-name="P43">{</text:p>
            <text:p text:style-name="P43"><text:tab/>"statusCode" : 200,</text:p>
            <text:p text:style-name="P43"><text:tab/>"status" : "success",</text:p>
            <text:p text:style-name="P43"><text:tab/>"message" : "The data is returned successfully.",</text:p>
            <text:p text:style-name="P43"><text:tab/>"errorCode" : 0,</text:p>
            <text:p text:style-name="P43"><text:tab/>"data" : {</text:p>
            <text:p text:style-name="P43"><text:tab/><text:tab/>"id" : 16621244611384550112, </text:p>
            <text:p text:style-name="P43"><text:tab/><text:tab/>"title" : "test",</text:p>
            <text:p text:style-name="P43"><text:soft-page-break/><text:tab/><text:tab/>"code" : "123",</text:p>
            <text:p text:style-name="P43"><text:tab/><text:tab/>"description" : "test",</text:p>
            <text:p text:style-name="P43"><text:tab/><text:tab/>"profileId": [{</text:p>
            <text:p text:style-name="P43"><text:tab/><text:tab/><text:tab/>"id" : 16621244611384550113,</text:p>
            <text:p text:style-name="P43"><text:tab/><text:tab/><text:tab/>"firstName": "David",</text:p>
            <text:p text:style-name="P43"><text:tab/><text:tab/><text:tab/>"lastName": "Talor"</text:p>
            <text:p text:style-name="P43"><text:tab/><text:tab/>}],</text:p>
            <text:p text:style-name="P43"><text:tab/><text:tab/>"roleFormPermissionId": [{</text:p>
            <text:p text:style-name="P43"><text:tab/><text:tab/><text:tab/>"id" : 16621244611384550114,</text:p>
            <text:p text:style-name="P43"><text:tab/><text:tab/><text:tab/>"formPermissionId": {</text:p>
            <text:p text:style-name="P43"><text:tab/><text:tab/><text:tab/><text:tab/>"id" : 16621244611384550114,</text:p>
            <text:p text:style-name="P43"><text:tab/><text:tab/><text:tab/><text:tab/>"formId": {</text:p>
            <text:p text:style-name="P43"><text:tab/><text:tab/><text:tab/><text:tab/><text:tab/>"id" : 16621244611384550115,</text:p>
            <text:p text:style-name="P43"><text:tab/><text:tab/><text:tab/><text:tab/><text:tab/>"title": "Project"</text:p>
            <text:p text:style-name="P43"><text:tab/><text:tab/><text:tab/><text:tab/>},</text:p>
            <text:p text:style-name="P43"><text:tab/><text:tab/><text:tab/><text:tab/>"permissionId": {</text:p>
            <text:p text:style-name="P43"><text:tab/><text:tab/><text:tab/><text:tab/><text:tab/>"id" : 16621244611384550116,</text:p>
            <text:p text:style-name="P43"><text:tab/><text:tab/><text:tab/><text:tab/><text:tab/>"title": "Add"</text:p>
            <text:p text:style-name="P43"><text:tab/><text:tab/><text:tab/><text:tab/>}</text:p>
            <text:p text:style-name="P43"><text:tab/><text:tab/><text:tab/>}</text:p>
            <text:p text:style-name="P43"><text:tab/><text:tab/>}],</text:p>
            <text:p text:style-name="P43"><text:tab/><text:tab/>"createdAt" : "2025-8-25 12:00:00",</text:p>
            <text:p text:style-name="P43"><text:tab/><text:tab/>"createdBy" : "John Davis" </text:p>
            <text:p text:style-name="P43"><text:tab/>}</text:p>
            <text:p text:style-name="P43">}</text:p>
          </table:table-cell>
        </table:table-row>
      </table:table>
      <text:p text:style-name="P42"><text:span text:style-name="Strong_20_Emphasis"/></text:p>
      <text:h text:style-name="P47" text:outline-level="1"><text:bookmark-start text:name="__RefHeading___Toc227_771010674 Copy 1 Copy 1 Copy 3 Copy 5 Copy 7"/><text:span text:style-name="T35">Issue</text:span><text:span text:style-name="T6"> </text:span><text:span text:style-name="T25">Workflow </text:span><text:span text:style-name="T35">History</text:span><text:bookmark-end text:name="__RefHeading___Toc227_771010674 Copy 1 Copy 1 Copy 3 Copy 5 Copy 7"/></text:h>
      <text:h text:style-name="P41" text:outline-level="2"><text:bookmark-start text:name="__RefHeading___Toc908_3206075736 Copy 1 Copy 1 Copy 1 Copy 3 Copy 5 Copy 7"/><text:span text:style-name="Strong_20_Emphasis"><text:span text:style-name="T7">Delete</text:span></text:span><text:bookmark-end text:name="__RefHeading___Toc908_3206075736 Copy 1 Copy 1 Copy 1 Copy 3 Copy 5 Copy 7"/></text:h>
      <text:p text:style-name="P42"><text:span text:style-name="Strong_20_Emphasis"><text:span text:style-name="T8">Description</text:span></text:span></text:p>
      <text:p text:style-name="P42"><text:span text:style-name="Strong_20_Emphasis"><text:span text:style-name="T9">This API </text:span></text:span><text:span text:style-name="Strong_20_Emphasis"><text:span text:style-name="T10">logically</text:span></text:span><text:span text:style-name="Strong_20_Emphasis"><text:span text:style-name="T9"> deletes a</text:span></text:span><text:span text:style-name="Strong_20_Emphasis"><text:span text:style-name="T36">n</text:span></text:span><text:span text:style-name="Strong_20_Emphasis"><text:span text:style-name="T9"> “</text:span></text:span><text:span text:style-name="Strong_20_Emphasis"><text:span text:style-name="T36">issue workflow history</text:span></text:span><text:span text:style-name="Strong_20_Emphasis"><text:span text:style-name="T9">” from the </text:span></text:span><text:span text:style-name="Strong_20_Emphasis"><text:span text:style-name="T11">project</text:span></text:span><text:span text:style-name="Strong_20_Emphasis"><text:span text:style-name="T12"> man</text:span></text:span><text:span text:style-name="Strong_20_Emphasis"><text:span text:style-name="T13">a</text:span></text:span><text:span text:style-name="Strong_20_Emphasis"><text:span text:style-name="T12">gement</text:span></text:span><text:span text:style-name="Strong_20_Emphasis"><text:span text:style-name="T9">.</text:span></text:span></text:p>
      <text:p text:style-name="P42"><text:span text:style-name="Strong_20_Emphasis"><text:span text:style-name="T14">Request CURL Sample</text:span></text:span></text:p>
      <table:table table:name="Table132" table:style-name="Table132">
        <table:table-column table:style-name="Table132.A"/>
        <table:table-row>
          <table:table-cell table:style-name="Table132.A1" office:value-type="string">
            <text:p text:style-name="P43">curl --request DELETE \</text:p>
            <text:p text:style-name="P43"><text:s text:c="2"/>--url 'https://[maindomian]/api/projectManagement/issueWorkflowHistory/[id]' \</text:p>
            <text:p text:style-name="P43"><text:s text:c="2"/>--header 'Authorization: Bearer [token]'</text:p>
          </table:table-cell>
        </table:table-row>
      </table:table>
      <text:p text:style-name="P42"><text:soft-page-break/><text:span text:style-name="Strong_20_Emphasis"><text:span text:style-name="T15"/></text:span></text:p>
      <text:p text:style-name="P42"><text:span text:style-name="Strong_20_Emphasis"><text:span text:style-name="T14">Response Sample</text:span></text:span></text:p>
      <table:table table:name="Table133" table:style-name="Table133">
        <table:table-column table:style-name="Table133.A"/>
        <table:table-row>
          <table:table-cell table:style-name="Table133.A1" office:value-type="string">
            <text:p text:style-name="P43">{</text:p>
            <text:p text:style-name="P43"><text:tab/>"statusCode" : 200,</text:p>
            <text:p text:style-name="P43"><text:tab/>"status" : "success",</text:p>
            <text:p text:style-name="P43"><text:tab/>"message" : "The record is <text:span text:style-name="T16">deleted</text:span> successfully."</text:p>
            <text:p text:style-name="P43"><text:tab/>"errorCode" : 0,</text:p>
            <text:p text:style-name="P43"><text:tab/>"data" : <text:span text:style-name="T16">null</text:span></text:p>
            <text:p text:style-name="P43">}</text:p>
          </table:table-cell>
        </table:table-row>
      </table:table>
      <text:p text:style-name="P42"><text:span text:style-name="Strong_20_Emphasis"/></text:p>
      <text:h text:style-name="P41" text:outline-level="2"><text:bookmark-start text:name="__RefHeading___Toc2085_720390006 Copy 1 Copy 1 Copy 3 Copy 5 Copy 7"/><text:span text:style-name="Strong_20_Emphasis"><text:span text:style-name="T7">Fetch Specific Record</text:span></text:span><text:bookmark-end text:name="__RefHeading___Toc2085_720390006 Copy 1 Copy 1 Copy 3 Copy 5 Copy 7"/></text:h>
      <text:p text:style-name="P42"><text:span text:style-name="Strong_20_Emphasis"><text:span text:style-name="T8">Description</text:span></text:span></text:p>
      <text:p text:style-name="P48"><text:span text:style-name="Strong_20_Emphasis"><text:span text:style-name="T9">This API </text:span></text:span><text:span text:style-name="Strong_20_Emphasis"><text:span text:style-name="T19">returns</text:span></text:span><text:span text:style-name="Strong_20_Emphasis"><text:span text:style-name="T9"> a specific “</text:span></text:span><text:span text:style-name="Strong_20_Emphasis"><text:span text:style-name="T36">issue workflow history</text:span></text:span><text:span text:style-name="Strong_20_Emphasis"><text:span text:style-name="T9">” </text:span></text:span><text:span text:style-name="Strong_20_Emphasis"><text:span text:style-name="T19">from</text:span></text:span><text:span text:style-name="Strong_20_Emphasis"><text:span text:style-name="T9"> the </text:span></text:span><text:span text:style-name="Strong_20_Emphasis"><text:span text:style-name="T11">project</text:span></text:span><text:span text:style-name="Strong_20_Emphasis"><text:span text:style-name="T20"> management</text:span></text:span><text:span text:style-name="Strong_20_Emphasis"><text:span text:style-name="T9">.</text:span></text:span></text:p>
      <text:p text:style-name="P42"><text:span text:style-name="Strong_20_Emphasis"><text:span text:style-name="T14">Request CURL Sample</text:span></text:span></text:p>
      <table:table table:name="Table138" table:style-name="Table138">
        <table:table-column table:style-name="Table138.A"/>
        <table:table-row>
          <table:table-cell table:style-name="Table138.A1" office:value-type="string">
            <text:p text:style-name="P43">curl --request GET \</text:p>
            <text:p text:style-name="P43"><text:s text:c="2"/>--url 'https://[maindomian]/api/projectManagement/issueWorkflowHistory/[id]' \</text:p>
            <text:p text:style-name="P43"><text:s text:c="2"/>--header 'Authorization: Bearer [token]'</text:p>
          </table:table-cell>
        </table:table-row>
      </table:table>
      <text:p text:style-name="P42"><text:span text:style-name="Strong_20_Emphasis"><text:span text:style-name="T15"/></text:span></text:p>
      <text:p text:style-name="P42"><text:span text:style-name="Strong_20_Emphasis"><text:span text:style-name="T14">Response Sample</text:span></text:span></text:p>
      <table:table table:name="Table139" table:style-name="Table139">
        <table:table-column table:style-name="Table139.A"/>
        <table:table-row>
          <table:table-cell table:style-name="Table139.A1" office:value-type="string">
            <text:p text:style-name="P43">{</text:p>
            <text:p text:style-name="P43"><text:tab/>"statusCode" : 200,</text:p>
            <text:p text:style-name="P43"><text:tab/>"status" : "success",</text:p>
            <text:p text:style-name="P43"><text:tab/>"message" : "The data is returned successfully.",</text:p>
            <text:p text:style-name="P43"><text:tab/>"errorCode" : 0,</text:p>
            <text:p text:style-name="P43"><text:tab/>"data" : {</text:p>
            <text:p text:style-name="P43"><text:tab/><text:tab/>"id" : 16621244611384550112, </text:p>
            <text:p text:style-name="P43"><text:tab/><text:tab/>"title" : "test",</text:p>
            <text:p text:style-name="P43"><text:tab/><text:tab/>"code" : "123",</text:p>
            <text:p text:style-name="P43"><text:tab/><text:tab/>"description" : "test",</text:p>
            <text:p text:style-name="P43"><text:tab/><text:tab/>"profileId": [{</text:p>
            <text:p text:style-name="P43"><text:tab/><text:tab/><text:tab/>"id" : 16621244611384550113,</text:p>
            <text:p text:style-name="P43"><text:tab/><text:tab/><text:tab/>"firstName": "David",</text:p>
            <text:p text:style-name="P43"><text:tab/><text:tab/><text:tab/>"lastName": "Talor"</text:p>
            <text:p text:style-name="P43"><text:soft-page-break/><text:tab/><text:tab/>}],</text:p>
            <text:p text:style-name="P43"><text:tab/><text:tab/>"roleFormPermissionId": [{</text:p>
            <text:p text:style-name="P43"><text:tab/><text:tab/><text:tab/>"id" : 16621244611384550114,</text:p>
            <text:p text:style-name="P43"><text:tab/><text:tab/><text:tab/>"formPermissionId": {</text:p>
            <text:p text:style-name="P43"><text:tab/><text:tab/><text:tab/><text:tab/>"id" : 16621244611384550114,</text:p>
            <text:p text:style-name="P43"><text:tab/><text:tab/><text:tab/><text:tab/>"formId": {</text:p>
            <text:p text:style-name="P43"><text:tab/><text:tab/><text:tab/><text:tab/><text:tab/>"id" : 16621244611384550115,</text:p>
            <text:p text:style-name="P43"><text:tab/><text:tab/><text:tab/><text:tab/><text:tab/>"title": "Project"</text:p>
            <text:p text:style-name="P43"><text:tab/><text:tab/><text:tab/><text:tab/>},</text:p>
            <text:p text:style-name="P43"><text:tab/><text:tab/><text:tab/><text:tab/>"permissionId": {</text:p>
            <text:p text:style-name="P43"><text:tab/><text:tab/><text:tab/><text:tab/><text:tab/>"id" : 16621244611384550116,</text:p>
            <text:p text:style-name="P43"><text:tab/><text:tab/><text:tab/><text:tab/><text:tab/>"title": "Add"</text:p>
            <text:p text:style-name="P43"><text:tab/><text:tab/><text:tab/><text:tab/>}</text:p>
            <text:p text:style-name="P43"><text:tab/><text:tab/><text:tab/>}</text:p>
            <text:p text:style-name="P43"><text:tab/><text:tab/>}],</text:p>
            <text:p text:style-name="P43"><text:tab/><text:tab/>"createdAt" : "2025-8-25 12:00:00",</text:p>
            <text:p text:style-name="P43"><text:tab/><text:tab/>"createdBy" : "John Davis" </text:p>
            <text:p text:style-name="P43"><text:tab/>}</text:p>
            <text:p text:style-name="P43">}</text:p>
          </table:table-cell>
        </table:table-row>
      </table:table>
      <text:p text:style-name="P42"><text:span text:style-name="Strong_20_Emphasis"/></text:p>
      <text:h text:style-name="P47" text:outline-level="1"><text:bookmark-start text:name="__RefHeading___Toc227_771010674 Copy 1 Copy 1 Copy 3 Copy 5 Copy 8"/><text:span text:style-name="T35">Meeting</text:span><text:bookmark-end text:name="__RefHeading___Toc227_771010674 Copy 1 Copy 1 Copy 3 Copy 5 Copy 8"/></text:h>
      <text:h text:style-name="P41" text:outline-level="2"><text:bookmark-start text:name="__RefHeading___Toc908_3206075736 Copy 1 Copy 1 Copy 1 Copy 3 Copy 5 Copy 8"/><text:span text:style-name="Strong_20_Emphasis"><text:span text:style-name="T7">Delete</text:span></text:span><text:bookmark-end text:name="__RefHeading___Toc908_3206075736 Copy 1 Copy 1 Copy 1 Copy 3 Copy 5 Copy 8"/></text:h>
      <text:p text:style-name="P42"><text:span text:style-name="Strong_20_Emphasis"><text:span text:style-name="T8">Description</text:span></text:span></text:p>
      <text:p text:style-name="P42"><text:span text:style-name="Strong_20_Emphasis"><text:span text:style-name="T9">This API </text:span></text:span><text:span text:style-name="Strong_20_Emphasis"><text:span text:style-name="T10">logically</text:span></text:span><text:span text:style-name="Strong_20_Emphasis"><text:span text:style-name="T9"> deletes a “</text:span></text:span><text:span text:style-name="Strong_20_Emphasis"><text:span text:style-name="T11">project </text:span></text:span><text:span text:style-name="Strong_20_Emphasis"><text:span text:style-name="T37">meeting</text:span></text:span><text:span text:style-name="Strong_20_Emphasis"><text:span text:style-name="T9">” from the </text:span></text:span><text:span text:style-name="Strong_20_Emphasis"><text:span text:style-name="T11">project</text:span></text:span><text:span text:style-name="Strong_20_Emphasis"><text:span text:style-name="T12"> man</text:span></text:span><text:span text:style-name="Strong_20_Emphasis"><text:span text:style-name="T13">a</text:span></text:span><text:span text:style-name="Strong_20_Emphasis"><text:span text:style-name="T12">gement</text:span></text:span><text:span text:style-name="Strong_20_Emphasis"><text:span text:style-name="T9">.</text:span></text:span></text:p>
      <text:p text:style-name="P42"><text:span text:style-name="Strong_20_Emphasis"><text:span text:style-name="T14">Request CURL Sample</text:span></text:span></text:p>
      <table:table table:name="Table140" table:style-name="Table140">
        <table:table-column table:style-name="Table140.A"/>
        <table:table-row>
          <table:table-cell table:style-name="Table140.A1" office:value-type="string">
            <text:p text:style-name="P43">curl --request DELETE \</text:p>
            <text:p text:style-name="P43"><text:s text:c="2"/>--url 'https://[maindomian]/api/projectManagement/projectMeeting/[id]' \</text:p>
            <text:p text:style-name="P43"><text:s text:c="2"/>--header 'Authorization: Bearer [token]'</text:p>
          </table:table-cell>
        </table:table-row>
      </table:table>
      <text:p text:style-name="P42"><text:span text:style-name="Strong_20_Emphasis"><text:span text:style-name="T15"/></text:span></text:p>
      <text:p text:style-name="P42"><text:span text:style-name="Strong_20_Emphasis"><text:span text:style-name="T14">Response Sample</text:span></text:span></text:p>
      <table:table table:name="Table141" table:style-name="Table141">
        <table:table-column table:style-name="Table141.A"/>
        <table:table-row>
          <table:table-cell table:style-name="Table141.A1" office:value-type="string">
            <text:p text:style-name="P43">{</text:p>
            <text:p text:style-name="P43"><text:tab/>"statusCode" : 200,</text:p>
            <text:p text:style-name="P43"><text:tab/>"status" : "success",</text:p>
            <text:p text:style-name="P43"><text:tab/>"message" : "The record is <text:span text:style-name="T16">deleted</text:span> successfully.",</text:p>
            <text:p text:style-name="P43"><text:soft-page-break/><text:tab/>"errorCode" : 0,</text:p>
            <text:p text:style-name="P43"><text:tab/>"data" : <text:span text:style-name="T16">null</text:span></text:p>
            <text:p text:style-name="P43">}</text:p>
          </table:table-cell>
        </table:table-row>
      </table:table>
      <text:p text:style-name="P42"><text:span text:style-name="Strong_20_Emphasis"/></text:p>
      <text:h text:style-name="P41" text:outline-level="2"><text:bookmark-start text:name="__RefHeading___Toc2079_720390006 Copy 1 Copy 1 Copy 3 Copy 5 Copy 8"/><text:span text:style-name="Strong_20_Emphasis"><text:span text:style-name="T7">Active</text:span></text:span><text:bookmark-end text:name="__RefHeading___Toc2079_720390006 Copy 1 Copy 1 Copy 3 Copy 5 Copy 8"/></text:h>
      <text:p text:style-name="P42"><text:span text:style-name="Strong_20_Emphasis"><text:span text:style-name="T8">Description</text:span></text:span></text:p>
      <text:p text:style-name="P49"><text:span text:style-name="Strong_20_Emphasis"><text:span text:style-name="T9">This API actives a “</text:span></text:span><text:span text:style-name="Strong_20_Emphasis"><text:span text:style-name="T11">project </text:span></text:span><text:span text:style-name="Strong_20_Emphasis"><text:span text:style-name="T37">meeting</text:span></text:span><text:span text:style-name="Strong_20_Emphasis"><text:span text:style-name="T9">” in the </text:span></text:span><text:span text:style-name="Strong_20_Emphasis"><text:span text:style-name="T11">project</text:span></text:span><text:span text:style-name="Strong_20_Emphasis"><text:span text:style-name="T12"> management</text:span></text:span><text:span text:style-name="Strong_20_Emphasis"><text:span text:style-name="T9">.</text:span></text:span></text:p>
      <text:p text:style-name="P42"><text:span text:style-name="Strong_20_Emphasis"><text:span text:style-name="T14">Request CURL Sample</text:span></text:span></text:p>
      <table:table table:name="Table142" table:style-name="Table142">
        <table:table-column table:style-name="Table142.A"/>
        <table:table-row>
          <table:table-cell table:style-name="Table142.A1" office:value-type="string">
            <text:p text:style-name="P43">curl --request PUT \</text:p>
            <text:p text:style-name="P43"><text:s text:c="2"/>--url 'https://[maindomian]/api/projectManagement/projectMeeting/active/[id]' \</text:p>
            <text:p text:style-name="P43"><text:s text:c="2"/>--header 'Authorization: Bearer [token]'</text:p>
          </table:table-cell>
        </table:table-row>
      </table:table>
      <text:p text:style-name="P42"><text:span text:style-name="Strong_20_Emphasis"><text:span text:style-name="T15"/></text:span></text:p>
      <text:p text:style-name="P42"><text:span text:style-name="Strong_20_Emphasis"><text:span text:style-name="T14">Response Sample</text:span></text:span></text:p>
      <table:table table:name="Table143" table:style-name="Table143">
        <table:table-column table:style-name="Table143.A"/>
        <table:table-row>
          <table:table-cell table:style-name="Table143.A1" office:value-type="string">
            <text:p text:style-name="P43">{</text:p>
            <text:p text:style-name="P43"><text:tab/>"statusCode" : 200,</text:p>
            <text:p text:style-name="P43"><text:tab/>"status" : "success",</text:p>
            <text:p text:style-name="P43"><text:tab/>"message" : "The record is <text:span text:style-name="T16">activated</text:span> successfully.",</text:p>
            <text:p text:style-name="P43"><text:tab/>"errorCode" : 0,</text:p>
            <text:p text:style-name="P43"><text:tab/>"data" : <text:span text:style-name="T16">null</text:span></text:p>
            <text:p text:style-name="P43">}</text:p>
          </table:table-cell>
        </table:table-row>
      </table:table>
      <text:p text:style-name="P42"><text:span text:style-name="Strong_20_Emphasis"/></text:p>
      <text:h text:style-name="P41" text:outline-level="2"><text:bookmark-start text:name="__RefHeading___Toc2083_720390006 Copy 1 Copy 1 Copy 3 Copy 5 Copy 8"/><text:span text:style-name="Strong_20_Emphasis"><text:span text:style-name="T7">Inactive</text:span></text:span><text:bookmark-end text:name="__RefHeading___Toc2083_720390006 Copy 1 Copy 1 Copy 3 Copy 5 Copy 8"/></text:h>
      <text:p text:style-name="P42"><text:span text:style-name="Strong_20_Emphasis"><text:span text:style-name="T8">Description</text:span></text:span></text:p>
      <text:p text:style-name="P49"><text:span text:style-name="Strong_20_Emphasis"><text:span text:style-name="T9">This API </text:span></text:span><text:span text:style-name="Strong_20_Emphasis"><text:span text:style-name="T17">in</text:span></text:span><text:span text:style-name="Strong_20_Emphasis"><text:span text:style-name="T9">-actives a specific “</text:span></text:span><text:span text:style-name="Strong_20_Emphasis"><text:span text:style-name="T11">project </text:span></text:span><text:span text:style-name="Strong_20_Emphasis"><text:span text:style-name="T37">meeting</text:span></text:span><text:span text:style-name="Strong_20_Emphasis"><text:span text:style-name="T9">” in the </text:span></text:span><text:span text:style-name="Strong_20_Emphasis"><text:span text:style-name="T11">project</text:span></text:span><text:span text:style-name="Strong_20_Emphasis"><text:span text:style-name="T12"> management</text:span></text:span><text:span text:style-name="Strong_20_Emphasis"><text:span text:style-name="T9">.</text:span></text:span></text:p>
      <text:p text:style-name="P42"><text:span text:style-name="Strong_20_Emphasis"><text:span text:style-name="T14">Request CURL Sample</text:span></text:span></text:p>
      <table:table table:name="Table144" table:style-name="Table144">
        <table:table-column table:style-name="Table144.A"/>
        <table:table-row>
          <table:table-cell table:style-name="Table144.A1" office:value-type="string">
            <text:p text:style-name="P43">curl --request PUT \</text:p>
            <text:p text:style-name="P43"><text:s text:c="2"/>--url 'https://[maindomian]/api/projectManagement/projectMeeting/inactive/[id]' \</text:p>
            <text:p text:style-name="P43"><text:s text:c="2"/>--header 'Authorization: Bearer [token]'</text:p>
          </table:table-cell>
        </table:table-row>
      </table:table>
      <text:p text:style-name="P42"><text:soft-page-break/><text:span text:style-name="Strong_20_Emphasis"><text:span text:style-name="T15"/></text:span></text:p>
      <text:p text:style-name="P42"><text:span text:style-name="Strong_20_Emphasis"><text:span text:style-name="T14">Response Sample</text:span></text:span></text:p>
      <table:table table:name="Table145" table:style-name="Table145">
        <table:table-column table:style-name="Table145.A"/>
        <table:table-row>
          <table:table-cell table:style-name="Table145.A1" office:value-type="string">
            <text:p text:style-name="P43">{</text:p>
            <text:p text:style-name="P43"><text:tab/>"statusCode" : 200,</text:p>
            <text:p text:style-name="P43"><text:tab/>"status" : "success",</text:p>
            <text:p text:style-name="P43"><text:tab/>"message" : "The record is <text:span text:style-name="T18">in</text:span><text:span text:style-name="T16">activated</text:span> successfully.",</text:p>
            <text:p text:style-name="P43"><text:tab/>"errorCode" : 0,</text:p>
            <text:p text:style-name="P43"><text:tab/>"data" : <text:span text:style-name="T16">null</text:span></text:p>
            <text:p text:style-name="P43">}</text:p>
          </table:table-cell>
        </table:table-row>
      </table:table>
      <text:p text:style-name="P42"><text:span text:style-name="Strong_20_Emphasis"/></text:p>
      <text:h text:style-name="P41" text:outline-level="2"><text:bookmark-start text:name="__RefHeading___Toc2085_720390006 Copy 1 Copy 1 Copy 3 Copy 5 Copy 8"/><text:span text:style-name="Strong_20_Emphasis"><text:span text:style-name="T7">Fetch Specific Record</text:span></text:span><text:bookmark-end text:name="__RefHeading___Toc2085_720390006 Copy 1 Copy 1 Copy 3 Copy 5 Copy 8"/></text:h>
      <text:p text:style-name="P42"><text:span text:style-name="Strong_20_Emphasis"><text:span text:style-name="T8">Description</text:span></text:span></text:p>
      <text:p text:style-name="P49"><text:span text:style-name="Strong_20_Emphasis"><text:span text:style-name="T9">This API </text:span></text:span><text:span text:style-name="Strong_20_Emphasis"><text:span text:style-name="T19">returns</text:span></text:span><text:span text:style-name="Strong_20_Emphasis"><text:span text:style-name="T9"> a specific “</text:span></text:span><text:span text:style-name="Strong_20_Emphasis"><text:span text:style-name="T11">project </text:span></text:span><text:span text:style-name="Strong_20_Emphasis"><text:span text:style-name="T37">meeting</text:span></text:span><text:span text:style-name="Strong_20_Emphasis"><text:span text:style-name="T9">” </text:span></text:span><text:span text:style-name="Strong_20_Emphasis"><text:span text:style-name="T19">from</text:span></text:span><text:span text:style-name="Strong_20_Emphasis"><text:span text:style-name="T9"> the </text:span></text:span><text:span text:style-name="Strong_20_Emphasis"><text:span text:style-name="T11">project</text:span></text:span><text:span text:style-name="Strong_20_Emphasis"><text:span text:style-name="T20"> management</text:span></text:span><text:span text:style-name="Strong_20_Emphasis"><text:span text:style-name="T9">.</text:span></text:span></text:p>
      <text:p text:style-name="P42"><text:span text:style-name="Strong_20_Emphasis"><text:span text:style-name="T14">Request CURL Sample</text:span></text:span></text:p>
      <table:table table:name="Table146" table:style-name="Table146">
        <table:table-column table:style-name="Table146.A"/>
        <table:table-row>
          <table:table-cell table:style-name="Table146.A1" office:value-type="string">
            <text:p text:style-name="P43">curl --request GET \</text:p>
            <text:p text:style-name="P43"><text:s text:c="2"/>--url 'https://[maindomian]/api/projectManagement/projectMeeting/[id]' \</text:p>
            <text:p text:style-name="P43"><text:s text:c="2"/>--header 'Authorization: Bearer [token]'</text:p>
          </table:table-cell>
        </table:table-row>
      </table:table>
      <text:p text:style-name="P42"><text:span text:style-name="Strong_20_Emphasis"><text:span text:style-name="T15"/></text:span></text:p>
      <text:p text:style-name="P42"><text:span text:style-name="Strong_20_Emphasis"><text:span text:style-name="T14">Response Sample</text:span></text:span></text:p>
      <table:table table:name="Table147" table:style-name="Table147">
        <table:table-column table:style-name="Table147.A"/>
        <table:table-row>
          <table:table-cell table:style-name="Table147.A1" office:value-type="string">
            <text:p text:style-name="P43">{</text:p>
            <text:p text:style-name="P43"><text:tab/>"statusCode" : 200,</text:p>
            <text:p text:style-name="P43"><text:tab/>"status" : "success",</text:p>
            <text:p text:style-name="P43"><text:tab/>"message" : "The data is returned successfully.",</text:p>
            <text:p text:style-name="P43"><text:tab/>"errorCode" : 0,</text:p>
            <text:p text:style-name="P43"><text:tab/>"data" : {</text:p>
            <text:p text:style-name="P43"><text:tab/><text:tab/>"id" : 16621244611384550112, </text:p>
            <text:p text:style-name="P43"><text:tab/><text:tab/>"title" : "test",</text:p>
            <text:p text:style-name="P43"><text:tab/><text:tab/>"code" : "123",</text:p>
            <text:p text:style-name="P43"><text:tab/><text:tab/>"description" : "test",</text:p>
            <text:p text:style-name="P43"><text:tab/><text:tab/>"profileId": [{</text:p>
            <text:p text:style-name="P43"><text:tab/><text:tab/><text:tab/>"id" : 16621244611384550113,</text:p>
            <text:p text:style-name="P43"><text:tab/><text:tab/><text:tab/>"firstName": "David",</text:p>
            <text:p text:style-name="P43"><text:tab/><text:tab/><text:tab/>"lastName": "Talor"</text:p>
            <text:p text:style-name="P43"><text:tab/><text:tab/>}],</text:p>
            <text:p text:style-name="P43"><text:soft-page-break/><text:tab/><text:tab/>"roleFormPermissionId": [{</text:p>
            <text:p text:style-name="P43"><text:tab/><text:tab/><text:tab/>"id" : 16621244611384550114,</text:p>
            <text:p text:style-name="P43"><text:tab/><text:tab/><text:tab/>"formPermissionId": {</text:p>
            <text:p text:style-name="P43"><text:tab/><text:tab/><text:tab/><text:tab/>"id" : 16621244611384550114,</text:p>
            <text:p text:style-name="P43"><text:tab/><text:tab/><text:tab/><text:tab/>"formId": {</text:p>
            <text:p text:style-name="P43"><text:tab/><text:tab/><text:tab/><text:tab/><text:tab/>"id" : 16621244611384550115,</text:p>
            <text:p text:style-name="P43"><text:tab/><text:tab/><text:tab/><text:tab/><text:tab/>"title": "Project"</text:p>
            <text:p text:style-name="P43"><text:tab/><text:tab/><text:tab/><text:tab/>},</text:p>
            <text:p text:style-name="P43"><text:tab/><text:tab/><text:tab/><text:tab/>"permissionId": {</text:p>
            <text:p text:style-name="P43"><text:tab/><text:tab/><text:tab/><text:tab/><text:tab/>"id" : 16621244611384550116,</text:p>
            <text:p text:style-name="P43"><text:tab/><text:tab/><text:tab/><text:tab/><text:tab/>"title": "Add"</text:p>
            <text:p text:style-name="P43"><text:tab/><text:tab/><text:tab/><text:tab/>}</text:p>
            <text:p text:style-name="P43"><text:tab/><text:tab/><text:tab/>}</text:p>
            <text:p text:style-name="P43"><text:tab/><text:tab/>}],</text:p>
            <text:p text:style-name="P43"><text:tab/><text:tab/>"createdAt" : "2025-8-25 12:00:00",</text:p>
            <text:p text:style-name="P43"><text:tab/><text:tab/>"createdBy" : "John Davis" </text:p>
            <text:p text:style-name="P43"><text:tab/>}</text:p>
            <text:p text:style-name="P43">}</text:p>
          </table:table-cell>
        </table:table-row>
      </table:table>
      <text:p text:style-name="P42"><text:span text:style-name="Strong_20_Emphasis"/></text:p>
      <text:h text:style-name="P40" text:outline-level="1"><text:bookmark-start text:name="__RefHeading___Toc227_771010674 Copy 1 Copy 1 Copy 3 Copy 5 Copy 9"/><text:span text:style-name="T25">M</text:span><text:span text:style-name="T6">eeting Invitees</text:span><text:bookmark-end text:name="__RefHeading___Toc227_771010674 Copy 1 Copy 1 Copy 3 Copy 5 Copy 9"/></text:h>
      <text:h text:style-name="P41" text:outline-level="2"><text:bookmark-start text:name="__RefHeading___Toc908_3206075736 Copy 1 Copy 1 Copy 1 Copy 3 Copy 5 Copy 9"/><text:span text:style-name="Strong_20_Emphasis"><text:span text:style-name="T7">Delete</text:span></text:span><text:bookmark-end text:name="__RefHeading___Toc908_3206075736 Copy 1 Copy 1 Copy 1 Copy 3 Copy 5 Copy 9"/></text:h>
      <text:p text:style-name="P42"><text:span text:style-name="Strong_20_Emphasis"><text:span text:style-name="T8">Description</text:span></text:span></text:p>
      <text:p text:style-name="P42"><text:span text:style-name="Strong_20_Emphasis"><text:span text:style-name="T9">This API </text:span></text:span><text:span text:style-name="Strong_20_Emphasis"><text:span text:style-name="T10">logically</text:span></text:span><text:span text:style-name="Strong_20_Emphasis"><text:span text:style-name="T9"> deletes a “</text:span></text:span><text:span text:style-name="Strong_20_Emphasis"><text:span text:style-name="T38">meeting invitee</text:span></text:span><text:span text:style-name="Strong_20_Emphasis"><text:span text:style-name="T9">” from the </text:span></text:span><text:span text:style-name="Strong_20_Emphasis"><text:span text:style-name="T11">project</text:span></text:span><text:span text:style-name="Strong_20_Emphasis"><text:span text:style-name="T12"> man</text:span></text:span><text:span text:style-name="Strong_20_Emphasis"><text:span text:style-name="T13">a</text:span></text:span><text:span text:style-name="Strong_20_Emphasis"><text:span text:style-name="T12">gement</text:span></text:span><text:span text:style-name="Strong_20_Emphasis"><text:span text:style-name="T9">.</text:span></text:span></text:p>
      <text:p text:style-name="P42"><text:span text:style-name="Strong_20_Emphasis"><text:span text:style-name="T14">Request CURL Sample</text:span></text:span></text:p>
      <table:table table:name="Table148" table:style-name="Table148">
        <table:table-column table:style-name="Table148.A"/>
        <table:table-row>
          <table:table-cell table:style-name="Table148.A1" office:value-type="string">
            <text:p text:style-name="P43">curl --request DELETE \</text:p>
            <text:p text:style-name="P43"><text:s text:c="2"/>--url 'https://[maindomian]/api/projectManagement/meetingInvitees/[id]' \</text:p>
            <text:p text:style-name="P43"><text:s text:c="2"/>--header 'Authorization: Bearer [token]'</text:p>
          </table:table-cell>
        </table:table-row>
      </table:table>
      <text:p text:style-name="P42"><text:span text:style-name="Strong_20_Emphasis"><text:span text:style-name="T15"/></text:span></text:p>
      <text:p text:style-name="P42"><text:span text:style-name="Strong_20_Emphasis"><text:span text:style-name="T14">Response Sample</text:span></text:span></text:p>
      <table:table table:name="Table149" table:style-name="Table149">
        <table:table-column table:style-name="Table149.A"/>
        <table:table-row>
          <table:table-cell table:style-name="Table149.A1" office:value-type="string">
            <text:p text:style-name="P43">{</text:p>
            <text:p text:style-name="P43"><text:tab/>"statusCode" : 200,</text:p>
            <text:p text:style-name="P43"><text:tab/>"status" : "success",</text:p>
            <text:p text:style-name="P43"><text:tab/>"message" : "The record is <text:span text:style-name="T16">deleted</text:span> successfully.",</text:p>
            <text:p text:style-name="P43"><text:tab/>"errorCode" : 0,</text:p>
            <text:p text:style-name="P43"><text:soft-page-break/><text:tab/>"data" : <text:span text:style-name="T16">null</text:span></text:p>
            <text:p text:style-name="P43">}</text:p>
          </table:table-cell>
        </table:table-row>
      </table:table>
      <text:p text:style-name="P42"><text:span text:style-name="Strong_20_Emphasis"/></text:p>
      <text:h text:style-name="P41" text:outline-level="2"><text:bookmark-start text:name="__RefHeading___Toc2079_720390006 Copy 1 Copy 1 Copy 3 Copy 5 Copy 9"/><text:span text:style-name="Strong_20_Emphasis"><text:span text:style-name="T7">Active</text:span></text:span><text:bookmark-end text:name="__RefHeading___Toc2079_720390006 Copy 1 Copy 1 Copy 3 Copy 5 Copy 9"/></text:h>
      <text:p text:style-name="P42"><text:span text:style-name="Strong_20_Emphasis"><text:span text:style-name="T8">Description</text:span></text:span></text:p>
      <text:p text:style-name="P50"><text:span text:style-name="Strong_20_Emphasis"><text:span text:style-name="T9">This API actives a “</text:span></text:span><text:span text:style-name="Strong_20_Emphasis"><text:span text:style-name="T38">meeting invitee</text:span></text:span><text:span text:style-name="Strong_20_Emphasis"><text:span text:style-name="T9">” in the </text:span></text:span><text:span text:style-name="Strong_20_Emphasis"><text:span text:style-name="T11">project</text:span></text:span><text:span text:style-name="Strong_20_Emphasis"><text:span text:style-name="T12"> management</text:span></text:span><text:span text:style-name="Strong_20_Emphasis"><text:span text:style-name="T9">.</text:span></text:span></text:p>
      <text:p text:style-name="P42"><text:span text:style-name="Strong_20_Emphasis"><text:span text:style-name="T14">Request CURL Sample</text:span></text:span></text:p>
      <table:table table:name="Table150" table:style-name="Table150">
        <table:table-column table:style-name="Table150.A"/>
        <table:table-row>
          <table:table-cell table:style-name="Table150.A1" office:value-type="string">
            <text:p text:style-name="P43">curl --request PUT \</text:p>
            <text:p text:style-name="P43"><text:s text:c="2"/>--url 'https://[maindomian]/api/projectManagement/meetingInvitees/active/[id]' \</text:p>
            <text:p text:style-name="P43"><text:s text:c="2"/>--header 'Authorization: Bearer [token]'</text:p>
          </table:table-cell>
        </table:table-row>
      </table:table>
      <text:p text:style-name="P42"><text:span text:style-name="Strong_20_Emphasis"><text:span text:style-name="T15"/></text:span></text:p>
      <text:p text:style-name="P42"><text:span text:style-name="Strong_20_Emphasis"><text:span text:style-name="T14">Response Sample</text:span></text:span></text:p>
      <table:table table:name="Table151" table:style-name="Table151">
        <table:table-column table:style-name="Table151.A"/>
        <table:table-row>
          <table:table-cell table:style-name="Table151.A1" office:value-type="string">
            <text:p text:style-name="P43">{</text:p>
            <text:p text:style-name="P43"><text:tab/>"statusCode" : 200,</text:p>
            <text:p text:style-name="P43"><text:tab/>"status" : "success",</text:p>
            <text:p text:style-name="P43"><text:tab/>"message" : "The record is <text:span text:style-name="T16">activated</text:span> successfully.",</text:p>
            <text:p text:style-name="P43"><text:tab/>"errorCode" : 0,</text:p>
            <text:p text:style-name="P43"><text:tab/>"data" : <text:span text:style-name="T16">null</text:span></text:p>
            <text:p text:style-name="P43">}</text:p>
          </table:table-cell>
        </table:table-row>
      </table:table>
      <text:p text:style-name="P42"><text:span text:style-name="Strong_20_Emphasis"/></text:p>
      <text:h text:style-name="P41" text:outline-level="2"><text:bookmark-start text:name="__RefHeading___Toc2083_720390006 Copy 1 Copy 1 Copy 3 Copy 5 Copy 9"/><text:span text:style-name="Strong_20_Emphasis"><text:span text:style-name="T7">Inactive</text:span></text:span><text:bookmark-end text:name="__RefHeading___Toc2083_720390006 Copy 1 Copy 1 Copy 3 Copy 5 Copy 9"/></text:h>
      <text:p text:style-name="P42"><text:span text:style-name="Strong_20_Emphasis"><text:span text:style-name="T8">Description</text:span></text:span></text:p>
      <text:p text:style-name="P50"><text:span text:style-name="Strong_20_Emphasis"><text:span text:style-name="T9">This API </text:span></text:span><text:span text:style-name="Strong_20_Emphasis"><text:span text:style-name="T17">in</text:span></text:span><text:span text:style-name="Strong_20_Emphasis"><text:span text:style-name="T9">-actives a specific “</text:span></text:span><text:span text:style-name="Strong_20_Emphasis"><text:span text:style-name="T38">meeting invitee</text:span></text:span><text:span text:style-name="Strong_20_Emphasis"><text:span text:style-name="T9">” in the </text:span></text:span><text:span text:style-name="Strong_20_Emphasis"><text:span text:style-name="T11">project</text:span></text:span><text:span text:style-name="Strong_20_Emphasis"><text:span text:style-name="T12"> management</text:span></text:span><text:span text:style-name="Strong_20_Emphasis"><text:span text:style-name="T9">.</text:span></text:span></text:p>
      <text:p text:style-name="P42"><text:span text:style-name="Strong_20_Emphasis"><text:span text:style-name="T14">Request CURL Sample</text:span></text:span></text:p>
      <table:table table:name="Table152" table:style-name="Table152">
        <table:table-column table:style-name="Table152.A"/>
        <table:table-row>
          <table:table-cell table:style-name="Table152.A1" office:value-type="string">
            <text:p text:style-name="P43">curl --request PUT \</text:p>
            <text:p text:style-name="P43"><text:s text:c="2"/>--url 'https://[maindomian]/api/projectManagement/meetingInvitees/inactive/[id]' \</text:p>
            <text:p text:style-name="P43"><text:s text:c="2"/>--header 'Authorization: Bearer [token]'</text:p>
          </table:table-cell>
        </table:table-row>
      </table:table>
      <text:p text:style-name="P42"><text:span text:style-name="Strong_20_Emphasis"><text:span text:style-name="T15"/></text:span></text:p>
      <text:p text:style-name="P42"><text:soft-page-break/><text:span text:style-name="Strong_20_Emphasis"><text:span text:style-name="T14">Response Sample</text:span></text:span></text:p>
      <table:table table:name="Table153" table:style-name="Table153">
        <table:table-column table:style-name="Table153.A"/>
        <table:table-row>
          <table:table-cell table:style-name="Table153.A1" office:value-type="string">
            <text:p text:style-name="P43">{</text:p>
            <text:p text:style-name="P43"><text:tab/>"statusCode" : 200,</text:p>
            <text:p text:style-name="P43"><text:tab/>"status" : "success",</text:p>
            <text:p text:style-name="P43"><text:tab/>"message" : "The record is <text:span text:style-name="T18">in</text:span><text:span text:style-name="T16">activated</text:span> successfully.",</text:p>
            <text:p text:style-name="P43"><text:tab/>"errorCode" : 0,</text:p>
            <text:p text:style-name="P43"><text:tab/>"data" : <text:span text:style-name="T16">null</text:span></text:p>
            <text:p text:style-name="P43">}</text:p>
          </table:table-cell>
        </table:table-row>
      </table:table>
      <text:p text:style-name="P42"><text:span text:style-name="Strong_20_Emphasis"/></text:p>
      <text:h text:style-name="P41" text:outline-level="2"><text:bookmark-start text:name="__RefHeading___Toc2085_720390006 Copy 1 Copy 1 Copy 3 Copy 5 Copy 9"/><text:span text:style-name="Strong_20_Emphasis"><text:span text:style-name="T7">Fetch Specific Record</text:span></text:span><text:bookmark-end text:name="__RefHeading___Toc2085_720390006 Copy 1 Copy 1 Copy 3 Copy 5 Copy 9"/></text:h>
      <text:p text:style-name="P42"><text:span text:style-name="Strong_20_Emphasis"><text:span text:style-name="T8">Description</text:span></text:span></text:p>
      <text:p text:style-name="P50"><text:span text:style-name="Strong_20_Emphasis"><text:span text:style-name="T9">This API </text:span></text:span><text:span text:style-name="Strong_20_Emphasis"><text:span text:style-name="T19">returns</text:span></text:span><text:span text:style-name="Strong_20_Emphasis"><text:span text:style-name="T9"> a specific “</text:span></text:span><text:span text:style-name="Strong_20_Emphasis"><text:span text:style-name="T38">meeting invitee</text:span></text:span><text:span text:style-name="Strong_20_Emphasis"><text:span text:style-name="T9">” </text:span></text:span><text:span text:style-name="Strong_20_Emphasis"><text:span text:style-name="T19">from</text:span></text:span><text:span text:style-name="Strong_20_Emphasis"><text:span text:style-name="T9"> the </text:span></text:span><text:span text:style-name="Strong_20_Emphasis"><text:span text:style-name="T11">project</text:span></text:span><text:span text:style-name="Strong_20_Emphasis"><text:span text:style-name="T20"> management</text:span></text:span><text:span text:style-name="Strong_20_Emphasis"><text:span text:style-name="T9">.</text:span></text:span></text:p>
      <text:p text:style-name="P42"><text:span text:style-name="Strong_20_Emphasis"><text:span text:style-name="T14">Request CURL Sample</text:span></text:span></text:p>
      <table:table table:name="Table154" table:style-name="Table154">
        <table:table-column table:style-name="Table154.A"/>
        <table:table-row>
          <table:table-cell table:style-name="Table154.A1" office:value-type="string">
            <text:p text:style-name="P43">curl --request GET \</text:p>
            <text:p text:style-name="P43"><text:s text:c="2"/>--url 'https://[maindomian]/api/projectManagement/meetingInvitees/[id]' \</text:p>
            <text:p text:style-name="P43"><text:s text:c="2"/>--header 'Authorization: Bearer [token]'</text:p>
          </table:table-cell>
        </table:table-row>
      </table:table>
      <text:p text:style-name="P42"><text:span text:style-name="Strong_20_Emphasis"><text:span text:style-name="T15"/></text:span></text:p>
      <text:p text:style-name="P42"><text:span text:style-name="Strong_20_Emphasis"><text:span text:style-name="T14">Response Sample</text:span></text:span></text:p>
      <table:table table:name="Table155" table:style-name="Table155">
        <table:table-column table:style-name="Table155.A"/>
        <table:table-row>
          <table:table-cell table:style-name="Table155.A1" office:value-type="string">
            <text:p text:style-name="P43">{</text:p>
            <text:p text:style-name="P43"><text:tab/>"statusCode" : 200,</text:p>
            <text:p text:style-name="P43"><text:tab/>"status" : "success",</text:p>
            <text:p text:style-name="P43"><text:tab/>"message" : "The data is returned successfully.",</text:p>
            <text:p text:style-name="P43"><text:tab/>"errorCode" : 0,</text:p>
            <text:p text:style-name="P43"><text:tab/>"data" : {</text:p>
            <text:p text:style-name="P43"><text:tab/><text:tab/>"id" : 16621244611384550112, </text:p>
            <text:p text:style-name="P43"><text:tab/><text:tab/>"title" : "test",</text:p>
            <text:p text:style-name="P43"><text:tab/><text:tab/>"code" : "123",</text:p>
            <text:p text:style-name="P43"><text:tab/><text:tab/>"description" : "test",</text:p>
            <text:p text:style-name="P43"><text:tab/><text:tab/>"profileId": [{</text:p>
            <text:p text:style-name="P43"><text:tab/><text:tab/><text:tab/>"id" : 16621244611384550113,</text:p>
            <text:p text:style-name="P43"><text:tab/><text:tab/><text:tab/>"firstName": "David",</text:p>
            <text:p text:style-name="P43"><text:tab/><text:tab/><text:tab/>"lastName": "Talor"</text:p>
            <text:p text:style-name="P43"><text:tab/><text:tab/>}],</text:p>
            <text:p text:style-name="P43"><text:tab/><text:tab/>"roleFormPermissionId": [{</text:p>
            <text:p text:style-name="P43"><text:tab/><text:tab/><text:tab/>"id" : 16621244611384550114,</text:p>
            <text:p text:style-name="P43"><text:soft-page-break/><text:tab/><text:tab/><text:tab/>"formPermissionId": {</text:p>
            <text:p text:style-name="P43"><text:tab/><text:tab/><text:tab/><text:tab/>"id" : 16621244611384550114,</text:p>
            <text:p text:style-name="P43"><text:tab/><text:tab/><text:tab/><text:tab/>"formId": {</text:p>
            <text:p text:style-name="P43"><text:tab/><text:tab/><text:tab/><text:tab/><text:tab/>"id" : 16621244611384550115,</text:p>
            <text:p text:style-name="P43"><text:tab/><text:tab/><text:tab/><text:tab/><text:tab/>"title": "Project"</text:p>
            <text:p text:style-name="P43"><text:tab/><text:tab/><text:tab/><text:tab/>},</text:p>
            <text:p text:style-name="P43"><text:tab/><text:tab/><text:tab/><text:tab/>"permissionId": {</text:p>
            <text:p text:style-name="P43"><text:tab/><text:tab/><text:tab/><text:tab/><text:tab/>"id" : 16621244611384550116,</text:p>
            <text:p text:style-name="P43"><text:tab/><text:tab/><text:tab/><text:tab/><text:tab/>"title": "Add"</text:p>
            <text:p text:style-name="P43"><text:tab/><text:tab/><text:tab/><text:tab/>}</text:p>
            <text:p text:style-name="P43"><text:tab/><text:tab/><text:tab/>}</text:p>
            <text:p text:style-name="P43"><text:tab/><text:tab/>}],</text:p>
            <text:p text:style-name="P43"><text:tab/><text:tab/>"createdAt" : "2025-8-25 12:00:00",</text:p>
            <text:p text:style-name="P43"><text:tab/><text:tab/>"createdBy" : "John Davis" </text:p>
            <text:p text:style-name="P43"><text:tab/>}</text:p>
            <text:p text:style-name="P43">}</text:p>
          </table:table-cell>
        </table:table-row>
      </table:table>
      <text:p text:style-name="P42"><text:span text:style-name="Strong_20_Emphasis"/></text:p>
      <text:h text:style-name="P40" text:outline-level="1"><text:bookmark-start text:name="__RefHeading___Toc227_771010674 Copy 1 Copy 1 Copy 3 Copy 5 Copy 10"/><text:span text:style-name="T25">M</text:span><text:span text:style-name="T6">eeting Minutes</text:span><text:bookmark-end text:name="__RefHeading___Toc227_771010674 Copy 1 Copy 1 Copy 3 Copy 5 Copy 10"/></text:h>
      <text:h text:style-name="P41" text:outline-level="2"><text:bookmark-start text:name="__RefHeading___Toc908_3206075736 Copy 1 Copy 1 Copy 1 Copy 3 Copy 5 Copy 10"/><text:span text:style-name="Strong_20_Emphasis"><text:span text:style-name="T7">Delete</text:span></text:span><text:bookmark-end text:name="__RefHeading___Toc908_3206075736 Copy 1 Copy 1 Copy 1 Copy 3 Copy 5 Copy 10"/></text:h>
      <text:p text:style-name="P42"><text:span text:style-name="Strong_20_Emphasis"><text:span text:style-name="T8">Description</text:span></text:span></text:p>
      <text:p text:style-name="P42"><text:span text:style-name="Strong_20_Emphasis"><text:span text:style-name="T9">This API </text:span></text:span><text:span text:style-name="Strong_20_Emphasis"><text:span text:style-name="T10">logically</text:span></text:span><text:span text:style-name="Strong_20_Emphasis"><text:span text:style-name="T9"> deletes a “</text:span></text:span><text:span text:style-name="Strong_20_Emphasis"><text:span text:style-name="T38">meeting minute</text:span></text:span><text:span text:style-name="Strong_20_Emphasis"><text:span text:style-name="T9">” from the </text:span></text:span><text:span text:style-name="Strong_20_Emphasis"><text:span text:style-name="T11">project</text:span></text:span><text:span text:style-name="Strong_20_Emphasis"><text:span text:style-name="T12"> man</text:span></text:span><text:span text:style-name="Strong_20_Emphasis"><text:span text:style-name="T13">a</text:span></text:span><text:span text:style-name="Strong_20_Emphasis"><text:span text:style-name="T12">gement</text:span></text:span><text:span text:style-name="Strong_20_Emphasis"><text:span text:style-name="T9">.</text:span></text:span></text:p>
      <text:p text:style-name="P42"><text:span text:style-name="Strong_20_Emphasis"><text:span text:style-name="T14">Request CURL Sample</text:span></text:span></text:p>
      <table:table table:name="Table156" table:style-name="Table156">
        <table:table-column table:style-name="Table156.A"/>
        <table:table-row>
          <table:table-cell table:style-name="Table156.A1" office:value-type="string">
            <text:p text:style-name="P51">curl --request DELETE \</text:p>
            <text:p text:style-name="P51"><text:s text:c="2"/>--url 'https://[maindomian]/api/projectManagement/meetingMinutes/[id]' \</text:p>
            <text:p text:style-name="P51"><text:s text:c="2"/>--header 'Authorization: Bearer [token]'</text:p>
          </table:table-cell>
        </table:table-row>
      </table:table>
      <text:p text:style-name="P42"><text:span text:style-name="Strong_20_Emphasis"><text:span text:style-name="T15"/></text:span></text:p>
      <text:p text:style-name="P42"><text:span text:style-name="Strong_20_Emphasis"><text:span text:style-name="T14">Response Sample</text:span></text:span></text:p>
      <table:table table:name="Table157" table:style-name="Table157">
        <table:table-column table:style-name="Table157.A"/>
        <table:table-row>
          <table:table-cell table:style-name="Table157.A1" office:value-type="string">
            <text:p text:style-name="P43">{</text:p>
            <text:p text:style-name="P43"><text:tab/>"statusCode" : 200,</text:p>
            <text:p text:style-name="P43"><text:tab/>"status" : "success",</text:p>
            <text:p text:style-name="P43"><text:tab/>"message" : "The record is <text:span text:style-name="T16">deleted</text:span> successfully."</text:p>
            <text:p text:style-name="P43"><text:tab/>"errorCode" : 0,</text:p>
            <text:p text:style-name="P43"><text:tab/>"data" : <text:span text:style-name="T16">null</text:span></text:p>
            <text:p text:style-name="P43">}</text:p>
          </table:table-cell>
        </table:table-row>
      </table:table>
      <text:p text:style-name="P42"><text:soft-page-break/><text:span text:style-name="Strong_20_Emphasis"/></text:p>
      <text:h text:style-name="P41" text:outline-level="2"><text:bookmark-start text:name="__RefHeading___Toc2079_720390006 Copy 1 Copy 1 Copy 3 Copy 5 Copy 10"/><text:span text:style-name="Strong_20_Emphasis"><text:span text:style-name="T7">Active</text:span></text:span><text:bookmark-end text:name="__RefHeading___Toc2079_720390006 Copy 1 Copy 1 Copy 3 Copy 5 Copy 10"/></text:h>
      <text:p text:style-name="P42"><text:span text:style-name="Strong_20_Emphasis"><text:span text:style-name="T8">Description</text:span></text:span></text:p>
      <text:p text:style-name="P50"><text:span text:style-name="Strong_20_Emphasis"><text:span text:style-name="T9">This API actives a “</text:span></text:span><text:span text:style-name="Strong_20_Emphasis"><text:span text:style-name="T38">meeting minute</text:span></text:span><text:span text:style-name="Strong_20_Emphasis"><text:span text:style-name="T9">” in the </text:span></text:span><text:span text:style-name="Strong_20_Emphasis"><text:span text:style-name="T11">project</text:span></text:span><text:span text:style-name="Strong_20_Emphasis"><text:span text:style-name="T12"> management</text:span></text:span><text:span text:style-name="Strong_20_Emphasis"><text:span text:style-name="T9">.</text:span></text:span></text:p>
      <text:p text:style-name="P42"><text:span text:style-name="Strong_20_Emphasis"><text:span text:style-name="T14">Request CURL Sample</text:span></text:span></text:p>
      <table:table table:name="Table158" table:style-name="Table158">
        <table:table-column table:style-name="Table158.A"/>
        <table:table-row>
          <table:table-cell table:style-name="Table158.A1" office:value-type="string">
            <text:p text:style-name="P43">curl --request PUT \</text:p>
            <text:p text:style-name="P43"><text:s text:c="2"/>--url 'https://[maindomian]/api/projectManagement/meetingMinutes/active/[id]' \</text:p>
            <text:p text:style-name="P43"><text:s text:c="2"/>--header 'Authorization: Bearer [token]'</text:p>
          </table:table-cell>
        </table:table-row>
      </table:table>
      <text:p text:style-name="P42"><text:span text:style-name="Strong_20_Emphasis"><text:span text:style-name="T15"/></text:span></text:p>
      <text:p text:style-name="P42"><text:span text:style-name="Strong_20_Emphasis"><text:span text:style-name="T14">Response Sample</text:span></text:span></text:p>
      <table:table table:name="Table159" table:style-name="Table159">
        <table:table-column table:style-name="Table159.A"/>
        <table:table-row>
          <table:table-cell table:style-name="Table159.A1" office:value-type="string">
            <text:p text:style-name="P43">{</text:p>
            <text:p text:style-name="P43"><text:tab/>"statusCode" : 200,</text:p>
            <text:p text:style-name="P43"><text:tab/>"status" : "success",</text:p>
            <text:p text:style-name="P43"><text:tab/>"message" : "The record is <text:span text:style-name="T16">activated</text:span> successfully.",</text:p>
            <text:p text:style-name="P43"><text:tab/>"errorCode" : 0,</text:p>
            <text:p text:style-name="P43"><text:tab/>"data" : <text:span text:style-name="T16">null</text:span></text:p>
            <text:p text:style-name="P43">}</text:p>
          </table:table-cell>
        </table:table-row>
      </table:table>
      <text:p text:style-name="P42"><text:span text:style-name="Strong_20_Emphasis"/></text:p>
      <text:h text:style-name="P41" text:outline-level="2"><text:bookmark-start text:name="__RefHeading___Toc2083_720390006 Copy 1 Copy 1 Copy 3 Copy 5 Copy 10"/><text:span text:style-name="Strong_20_Emphasis"><text:span text:style-name="T7">Inactive</text:span></text:span><text:bookmark-end text:name="__RefHeading___Toc2083_720390006 Copy 1 Copy 1 Copy 3 Copy 5 Copy 10"/></text:h>
      <text:p text:style-name="P42"><text:span text:style-name="Strong_20_Emphasis"><text:span text:style-name="T8">Description</text:span></text:span></text:p>
      <text:p text:style-name="P50"><text:span text:style-name="Strong_20_Emphasis"><text:span text:style-name="T9">This API </text:span></text:span><text:span text:style-name="Strong_20_Emphasis"><text:span text:style-name="T17">in</text:span></text:span><text:span text:style-name="Strong_20_Emphasis"><text:span text:style-name="T9">-actives a specific “</text:span></text:span><text:span text:style-name="Strong_20_Emphasis"><text:span text:style-name="T38">meeting minute</text:span></text:span><text:span text:style-name="Strong_20_Emphasis"><text:span text:style-name="T9">” in the </text:span></text:span><text:span text:style-name="Strong_20_Emphasis"><text:span text:style-name="T11">project</text:span></text:span><text:span text:style-name="Strong_20_Emphasis"><text:span text:style-name="T12"> management</text:span></text:span><text:span text:style-name="Strong_20_Emphasis"><text:span text:style-name="T9">.</text:span></text:span></text:p>
      <text:p text:style-name="P42"><text:span text:style-name="Strong_20_Emphasis"><text:span text:style-name="T14">Request CURL Sample</text:span></text:span></text:p>
      <table:table table:name="Table160" table:style-name="Table160">
        <table:table-column table:style-name="Table160.A"/>
        <table:table-row table:style-name="Table160.1">
          <table:table-cell table:style-name="Table160.A1" office:value-type="string">
            <text:p text:style-name="P43">curl --request PUT \</text:p>
            <text:p text:style-name="P43"><text:s text:c="2"/>--url 'https://[maindomian]/api/projectManagement/meetingMinutes/inactive/[id]' \</text:p>
            <text:p text:style-name="P43"><text:s text:c="2"/>--header 'Authorization: Bearer [token]'</text:p>
          </table:table-cell>
        </table:table-row>
      </table:table>
      <text:p text:style-name="P42"><text:span text:style-name="Strong_20_Emphasis"><text:span text:style-name="T15"/></text:span></text:p>
      <text:p text:style-name="P42"><text:span text:style-name="Strong_20_Emphasis"><text:span text:style-name="T14">Response Sample</text:span></text:span></text:p>
      <table:table table:name="Table161" table:style-name="Table161">
        <table:table-column table:style-name="Table161.A"/>
        <text:soft-page-break/>
        <table:table-row>
          <table:table-cell table:style-name="Table161.A1" office:value-type="string">
            <text:p text:style-name="P43">{</text:p>
            <text:p text:style-name="P43"><text:tab/>"statusCode" : 200,</text:p>
            <text:p text:style-name="P43"><text:tab/>"status" : "success",</text:p>
            <text:p text:style-name="P43"><text:tab/>"message" : "The record is <text:span text:style-name="T18">in</text:span><text:span text:style-name="T16">activated</text:span> successfully.",</text:p>
            <text:p text:style-name="P43"><text:tab/>"errorCode" : 0,</text:p>
            <text:p text:style-name="P43"><text:tab/>"data" : <text:span text:style-name="T16">null</text:span></text:p>
            <text:p text:style-name="P43">}</text:p>
          </table:table-cell>
        </table:table-row>
      </table:table>
      <text:p text:style-name="P42"><text:span text:style-name="Strong_20_Emphasis"/></text:p>
      <text:h text:style-name="P41" text:outline-level="2"><text:bookmark-start text:name="__RefHeading___Toc2085_720390006 Copy 1 Copy 1 Copy 3 Copy 5 Copy 10"/><text:span text:style-name="Strong_20_Emphasis"><text:span text:style-name="T7">Fetch Specific Record</text:span></text:span><text:bookmark-end text:name="__RefHeading___Toc2085_720390006 Copy 1 Copy 1 Copy 3 Copy 5 Copy 10"/></text:h>
      <text:p text:style-name="P42"><text:span text:style-name="Strong_20_Emphasis"><text:span text:style-name="T8">Description</text:span></text:span></text:p>
      <text:p text:style-name="P50"><text:span text:style-name="Strong_20_Emphasis"><text:span text:style-name="T9">This API </text:span></text:span><text:span text:style-name="Strong_20_Emphasis"><text:span text:style-name="T19">returns</text:span></text:span><text:span text:style-name="Strong_20_Emphasis"><text:span text:style-name="T9"> a specific “</text:span></text:span><text:span text:style-name="Strong_20_Emphasis"><text:span text:style-name="T38">meeting minute</text:span></text:span><text:span text:style-name="Strong_20_Emphasis"><text:span text:style-name="T9">” </text:span></text:span><text:span text:style-name="Strong_20_Emphasis"><text:span text:style-name="T19">from</text:span></text:span><text:span text:style-name="Strong_20_Emphasis"><text:span text:style-name="T9"> the </text:span></text:span><text:span text:style-name="Strong_20_Emphasis"><text:span text:style-name="T11">project</text:span></text:span><text:span text:style-name="Strong_20_Emphasis"><text:span text:style-name="T20"> management</text:span></text:span><text:span text:style-name="Strong_20_Emphasis"><text:span text:style-name="T9">.</text:span></text:span></text:p>
      <text:p text:style-name="P42"><text:span text:style-name="Strong_20_Emphasis"><text:span text:style-name="T14">Request CURL Sample</text:span></text:span></text:p>
      <table:table table:name="Table162" table:style-name="Table162">
        <table:table-column table:style-name="Table162.A"/>
        <table:table-row>
          <table:table-cell table:style-name="Table162.A1" office:value-type="string">
            <text:p text:style-name="P43">curl --request GET \</text:p>
            <text:p text:style-name="P43"><text:s text:c="2"/>--url 'https://[maindomian]/api/projectManagement/meetingMinutes/[id]' \</text:p>
            <text:p text:style-name="P43"><text:s text:c="2"/>--header 'Authorization: Bearer [token]'</text:p>
          </table:table-cell>
        </table:table-row>
      </table:table>
      <text:p text:style-name="P42"><text:span text:style-name="Strong_20_Emphasis"><text:span text:style-name="T15"/></text:span></text:p>
      <text:p text:style-name="P42"><text:span text:style-name="Strong_20_Emphasis"><text:span text:style-name="T14">Response Sample</text:span></text:span></text:p>
      <table:table table:name="Table163" table:style-name="Table163">
        <table:table-column table:style-name="Table163.A"/>
        <table:table-row>
          <table:table-cell table:style-name="Table163.A1" office:value-type="string">
            <text:p text:style-name="P43">{</text:p>
            <text:p text:style-name="P43"><text:tab/>"statusCode" : 200,</text:p>
            <text:p text:style-name="P43"><text:tab/>"status" : "success",</text:p>
            <text:p text:style-name="P43"><text:tab/>"message" : "The data is returned successfully.",</text:p>
            <text:p text:style-name="P43"><text:tab/>"errorCode" : 0,</text:p>
            <text:p text:style-name="P43"><text:tab/>"data" : {</text:p>
            <text:p text:style-name="P43"><text:tab/><text:tab/>"id" : 16621244611384550112, </text:p>
            <text:p text:style-name="P43"><text:tab/><text:tab/>"title" : "test",</text:p>
            <text:p text:style-name="P43"><text:tab/><text:tab/>"code" : "123",</text:p>
            <text:p text:style-name="P43"><text:tab/><text:tab/>"description" : "test",</text:p>
            <text:p text:style-name="P43"><text:tab/><text:tab/>"profileId": [{</text:p>
            <text:p text:style-name="P43"><text:tab/><text:tab/><text:tab/>"id" : 16621244611384550113,</text:p>
            <text:p text:style-name="P43"><text:tab/><text:tab/><text:tab/>"firstName": "David",</text:p>
            <text:p text:style-name="P43"><text:tab/><text:tab/><text:tab/>"lastName": "Talor"</text:p>
            <text:p text:style-name="P43"><text:tab/><text:tab/>}],</text:p>
            <text:p text:style-name="P43"><text:tab/><text:tab/>"roleFormPermissionId": [{</text:p>
            <text:p text:style-name="P43"><text:tab/><text:tab/><text:tab/>"id" : 16621244611384550114,</text:p>
            <text:p text:style-name="P43"><text:tab/><text:tab/><text:tab/>"formPermissionId": {</text:p>
            <text:p text:style-name="P43"><text:soft-page-break/><text:tab/><text:tab/><text:tab/><text:tab/>"id" : 16621244611384550114,</text:p>
            <text:p text:style-name="P43"><text:tab/><text:tab/><text:tab/><text:tab/>"formId": {</text:p>
            <text:p text:style-name="P43"><text:tab/><text:tab/><text:tab/><text:tab/><text:tab/>"id" : 16621244611384550115,</text:p>
            <text:p text:style-name="P43"><text:tab/><text:tab/><text:tab/><text:tab/><text:tab/>"title": "Project"</text:p>
            <text:p text:style-name="P43"><text:tab/><text:tab/><text:tab/><text:tab/>},</text:p>
            <text:p text:style-name="P43"><text:tab/><text:tab/><text:tab/><text:tab/>"permissionId": {</text:p>
            <text:p text:style-name="P43"><text:tab/><text:tab/><text:tab/><text:tab/><text:tab/>"id" : 16621244611384550116,</text:p>
            <text:p text:style-name="P43"><text:tab/><text:tab/><text:tab/><text:tab/><text:tab/>"title": "Add"</text:p>
            <text:p text:style-name="P43"><text:tab/><text:tab/><text:tab/><text:tab/>}</text:p>
            <text:p text:style-name="P43"><text:tab/><text:tab/><text:tab/>}</text:p>
            <text:p text:style-name="P43"><text:tab/><text:tab/>}],</text:p>
            <text:p text:style-name="P43"><text:tab/><text:tab/>"createdAt" : "2025-8-25 12:00:00",</text:p>
            <text:p text:style-name="P43"><text:tab/><text:tab/>"createdBy" : "John Davis" </text:p>
            <text:p text:style-name="P43"><text:tab/>}</text:p>
            <text:p text:style-name="P43">}</text:p>
          </table:table-cell>
        </table:table-row>
      </table:table>
      <text:p text:style-name="P42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scadia Code Light" svg:font-family="'Cascadia Code Light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9" number:language="en" number:country="US" number:transliteration-format="1" number:transliteration-language="en" number:transliteration-country="US" number:transliteration-style="short">
      <number:day-of-week number:style="long"/>
      <number:text> </number:text>
      <number:day/>
      <number:text> </number:text>
      <number:month number:style="long" number:textual="true"/>
      <number:year number:style="long"/>
    </number:date-style>
    <number:date-style style:name="N10130" number:language="en" number:country="US" number:transliteration-format="1" number:transliteration-language="en" number:transliteration-country="US" number:transliteration-style="short">
      <number:day-of-week number:style="long"/>
      <number:text>, </number:text>
      <number:day/>
      <number:text> </number:text>
      <number:month number:style="long" number:textual="true"/>
      <number:year number:style="long"/>
    </number:date-style>
    <number:date-style style:name="N20105" number:language="fa" number:country="IR" number:transliteration-format="۱" number:transliteration-language="fa" number:transliteration-country="IR" number:transliteration-style="short">
      <number:day-of-week number:style="long"/>
      <number:text> </number:text>
      <number:day/>
      <number:text> </number:text>
      <number:month number:style="long" number:textual="true"/>
      <number:year number:style="long"/>
    </number:date-styl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a92af" officeooo:paragraph-rsid="00b7d508"/>
    </style:style>
    <style:style style:name="MP2" style:family="paragraph" style:parent-style-name="Footer">
      <style:paragraph-properties fo:text-align="start" style:justify-single-word="false" style:writing-mode="lr-tb"/>
      <style:text-properties officeooo:rsid="00180ac0" officeooo:paragraph-rsid="00180ac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1.0&#10;&#10;" text:name="DocumentVersion"/>
        </text:user-field-decls>
        <text:p text:style-name="MP1"><text:subject>API Specification for Project Management</text:subject><text:tab/><text:tab/>Document Version: <text:user-field-get text:name="DocumentVersion">1.0

</text:user-field-get></text:p>
      </style:header>
      <style:header-first>
        <text:p text:style-name="Header_20_left"/>
      </style:header-first>
      <style:footer>
        <text:p text:style-name="MP2"><text:title>Horizon Research Project</text:title><text:tab/><text:tab/>Page <text:page-number text:select-page="current">61</text:page-number><text:s/>of <text:page-count>61</text:page-count></text:p>
      </style:footer>
      <style:footer-first>
        <text:p text:style-name="MP2"/>
      </style:footer-first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0-09-26T00:27:57.311000000</meta:creation-date>
    <dc:date>2026-05-29T22:40:46.380275800</dc:date>
    <meta:editing-duration>P25DT9H11M9S</meta:editing-duration>
    <meta:editing-cycles>1171</meta:editing-cycles>
    <meta:generator>LibreOffice/25.2.6.2$Windows_X86_64 LibreOffice_project/729c5bfe710f5eb71ed3bbde9e06a6065e9c6c5d</meta:generator>
    <dc:subject>API Specification for Project Management</dc:subject>
    <dc:title>Horizon Research Project</dc:title>
    <meta:document-statistic meta:table-count="151" meta:image-count="1" meta:object-count="0" meta:page-count="61" meta:paragraph-count="1794" meta:word-count="5844" meta:character-count="43802" meta:non-whitespace-character-count="37861"/>
  </office:meta>
</office:document-meta>
</file>