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ebd70f" officeooo:paragraph-rsid="07ebd70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ebd70f"/>
    </style:style>
    <style:style style:name="P26" style:family="paragraph" style:parent-style-name="Text_20_body">
      <style:text-properties style:font-name="Liberation Sans" fo:font-size="18.2000007629395pt" fo:font-weight="bold" officeooo:rsid="07c07f1c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1">
      <style:text-properties style:font-name="Liberation Sans" fo:font-size="18.2000007629395pt" fo:font-weight="bold" officeooo:rsid="07ebd70f" officeooo:paragraph-rsid="07ed92f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8" style:family="paragraph" style:parent-style-name="Heading_20_2">
      <style:text-properties officeooo:paragraph-rsid="07ed92f9"/>
    </style:style>
    <style:style style:name="P29" style:family="paragraph" style:parent-style-name="Text_20_body">
      <style:text-properties officeooo:paragraph-rsid="07ed92f9"/>
    </style:style>
    <style:style style:name="P30" style:family="paragraph" style:parent-style-name="Table_20_Contents">
      <style:text-properties style:font-name="Cascadia Code Light" officeooo:paragraph-rsid="07ed92f9"/>
    </style:style>
    <style:style style:name="P31" style:family="paragraph" style:parent-style-name="Text_20_body">
      <style:text-properties officeooo:paragraph-rsid="07edde34"/>
    </style:style>
    <style:style style:name="P32" style:family="paragraph" style:parent-style-name="Text_20_body">
      <style:text-properties style:font-name="Liberation Sans" fo:font-size="18.2000007629395pt" fo:font-weight="bold" officeooo:rsid="07c07f1c" officeooo:paragraph-rsid="07ed92f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3" style:family="paragraph" style:parent-style-name="Table_20_Contents">
      <style:text-properties style:font-name="Cascadia Code Light" officeooo:paragraph-rsid="07edde34"/>
    </style:style>
    <style:style style:name="P34" style:family="paragraph" style:parent-style-name="Text_20_body">
      <style:text-properties officeooo:paragraph-rsid="07efd5ae"/>
    </style:style>
    <style:style style:name="P35" style:family="paragraph" style:parent-style-name="Text_20_body">
      <style:text-properties officeooo:paragraph-rsid="07f10841"/>
    </style:style>
    <style:style style:name="P36" style:family="paragraph" style:parent-style-name="Text_20_body">
      <style:text-properties officeooo:paragraph-rsid="07f1ba8d"/>
    </style:style>
    <style:style style:name="P37" style:family="paragraph" style:parent-style-name="Text_20_body">
      <style:text-properties officeooo:paragraph-rsid="07f3894e"/>
    </style:style>
    <style:style style:name="P38" style:family="paragraph" style:parent-style-name="Text_20_body">
      <style:text-properties officeooo:paragraph-rsid="07f45d48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70a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9" style:family="text">
      <style:text-properties fo:font-weight="normal" officeooo:rsid="07ebd70f" style:font-weight-asian="normal" style:font-weight-complex="normal"/>
    </style:style>
    <style:style style:name="T10" style:family="text">
      <style:text-properties style:font-name="Liberation San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78bff70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fo:font-weight="normal" officeooo:rsid="07ebd70f" style:font-weight-asian="normal" style:language-complex="fa" style:country-complex="IR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ed92f9"/>
    </style:style>
    <style:style style:name="T18" style:family="text">
      <style:text-properties fo:font-weight="normal" officeooo:rsid="07edde34" style:font-weight-asian="normal" style:font-weight-complex="normal"/>
    </style:style>
    <style:style style:name="T19" style:family="text">
      <style:text-properties fo:font-weight="normal" officeooo:rsid="07efd5ae" style:font-weight-asian="normal" style:font-weight-complex="normal"/>
    </style:style>
    <style:style style:name="T20" style:family="text">
      <style:text-properties fo:font-weight="normal" officeooo:rsid="07f10841" style:font-weight-asian="normal" style:font-weight-complex="normal"/>
    </style:style>
    <style:style style:name="T21" style:family="text">
      <style:text-properties fo:font-weight="normal" officeooo:rsid="07f1ba8d" style:font-weight-asian="normal" style:font-weight-complex="normal"/>
    </style:style>
    <style:style style:name="T22" style:family="text">
      <style:text-properties fo:font-weight="normal" officeooo:rsid="07f3894e" style:font-weight-asian="normal" style:font-weight-complex="normal"/>
    </style:style>
    <style:style style:name="T23" style:family="text">
      <style:text-properties fo:font-weight="normal" officeooo:rsid="07f45d48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Evaluation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6-05T17:29:07.395252808">June 5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%20Copy%201" text:style-name="Index_20_Link" text:visited-style-name="Index_20_Link">2 Question<text:tab/>5</text:a></text:p>
          <text:p text:style-name="P8"><text:a xlink:type="simple" xlink:href="#__RefHeading___Toc908_3206075736%20Copy%201%20Copy%201" text:style-name="Index_20_Link" text:visited-style-name="Index_20_Link">2.1 Delete<text:tab/>5</text:a></text:p>
          <text:p text:style-name="P8"><text:a xlink:type="simple" xlink:href="#__RefHeading___Toc2079_720390006%20Copy%201" text:style-name="Index_20_Link" text:visited-style-name="Index_20_Link">2.2 Active<text:tab/>5</text:a></text:p>
          <text:p text:style-name="P8"><text:a xlink:type="simple" xlink:href="#__RefHeading___Toc2083_720390006%20Copy%201" text:style-name="Index_20_Link" text:visited-style-name="Index_20_Link">2.3 Inactive<text:tab/>6</text:a></text:p>
          <text:p text:style-name="P8"><text:a xlink:type="simple" xlink:href="#__RefHeading___Toc2085_720390006%20Copy%201" text:style-name="Index_20_Link" text:visited-style-name="Index_20_Link">2.4 Fetch Specific Record<text:tab/>6</text:a></text:p>
          <text:p text:style-name="P7"><text:a xlink:type="simple" xlink:href="#__RefHeading___Toc227_771010674%20Copy%201%20Copy%201" text:style-name="Index_20_Link" text:visited-style-name="Index_20_Link">3 Question Option<text:tab/>8</text:a></text:p>
          <text:p text:style-name="P8"><text:a xlink:type="simple" xlink:href="#__RefHeading___Toc908_3206075736%20Copy%201%20Copy%201%20Copy%201" text:style-name="Index_20_Link" text:visited-style-name="Index_20_Link">3.1 Delete<text:tab/>8</text:a></text:p>
          <text:p text:style-name="P8"><text:a xlink:type="simple" xlink:href="#__RefHeading___Toc2079_720390006%20Copy%201%20Copy%201" text:style-name="Index_20_Link" text:visited-style-name="Index_20_Link">3.2 Active<text:tab/>8</text:a></text:p>
          <text:p text:style-name="P8"><text:a xlink:type="simple" xlink:href="#__RefHeading___Toc2083_720390006%20Copy%201%20Copy%201" text:style-name="Index_20_Link" text:visited-style-name="Index_20_Link">3.3 Inactive<text:tab/>9</text:a></text:p>
          <text:p text:style-name="P8"><text:a xlink:type="simple" xlink:href="#__RefHeading___Toc2085_720390006%20Copy%201%20Copy%201" text:style-name="Index_20_Link" text:visited-style-name="Index_20_Link">3.4 Fetch Specific Record<text:tab/>9</text:a></text:p>
          <text:p text:style-name="P7"><text:a xlink:type="simple" xlink:href="#__RefHeading___Toc227_771010674%20Copy%201%20Copy%202" text:style-name="Index_20_Link" text:visited-style-name="Index_20_Link">4 Questionnaire<text:tab/>10</text:a></text:p>
          <text:p text:style-name="P8"><text:a xlink:type="simple" xlink:href="#__RefHeading___Toc908_3206075736%20Copy%201%20Copy%201%20Copy%202" text:style-name="Index_20_Link" text:visited-style-name="Index_20_Link">4.1 Delete<text:tab/>10</text:a></text:p>
          <text:p text:style-name="P8"><text:a xlink:type="simple" xlink:href="#__RefHeading___Toc2079_720390006%20Copy%201%20Copy%202" text:style-name="Index_20_Link" text:visited-style-name="Index_20_Link">4.2 Active<text:tab/>11</text:a></text:p>
          <text:p text:style-name="P8"><text:a xlink:type="simple" xlink:href="#__RefHeading___Toc2083_720390006%20Copy%201%20Copy%202" text:style-name="Index_20_Link" text:visited-style-name="Index_20_Link">4.3 Inactive<text:tab/>12</text:a></text:p>
          <text:p text:style-name="P8"><text:a xlink:type="simple" xlink:href="#__RefHeading___Toc2085_720390006%20Copy%201%20Copy%202" text:style-name="Index_20_Link" text:visited-style-name="Index_20_Link">4.4 Fetch Specific Record<text:tab/>12</text:a></text:p>
          <text:p text:style-name="P7"><text:a xlink:type="simple" xlink:href="#__RefHeading___Toc227_771010674%20Copy%201%20Copy%203" text:style-name="Index_20_Link" text:visited-style-name="Index_20_Link">5 Questionnaire Target Department<text:tab/>13</text:a></text:p>
          <text:p text:style-name="P8"><text:a xlink:type="simple" xlink:href="#__RefHeading___Toc908_3206075736%20Copy%201%20Copy%201%20Copy%203" text:style-name="Index_20_Link" text:visited-style-name="Index_20_Link">5.1 Delete<text:tab/>13</text:a></text:p>
          <text:p text:style-name="P8"><text:a xlink:type="simple" xlink:href="#__RefHeading___Toc2079_720390006%20Copy%201%20Copy%203" text:style-name="Index_20_Link" text:visited-style-name="Index_20_Link">5.2 Active<text:tab/>14</text:a></text:p>
          <text:p text:style-name="P8"><text:a xlink:type="simple" xlink:href="#__RefHeading___Toc2083_720390006%20Copy%201%20Copy%203" text:style-name="Index_20_Link" text:visited-style-name="Index_20_Link">5.3 Inactive<text:tab/>15</text:a></text:p>
          <text:p text:style-name="P8"><text:a xlink:type="simple" xlink:href="#__RefHeading___Toc2085_720390006%20Copy%201%20Copy%203" text:style-name="Index_20_Link" text:visited-style-name="Index_20_Link">5.4 Fetch Specific Record<text:tab/>15</text:a></text:p>
          <text:p text:style-name="P7"><text:a xlink:type="simple" xlink:href="#__RefHeading___Toc227_771010674%20Copy%201%20Copy%204" text:style-name="Index_20_Link" text:visited-style-name="Index_20_Link">6 Questionnaire Item<text:tab/>16</text:a></text:p>
          <text:p text:style-name="P8"><text:a xlink:type="simple" xlink:href="#__RefHeading___Toc908_3206075736%20Copy%201%20Copy%201%20Copy%204" text:style-name="Index_20_Link" text:visited-style-name="Index_20_Link">6.1 Delete<text:tab/>16</text:a></text:p>
          <text:p text:style-name="P8"><text:a xlink:type="simple" xlink:href="#__RefHeading___Toc2079_720390006%20Copy%201%20Copy%204" text:style-name="Index_20_Link" text:visited-style-name="Index_20_Link">6.2 Active<text:tab/>17</text:a></text:p>
          <text:p text:style-name="P8"><text:a xlink:type="simple" xlink:href="#__RefHeading___Toc2083_720390006%20Copy%201%20Copy%204" text:style-name="Index_20_Link" text:visited-style-name="Index_20_Link">6.3 Inactive<text:tab/>17</text:a></text:p>
          <text:p text:style-name="P8"><text:a xlink:type="simple" xlink:href="#__RefHeading___Toc2085_720390006%20Copy%201%20Copy%204" text:style-name="Index_20_Link" text:visited-style-name="Index_20_Link">6.4 Fetch Specific Record<text:tab/>18</text:a></text:p>
          <text:p text:style-name="P7"><text:a xlink:type="simple" xlink:href="#__RefHeading___Toc227_771010674%20Copy%201%20Copy%205" text:style-name="Index_20_Link" text:visited-style-name="Index_20_Link">7 Questionnaire Result<text:tab/>19</text:a></text:p>
          <text:p text:style-name="P8"><text:a xlink:type="simple" xlink:href="#__RefHeading___Toc908_3206075736%20Copy%201%20Copy%201%20Copy%205" text:style-name="Index_20_Link" text:visited-style-name="Index_20_Link">7.1 Delete<text:tab/>19</text:a></text:p>
          <text:p text:style-name="P8"><text:a xlink:type="simple" xlink:href="#__RefHeading___Toc2079_720390006%20Copy%201%20Copy%205" text:style-name="Index_20_Link" text:visited-style-name="Index_20_Link">7.2 Active<text:tab/>20</text:a></text:p>
          <text:p text:style-name="P8"><text:a xlink:type="simple" xlink:href="#__RefHeading___Toc2083_720390006%20Copy%201%20Copy%205" text:style-name="Index_20_Link" text:visited-style-name="Index_20_Link">7.3 Inactive<text:tab/>20</text:a></text:p>
          <text:p text:style-name="P8"><text:a xlink:type="simple" xlink:href="#__RefHeading___Toc2085_720390006%20Copy%201%20Copy%205" text:style-name="Index_20_Link" text:visited-style-name="Index_20_Link">7.4 Fetch Specific Record<text:tab/>21</text:a></text:p>
          <text:p text:style-name="P7"><text:a xlink:type="simple" xlink:href="#__RefHeading___Toc227_771010674%20Copy%201%20Copy%206" text:style-name="Index_20_Link" text:visited-style-name="Index_20_Link">8 Questionnaire Result Detail<text:tab/>22</text:a></text:p>
          <text:p text:style-name="P8"><text:a xlink:type="simple" xlink:href="#__RefHeading___Toc908_3206075736%20Copy%201%20Copy%201%20Copy%206" text:style-name="Index_20_Link" text:visited-style-name="Index_20_Link">8.1 Delete<text:tab/>22</text:a></text:p>
          <text:p text:style-name="P8"><text:a xlink:type="simple" xlink:href="#__RefHeading___Toc2079_720390006%20Copy%201%20Copy%206" text:style-name="Index_20_Link" text:visited-style-name="Index_20_Link">8.2 Active<text:tab/>23</text:a></text:p>
          <text:p text:style-name="P8"><text:a xlink:type="simple" xlink:href="#__RefHeading___Toc2083_720390006%20Copy%201%20Copy%206" text:style-name="Index_20_Link" text:visited-style-name="Index_20_Link">8.3 Inactive<text:tab/>23</text:a></text:p>
          <text:p text:style-name="P8"><text:a xlink:type="simple" xlink:href="#__RefHeading___Toc2085_720390006%20Copy%201%20Copy%206" text:style-name="Index_20_Link" text:visited-style-name="Index_20_Link">8.4 Fetch Specific Record<text:tab/>24</text:a></text:p>
          <text:p text:style-name="P7"><text:a xlink:type="simple" xlink:href="#__RefHeading___Toc227_771010674%20Copy%201%20Copy%207" text:style-name="Index_20_Link" text:visited-style-name="Index_20_Link">9 Staff Satisfaction Evaluation<text:tab/>25</text:a></text:p>
          <text:p text:style-name="P8"><text:a xlink:type="simple" xlink:href="#__RefHeading___Toc908_3206075736%20Copy%201%20Copy%201%20Copy%207" text:style-name="Index_20_Link" text:visited-style-name="Index_20_Link"><text:soft-page-break/>9.1 Delete<text:tab/>25</text:a></text:p>
          <text:p text:style-name="P8"><text:a xlink:type="simple" xlink:href="#__RefHeading___Toc2079_720390006%20Copy%201%20Copy%207" text:style-name="Index_20_Link" text:visited-style-name="Index_20_Link">9.2 Active<text:tab/>26</text:a></text:p>
          <text:p text:style-name="P8"><text:a xlink:type="simple" xlink:href="#__RefHeading___Toc2083_720390006%20Copy%201%20Copy%207" text:style-name="Index_20_Link" text:visited-style-name="Index_20_Link">9.3 Inactive<text:tab/>26</text:a></text:p>
          <text:p text:style-name="P8"><text:a xlink:type="simple" xlink:href="#__RefHeading___Toc2085_720390006%20Copy%201%20Copy%207" text:style-name="Index_20_Link" text:visited-style-name="Index_20_Link">9.4 Fetch Specific Record<text:tab/>27</text:a></text:p>
          <text:p text:style-name="P7"><text:a xlink:type="simple" xlink:href="#__RefHeading___Toc227_771010674%20Copy%201%20Copy%208" text:style-name="Index_20_Link" text:visited-style-name="Index_20_Link">10 Project Productivity Evaluation<text:tab/>28</text:a></text:p>
          <text:p text:style-name="P8"><text:a xlink:type="simple" xlink:href="#__RefHeading___Toc908_3206075736%20Copy%201%20Copy%201%20Copy%208" text:style-name="Index_20_Link" text:visited-style-name="Index_20_Link">10.1 Delete<text:tab/>28</text:a></text:p>
          <text:p text:style-name="P8"><text:a xlink:type="simple" xlink:href="#__RefHeading___Toc2079_720390006%20Copy%201%20Copy%208" text:style-name="Index_20_Link" text:visited-style-name="Index_20_Link">10.2 Active<text:tab/>29</text:a></text:p>
          <text:p text:style-name="P8"><text:a xlink:type="simple" xlink:href="#__RefHeading___Toc2083_720390006%20Copy%201%20Copy%208" text:style-name="Index_20_Link" text:visited-style-name="Index_20_Link">10.3 Inactive<text:tab/>29</text:a></text:p>
          <text:p text:style-name="P8"><text:a xlink:type="simple" xlink:href="#__RefHeading___Toc2085_720390006%20Copy%201%20Copy%208" text:style-name="Index_20_Link" text:visited-style-name="Index_20_Link">10.4 Fetch Specific Record<text:tab/>30</text:a></text:p>
          <text:p text:style-name="P7"><text:a xlink:type="simple" xlink:href="#__RefHeading___Toc227_771010674%20Copy%201%20Copy%209" text:style-name="Index_20_Link" text:visited-style-name="Index_20_Link">11 Customer Satisfaction Evaluation<text:tab/>31</text:a></text:p>
          <text:p text:style-name="P8"><text:a xlink:type="simple" xlink:href="#__RefHeading___Toc908_3206075736%20Copy%201%20Copy%201%20Copy%209" text:style-name="Index_20_Link" text:visited-style-name="Index_20_Link">11.1 Delete<text:tab/>31</text:a></text:p>
          <text:p text:style-name="P8"><text:a xlink:type="simple" xlink:href="#__RefHeading___Toc2079_720390006%20Copy%201%20Copy%209" text:style-name="Index_20_Link" text:visited-style-name="Index_20_Link">11.2 Active<text:tab/>32</text:a></text:p>
          <text:p text:style-name="P8"><text:a xlink:type="simple" xlink:href="#__RefHeading___Toc2083_720390006%20Copy%201%20Copy%209" text:style-name="Index_20_Link" text:visited-style-name="Index_20_Link">11.3 Inactive<text:tab/>32</text:a></text:p>
          <text:p text:style-name="P8"><text:a xlink:type="simple" xlink:href="#__RefHeading___Toc2085_720390006%20Copy%201%20Copy%209" text:style-name="Index_20_Link" text:visited-style-name="Index_20_Link">11.4 Fetch Specific Record<text:tab/>33</text:a></text:p>
          <text:p text:style-name="P7"><text:a xlink:type="simple" xlink:href="#__RefHeading___Toc227_771010674%20Copy%201%20Copy%2010" text:style-name="Index_20_Link" text:visited-style-name="Index_20_Link">12 Customer Feedback<text:tab/>34</text:a></text:p>
          <text:p text:style-name="P8"><text:a xlink:type="simple" xlink:href="#__RefHeading___Toc908_3206075736%20Copy%201%20Copy%201%20Copy%2010" text:style-name="Index_20_Link" text:visited-style-name="Index_20_Link">12.1 Delete<text:tab/>34</text:a></text:p>
          <text:p text:style-name="P8"><text:a xlink:type="simple" xlink:href="#__RefHeading___Toc2079_720390006%20Copy%201%20Copy%2010" text:style-name="Index_20_Link" text:visited-style-name="Index_20_Link">12.2 Active<text:tab/>35</text:a></text:p>
          <text:p text:style-name="P8"><text:a xlink:type="simple" xlink:href="#__RefHeading___Toc2083_720390006%20Copy%201%20Copy%2010" text:style-name="Index_20_Link" text:visited-style-name="Index_20_Link">12.3 Inactive<text:tab/>35</text:a></text:p>
          <text:p text:style-name="P8"><text:a xlink:type="simple" xlink:href="#__RefHeading___Toc2085_720390006%20Copy%201%20Copy%2010" text:style-name="Index_20_Link" text:visited-style-name="Index_20_Link">12.4 Fetch Specific Record<text:tab/>36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Question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5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ques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evaluation/question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5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actives a “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evaluation/question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oft-page-break/><text:span text:style-name="Strong_20_Emphasis"><text:span text:style-name="T10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5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evaluation/question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in</text:span>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5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ques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oft-page-break/><text:s text:c="2"/>--url 'https://[maindomian]/api/evaluation/question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6"/>
      <text:h text:style-name="P27" text:outline-level="1"><text:bookmark-start text:name="__RefHeading___Toc227_771010674 Copy 1 Copy 1"/><text:soft-page-break/>Question <text:span text:style-name="T17">Option</text:span><text:bookmark-end text:name="__RefHeading___Toc227_771010674 Copy 1 Copy 1"/></text:h>
      <text:h text:style-name="P28" text:outline-level="2"><text:bookmark-start text:name="__RefHeading___Toc908_3206075736 Copy 1 Copy 1 Copy 1"/><text:span text:style-name="Strong_20_Emphasis"><text:span text:style-name="T5">Delete</text:span></text:span><text:bookmark-end text:name="__RefHeading___Toc908_3206075736 Copy 1 Copy 1 Copy 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18">n</text:span></text:span><text:span text:style-name="Strong_20_Emphasis"><text:span text:style-name="T7">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>curl --request DELETE \</text:p>
            <text:p text:style-name="P30"><text:s text:c="2"/>--url 'https://[maindomian]/api/evaluation/questionOp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"/><text:span text:style-name="Strong_20_Emphasis"><text:span text:style-name="T5">Active</text:span></text:span><text:bookmark-end text:name="__RefHeading___Toc2079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</text:span></text:span><text:span text:style-name="Strong_20_Emphasis"><text:span text:style-name="T18">n</text:span></text:span><text:span text:style-name="Strong_20_Emphasis"><text:span text:style-name="T7">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0">curl --request PUT \</text:p>
            <text:p text:style-name="P30"><text:s text:c="2"/>--url 'https://[maindomian]/api/evaluation/questionOp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{</text:p>
            <text:p text:style-name="P30"><text:tab/>"statusCode" : 200,</text:p>
            <text:p text:style-name="P30"><text:soft-page-break/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"/><text:span text:style-name="Strong_20_Emphasis"><text:span text:style-name="T5">Inactive</text:span></text:span><text:bookmark-end text:name="__RefHeading___Toc2083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url --request PUT \</text:p>
            <text:p text:style-name="P30"><text:s text:c="2"/>--url 'https://[maindomian]/api/evaluation/questionOp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"/><text:span text:style-name="Strong_20_Emphasis"><text:span text:style-name="T5">Fetch Specific Record</text:span></text:span><text:bookmark-end text:name="__RefHeading___Toc2085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url --request GET \</text:p>
            <text:p text:style-name="P30"><text:s text:c="2"/>--url 'https://[maindomian]/api/evaluation/questionOp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2"/>Questionnaire<text:bookmark-end text:name="__RefHeading___Toc227_771010674 Copy 1 Copy 2"/></text:h>
      <text:h text:style-name="P28" text:outline-level="2"><text:bookmark-start text:name="__RefHeading___Toc908_3206075736 Copy 1 Copy 1 Copy 2"/><text:span text:style-name="Strong_20_Emphasis"><text:span text:style-name="T5">Delete</text:span></text:span><text:bookmark-end text:name="__RefHeading___Toc908_3206075736 Copy 1 Copy 1 Copy 2"/></text:h>
      <text:p text:style-name="P29"><text:span text:style-name="Strong_20_Emphasis"><text:span text:style-name="T6">Description</text:span></text:span></text:p>
      <text:p text:style-name="P29"><text:soft-page-break/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curl --request DELETE \</text:p>
            <text:p text:style-name="P30"><text:s text:c="2"/>--url 'https://[maindomian]/api/evaluation/questionnair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2"/><text:span text:style-name="Strong_20_Emphasis"><text:span text:style-name="T5">Active</text:span></text:span><text:bookmark-end text:name="__RefHeading___Toc2079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">curl --request PUT \</text:p>
            <text:p text:style-name="P30"><text:s text:c="2"/>--url 'https://[maindomian]/api/evaluation/questionnaire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2"/><text:soft-page-break/><text:span text:style-name="Strong_20_Emphasis"><text:span text:style-name="T5">Inactive</text:span></text:span><text:bookmark-end text:name="__RefHeading___Toc2083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curl --request PUT \</text:p>
            <text:p text:style-name="P33"><text:s text:c="2"/>--url 'https://[maindomian]/api/evaluation/questionnaire/inactive/[id]' \</text:p>
            <text:p text:style-name="P33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2"/><text:span text:style-name="Strong_20_Emphasis"><text:span text:style-name="T5">Fetch Specific Record</text:span></text:span><text:bookmark-end text:name="__RefHeading___Toc2085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0">curl --request GET \</text:p>
            <text:p text:style-name="P30"><text:s text:c="2"/>--url 'https://[maindomian]/api/evaluation/questionnair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soft-page-break/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3"/>Questionnaire Target Department<text:bookmark-end text:name="__RefHeading___Toc227_771010674 Copy 1 Copy 3"/></text:h>
      <text:h text:style-name="P28" text:outline-level="2"><text:bookmark-start text:name="__RefHeading___Toc908_3206075736 Copy 1 Copy 1 Copy 3"/><text:span text:style-name="Strong_20_Emphasis"><text:span text:style-name="T5">Delete</text:span></text:span><text:bookmark-end text:name="__RefHeading___Toc908_3206075736 Copy 1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0">curl --request DELETE \</text:p>
            <text:p text:style-name="P30"><text:s text:c="2"/>--url <text:soft-page-break/>'https://[maindomian]/api/evaluation/questionnaireTargetDepartmen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3"/><text:span text:style-name="Strong_20_Emphasis"><text:span text:style-name="T5">Active</text:span></text:span><text:bookmark-end text:name="__RefHeading___Toc2079_720390006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0">curl --request PUT \</text:p>
            <text:p text:style-name="P30"><text:s text:c="2"/>--url 'https://[maindomian]/api/evaluation/questionnaireTargetDepartmen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3"/><text:soft-page-break/><text:span text:style-name="Strong_20_Emphasis"><text:span text:style-name="T5">Inactive</text:span></text:span><text:bookmark-end text:name="__RefHeading___Toc2083_720390006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">curl --request PUT \</text:p>
            <text:p text:style-name="P30"><text:s text:c="2"/>--url 'https://[maindomian]/api/evaluation/questionnaireTargetDepartmen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3"/><text:span text:style-name="Strong_20_Emphasis"><text:span text:style-name="T5">Fetch Specific Record</text:span></text:span><text:bookmark-end text:name="__RefHeading___Toc2085_720390006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0">curl --request GET \</text:p>
            <text:p text:style-name="P30"><text:s text:c="2"/>--url 'https://[maindomian]/api/evaluation/questionnaireTargetDepartmen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0">{</text:p>
            <text:p text:style-name="P30"><text:tab/>"statusCode" : 200,</text:p>
            <text:p text:style-name="P30"><text:soft-page-break/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4"/>Questionnaire Item<text:bookmark-end text:name="__RefHeading___Toc227_771010674 Copy 1 Copy 4"/></text:h>
      <text:h text:style-name="P28" text:outline-level="2"><text:bookmark-start text:name="__RefHeading___Toc908_3206075736 Copy 1 Copy 1 Copy 4"/><text:span text:style-name="Strong_20_Emphasis"><text:span text:style-name="T5">Delete</text:span></text:span><text:bookmark-end text:name="__RefHeading___Toc908_3206075736 Copy 1 Copy 1 Copy 4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30">curl --request DELETE \</text:p>
            <text:p text:style-name="P30"><text:s text:c="2"/>--url 'https://[maindomian]/api/evaluation/questionnaire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4"/><text:span text:style-name="Strong_20_Emphasis"><text:span text:style-name="T5">Active</text:span></text:span><text:bookmark-end text:name="__RefHeading___Toc2079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actives a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0">curl --request PUT \</text:p>
            <text:p text:style-name="P30"><text:s text:c="2"/>--url 'https://[maindomian]/api/evaluation/questionnaireItem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4"/><text:span text:style-name="Strong_20_Emphasis"><text:span text:style-name="T5">Inactive</text:span></text:span><text:bookmark-end text:name="__RefHeading___Toc2083_720390006 Copy 1 Copy 4"/></text:h>
      <text:p text:style-name="P29"><text:span text:style-name="Strong_20_Emphasis"><text:span text:style-name="T6">Description</text:span></text:span></text:p>
      <text:p text:style-name="P34"><text:soft-page-break/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0">curl --request PUT \</text:p>
            <text:p text:style-name="P30"><text:s text:c="2"/>--url 'https://[maindomian]/api/evaluation/questionnaireItem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4"/><text:span text:style-name="Strong_20_Emphasis"><text:span text:style-name="T5">Fetch Specific Record</text:span></text:span><text:bookmark-end text:name="__RefHeading___Toc2085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0">curl --request GET \</text:p>
            <text:p text:style-name="P30"><text:s text:c="2"/>--url 'https://[maindomian]/api/evaluation/questionnaire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soft-page-break/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5"/>Questionnaire Result<text:bookmark-end text:name="__RefHeading___Toc227_771010674 Copy 1 Copy 5"/></text:h>
      <text:h text:style-name="P28" text:outline-level="2"><text:bookmark-start text:name="__RefHeading___Toc908_3206075736 Copy 1 Copy 1 Copy 5"/><text:span text:style-name="Strong_20_Emphasis"><text:span text:style-name="T5">Delete</text:span></text:span><text:bookmark-end text:name="__RefHeading___Toc908_3206075736 Copy 1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0">curl --request DELETE \</text:p>
            <text:p text:style-name="P30"><text:s text:c="2"/>--url 'https://[maindomian]/api/evaluation/questionnaireResult/[id]' \</text:p>
            <text:p text:style-name="P30"><text:s text:c="2"/>--header 'Authorization: Bearer [token]'</text:p>
          </table:table-cell>
        </table:table-row>
      </table:table>
      <text:p text:style-name="P29"><text:soft-page-break/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5"/><text:span text:style-name="Strong_20_Emphasis"><text:span text:style-name="T5">Active</text:span></text:span><text:bookmark-end text:name="__RefHeading___Toc2079_720390006 Copy 1 Copy 5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actives a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0">curl --request PUT \</text:p>
            <text:p text:style-name="P30"><text:s text:c="2"/>--url 'https://[maindomian]/api/evaluation/questionnaireResul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5"/><text:span text:style-name="Strong_20_Emphasis"><text:span text:style-name="T5">Inactive</text:span></text:span><text:bookmark-end text:name="__RefHeading___Toc2083_720390006 Copy 1 Copy 5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oft-page-break/><text:span text:style-name="Strong_20_Emphasis"><text:span text:style-name="T10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0">curl --request PUT \</text:p>
            <text:p text:style-name="P30"><text:s text:c="2"/>--url 'https://[maindomian]/api/evaluation/questionnaireResul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5"/><text:span text:style-name="Strong_20_Emphasis"><text:span text:style-name="T5">Fetch Specific Record</text:span></text:span><text:bookmark-end text:name="__RefHeading___Toc2085_720390006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">curl --request GET \</text:p>
            <text:p text:style-name="P30"><text:s text:c="2"/>--url 'https://[maindomian]/api/evaluation/questionnaireResul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soft-page-break/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6"/>Questionnaire Result Detail<text:bookmark-end text:name="__RefHeading___Toc227_771010674 Copy 1 Copy 6"/></text:h>
      <text:h text:style-name="P28" text:outline-level="2"><text:bookmark-start text:name="__RefHeading___Toc908_3206075736 Copy 1 Copy 1 Copy 6"/><text:span text:style-name="Strong_20_Emphasis"><text:span text:style-name="T5">Delete</text:span></text:span><text:bookmark-end text:name="__RefHeading___Toc908_3206075736 Copy 1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0">curl --request DELETE \</text:p>
            <text:p text:style-name="P30"><text:s text:c="2"/>--url 'https://[maindomian]/api/evaluation/questionnaireResultDetail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6"/><text:span text:style-name="Strong_20_Emphasis"><text:span text:style-name="T5">Active</text:span></text:span><text:bookmark-end text:name="__RefHeading___Toc2079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actives a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0">curl --request PUT \</text:p>
            <text:p text:style-name="P30"><text:s text:c="2"/>--url 'https://[maindomian]/api/evaluation/questionnaireResultDetail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6"/><text:span text:style-name="Strong_20_Emphasis"><text:span text:style-name="T5">Inactive</text:span></text:span><text:bookmark-end text:name="__RefHeading___Toc2083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3" table:style-name="Table53">
        <table:table-column table:style-name="Table53.A"/>
        <text:soft-page-break/>
        <table:table-row>
          <table:table-cell table:style-name="Table53.A1" office:value-type="string">
            <text:p text:style-name="P30">curl --request PUT \</text:p>
            <text:p text:style-name="P30"><text:s text:c="2"/>--url 'https://[maindomian]/api/evaluation/questionnaireResultDetail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6"/><text:span text:style-name="Strong_20_Emphasis"><text:span text:style-name="T5">Fetch Specific Record</text:span></text:span><text:bookmark-end text:name="__RefHeading___Toc2085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0">curl --request GET \</text:p>
            <text:p text:style-name="P30"><text:s text:c="2"/>--url 'https://[maindomian]/api/evaluation/questionnaireResultDetail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soft-page-break/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7"/>Staff Satisfaction Evaluation<text:bookmark-end text:name="__RefHeading___Toc227_771010674 Copy 1 Copy 7"/></text:h>
      <text:h text:style-name="P28" text:outline-level="2"><text:bookmark-start text:name="__RefHeading___Toc908_3206075736 Copy 1 Copy 1 Copy 7"/><text:span text:style-name="Strong_20_Emphasis"><text:span text:style-name="T5">Delete</text:span></text:span><text:bookmark-end text:name="__RefHeading___Toc908_3206075736 Copy 1 Copy 1 Copy 7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1">n</text:span></text:span><text:span text:style-name="Strong_20_Emphasis"><text:span text:style-name="T7"> “</text:span></text:span><text:span text:style-name="Strong_20_Emphasis"><text:span text:style-name="T21">evaluation </text:span></text:span><text:span text:style-name="Strong_20_Emphasis"><text:span text:style-name="T21">result of staff satisfac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0">curl --request DELETE \</text:p>
            <text:p text:style-name="P30"><text:s text:c="2"/>--url 'https://[maindomian]/api/evaluation/staff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7"/><text:span text:style-name="Strong_20_Emphasis"><text:span text:style-name="T5">Active</text:span></text:span><text:bookmark-end text:name="__RefHeading___Toc2079_720390006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actives a</text:span></text:span><text:span text:style-name="Strong_20_Emphasis"><text:span text:style-name="T21">n</text:span></text:span><text:span text:style-name="Strong_20_Emphasis"><text:span text:style-name="T7"> “</text:span></text:span><text:span text:style-name="Strong_20_Emphasis"><text:span text:style-name="T21">evaluation result of staff satisfac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0">curl --request PUT \</text:p>
            <text:p text:style-name="P30"><text:s text:c="2"/>--url 'https://[maindomian]/api/evaluation/staffSatisfactionEvalua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7"/><text:span text:style-name="Strong_20_Emphasis"><text:span text:style-name="T5">Inactive</text:span></text:span><text:bookmark-end text:name="__RefHeading___Toc2083_720390006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1">evaluation result of staff satisfac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1" table:style-name="Table61">
        <table:table-column table:style-name="Table61.A"/>
        <text:soft-page-break/>
        <table:table-row>
          <table:table-cell table:style-name="Table61.A1" office:value-type="string">
            <text:p text:style-name="P30">curl --request PUT \</text:p>
            <text:p text:style-name="P30"><text:s text:c="2"/>--url 'https://[maindomian]/api/evaluation/staffSatisfactionEvalua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7"/><text:span text:style-name="Strong_20_Emphasis"><text:span text:style-name="T5">Fetch Specific Record</text:span></text:span><text:bookmark-end text:name="__RefHeading___Toc2085_720390006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1">evaluation result of staff satisfac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0">curl --request GET \</text:p>
            <text:p text:style-name="P30"><text:s text:c="2"/>--url 'https://[maindomian]/api/evaluation/staff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soft-page-break/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8"/>Project Productivity Evaluation<text:bookmark-end text:name="__RefHeading___Toc227_771010674 Copy 1 Copy 8"/></text:h>
      <text:h text:style-name="P28" text:outline-level="2"><text:bookmark-start text:name="__RefHeading___Toc908_3206075736 Copy 1 Copy 1 Copy 8"/><text:span text:style-name="Strong_20_Emphasis"><text:span text:style-name="T5">Delete</text:span></text:span><text:bookmark-end text:name="__RefHeading___Toc908_3206075736 Copy 1 Copy 1 Copy 8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evaluation result of the project productivity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0">curl --request DELETE \</text:p>
            <text:p text:style-name="P30"><text:s text:c="2"/>--url 'https://[maindomian]/api/evaluation/projectProductivity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8"/><text:span text:style-name="Strong_20_Emphasis"><text:span text:style-name="T5">Active</text:span></text:span><text:bookmark-end text:name="__RefHeading___Toc2079_720390006 Copy 1 Copy 8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activ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evaluation result of the project productivity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0">curl --request PUT \</text:p>
            <text:p text:style-name="P30"><text:s text:c="2"/>--url 'https://[maindomian]/api/evaluation/projectProductivityEvalua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8"/><text:span text:style-name="Strong_20_Emphasis"><text:span text:style-name="T5">Inactive</text:span></text:span><text:bookmark-end text:name="__RefHeading___Toc2083_720390006 Copy 1 Copy 8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2">evaluation result of the project productivity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9" table:style-name="Table69">
        <table:table-column table:style-name="Table69.A"/>
        <text:soft-page-break/>
        <table:table-row>
          <table:table-cell table:style-name="Table69.A1" office:value-type="string">
            <text:p text:style-name="P30">curl --request PUT \</text:p>
            <text:p text:style-name="P30"><text:s text:c="2"/>--url 'https://[maindomian]/api/evaluation/projectProductivityEvalua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8"/><text:span text:style-name="Strong_20_Emphasis"><text:span text:style-name="T5">Fetch Specific Record</text:span></text:span><text:bookmark-end text:name="__RefHeading___Toc2085_720390006 Copy 1 Copy 8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2">evaluation result of the project productivit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0">curl --request GET \</text:p>
            <text:p text:style-name="P30"><text:s text:c="2"/>--url 'https://[maindomian]/api/evaluation/projectProductivity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soft-page-break/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9"/>Customer Satisfaction Evaluation<text:bookmark-end text:name="__RefHeading___Toc227_771010674 Copy 1 Copy 9"/></text:h>
      <text:h text:style-name="P28" text:outline-level="2"><text:bookmark-start text:name="__RefHeading___Toc908_3206075736 Copy 1 Copy 1 Copy 9"/><text:span text:style-name="Strong_20_Emphasis"><text:span text:style-name="T5">Delete</text:span></text:span><text:bookmark-end text:name="__RefHeading___Toc908_3206075736 Copy 1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3">n</text:span></text:span><text:span text:style-name="Strong_20_Emphasis"><text:span text:style-name="T7">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0">curl --request DELETE \</text:p>
            <text:p text:style-name="P30"><text:s text:c="2"/>--url 'https://[maindomian]/api/evaluation/customer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9"/><text:span text:style-name="Strong_20_Emphasis"><text:span text:style-name="T5">Active</text:span></text:span><text:bookmark-end text:name="__RefHeading___Toc2079_720390006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actives a</text:span></text:span><text:span text:style-name="Strong_20_Emphasis"><text:span text:style-name="T23">n</text:span></text:span><text:span text:style-name="Strong_20_Emphasis"><text:span text:style-name="T7">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0">curl --request PUT \</text:p>
            <text:p text:style-name="P30"><text:s text:c="2"/>--url 'https://[maindomian]/api/evaluation/customerSatisfactionEvalua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9"/><text:span text:style-name="Strong_20_Emphasis"><text:span text:style-name="T5">Inactive</text:span></text:span><text:bookmark-end text:name="__RefHeading___Toc2083_720390006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7" table:style-name="Table77">
        <table:table-column table:style-name="Table77.A"/>
        <text:soft-page-break/>
        <table:table-row>
          <table:table-cell table:style-name="Table77.A1" office:value-type="string">
            <text:p text:style-name="P30">curl --request PUT \</text:p>
            <text:p text:style-name="P30"><text:s text:c="2"/>--url 'https://[maindomian]/api/evaluation/customerSatisfactionEvalua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9"/><text:span text:style-name="Strong_20_Emphasis"><text:span text:style-name="T5">Fetch Specific Record</text:span></text:span><text:bookmark-end text:name="__RefHeading___Toc2085_720390006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0">curl --request GET \</text:p>
            <text:p text:style-name="P30"><text:s text:c="2"/>--url 'https://[maindomian]/api/evaluation/customer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soft-page-break/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10"/>Customer Feedback<text:bookmark-end text:name="__RefHeading___Toc227_771010674 Copy 1 Copy 10"/></text:h>
      <text:h text:style-name="P28" text:outline-level="2"><text:bookmark-start text:name="__RefHeading___Toc908_3206075736 Copy 1 Copy 1 Copy 10"/><text:span text:style-name="Strong_20_Emphasis"><text:span text:style-name="T5">Delete</text:span></text:span><text:bookmark-end text:name="__RefHeading___Toc908_3206075736 Copy 1 Copy 1 Copy 10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3">customer feedback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curl --request DELETE \</text:p>
            <text:p text:style-name="P30"><text:s text:c="2"/>--url 'https://[maindomian]/api/evaluation/customerFeedback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5" table:style-name="Table85">
        <table:table-column table:style-name="Table85.A"/>
        <text:soft-page-break/>
        <table:table-row>
          <table:table-cell table:style-name="Table85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0"/><text:span text:style-name="Strong_20_Emphasis"><text:span text:style-name="T5">Active</text:span></text:span><text:bookmark-end text:name="__RefHeading___Toc2079_720390006 Copy 1 Copy 10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actives a “</text:span></text:span><text:span text:style-name="Strong_20_Emphasis"><text:span text:style-name="T23">customer feedback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0">curl --request PUT \</text:p>
            <text:p text:style-name="P30"><text:s text:c="2"/>--url 'https://[maindomian]/api/evaluation/customerFeedback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0"/><text:span text:style-name="Strong_20_Emphasis"><text:span text:style-name="T5">Inactive</text:span></text:span><text:bookmark-end text:name="__RefHeading___Toc2083_720390006 Copy 1 Copy 10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3">customer feedback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0">curl --request PUT \</text:p>
            <text:p text:style-name="P30"><text:s text:c="2"/>--url <text:soft-page-break/>'https://[maindomian]/api/evaluation/customerFeedback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0"/><text:span text:style-name="Strong_20_Emphasis"><text:span text:style-name="T5">Fetch Specific Record</text:span></text:span><text:bookmark-end text:name="__RefHeading___Toc2085_720390006 Copy 1 Copy 10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3">customer feedback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0">curl --request GET \</text:p>
            <text:p text:style-name="P30"><text:s text:c="2"/>--url 'https://[maindomian]/api/evaluation/customerFeedback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soft-page-break/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Evaluation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37</text:page-number><text:s/>of <text:page-count>37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6-05T17:29:07.051285100</dc:date>
    <meta:editing-duration>P25DT11H28S</meta:editing-duration>
    <meta:editing-cycles>1190</meta:editing-cycles>
    <meta:generator>LibreOffice/25.2.7.2$Windows_X86_64 LibreOffice_project/5cbfd1ab6520636bb5f7b99185aa69bd7456825d</meta:generator>
    <dc:subject>API Specification for Evaluation</dc:subject>
    <dc:title>Horizon Research Project</dc:title>
    <meta:document-statistic meta:table-count="91" meta:image-count="1" meta:object-count="0" meta:page-count="37" meta:paragraph-count="1092" meta:word-count="3551" meta:character-count="26414" meta:non-whitespace-character-count="22854"/>
  </office:meta>
</office:document-meta>
</file>