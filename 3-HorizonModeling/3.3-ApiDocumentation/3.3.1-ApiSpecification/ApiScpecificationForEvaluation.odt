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600000226C86F0DD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scadia Code Light" svg:font-family="'Cascadia Code Light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81" style:family="table">
      <style:table-properties style:width="6.925in" table:align="margins"/>
    </style:style>
    <style:style style:name="Table81.A" style:family="table-column">
      <style:table-column-properties style:column-width="0.409in" style:rel-column-width="3870*"/>
    </style:style>
    <style:style style:name="Table81.B" style:family="table-column">
      <style:table-column-properties style:column-width="1.7563in" style:rel-column-width="16620*"/>
    </style:style>
    <style:style style:name="Table81.C" style:family="table-column">
      <style:table-column-properties style:column-width="4.7597in" style:rel-column-width="45045*"/>
    </style:style>
    <style:style style:name="Table81.1" style:family="table-row">
      <style:table-row-properties style:min-row-height="0.2903in"/>
    </style:style>
    <style:style style:name="Table81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1.C1" style:family="table-cell">
      <style:table-cell-properties fo:background-color="#b4c7dc" fo:padding="0.0382in" fo:border="0.5pt solid #000000">
        <style:background-image/>
      </style:table-cell-properties>
    </style:style>
    <style:style style:name="Table81.A2" style:family="table-cell">
      <style:table-cell-properties fo:padding="0.0382in" fo:border-left="0.5pt solid #000000" fo:border-right="none" fo:border-top="none" fo:border-bottom="0.5pt solid #000000"/>
    </style:style>
    <style:style style:name="Table81.B2" style:family="table-cell">
      <style:table-cell-properties fo:padding="0.0382in" fo:border-left="0.5pt solid #000000" fo:border-right="none" fo:border-top="none" fo:border-bottom="0.5pt solid #000000"/>
    </style:style>
    <style:style style:name="Table8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1.3" style:family="table-row">
      <style:table-row-properties style:min-row-height="0.2528in"/>
    </style:style>
    <style:style style:name="Table81.A3" style:family="table-cell">
      <style:table-cell-properties fo:padding="0.0382in" fo:border-left="0.5pt solid #000000" fo:border-right="none" fo:border-top="none" fo:border-bottom="0.5pt solid #000000"/>
    </style:style>
    <style:style style:name="Table81.B3" style:family="table-cell">
      <style:table-cell-properties fo:padding="0.0382in" fo:border-left="0.5pt solid #000000" fo:border-right="none" fo:border-top="none" fo:border-bottom="0.5pt solid #000000"/>
    </style:style>
    <style:style style:name="Table8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82" style:family="table">
      <style:table-properties style:width="6.925in" table:align="margins"/>
    </style:style>
    <style:style style:name="Table82.A" style:family="table-column">
      <style:table-column-properties style:column-width="0.4389in" style:rel-column-width="4153*"/>
    </style:style>
    <style:style style:name="Table82.B" style:family="table-column">
      <style:table-column-properties style:column-width="3.4972in" style:rel-column-width="33096*"/>
    </style:style>
    <style:style style:name="Table82.C" style:family="table-column">
      <style:table-column-properties style:column-width="2.9889in" style:rel-column-width="28286*"/>
    </style:style>
    <style:style style:name="Table82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2.C1" style:family="table-cell">
      <style:table-cell-properties fo:background-color="#b4c7dc" fo:padding="0.0382in" fo:border="0.5pt solid #000000">
        <style:background-image/>
      </style:table-cell-properties>
    </style:style>
    <style:style style:name="Table82.A2" style:family="table-cell">
      <style:table-cell-properties fo:padding="0.0382in" fo:border-left="0.5pt solid #000000" fo:border-right="none" fo:border-top="none" fo:border-bottom="0.5pt solid #000000"/>
    </style:style>
    <style:style style:name="Table82.B2" style:family="table-cell">
      <style:table-cell-properties fo:padding="0.0382in" fo:border-left="0.5pt solid #000000" fo:border-right="none" fo:border-top="none" fo:border-bottom="0.5pt solid #000000"/>
    </style:style>
    <style:style style:name="Table8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3" style:family="table-cell">
      <style:table-cell-properties fo:padding="0.0382in" fo:border-left="0.5pt solid #000000" fo:border-right="none" fo:border-top="none" fo:border-bottom="0.5pt solid #000000"/>
    </style:style>
    <style:style style:name="Table82.B3" style:family="table-cell">
      <style:table-cell-properties fo:padding="0.0382in" fo:border-left="0.5pt solid #000000" fo:border-right="none" fo:border-top="none" fo:border-bottom="0.5pt solid #000000"/>
    </style:style>
    <style:style style:name="Table8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4" style:family="table-cell">
      <style:table-cell-properties fo:padding="0.0382in" fo:border-left="0.5pt solid #000000" fo:border-right="none" fo:border-top="none" fo:border-bottom="0.5pt solid #000000"/>
    </style:style>
    <style:style style:name="Table82.B4" style:family="table-cell">
      <style:table-cell-properties fo:padding="0.0382in" fo:border-left="0.5pt solid #000000" fo:border-right="none" fo:border-top="none" fo:border-bottom="0.5pt solid #000000"/>
    </style:style>
    <style:style style:name="Table8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5" style:family="table-cell">
      <style:table-cell-properties fo:padding="0.0382in" fo:border-left="0.5pt solid #000000" fo:border-right="none" fo:border-top="none" fo:border-bottom="0.5pt solid #000000"/>
    </style:style>
    <style:style style:name="Table82.B5" style:family="table-cell">
      <style:table-cell-properties fo:padding="0.0382in" fo:border-left="0.5pt solid #000000" fo:border-right="none" fo:border-top="none" fo:border-bottom="0.5pt solid #000000"/>
    </style:style>
    <style:style style:name="Table8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6" style:family="table-cell">
      <style:table-cell-properties fo:padding="0.0382in" fo:border-left="0.5pt solid #000000" fo:border-right="none" fo:border-top="none" fo:border-bottom="0.5pt solid #000000"/>
    </style:style>
    <style:style style:name="Table82.B6" style:family="table-cell">
      <style:table-cell-properties fo:padding="0.0382in" fo:border-left="0.5pt solid #000000" fo:border-right="none" fo:border-top="none" fo:border-bottom="0.5pt solid #000000"/>
    </style:style>
    <style:style style:name="Table82.C6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7" style:family="table-cell">
      <style:table-cell-properties fo:padding="0.0382in" fo:border-left="0.5pt solid #000000" fo:border-right="none" fo:border-top="none" fo:border-bottom="0.5pt solid #000000"/>
    </style:style>
    <style:style style:name="Table82.B7" style:family="table-cell">
      <style:table-cell-properties fo:padding="0.0382in" fo:border-left="0.5pt solid #000000" fo:border-right="none" fo:border-top="none" fo:border-bottom="0.5pt solid #000000"/>
    </style:style>
    <style:style style:name="Table82.C7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8" style:family="table-cell">
      <style:table-cell-properties fo:padding="0.0382in" fo:border-left="0.5pt solid #000000" fo:border-right="none" fo:border-top="none" fo:border-bottom="0.5pt solid #000000"/>
    </style:style>
    <style:style style:name="Table82.B8" style:family="table-cell">
      <style:table-cell-properties fo:padding="0.0382in" fo:border-left="0.5pt solid #000000" fo:border-right="none" fo:border-top="none" fo:border-bottom="0.5pt solid #000000"/>
    </style:style>
    <style:style style:name="Table82.C8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9" style:family="table-cell">
      <style:table-cell-properties fo:padding="0.0382in" fo:border-left="0.5pt solid #000000" fo:border-right="none" fo:border-top="none" fo:border-bottom="0.5pt solid #000000"/>
    </style:style>
    <style:style style:name="Table82.B9" style:family="table-cell">
      <style:table-cell-properties fo:padding="0.0382in" fo:border-left="0.5pt solid #000000" fo:border-right="none" fo:border-top="none" fo:border-bottom="0.5pt solid #000000"/>
    </style:style>
    <style:style style:name="Table82.C9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10" style:family="table-cell">
      <style:table-cell-properties fo:padding="0.0382in" fo:border-left="0.5pt solid #000000" fo:border-right="none" fo:border-top="none" fo:border-bottom="0.5pt solid #000000"/>
    </style:style>
    <style:style style:name="Table82.B10" style:family="table-cell">
      <style:table-cell-properties fo:padding="0.0382in" fo:border-left="0.5pt solid #000000" fo:border-right="none" fo:border-top="none" fo:border-bottom="0.5pt solid #000000"/>
    </style:style>
    <style:style style:name="Table82.C10" style:family="table-cell">
      <style:table-cell-properties fo:padding="0.0382in" fo:border-left="0.5pt solid #000000" fo:border-right="0.5pt solid #000000" fo:border-top="none" fo:border-bottom="0.5pt solid #000000"/>
    </style:style>
    <style:style style:name="Table83" style:family="table">
      <style:table-properties style:width="6.925in" table:align="margins"/>
    </style:style>
    <style:style style:name="Table83.A" style:family="table-column">
      <style:table-column-properties style:column-width="0.409in" style:rel-column-width="3870*"/>
    </style:style>
    <style:style style:name="Table83.B" style:family="table-column">
      <style:table-column-properties style:column-width="1.3396in" style:rel-column-width="12677*"/>
    </style:style>
    <style:style style:name="Table83.C" style:family="table-column">
      <style:table-column-properties style:column-width="1.3542in" style:rel-column-width="12815*"/>
    </style:style>
    <style:style style:name="Table83.D" style:family="table-column">
      <style:table-column-properties style:column-width="3.8222in" style:rel-column-width="36173*"/>
    </style:style>
    <style:style style:name="Table83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3.D1" style:family="table-cell">
      <style:table-cell-properties fo:background-color="#b4c7dc" fo:padding="0.0382in" fo:border="0.5pt solid #000000">
        <style:background-image/>
      </style:table-cell-properties>
    </style:style>
    <style:style style:name="Table83.A2" style:family="table-cell">
      <style:table-cell-properties fo:padding="0.0382in" fo:border-left="0.5pt solid #000000" fo:border-right="none" fo:border-top="none" fo:border-bottom="0.5pt solid #000000"/>
    </style:style>
    <style:style style:name="Table83.B2" style:family="table-cell">
      <style:table-cell-properties fo:padding="0.0382in" fo:border-left="0.5pt solid #000000" fo:border-right="none" fo:border-top="none" fo:border-bottom="0.5pt solid #000000"/>
    </style:style>
    <style:style style:name="Table83.C2" style:family="table-cell">
      <style:table-cell-properties fo:padding="0.0382in" fo:border-left="0.5pt solid #000000" fo:border-right="none" fo:border-top="none" fo:border-bottom="0.5pt solid #000000"/>
    </style:style>
    <style:style style:name="Table8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3" style:family="table-cell">
      <style:table-cell-properties fo:padding="0.0382in" fo:border-left="0.5pt solid #000000" fo:border-right="none" fo:border-top="none" fo:border-bottom="0.5pt solid #000000"/>
    </style:style>
    <style:style style:name="Table83.B3" style:family="table-cell">
      <style:table-cell-properties fo:padding="0.0382in" fo:border-left="0.5pt solid #000000" fo:border-right="none" fo:border-top="none" fo:border-bottom="0.5pt solid #000000"/>
    </style:style>
    <style:style style:name="Table83.C3" style:family="table-cell">
      <style:table-cell-properties fo:padding="0.0382in" fo:border-left="0.5pt solid #000000" fo:border-right="none" fo:border-top="none" fo:border-bottom="0.5pt solid #000000"/>
    </style:style>
    <style:style style:name="Table83.D3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4" style:family="table-cell">
      <style:table-cell-properties fo:padding="0.0382in" fo:border-left="0.5pt solid #000000" fo:border-right="none" fo:border-top="none" fo:border-bottom="0.5pt solid #000000"/>
    </style:style>
    <style:style style:name="Table83.B4" style:family="table-cell">
      <style:table-cell-properties fo:padding="0.0382in" fo:border-left="0.5pt solid #000000" fo:border-right="none" fo:border-top="none" fo:border-bottom="0.5pt solid #000000"/>
    </style:style>
    <style:style style:name="Table83.C4" style:family="table-cell">
      <style:table-cell-properties fo:padding="0.0382in" fo:border-left="0.5pt solid #000000" fo:border-right="none" fo:border-top="none" fo:border-bottom="0.5pt solid #000000"/>
    </style:style>
    <style:style style:name="Table83.D4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5" style:family="table-cell">
      <style:table-cell-properties fo:padding="0.0382in" fo:border-left="0.5pt solid #000000" fo:border-right="none" fo:border-top="none" fo:border-bottom="0.5pt solid #000000"/>
    </style:style>
    <style:style style:name="Table83.B5" style:family="table-cell">
      <style:table-cell-properties fo:padding="0.0382in" fo:border-left="0.5pt solid #000000" fo:border-right="none" fo:border-top="none" fo:border-bottom="0.5pt solid #000000"/>
    </style:style>
    <style:style style:name="Table83.C5" style:family="table-cell">
      <style:table-cell-properties fo:padding="0.0382in" fo:border-left="0.5pt solid #000000" fo:border-right="none" fo:border-top="none" fo:border-bottom="0.5pt solid #000000"/>
    </style:style>
    <style:style style:name="Table83.D5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6" style:family="table-cell">
      <style:table-cell-properties fo:padding="0.0382in" fo:border-left="0.5pt solid #000000" fo:border-right="none" fo:border-top="none" fo:border-bottom="0.5pt solid #000000"/>
    </style:style>
    <style:style style:name="Table83.B6" style:family="table-cell">
      <style:table-cell-properties fo:padding="0.0382in" fo:border-left="0.5pt solid #000000" fo:border-right="none" fo:border-top="none" fo:border-bottom="0.5pt solid #000000"/>
    </style:style>
    <style:style style:name="Table83.C6" style:family="table-cell">
      <style:table-cell-properties fo:padding="0.0382in" fo:border-left="0.5pt solid #000000" fo:border-right="none" fo:border-top="none" fo:border-bottom="0.5pt solid #000000"/>
    </style:style>
    <style:style style:name="Table83.D6" style:family="table-cell">
      <style:table-cell-properties fo:padding="0.0382in" fo:border-left="0.5pt solid #000000" fo:border-right="0.5pt solid #000000" fo:border-top="none" fo:border-bottom="0.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6.925in" style:rel-column-width="65535*"/>
    </style:style>
    <style:style style:name="Table21.A1" style:family="table-cell">
      <style:table-cell-properties fo:padding="0.0382in" fo:border="0.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6.925in" style:rel-column-width="65535*"/>
    </style:style>
    <style:style style:name="Table22.A1" style:family="table-cell">
      <style:table-cell-properties fo:padding="0.0382in" fo:border="0.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6.925in" style:rel-column-width="65535*"/>
    </style:style>
    <style:style style:name="Table23.A1" style:family="table-cell">
      <style:table-cell-properties fo:padding="0.0382in" fo:border="0.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6.925in" style:rel-column-width="65535*"/>
    </style:style>
    <style:style style:name="Table24.A1" style:family="table-cell">
      <style:table-cell-properties fo:padding="0.0382in" fo:border="0.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6.925in" style:rel-column-width="65535*"/>
    </style:style>
    <style:style style:name="Table25.A1" style:family="table-cell">
      <style:table-cell-properties fo:padding="0.0382in" fo:border="0.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6.925in" style:rel-column-width="65535*"/>
    </style:style>
    <style:style style:name="Table26.A1" style:family="table-cell">
      <style:table-cell-properties fo:padding="0.0382in" fo:border="0.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6.925in" style:rel-column-width="65535*"/>
    </style:style>
    <style:style style:name="Table27.A1" style:family="table-cell">
      <style:table-cell-properties fo:padding="0.0382in" fo:border="0.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6.925in" style:rel-column-width="65535*"/>
    </style:style>
    <style:style style:name="Table28.A1" style:family="table-cell">
      <style:table-cell-properties fo:padding="0.0382in" fo:border="0.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padding="0.0382in" fo:border="0.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padding="0.0382in" fo:border="0.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padding="0.0382in" fo:border="0.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6.925in" style:rel-column-width="65535*"/>
    </style:style>
    <style:style style:name="Table18.A1" style:family="table-cell">
      <style:table-cell-properties fo:padding="0.0382in" fo:border="0.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6.925in" style:rel-column-width="65535*"/>
    </style:style>
    <style:style style:name="Table19.A1" style:family="table-cell">
      <style:table-cell-properties fo:padding="0.0382in" fo:border="0.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925in" style:rel-column-width="65535*"/>
    </style:style>
    <style:style style:name="Table20.A1" style:family="table-cell">
      <style:table-cell-properties fo:padding="0.0382in" fo:border="0.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6.925in" style:rel-column-width="65535*"/>
    </style:style>
    <style:style style:name="Table29.A1" style:family="table-cell">
      <style:table-cell-properties fo:padding="0.0382in" fo:border="0.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6.925in" style:rel-column-width="65535*"/>
    </style:style>
    <style:style style:name="Table30.A1" style:family="table-cell">
      <style:table-cell-properties fo:padding="0.0382in" fo:border="0.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6.925in" style:rel-column-width="65535*"/>
    </style:style>
    <style:style style:name="Table31.A1" style:family="table-cell">
      <style:table-cell-properties fo:padding="0.0382in" fo:border="0.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6.925in" style:rel-column-width="65535*"/>
    </style:style>
    <style:style style:name="Table32.A1" style:family="table-cell">
      <style:table-cell-properties fo:padding="0.0382in" fo:border="0.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6.925in" style:rel-column-width="65535*"/>
    </style:style>
    <style:style style:name="Table33.A1" style:family="table-cell">
      <style:table-cell-properties fo:padding="0.0382in" fo:border="0.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6.925in" style:rel-column-width="65535*"/>
    </style:style>
    <style:style style:name="Table34.A1" style:family="table-cell">
      <style:table-cell-properties fo:padding="0.0382in" fo:border="0.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6.925in" style:rel-column-width="65535*"/>
    </style:style>
    <style:style style:name="Table35.A1" style:family="table-cell">
      <style:table-cell-properties fo:padding="0.0382in" fo:border="0.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6.925in" style:rel-column-width="65535*"/>
    </style:style>
    <style:style style:name="Table36.A1" style:family="table-cell">
      <style:table-cell-properties fo:padding="0.0382in" fo:border="0.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6.925in" style:rel-column-width="65535*"/>
    </style:style>
    <style:style style:name="Table37.A1" style:family="table-cell">
      <style:table-cell-properties fo:padding="0.0382in" fo:border="0.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6.925in" style:rel-column-width="65535*"/>
    </style:style>
    <style:style style:name="Table38.A1" style:family="table-cell">
      <style:table-cell-properties fo:padding="0.0382in" fo:border="0.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6.925in" style:rel-column-width="65535*"/>
    </style:style>
    <style:style style:name="Table39.A1" style:family="table-cell">
      <style:table-cell-properties fo:padding="0.0382in" fo:border="0.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6.925in" style:rel-column-width="65535*"/>
    </style:style>
    <style:style style:name="Table40.A1" style:family="table-cell">
      <style:table-cell-properties fo:padding="0.0382in" fo:border="0.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6.925in" style:rel-column-width="65535*"/>
    </style:style>
    <style:style style:name="Table41.A1" style:family="table-cell">
      <style:table-cell-properties fo:padding="0.0382in" fo:border="0.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6.925in" style:rel-column-width="65535*"/>
    </style:style>
    <style:style style:name="Table42.A1" style:family="table-cell">
      <style:table-cell-properties fo:padding="0.0382in" fo:border="0.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6.925in" style:rel-column-width="65535*"/>
    </style:style>
    <style:style style:name="Table43.A1" style:family="table-cell">
      <style:table-cell-properties fo:padding="0.0382in" fo:border="0.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6.925in" style:rel-column-width="65535*"/>
    </style:style>
    <style:style style:name="Table44.A1" style:family="table-cell">
      <style:table-cell-properties fo:padding="0.0382in" fo:border="0.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6.925in" style:rel-column-width="65535*"/>
    </style:style>
    <style:style style:name="Table45.A1" style:family="table-cell">
      <style:table-cell-properties fo:padding="0.0382in" fo:border="0.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6.925in" style:rel-column-width="65535*"/>
    </style:style>
    <style:style style:name="Table46.A1" style:family="table-cell">
      <style:table-cell-properties fo:padding="0.0382in" fo:border="0.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6.925in" style:rel-column-width="65535*"/>
    </style:style>
    <style:style style:name="Table47.A1" style:family="table-cell">
      <style:table-cell-properties fo:padding="0.0382in" fo:border="0.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6.925in" style:rel-column-width="65535*"/>
    </style:style>
    <style:style style:name="Table48.A1" style:family="table-cell">
      <style:table-cell-properties fo:padding="0.0382in" fo:border="0.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6.925in" style:rel-column-width="65535*"/>
    </style:style>
    <style:style style:name="Table49.A1" style:family="table-cell">
      <style:table-cell-properties fo:padding="0.0382in" fo:border="0.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6.925in" style:rel-column-width="65535*"/>
    </style:style>
    <style:style style:name="Table50.A1" style:family="table-cell">
      <style:table-cell-properties fo:padding="0.0382in" fo:border="0.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6.925in" style:rel-column-width="65535*"/>
    </style:style>
    <style:style style:name="Table51.A1" style:family="table-cell">
      <style:table-cell-properties fo:padding="0.0382in" fo:border="0.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6.925in" style:rel-column-width="65535*"/>
    </style:style>
    <style:style style:name="Table52.A1" style:family="table-cell">
      <style:table-cell-properties fo:padding="0.0382in" fo:border="0.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6.925in" style:rel-column-width="65535*"/>
    </style:style>
    <style:style style:name="Table53.A1" style:family="table-cell">
      <style:table-cell-properties fo:padding="0.0382in" fo:border="0.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6.925in" style:rel-column-width="65535*"/>
    </style:style>
    <style:style style:name="Table54.A1" style:family="table-cell">
      <style:table-cell-properties fo:padding="0.0382in" fo:border="0.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6.925in" style:rel-column-width="65535*"/>
    </style:style>
    <style:style style:name="Table55.A1" style:family="table-cell">
      <style:table-cell-properties fo:padding="0.0382in" fo:border="0.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6.925in" style:rel-column-width="65535*"/>
    </style:style>
    <style:style style:name="Table56.A1" style:family="table-cell">
      <style:table-cell-properties fo:padding="0.0382in" fo:border="0.5pt solid #000000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6.925in" style:rel-column-width="65535*"/>
    </style:style>
    <style:style style:name="Table57.A1" style:family="table-cell">
      <style:table-cell-properties fo:padding="0.0382in" fo:border="0.5pt solid #000000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6.925in" style:rel-column-width="65535*"/>
    </style:style>
    <style:style style:name="Table58.A1" style:family="table-cell">
      <style:table-cell-properties fo:padding="0.0382in" fo:border="0.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6.925in" style:rel-column-width="65535*"/>
    </style:style>
    <style:style style:name="Table59.A1" style:family="table-cell">
      <style:table-cell-properties fo:padding="0.0382in" fo:border="0.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6.925in" style:rel-column-width="65535*"/>
    </style:style>
    <style:style style:name="Table60.A1" style:family="table-cell">
      <style:table-cell-properties fo:padding="0.0382in" fo:border="0.5pt solid #000000"/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6.925in" style:rel-column-width="65535*"/>
    </style:style>
    <style:style style:name="Table61.A1" style:family="table-cell">
      <style:table-cell-properties fo:padding="0.0382in" fo:border="0.5pt solid #000000"/>
    </style:style>
    <style:style style:name="Table62" style:family="table">
      <style:table-properties style:width="6.925in" table:align="margins"/>
    </style:style>
    <style:style style:name="Table62.A" style:family="table-column">
      <style:table-column-properties style:column-width="6.925in" style:rel-column-width="65535*"/>
    </style:style>
    <style:style style:name="Table62.A1" style:family="table-cell">
      <style:table-cell-properties fo:padding="0.0382in" fo:border="0.5pt solid #000000"/>
    </style:style>
    <style:style style:name="Table63" style:family="table">
      <style:table-properties style:width="6.925in" table:align="margins"/>
    </style:style>
    <style:style style:name="Table63.A" style:family="table-column">
      <style:table-column-properties style:column-width="6.925in" style:rel-column-width="65535*"/>
    </style:style>
    <style:style style:name="Table63.A1" style:family="table-cell">
      <style:table-cell-properties fo:padding="0.0382in" fo:border="0.5pt solid #000000"/>
    </style:style>
    <style:style style:name="Table64" style:family="table">
      <style:table-properties style:width="6.925in" table:align="margins"/>
    </style:style>
    <style:style style:name="Table64.A" style:family="table-column">
      <style:table-column-properties style:column-width="6.925in" style:rel-column-width="65535*"/>
    </style:style>
    <style:style style:name="Table64.A1" style:family="table-cell">
      <style:table-cell-properties fo:padding="0.0382in" fo:border="0.5pt solid #000000"/>
    </style:style>
    <style:style style:name="Table65" style:family="table">
      <style:table-properties style:width="6.925in" table:align="margins"/>
    </style:style>
    <style:style style:name="Table65.A" style:family="table-column">
      <style:table-column-properties style:column-width="6.925in" style:rel-column-width="65535*"/>
    </style:style>
    <style:style style:name="Table65.A1" style:family="table-cell">
      <style:table-cell-properties fo:padding="0.0382in" fo:border="0.5pt solid #000000"/>
    </style:style>
    <style:style style:name="Table66" style:family="table">
      <style:table-properties style:width="6.925in" table:align="margins"/>
    </style:style>
    <style:style style:name="Table66.A" style:family="table-column">
      <style:table-column-properties style:column-width="6.925in" style:rel-column-width="65535*"/>
    </style:style>
    <style:style style:name="Table66.A1" style:family="table-cell">
      <style:table-cell-properties fo:padding="0.0382in" fo:border="0.5pt solid #000000"/>
    </style:style>
    <style:style style:name="Table67" style:family="table">
      <style:table-properties style:width="6.925in" table:align="margins"/>
    </style:style>
    <style:style style:name="Table67.A" style:family="table-column">
      <style:table-column-properties style:column-width="6.925in" style:rel-column-width="65535*"/>
    </style:style>
    <style:style style:name="Table67.A1" style:family="table-cell">
      <style:table-cell-properties fo:padding="0.0382in" fo:border="0.5pt solid #000000"/>
    </style:style>
    <style:style style:name="Table68" style:family="table">
      <style:table-properties style:width="6.925in" table:align="margins"/>
    </style:style>
    <style:style style:name="Table68.A" style:family="table-column">
      <style:table-column-properties style:column-width="6.925in" style:rel-column-width="65535*"/>
    </style:style>
    <style:style style:name="Table68.A1" style:family="table-cell">
      <style:table-cell-properties fo:padding="0.0382in" fo:border="0.5pt solid #000000"/>
    </style:style>
    <style:style style:name="Table69" style:family="table">
      <style:table-properties style:width="6.925in" table:align="margins"/>
    </style:style>
    <style:style style:name="Table69.A" style:family="table-column">
      <style:table-column-properties style:column-width="6.925in" style:rel-column-width="65535*"/>
    </style:style>
    <style:style style:name="Table69.A1" style:family="table-cell">
      <style:table-cell-properties fo:padding="0.0382in" fo:border="0.5pt solid #000000"/>
    </style:style>
    <style:style style:name="Table70" style:family="table">
      <style:table-properties style:width="6.925in" table:align="margins"/>
    </style:style>
    <style:style style:name="Table70.A" style:family="table-column">
      <style:table-column-properties style:column-width="6.925in" style:rel-column-width="65535*"/>
    </style:style>
    <style:style style:name="Table70.A1" style:family="table-cell">
      <style:table-cell-properties fo:padding="0.0382in" fo:border="0.5pt solid #000000"/>
    </style:style>
    <style:style style:name="Table71" style:family="table">
      <style:table-properties style:width="6.925in" table:align="margins"/>
    </style:style>
    <style:style style:name="Table71.A" style:family="table-column">
      <style:table-column-properties style:column-width="6.925in" style:rel-column-width="65535*"/>
    </style:style>
    <style:style style:name="Table71.A1" style:family="table-cell">
      <style:table-cell-properties fo:padding="0.0382in" fo:border="0.5pt solid #000000"/>
    </style:style>
    <style:style style:name="Table72" style:family="table">
      <style:table-properties style:width="6.925in" table:align="margins"/>
    </style:style>
    <style:style style:name="Table72.A" style:family="table-column">
      <style:table-column-properties style:column-width="6.925in" style:rel-column-width="65535*"/>
    </style:style>
    <style:style style:name="Table72.A1" style:family="table-cell">
      <style:table-cell-properties fo:padding="0.0382in" fo:border="0.5pt solid #000000"/>
    </style:style>
    <style:style style:name="Table73" style:family="table">
      <style:table-properties style:width="6.925in" table:align="margins"/>
    </style:style>
    <style:style style:name="Table73.A" style:family="table-column">
      <style:table-column-properties style:column-width="6.925in" style:rel-column-width="65535*"/>
    </style:style>
    <style:style style:name="Table73.A1" style:family="table-cell">
      <style:table-cell-properties fo:padding="0.0382in" fo:border="0.5pt solid #000000"/>
    </style:style>
    <style:style style:name="Table74" style:family="table">
      <style:table-properties style:width="6.925in" table:align="margins"/>
    </style:style>
    <style:style style:name="Table74.A" style:family="table-column">
      <style:table-column-properties style:column-width="6.925in" style:rel-column-width="65535*"/>
    </style:style>
    <style:style style:name="Table74.A1" style:family="table-cell">
      <style:table-cell-properties fo:padding="0.0382in" fo:border="0.5pt solid #000000"/>
    </style:style>
    <style:style style:name="Table75" style:family="table">
      <style:table-properties style:width="6.925in" table:align="margins"/>
    </style:style>
    <style:style style:name="Table75.A" style:family="table-column">
      <style:table-column-properties style:column-width="6.925in" style:rel-column-width="65535*"/>
    </style:style>
    <style:style style:name="Table75.A1" style:family="table-cell">
      <style:table-cell-properties fo:padding="0.0382in" fo:border="0.5pt solid #000000"/>
    </style:style>
    <style:style style:name="Table76" style:family="table">
      <style:table-properties style:width="6.925in" table:align="margins"/>
    </style:style>
    <style:style style:name="Table76.A" style:family="table-column">
      <style:table-column-properties style:column-width="6.925in" style:rel-column-width="65535*"/>
    </style:style>
    <style:style style:name="Table76.A1" style:family="table-cell">
      <style:table-cell-properties fo:padding="0.0382in" fo:border="0.5pt solid #000000"/>
    </style:style>
    <style:style style:name="Table77" style:family="table">
      <style:table-properties style:width="6.925in" table:align="margins"/>
    </style:style>
    <style:style style:name="Table77.A" style:family="table-column">
      <style:table-column-properties style:column-width="6.925in" style:rel-column-width="65535*"/>
    </style:style>
    <style:style style:name="Table77.A1" style:family="table-cell">
      <style:table-cell-properties fo:padding="0.0382in" fo:border="0.5pt solid #000000"/>
    </style:style>
    <style:style style:name="Table78" style:family="table">
      <style:table-properties style:width="6.925in" table:align="margins"/>
    </style:style>
    <style:style style:name="Table78.A" style:family="table-column">
      <style:table-column-properties style:column-width="6.925in" style:rel-column-width="65535*"/>
    </style:style>
    <style:style style:name="Table78.A1" style:family="table-cell">
      <style:table-cell-properties fo:padding="0.0382in" fo:border="0.5pt solid #000000"/>
    </style:style>
    <style:style style:name="Table79" style:family="table">
      <style:table-properties style:width="6.925in" table:align="margins"/>
    </style:style>
    <style:style style:name="Table79.A" style:family="table-column">
      <style:table-column-properties style:column-width="6.925in" style:rel-column-width="65535*"/>
    </style:style>
    <style:style style:name="Table79.A1" style:family="table-cell">
      <style:table-cell-properties fo:padding="0.0382in" fo:border="0.5pt solid #000000"/>
    </style:style>
    <style:style style:name="Table80" style:family="table">
      <style:table-properties style:width="6.925in" table:align="margins"/>
    </style:style>
    <style:style style:name="Table80.A" style:family="table-column">
      <style:table-column-properties style:column-width="6.925in" style:rel-column-width="65535*"/>
    </style:style>
    <style:style style:name="Table80.A1" style:family="table-cell">
      <style:table-cell-properties fo:padding="0.0382in" fo:border="0.5pt solid #000000"/>
    </style:style>
    <style:style style:name="Table84" style:family="table">
      <style:table-properties style:width="6.925in" table:align="margins"/>
    </style:style>
    <style:style style:name="Table84.A" style:family="table-column">
      <style:table-column-properties style:column-width="6.925in" style:rel-column-width="65535*"/>
    </style:style>
    <style:style style:name="Table84.A1" style:family="table-cell">
      <style:table-cell-properties fo:padding="0.0382in" fo:border="0.5pt solid #000000"/>
    </style:style>
    <style:style style:name="Table85" style:family="table">
      <style:table-properties style:width="6.925in" table:align="margins"/>
    </style:style>
    <style:style style:name="Table85.A" style:family="table-column">
      <style:table-column-properties style:column-width="6.925in" style:rel-column-width="65535*"/>
    </style:style>
    <style:style style:name="Table85.A1" style:family="table-cell">
      <style:table-cell-properties fo:padding="0.0382in" fo:border="0.5pt solid #000000"/>
    </style:style>
    <style:style style:name="Table86" style:family="table">
      <style:table-properties style:width="6.925in" table:align="margins"/>
    </style:style>
    <style:style style:name="Table86.A" style:family="table-column">
      <style:table-column-properties style:column-width="6.925in" style:rel-column-width="65535*"/>
    </style:style>
    <style:style style:name="Table86.A1" style:family="table-cell">
      <style:table-cell-properties fo:padding="0.0382in" fo:border="0.5pt solid #000000"/>
    </style:style>
    <style:style style:name="Table87" style:family="table">
      <style:table-properties style:width="6.925in" table:align="margins"/>
    </style:style>
    <style:style style:name="Table87.A" style:family="table-column">
      <style:table-column-properties style:column-width="6.925in" style:rel-column-width="65535*"/>
    </style:style>
    <style:style style:name="Table87.A1" style:family="table-cell">
      <style:table-cell-properties fo:padding="0.0382in" fo:border="0.5pt solid #000000"/>
    </style:style>
    <style:style style:name="Table88" style:family="table">
      <style:table-properties style:width="6.925in" table:align="margins"/>
    </style:style>
    <style:style style:name="Table88.A" style:family="table-column">
      <style:table-column-properties style:column-width="6.925in" style:rel-column-width="65535*"/>
    </style:style>
    <style:style style:name="Table88.A1" style:family="table-cell">
      <style:table-cell-properties fo:padding="0.0382in" fo:border="0.5pt solid #000000"/>
    </style:style>
    <style:style style:name="Table89" style:family="table">
      <style:table-properties style:width="6.925in" table:align="margins"/>
    </style:style>
    <style:style style:name="Table89.A" style:family="table-column">
      <style:table-column-properties style:column-width="6.925in" style:rel-column-width="65535*"/>
    </style:style>
    <style:style style:name="Table89.A1" style:family="table-cell">
      <style:table-cell-properties fo:padding="0.0382in" fo:border="0.5pt solid #000000"/>
    </style:style>
    <style:style style:name="Table90" style:family="table">
      <style:table-properties style:width="6.925in" table:align="margins"/>
    </style:style>
    <style:style style:name="Table90.A" style:family="table-column">
      <style:table-column-properties style:column-width="6.925in" style:rel-column-width="65535*"/>
    </style:style>
    <style:style style:name="Table90.A1" style:family="table-cell">
      <style:table-cell-properties fo:padding="0.0382in" fo:border="0.5pt solid #000000"/>
    </style:style>
    <style:style style:name="Table91" style:family="table">
      <style:table-properties style:width="6.925in" table:align="margins"/>
    </style:style>
    <style:style style:name="Table91.A" style:family="table-column">
      <style:table-column-properties style:column-width="6.925in" style:rel-column-width="65535*"/>
    </style:style>
    <style:style style:name="Table91.A1" style:family="table-cell">
      <style:table-cell-properties fo:padding="0.0382in" fo:border="0.5pt solid #000000"/>
    </style:style>
    <style:style style:name="P1" style:family="paragraph" style:parent-style-name="Text_20_body">
      <style:paragraph-properties fo:margin-top="0in" fo:margin-bottom="0.0575in" style:contextual-spacing="false" fo:text-align="center" style:justify-single-word="false"/>
      <style:text-properties officeooo:paragraph-rsid="001a92af"/>
    </style:style>
    <style:style style:name="P2" style:family="paragraph" style:parent-style-name="Title">
      <style:text-properties fo:font-size="26pt" style:font-size-asian="26pt" style:font-size-complex="26pt"/>
    </style:style>
    <style:style style:name="P3" style:family="paragraph" style:parent-style-name="Text_20_body">
      <style:paragraph-properties fo:text-align="center" style:justify-single-word="false"/>
      <style:text-properties officeooo:paragraph-rsid="0013eb52"/>
    </style:style>
    <style:style style:name="P4" style:family="paragraph" style:parent-style-name="Text_20_body">
      <style:paragraph-properties fo:text-align="center" style:justify-single-word="false"/>
      <style:text-properties officeooo:rsid="0013eb52" officeooo:paragraph-rsid="0013eb52"/>
    </style:style>
    <style:style style:name="P5" style:family="paragraph" style:parent-style-name="Text_20_body">
      <style:paragraph-properties fo:text-align="center" style:justify-single-word="false"/>
      <style:text-properties style:font-name="Liberation Sans" fo:font-size="16pt" officeooo:rsid="0016f020" officeooo:paragraph-rsid="0016f020" style:font-size-asian="16pt" style:font-size-complex="16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  <style:text-properties style:font-name="Liberation Sans" fo:font-size="18.2000007629395pt" fo:font-weight="bold" officeooo:rsid="079a3640" officeooo:paragraph-rsid="079a3640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10" style:family="paragraph" style:parent-style-name="Heading_20_2">
      <style:text-properties officeooo:rsid="079fe1f2" officeooo:paragraph-rsid="079fe1f2"/>
    </style:style>
    <style:style style:name="P11" style:family="paragraph" style:parent-style-name="Text_20_body">
      <style:text-properties officeooo:rsid="079ff7ba" officeooo:paragraph-rsid="079ff7ba"/>
    </style:style>
    <style:style style:name="P12" style:family="paragraph" style:parent-style-name="Table_20_Contents">
      <style:text-properties fo:font-weight="bold" officeooo:rsid="079b53d1" officeooo:paragraph-rsid="079b53d1" style:font-weight-asian="bold" style:font-weight-complex="bold"/>
    </style:style>
    <style:style style:name="P13" style:family="paragraph" style:parent-style-name="Table_20_Contents">
      <style:text-properties officeooo:rsid="079b53d1" officeooo:paragraph-rsid="079b53d1"/>
    </style:style>
    <style:style style:name="P14" style:family="paragraph" style:parent-style-name="Heading_20_2">
      <style:text-properties officeooo:rsid="079b53d1" officeooo:paragraph-rsid="079b53d1"/>
    </style:style>
    <style:style style:name="P15" style:family="paragraph" style:parent-style-name="Table_20_Contents">
      <style:text-properties officeooo:rsid="079b53d1" officeooo:paragraph-rsid="079b96af"/>
    </style:style>
    <style:style style:name="P16" style:family="paragraph" style:parent-style-name="Table_20_Contents">
      <style:text-properties officeooo:rsid="079b96af" officeooo:paragraph-rsid="079b96af"/>
    </style:style>
    <style:style style:name="P17" style:family="paragraph" style:parent-style-name="Table_20_Contents">
      <style:text-properties officeooo:rsid="07b689c9" officeooo:paragraph-rsid="07b689c9"/>
    </style:style>
    <style:style style:name="P18" style:family="paragraph" style:parent-style-name="Table_20_Contents">
      <style:text-properties officeooo:rsid="07b5b2b0" officeooo:paragraph-rsid="07b5b2b0"/>
    </style:style>
    <style:style style:name="P19" style:family="paragraph" style:parent-style-name="Table_20_Contents">
      <style:text-properties fo:font-weight="bold" officeooo:rsid="079fe1f2" officeooo:paragraph-rsid="079fe1f2" style:font-weight-asian="bold" style:font-weight-complex="bold"/>
    </style:style>
    <style:style style:name="P20" style:family="paragraph" style:parent-style-name="Table_20_Contents">
      <style:text-properties officeooo:rsid="079fe1f2" officeooo:paragraph-rsid="079fe1f2"/>
    </style:style>
    <style:style style:name="P21" style:family="paragraph" style:parent-style-name="Heading_20_1">
      <style:text-properties style:font-name="Liberation Sans" fo:font-size="18.2000007629395pt" fo:font-weight="bold" officeooo:rsid="07ebd70f" officeooo:paragraph-rsid="07ebd70f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22" style:family="paragraph" style:parent-style-name="Heading_20_2">
      <style:text-properties officeooo:paragraph-rsid="07926796"/>
    </style:style>
    <style:style style:name="P23" style:family="paragraph" style:parent-style-name="Text_20_body">
      <style:text-properties officeooo:paragraph-rsid="07926796"/>
    </style:style>
    <style:style style:name="P24" style:family="paragraph" style:parent-style-name="Table_20_Contents">
      <style:text-properties style:font-name="Cascadia Code Light" officeooo:paragraph-rsid="07926796"/>
    </style:style>
    <style:style style:name="P25" style:family="paragraph" style:parent-style-name="Text_20_body">
      <style:text-properties officeooo:paragraph-rsid="07ebd70f"/>
    </style:style>
    <style:style style:name="P26" style:family="paragraph" style:parent-style-name="Text_20_body">
      <style:text-properties style:font-name="Liberation Sans" fo:font-size="18.2000007629395pt" fo:font-weight="bold" officeooo:rsid="07c07f1c" officeooo:paragraph-rsid="07926796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27" style:family="paragraph" style:parent-style-name="Heading_20_1">
      <style:text-properties style:font-name="Liberation Sans" fo:font-size="18.2000007629395pt" fo:font-weight="bold" officeooo:rsid="07ebd70f" officeooo:paragraph-rsid="07ed92f9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28" style:family="paragraph" style:parent-style-name="Heading_20_2">
      <style:text-properties officeooo:paragraph-rsid="07ed92f9"/>
    </style:style>
    <style:style style:name="P29" style:family="paragraph" style:parent-style-name="Text_20_body">
      <style:text-properties officeooo:paragraph-rsid="07ed92f9"/>
    </style:style>
    <style:style style:name="P30" style:family="paragraph" style:parent-style-name="Table_20_Contents">
      <style:text-properties style:font-name="Cascadia Code Light" officeooo:paragraph-rsid="07ed92f9"/>
    </style:style>
    <style:style style:name="P31" style:family="paragraph" style:parent-style-name="Text_20_body">
      <style:text-properties officeooo:paragraph-rsid="07edde34"/>
    </style:style>
    <style:style style:name="P32" style:family="paragraph" style:parent-style-name="Text_20_body">
      <style:text-properties style:font-name="Liberation Sans" fo:font-size="18.2000007629395pt" fo:font-weight="bold" officeooo:rsid="07c07f1c" officeooo:paragraph-rsid="07ed92f9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33" style:family="paragraph" style:parent-style-name="Table_20_Contents">
      <style:text-properties style:font-name="Cascadia Code Light" officeooo:paragraph-rsid="07edde34"/>
    </style:style>
    <style:style style:name="P34" style:family="paragraph" style:parent-style-name="Text_20_body">
      <style:text-properties officeooo:paragraph-rsid="07efd5ae"/>
    </style:style>
    <style:style style:name="P35" style:family="paragraph" style:parent-style-name="Text_20_body">
      <style:text-properties officeooo:paragraph-rsid="07f10841"/>
    </style:style>
    <style:style style:name="P36" style:family="paragraph" style:parent-style-name="Text_20_body">
      <style:text-properties officeooo:paragraph-rsid="07f1ba8d"/>
    </style:style>
    <style:style style:name="P37" style:family="paragraph" style:parent-style-name="Text_20_body">
      <style:text-properties officeooo:paragraph-rsid="07f3894e"/>
    </style:style>
    <style:style style:name="P38" style:family="paragraph" style:parent-style-name="Text_20_body">
      <style:text-properties officeooo:paragraph-rsid="07f45d48"/>
    </style:style>
    <style:style style:name="T1" style:family="text">
      <style:text-properties style:font-name="Liberation Sans" fo:font-size="16pt" fo:language="zxx" fo:country="none" officeooo:rsid="0748aed8" style:font-size-asian="16pt" style:language-asian="zxx" style:country-asian="none" style:font-size-complex="16pt" style:language-complex="zxx" style:country-complex="none"/>
    </style:style>
    <style:style style:name="T2" style:family="text">
      <style:text-properties officeooo:rsid="079ff7ba"/>
    </style:style>
    <style:style style:name="T3" style:family="text">
      <style:text-properties officeooo:rsid="079b96af"/>
    </style:style>
    <style:style style:name="T4" style:family="text">
      <style:text-properties officeooo:rsid="079a3640"/>
    </style:style>
    <style:style style:name="T5" style:family="text">
      <style:text-properties officeooo:rsid="078b70a3"/>
    </style:style>
    <style:style style:name="T6" style:family="text">
      <style:text-properties style:font-name="Liberation Sans" officeooo:rsid="078bff70"/>
    </style:style>
    <style:style style:name="T7" style:family="text">
      <style:text-properties fo:font-weight="normal" officeooo:rsid="078bff70" style:font-weight-asian="normal" style:font-weight-complex="normal"/>
    </style:style>
    <style:style style:name="T8" style:family="text">
      <style:text-properties fo:font-style="italic" style:text-underline-style="solid" style:text-underline-width="auto" style:text-underline-color="font-color" fo:font-weight="bold" officeooo:rsid="078bff70" style:font-style-asian="italic" style:font-weight-asian="bold" style:font-style-complex="italic" style:font-weight-complex="bold"/>
    </style:style>
    <style:style style:name="T9" style:family="text">
      <style:text-properties fo:font-weight="normal" officeooo:rsid="07ebd70f" style:font-weight-asian="normal" style:font-weight-complex="normal"/>
    </style:style>
    <style:style style:name="T10" style:family="text">
      <style:text-properties style:font-name="Liberation Sans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78bff70"/>
    </style:style>
    <style:style style:name="T13" style:family="text">
      <style:text-properties fo:font-weight="normal" officeooo:rsid="078c4a89" style:font-weight-asian="normal" style:font-weight-complex="normal"/>
    </style:style>
    <style:style style:name="T14" style:family="text">
      <style:text-properties fo:font-weight="normal" officeooo:rsid="07ebd70f" style:font-weight-asian="normal" style:language-complex="fa" style:country-complex="IR" style:font-weight-complex="normal"/>
    </style:style>
    <style:style style:name="T15" style:family="text">
      <style:text-properties officeooo:rsid="078c4a89"/>
    </style:style>
    <style:style style:name="T16" style:family="text">
      <style:text-properties fo:font-weight="normal" officeooo:rsid="078d4d60" style:font-weight-asian="normal" style:font-weight-complex="normal"/>
    </style:style>
    <style:style style:name="T17" style:family="text">
      <style:text-properties officeooo:rsid="07ed92f9"/>
    </style:style>
    <style:style style:name="T18" style:family="text">
      <style:text-properties fo:font-weight="normal" officeooo:rsid="07edde34" style:font-weight-asian="normal" style:font-weight-complex="normal"/>
    </style:style>
    <style:style style:name="T19" style:family="text">
      <style:text-properties fo:font-weight="normal" officeooo:rsid="07efd5ae" style:font-weight-asian="normal" style:font-weight-complex="normal"/>
    </style:style>
    <style:style style:name="T20" style:family="text">
      <style:text-properties fo:font-weight="normal" officeooo:rsid="07f10841" style:font-weight-asian="normal" style:font-weight-complex="normal"/>
    </style:style>
    <style:style style:name="T21" style:family="text">
      <style:text-properties fo:font-weight="normal" officeooo:rsid="07f1ba8d" style:font-weight-asian="normal" style:font-weight-complex="normal"/>
    </style:style>
    <style:style style:name="T22" style:family="text">
      <style:text-properties fo:font-weight="normal" officeooo:rsid="07f3894e" style:font-weight-asian="normal" style:font-weight-complex="normal"/>
    </style:style>
    <style:style style:name="T23" style:family="text">
      <style:text-properties fo:font-weight="normal" officeooo:rsid="07f45d48" style:font-weight-asian="normal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0041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.0&#10;&#10;" text:name="DocumentVersion"/>
      </text:user-field-decls>
      <text:p text:style-name="P1"><draw:frame draw:style-name="fr1" draw:name="Image1" text:anchor-type="char" svg:width="1.8839in" svg:height="1.8811in" draw:z-index="0"><draw:image xlink:href="Pictures/100000010000022600000226C86F0DDF.png" xlink:type="simple" xlink:show="embed" xlink:actuate="onLoad" draw:mime-type="image/png"/></draw:frame></text:p>
      <text:p text:style-name="Text_20_body"/>
      <text:p text:style-name="P2"><text:subject>API Specification for Evaluation</text:subject></text:p>
      <text:p text:style-name="P3"><text:span text:style-name="T1"/></text:p>
      <text:p text:style-name="P4"/>
      <text:p text:style-name="P4"/>
      <text:p text:style-name="P4"/>
      <text:p text:style-name="P4"/>
      <text:p text:style-name="P5">Document Version: <text:user-field-get text:name="DocumentVersion">1.0

</text:user-field-get></text:p>
      <text:p text:style-name="P5"/>
      <text:p text:style-name="P5"/>
      <text:p text:style-name="P5"/>
      <text:p text:style-name="P5"/>
      <text:p text:style-name="P5"/>
      <text:p text:style-name="P5"/>
      <text:p text:style-name="P5">Release Date: <text:date style:data-style-name="N10041" text:date-value="2026-06-05T17:22:12.213082630">June 5, 2026</text:date></text:p>
      <text:table-of-content text:style-name="Sect1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Contents</text:p>
          </text:index-title>
          <text:p text:style-name="P7"><text:a xlink:type="simple" xlink:href="#__RefHeading___Toc2526_3019299338" text:style-name="Index_20_Link" text:visited-style-name="Index_20_Link">1 Structure of Response<text:tab/>4</text:a></text:p>
          <text:p text:style-name="P8"><text:a xlink:type="simple" xlink:href="#__RefHeading___Toc2750_3019299338" text:style-name="Index_20_Link" text:visited-style-name="Index_20_Link">1.1 Status Codes<text:tab/>4</text:a></text:p>
          <text:p text:style-name="P8"><text:a xlink:type="simple" xlink:href="#__RefHeading___Toc2528_3019299338" text:style-name="Index_20_Link" text:visited-style-name="Index_20_Link">1.2 Statuses<text:tab/>4</text:a></text:p>
          <text:p text:style-name="P8"><text:a xlink:type="simple" xlink:href="#__RefHeading___Toc2530_3019299338" text:style-name="Index_20_Link" text:visited-style-name="Index_20_Link">1.3 Successful Messages<text:tab/>4</text:a></text:p>
          <text:p text:style-name="P8"><text:a xlink:type="simple" xlink:href="#__RefHeading___Toc255_2732334432" text:style-name="Index_20_Link" text:visited-style-name="Index_20_Link">1.4 Format of Response<text:tab/>4</text:a></text:p>
          <text:p text:style-name="P7"><text:a xlink:type="simple" xlink:href="#__RefHeading___Toc227_771010674%20Copy%201" text:style-name="Index_20_Link" text:visited-style-name="Index_20_Link">2 Question<text:tab/>5</text:a></text:p>
          <text:p text:style-name="P8"><text:a xlink:type="simple" xlink:href="#__RefHeading___Toc908_3206075736%20Copy%201%20Copy%201" text:style-name="Index_20_Link" text:visited-style-name="Index_20_Link">2.1 Delete<text:tab/>5</text:a></text:p>
          <text:p text:style-name="P8"><text:a xlink:type="simple" xlink:href="#__RefHeading___Toc2079_720390006%20Copy%201" text:style-name="Index_20_Link" text:visited-style-name="Index_20_Link">2.2 Active<text:tab/>5</text:a></text:p>
          <text:p text:style-name="P8"><text:a xlink:type="simple" xlink:href="#__RefHeading___Toc2083_720390006%20Copy%201" text:style-name="Index_20_Link" text:visited-style-name="Index_20_Link">2.3 Inactive<text:tab/>6</text:a></text:p>
          <text:p text:style-name="P8"><text:a xlink:type="simple" xlink:href="#__RefHeading___Toc2085_720390006%20Copy%201" text:style-name="Index_20_Link" text:visited-style-name="Index_20_Link">2.4 Fetch Specific Record<text:tab/>6</text:a></text:p>
          <text:p text:style-name="P7"><text:a xlink:type="simple" xlink:href="#__RefHeading___Toc227_771010674%20Copy%201%20Copy%201" text:style-name="Index_20_Link" text:visited-style-name="Index_20_Link">3 Question Option<text:tab/>8</text:a></text:p>
          <text:p text:style-name="P8"><text:a xlink:type="simple" xlink:href="#__RefHeading___Toc908_3206075736%20Copy%201%20Copy%201%20Copy%201" text:style-name="Index_20_Link" text:visited-style-name="Index_20_Link">3.1 Delete<text:tab/>8</text:a></text:p>
          <text:p text:style-name="P8"><text:a xlink:type="simple" xlink:href="#__RefHeading___Toc2079_720390006%20Copy%201%20Copy%201" text:style-name="Index_20_Link" text:visited-style-name="Index_20_Link">3.2 Active<text:tab/>8</text:a></text:p>
          <text:p text:style-name="P8"><text:a xlink:type="simple" xlink:href="#__RefHeading___Toc2083_720390006%20Copy%201%20Copy%201" text:style-name="Index_20_Link" text:visited-style-name="Index_20_Link">3.3 Inactive<text:tab/>9</text:a></text:p>
          <text:p text:style-name="P8"><text:a xlink:type="simple" xlink:href="#__RefHeading___Toc2085_720390006%20Copy%201%20Copy%201" text:style-name="Index_20_Link" text:visited-style-name="Index_20_Link">3.4 Fetch Specific Record<text:tab/>9</text:a></text:p>
          <text:p text:style-name="P7"><text:a xlink:type="simple" xlink:href="#__RefHeading___Toc227_771010674%20Copy%201%20Copy%202" text:style-name="Index_20_Link" text:visited-style-name="Index_20_Link">4 Questionnaire<text:tab/>10</text:a></text:p>
          <text:p text:style-name="P8"><text:a xlink:type="simple" xlink:href="#__RefHeading___Toc908_3206075736%20Copy%201%20Copy%201%20Copy%202" text:style-name="Index_20_Link" text:visited-style-name="Index_20_Link">4.1 Delete<text:tab/>10</text:a></text:p>
          <text:p text:style-name="P8"><text:a xlink:type="simple" xlink:href="#__RefHeading___Toc2079_720390006%20Copy%201%20Copy%202" text:style-name="Index_20_Link" text:visited-style-name="Index_20_Link">4.2 Active<text:tab/>11</text:a></text:p>
          <text:p text:style-name="P8"><text:a xlink:type="simple" xlink:href="#__RefHeading___Toc2083_720390006%20Copy%201%20Copy%202" text:style-name="Index_20_Link" text:visited-style-name="Index_20_Link">4.3 Inactive<text:tab/>12</text:a></text:p>
          <text:p text:style-name="P8"><text:a xlink:type="simple" xlink:href="#__RefHeading___Toc2085_720390006%20Copy%201%20Copy%202" text:style-name="Index_20_Link" text:visited-style-name="Index_20_Link">4.4 Fetch Specific Record<text:tab/>12</text:a></text:p>
          <text:p text:style-name="P7"><text:a xlink:type="simple" xlink:href="#__RefHeading___Toc227_771010674%20Copy%201%20Copy%203" text:style-name="Index_20_Link" text:visited-style-name="Index_20_Link">5 Questionnaire Target Department<text:tab/>13</text:a></text:p>
          <text:p text:style-name="P8"><text:a xlink:type="simple" xlink:href="#__RefHeading___Toc908_3206075736%20Copy%201%20Copy%201%20Copy%203" text:style-name="Index_20_Link" text:visited-style-name="Index_20_Link">5.1 Delete<text:tab/>13</text:a></text:p>
          <text:p text:style-name="P8"><text:a xlink:type="simple" xlink:href="#__RefHeading___Toc2079_720390006%20Copy%201%20Copy%203" text:style-name="Index_20_Link" text:visited-style-name="Index_20_Link">5.2 Active<text:tab/>14</text:a></text:p>
          <text:p text:style-name="P8"><text:a xlink:type="simple" xlink:href="#__RefHeading___Toc2083_720390006%20Copy%201%20Copy%203" text:style-name="Index_20_Link" text:visited-style-name="Index_20_Link">5.3 Inactive<text:tab/>14</text:a></text:p>
          <text:p text:style-name="P8"><text:a xlink:type="simple" xlink:href="#__RefHeading___Toc2085_720390006%20Copy%201%20Copy%203" text:style-name="Index_20_Link" text:visited-style-name="Index_20_Link">5.4 Fetch Specific Record<text:tab/>15</text:a></text:p>
          <text:p text:style-name="P7"><text:a xlink:type="simple" xlink:href="#__RefHeading___Toc227_771010674%20Copy%201%20Copy%204" text:style-name="Index_20_Link" text:visited-style-name="Index_20_Link">6 Questionnaire Item<text:tab/>16</text:a></text:p>
          <text:p text:style-name="P8"><text:a xlink:type="simple" xlink:href="#__RefHeading___Toc908_3206075736%20Copy%201%20Copy%201%20Copy%204" text:style-name="Index_20_Link" text:visited-style-name="Index_20_Link">6.1 Delete<text:tab/>16</text:a></text:p>
          <text:p text:style-name="P8"><text:a xlink:type="simple" xlink:href="#__RefHeading___Toc2079_720390006%20Copy%201%20Copy%204" text:style-name="Index_20_Link" text:visited-style-name="Index_20_Link">6.2 Active<text:tab/>17</text:a></text:p>
          <text:p text:style-name="P8"><text:a xlink:type="simple" xlink:href="#__RefHeading___Toc2083_720390006%20Copy%201%20Copy%204" text:style-name="Index_20_Link" text:visited-style-name="Index_20_Link">6.3 Inactive<text:tab/>17</text:a></text:p>
          <text:p text:style-name="P8"><text:a xlink:type="simple" xlink:href="#__RefHeading___Toc2085_720390006%20Copy%201%20Copy%204" text:style-name="Index_20_Link" text:visited-style-name="Index_20_Link">6.4 Fetch Specific Record<text:tab/>18</text:a></text:p>
          <text:p text:style-name="P7"><text:a xlink:type="simple" xlink:href="#__RefHeading___Toc227_771010674%20Copy%201%20Copy%205" text:style-name="Index_20_Link" text:visited-style-name="Index_20_Link">7 Questionnaire Result<text:tab/>19</text:a></text:p>
          <text:p text:style-name="P8"><text:a xlink:type="simple" xlink:href="#__RefHeading___Toc908_3206075736%20Copy%201%20Copy%201%20Copy%205" text:style-name="Index_20_Link" text:visited-style-name="Index_20_Link">7.1 Delete<text:tab/>19</text:a></text:p>
          <text:p text:style-name="P8"><text:a xlink:type="simple" xlink:href="#__RefHeading___Toc2079_720390006%20Copy%201%20Copy%205" text:style-name="Index_20_Link" text:visited-style-name="Index_20_Link">7.2 Active<text:tab/>20</text:a></text:p>
          <text:p text:style-name="P8"><text:a xlink:type="simple" xlink:href="#__RefHeading___Toc2083_720390006%20Copy%201%20Copy%205" text:style-name="Index_20_Link" text:visited-style-name="Index_20_Link">7.3 Inactive<text:tab/>20</text:a></text:p>
          <text:p text:style-name="P8"><text:a xlink:type="simple" xlink:href="#__RefHeading___Toc2085_720390006%20Copy%201%20Copy%205" text:style-name="Index_20_Link" text:visited-style-name="Index_20_Link">7.4 Fetch Specific Record<text:tab/>21</text:a></text:p>
          <text:p text:style-name="P7"><text:a xlink:type="simple" xlink:href="#__RefHeading___Toc227_771010674%20Copy%201%20Copy%206" text:style-name="Index_20_Link" text:visited-style-name="Index_20_Link">8 Questionnaire Result Detail<text:tab/>22</text:a></text:p>
          <text:p text:style-name="P8"><text:a xlink:type="simple" xlink:href="#__RefHeading___Toc908_3206075736%20Copy%201%20Copy%201%20Copy%206" text:style-name="Index_20_Link" text:visited-style-name="Index_20_Link">8.1 Delete<text:tab/>22</text:a></text:p>
          <text:p text:style-name="P8"><text:a xlink:type="simple" xlink:href="#__RefHeading___Toc2079_720390006%20Copy%201%20Copy%206" text:style-name="Index_20_Link" text:visited-style-name="Index_20_Link">8.2 Active<text:tab/>22</text:a></text:p>
          <text:p text:style-name="P8"><text:a xlink:type="simple" xlink:href="#__RefHeading___Toc2083_720390006%20Copy%201%20Copy%206" text:style-name="Index_20_Link" text:visited-style-name="Index_20_Link">8.3 Inactive<text:tab/>23</text:a></text:p>
          <text:p text:style-name="P8"><text:a xlink:type="simple" xlink:href="#__RefHeading___Toc2085_720390006%20Copy%201%20Copy%206" text:style-name="Index_20_Link" text:visited-style-name="Index_20_Link">8.4 Fetch Specific Record<text:tab/>23</text:a></text:p>
          <text:p text:style-name="P7"><text:a xlink:type="simple" xlink:href="#__RefHeading___Toc227_771010674%20Copy%201%20Copy%207" text:style-name="Index_20_Link" text:visited-style-name="Index_20_Link">9 Staff Satisfaction Evaluation<text:tab/>25</text:a></text:p>
          <text:p text:style-name="P8"><text:a xlink:type="simple" xlink:href="#__RefHeading___Toc908_3206075736%20Copy%201%20Copy%201%20Copy%207" text:style-name="Index_20_Link" text:visited-style-name="Index_20_Link"><text:soft-page-break/>9.1 Delete<text:tab/>25</text:a></text:p>
          <text:p text:style-name="P8"><text:a xlink:type="simple" xlink:href="#__RefHeading___Toc2079_720390006%20Copy%201%20Copy%207" text:style-name="Index_20_Link" text:visited-style-name="Index_20_Link">9.2 Active<text:tab/>25</text:a></text:p>
          <text:p text:style-name="P8"><text:a xlink:type="simple" xlink:href="#__RefHeading___Toc2083_720390006%20Copy%201%20Copy%207" text:style-name="Index_20_Link" text:visited-style-name="Index_20_Link">9.3 Inactive<text:tab/>26</text:a></text:p>
          <text:p text:style-name="P8"><text:a xlink:type="simple" xlink:href="#__RefHeading___Toc2085_720390006%20Copy%201%20Copy%207" text:style-name="Index_20_Link" text:visited-style-name="Index_20_Link">9.4 Fetch Specific Record<text:tab/>26</text:a></text:p>
          <text:p text:style-name="P7"><text:a xlink:type="simple" xlink:href="#__RefHeading___Toc227_771010674%20Copy%201%20Copy%208" text:style-name="Index_20_Link" text:visited-style-name="Index_20_Link">10 Project Productivity Evaluation<text:tab/>28</text:a></text:p>
          <text:p text:style-name="P8"><text:a xlink:type="simple" xlink:href="#__RefHeading___Toc908_3206075736%20Copy%201%20Copy%201%20Copy%208" text:style-name="Index_20_Link" text:visited-style-name="Index_20_Link">10.1 Delete<text:tab/>28</text:a></text:p>
          <text:p text:style-name="P8"><text:a xlink:type="simple" xlink:href="#__RefHeading___Toc2079_720390006%20Copy%201%20Copy%208" text:style-name="Index_20_Link" text:visited-style-name="Index_20_Link">10.2 Active<text:tab/>28</text:a></text:p>
          <text:p text:style-name="P8"><text:a xlink:type="simple" xlink:href="#__RefHeading___Toc2083_720390006%20Copy%201%20Copy%208" text:style-name="Index_20_Link" text:visited-style-name="Index_20_Link">10.3 Inactive<text:tab/>29</text:a></text:p>
          <text:p text:style-name="P8"><text:a xlink:type="simple" xlink:href="#__RefHeading___Toc2085_720390006%20Copy%201%20Copy%208" text:style-name="Index_20_Link" text:visited-style-name="Index_20_Link">10.4 Fetch Specific Record<text:tab/>29</text:a></text:p>
          <text:p text:style-name="P7"><text:a xlink:type="simple" xlink:href="#__RefHeading___Toc227_771010674%20Copy%201%20Copy%209" text:style-name="Index_20_Link" text:visited-style-name="Index_20_Link">11 Customer Satisfaction Evaluation<text:tab/>30</text:a></text:p>
          <text:p text:style-name="P8"><text:a xlink:type="simple" xlink:href="#__RefHeading___Toc908_3206075736%20Copy%201%20Copy%201%20Copy%209" text:style-name="Index_20_Link" text:visited-style-name="Index_20_Link">11.1 Delete<text:tab/>30</text:a></text:p>
          <text:p text:style-name="P8"><text:a xlink:type="simple" xlink:href="#__RefHeading___Toc2079_720390006%20Copy%201%20Copy%209" text:style-name="Index_20_Link" text:visited-style-name="Index_20_Link">11.2 Active<text:tab/>31</text:a></text:p>
          <text:p text:style-name="P8"><text:a xlink:type="simple" xlink:href="#__RefHeading___Toc2083_720390006%20Copy%201%20Copy%209" text:style-name="Index_20_Link" text:visited-style-name="Index_20_Link">11.3 Inactive<text:tab/>32</text:a></text:p>
          <text:p text:style-name="P8"><text:a xlink:type="simple" xlink:href="#__RefHeading___Toc2085_720390006%20Copy%201%20Copy%209" text:style-name="Index_20_Link" text:visited-style-name="Index_20_Link">11.4 Fetch Specific Record<text:tab/>32</text:a></text:p>
          <text:p text:style-name="P7"><text:a xlink:type="simple" xlink:href="#__RefHeading___Toc227_771010674%20Copy%201%20Copy%2010" text:style-name="Index_20_Link" text:visited-style-name="Index_20_Link">12 Customer Feedback<text:tab/>33</text:a></text:p>
          <text:p text:style-name="P8"><text:a xlink:type="simple" xlink:href="#__RefHeading___Toc908_3206075736%20Copy%201%20Copy%201%20Copy%2010" text:style-name="Index_20_Link" text:visited-style-name="Index_20_Link">12.1 Delete<text:tab/>33</text:a></text:p>
          <text:p text:style-name="P8"><text:a xlink:type="simple" xlink:href="#__RefHeading___Toc2079_720390006%20Copy%201%20Copy%2010" text:style-name="Index_20_Link" text:visited-style-name="Index_20_Link">12.2 Active<text:tab/>34</text:a></text:p>
          <text:p text:style-name="P8"><text:a xlink:type="simple" xlink:href="#__RefHeading___Toc2083_720390006%20Copy%201%20Copy%2010" text:style-name="Index_20_Link" text:visited-style-name="Index_20_Link">12.3 Inactive<text:tab/>34</text:a></text:p>
          <text:p text:style-name="P8"><text:a xlink:type="simple" xlink:href="#__RefHeading___Toc2085_720390006%20Copy%201%20Copy%2010" text:style-name="Index_20_Link" text:visited-style-name="Index_20_Link">12.4 Fetch Specific Record<text:tab/>35</text:a></text:p>
        </text:index-body>
      </text:table-of-content>
      <text:h text:style-name="P9" text:outline-level="1"><text:bookmark-start text:name="__RefHeading___Toc2526_3019299338"/>Structure of Response<text:bookmark-end text:name="__RefHeading___Toc2526_3019299338"/></text:h>
      <text:h text:style-name="P10" text:outline-level="2"><text:bookmark-start text:name="__RefHeading___Toc2750_3019299338"/><text:span text:style-name="T2">Status</text:span> Codes<text:bookmark-end text:name="__RefHeading___Toc2750_3019299338"/></text:h>
      <text:p text:style-name="P11">All APIs in Horizon System follow the <text:a xlink:type="simple" xlink:href="https://en.wikipedia.org/wiki/List_of_HTTP_status_codes" text:style-name="Internet_20_link" text:visited-style-name="Visited_20_Internet_20_Link">List of HTTP status Code</text:a>.</text:p>
      <text:h text:style-name="Heading_20_2" text:outline-level="2"><text:bookmark-start text:name="__RefHeading___Toc2528_3019299338"/>Statuses<text:bookmark-end text:name="__RefHeading___Toc2528_3019299338"/></text:h>
      <table:table table:name="Table81" table:style-name="Table81">
        <table:table-column table:style-name="Table81.A"/>
        <table:table-column table:style-name="Table81.B"/>
        <table:table-column table:style-name="Table81.C"/>
        <table:table-row table:style-name="Table81.1">
          <table:table-cell table:style-name="Table81.A1" office:value-type="string">
            <text:p text:style-name="P12">No</text:p>
          </table:table-cell>
          <table:table-cell table:style-name="Table81.A1" office:value-type="string">
            <text:p text:style-name="P12">Status</text:p>
          </table:table-cell>
          <table:table-cell table:style-name="Table81.C1" office:value-type="string">
            <text:p text:style-name="P12">Description</text:p>
          </table:table-cell>
        </table:table-row>
        <table:table-row>
          <table:table-cell table:style-name="Table81.A2" office:value-type="string">
            <text:p text:style-name="P13">1</text:p>
          </table:table-cell>
          <table:table-cell table:style-name="Table81.B2" office:value-type="string">
            <text:p text:style-name="P13">success</text:p>
          </table:table-cell>
          <table:table-cell table:style-name="Table81.C2" office:value-type="string">
            <text:p text:style-name="P13">When the API returns successful result.</text:p>
          </table:table-cell>
        </table:table-row>
        <table:table-row table:style-name="Table81.3">
          <table:table-cell table:style-name="Table81.A3" office:value-type="string">
            <text:p text:style-name="P13">2</text:p>
          </table:table-cell>
          <table:table-cell table:style-name="Table81.B3" office:value-type="string">
            <text:p text:style-name="P13">error</text:p>
          </table:table-cell>
          <table:table-cell table:style-name="Table81.C3" office:value-type="string">
            <text:p text:style-name="P13">When the API returns fault result.</text:p>
          </table:table-cell>
        </table:table-row>
      </table:table>
      <text:p text:style-name="Text_20_body"/>
      <text:h text:style-name="P14" text:outline-level="2"><text:bookmark-start text:name="__RefHeading___Toc2530_3019299338"/>Successful Messages<text:bookmark-end text:name="__RefHeading___Toc2530_3019299338"/></text:h>
      <table:table table:name="Table82" table:style-name="Table82">
        <table:table-column table:style-name="Table82.A"/>
        <table:table-column table:style-name="Table82.B"/>
        <table:table-column table:style-name="Table82.C"/>
        <table:table-row>
          <table:table-cell table:style-name="Table82.A1" office:value-type="string">
            <text:p text:style-name="P12">No</text:p>
          </table:table-cell>
          <table:table-cell table:style-name="Table82.A1" office:value-type="string">
            <text:p text:style-name="P12">Messages</text:p>
          </table:table-cell>
          <table:table-cell table:style-name="Table82.C1" office:value-type="string">
            <text:p text:style-name="P12">Reason</text:p>
          </table:table-cell>
        </table:table-row>
        <table:table-row>
          <table:table-cell table:style-name="Table82.A2" office:value-type="string">
            <text:p text:style-name="P13">1</text:p>
          </table:table-cell>
          <table:table-cell table:style-name="Table82.B2" office:value-type="string">
            <text:p text:style-name="P13">The record is added successfully.</text:p>
          </table:table-cell>
          <table:table-cell table:style-name="Table82.C2" office:value-type="string">
            <text:p text:style-name="P13"><text:span text:style-name="T3">New Item</text:span> Insertion.</text:p>
          </table:table-cell>
        </table:table-row>
        <table:table-row>
          <table:table-cell table:style-name="Table82.A2" office:value-type="string">
            <text:p text:style-name="P13">2</text:p>
          </table:table-cell>
          <table:table-cell table:style-name="Table82.B3" office:value-type="string">
            <text:p text:style-name="P13">The record is updated successfully.</text:p>
          </table:table-cell>
          <table:table-cell table:style-name="Table82.C3" office:value-type="string">
            <text:p text:style-name="P13">Updating <text:span text:style-name="T3">Specific Item</text:span></text:p>
          </table:table-cell>
        </table:table-row>
        <table:table-row>
          <table:table-cell table:style-name="Table82.A2" office:value-type="string">
            <text:p text:style-name="P13">3</text:p>
          </table:table-cell>
          <table:table-cell table:style-name="Table82.B4" office:value-type="string">
            <text:p text:style-name="P13">The record is deleted successfully.</text:p>
          </table:table-cell>
          <table:table-cell table:style-name="Table82.C4" office:value-type="string">
            <text:p text:style-name="P15"><text:span text:style-name="T3">Dele</text:span>ting <text:span text:style-name="T3">Specific Item</text:span></text:p>
          </table:table-cell>
        </table:table-row>
        <table:table-row>
          <table:table-cell table:style-name="Table82.A2" office:value-type="string">
            <text:p text:style-name="P13">4</text:p>
          </table:table-cell>
          <table:table-cell table:style-name="Table82.B5" office:value-type="string">
            <text:p text:style-name="P13">The record is activated successfully.</text:p>
          </table:table-cell>
          <table:table-cell table:style-name="Table82.C5" office:value-type="string">
            <text:p text:style-name="P16">Activating Specific Inactive Item</text:p>
          </table:table-cell>
        </table:table-row>
        <table:table-row>
          <table:table-cell table:style-name="Table82.A6" office:value-type="string">
            <text:p text:style-name="P13">5</text:p>
          </table:table-cell>
          <table:table-cell table:style-name="Table82.B6" office:value-type="string">
            <text:p text:style-name="P13">The record is inactivated successfully.</text:p>
          </table:table-cell>
          <table:table-cell table:style-name="Table82.C6" office:value-type="string">
            <text:p text:style-name="P16">Inactivating Specific active Item</text:p>
          </table:table-cell>
        </table:table-row>
        <table:table-row>
          <table:table-cell table:style-name="Table82.A6" office:value-type="string">
            <text:p text:style-name="P17">6</text:p>
          </table:table-cell>
          <table:table-cell table:style-name="Table82.B6" office:value-type="string">
            <text:p text:style-name="P13">The data is returned successfully.</text:p>
          </table:table-cell>
          <table:table-cell table:style-name="Table82.C6" office:value-type="string">
            <text:p text:style-name="P18">Fetching Data (Specific Row or All Rows)</text:p>
          </table:table-cell>
        </table:table-row>
        <table:table-row>
          <table:table-cell table:style-name="Table82.A6" office:value-type="string">
            <text:p text:style-name="P17">7</text:p>
          </table:table-cell>
          <table:table-cell table:style-name="Table82.B6" office:value-type="string">
            <text:p text:style-name="P13">The token is generated successfully.</text:p>
          </table:table-cell>
          <table:table-cell table:style-name="Table82.C6" office:value-type="string">
            <text:p text:style-name="P18">User Login and Getting Token</text:p>
          </table:table-cell>
        </table:table-row>
        <table:table-row>
          <table:table-cell table:style-name="Table82.A9" office:value-type="string">
            <text:p text:style-name="P17">8</text:p>
          </table:table-cell>
          <table:table-cell table:style-name="Table82.B9" office:value-type="string">
            <text:p text:style-name="P13">The token is refreshed successfully.</text:p>
          </table:table-cell>
          <table:table-cell table:style-name="Table82.C9" office:value-type="string">
            <text:p text:style-name="P18">Extending The Expire Time of Token</text:p>
          </table:table-cell>
        </table:table-row>
        <table:table-row>
          <table:table-cell table:style-name="Table82.A10" office:value-type="string">
            <text:p text:style-name="P17">9</text:p>
          </table:table-cell>
          <table:table-cell table:style-name="Table82.B10" office:value-type="string">
            <text:p text:style-name="P13">The password is changed successfully.</text:p>
          </table:table-cell>
          <table:table-cell table:style-name="Table82.C10" office:value-type="string">
            <text:p text:style-name="P18">Changing Password</text:p>
          </table:table-cell>
        </table:table-row>
      </table:table>
      <text:p text:style-name="Text_20_body"/>
      <text:h text:style-name="Heading_20_2" text:outline-level="2"><text:bookmark-start text:name="__RefHeading___Toc255_2732334432"/>Format <text:span text:style-name="T4">of Response</text:span><text:bookmark-end text:name="__RefHeading___Toc255_2732334432"/></text:h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header-rows>
          <table:table-row>
            <table:table-cell table:style-name="Table83.A1" office:value-type="string">
              <text:p text:style-name="P19">No</text:p>
            </table:table-cell>
            <table:table-cell table:style-name="Table83.A1" office:value-type="string">
              <text:p text:style-name="P19">Property Name</text:p>
            </table:table-cell>
            <table:table-cell table:style-name="Table83.A1" office:value-type="string">
              <text:p text:style-name="P19">Data Type</text:p>
            </table:table-cell>
            <table:table-cell table:style-name="Table83.D1" office:value-type="string">
              <text:p text:style-name="P19">Description</text:p>
            </table:table-cell>
          </table:table-row>
        </table:table-header-rows>
        <table:table-row>
          <table:table-cell table:style-name="Table83.A2" office:value-type="string">
            <text:p text:style-name="P20">1</text:p>
          </table:table-cell>
          <table:table-cell table:style-name="Table83.B2" office:value-type="string">
            <text:p text:style-name="P20">statusCode</text:p>
          </table:table-cell>
          <table:table-cell table:style-name="Table83.C2" office:value-type="string">
            <text:p text:style-name="P20">integer</text:p>
          </table:table-cell>
          <table:table-cell table:style-name="Table83.D2" office:value-type="string">
            <text:p text:style-name="P18">HTTP Status Code</text:p>
          </table:table-cell>
        </table:table-row>
        <table:table-row>
          <table:table-cell table:style-name="Table83.A2" office:value-type="string">
            <text:p text:style-name="P20">2</text:p>
          </table:table-cell>
          <table:table-cell table:style-name="Table83.B2" office:value-type="string">
            <text:p text:style-name="P20">status</text:p>
          </table:table-cell>
          <table:table-cell table:style-name="Table83.C2" office:value-type="string">
            <text:p text:style-name="P20">string</text:p>
          </table:table-cell>
          <table:table-cell table:style-name="Table83.D2" office:value-type="string">
            <text:p text:style-name="P20">It presented in section 1.1.</text:p>
          </table:table-cell>
        </table:table-row>
        <table:table-row>
          <table:table-cell table:style-name="Table83.A2" office:value-type="string">
            <text:p text:style-name="P20">3</text:p>
          </table:table-cell>
          <table:table-cell table:style-name="Table83.B2" office:value-type="string">
            <text:p text:style-name="P20">message</text:p>
          </table:table-cell>
          <table:table-cell table:style-name="Table83.C2" office:value-type="string">
            <text:p text:style-name="P20">string</text:p>
          </table:table-cell>
          <table:table-cell table:style-name="Table83.D2" office:value-type="string">
            <text:p text:style-name="P20">Successful (section 1.2) and error message.</text:p>
          </table:table-cell>
        </table:table-row>
        <table:table-row>
          <table:table-cell table:style-name="Table83.A2" office:value-type="string">
            <text:p text:style-name="P20">4</text:p>
          </table:table-cell>
          <table:table-cell table:style-name="Table83.B2" office:value-type="string">
            <text:p text:style-name="P20">errorCode</text:p>
          </table:table-cell>
          <table:table-cell table:style-name="Table83.C2" office:value-type="string">
            <text:p text:style-name="P20">integer</text:p>
          </table:table-cell>
          <table:table-cell table:style-name="Table83.D2" office:value-type="string">
            <text:p text:style-name="P20">Error code based on “System Error List” document.</text:p>
          </table:table-cell>
        </table:table-row>
        <text:soft-page-break/>
        <table:table-row>
          <table:table-cell table:style-name="Table83.A2" office:value-type="string">
            <text:p text:style-name="P20">5</text:p>
          </table:table-cell>
          <table:table-cell table:style-name="Table83.B2" office:value-type="string">
            <text:p text:style-name="P20">data</text:p>
          </table:table-cell>
          <table:table-cell table:style-name="Table83.C2" office:value-type="string">
            <text:p text:style-name="P20">object</text:p>
          </table:table-cell>
          <table:table-cell table:style-name="Table83.D2" office:value-type="string">
            <text:p text:style-name="P20">To return data objects and properties.</text:p>
          </table:table-cell>
        </table:table-row>
      </table:table>
      <text:p text:style-name="Text_20_body"/>
      <text:h text:style-name="P21" text:outline-level="1"><text:bookmark-start text:name="__RefHeading___Toc227_771010674 Copy 1"/>Question<text:bookmark-end text:name="__RefHeading___Toc227_771010674 Copy 1"/></text:h>
      <text:h text:style-name="P22" text:outline-level="2"><text:bookmark-start text:name="__RefHeading___Toc908_3206075736 Copy 1 Copy 1"/><text:span text:style-name="Strong_20_Emphasis"><text:span text:style-name="T5">Delete</text:span></text:span><text:bookmark-end text:name="__RefHeading___Toc908_3206075736 Copy 1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</text:span></text:span><text:span text:style-name="Strong_20_Emphasis"><text:span text:style-name="T8">logically</text:span></text:span><text:span text:style-name="Strong_20_Emphasis"><text:span text:style-name="T7"> deletes a “</text:span></text:span><text:span text:style-name="Strong_20_Emphasis"><text:span text:style-name="T9">question</text:span></text:span><text:span text:style-name="Strong_20_Emphasis"><text:span text:style-name="T7">” from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3"><text:span text:style-name="Strong_20_Emphasis"><text:span text:style-name="T10">Request CURL Sample</text:span></text:span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4">curl --request DELETE \</text:p>
            <text:p text:style-name="P24"><text:s text:c="2"/>--url 'https://[maindomian]/api/evaluation/question/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1"/></text:span></text:p>
      <text:p text:style-name="P23"><text:span text:style-name="Strong_20_Emphasis"><text:span text:style-name="T10">Response Sample</text:span></text:span>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record is <text:span text:style-name="T12">deleted</text:span> successfully.",</text:p>
            <text:p text:style-name="P24"><text:tab/>"errorCode" : 0,</text:p>
            <text:p text:style-name="P24"><text:tab/>"data" : <text:span text:style-name="T12">null</text:span>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2079_720390006 Copy 1"/><text:span text:style-name="Strong_20_Emphasis"><text:span text:style-name="T5">Active</text:span></text:span><text:bookmark-end text:name="__RefHeading___Toc2079_720390006 Copy 1"/></text:h>
      <text:p text:style-name="P23"><text:span text:style-name="Strong_20_Emphasis"><text:span text:style-name="T6">Description</text:span></text:span></text:p>
      <text:p text:style-name="P25"><text:span text:style-name="Strong_20_Emphasis"><text:span text:style-name="T7">This API actives a “</text:span></text:span><text:span text:style-name="Strong_20_Emphasis"><text:span text:style-name="T9">question</text:span></text:span><text:span text:style-name="Strong_20_Emphasis"><text:span text:style-name="T7">” in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3"><text:span text:style-name="Strong_20_Emphasis"><text:span text:style-name="T10">Request CURL Sample</text:span></text:span>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4">curl --request PUT \</text:p>
            <text:p text:style-name="P24"><text:s text:c="2"/>--url 'https://[maindomian]/api/evaluation/question/active/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1"/></text:span></text:p>
      <text:p text:style-name="P23"><text:soft-page-break/><text:span text:style-name="Strong_20_Emphasis"><text:span text:style-name="T10">Response Sample</text:span>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record is <text:span text:style-name="T12">activated</text:span> successfully.",</text:p>
            <text:p text:style-name="P24"><text:tab/>"errorCode" : 0,</text:p>
            <text:p text:style-name="P24"><text:tab/>"data" : <text:span text:style-name="T12">null</text:span>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2083_720390006 Copy 1"/><text:span text:style-name="Strong_20_Emphasis"><text:span text:style-name="T5">Inactive</text:span></text:span><text:bookmark-end text:name="__RefHeading___Toc2083_720390006 Copy 1"/></text:h>
      <text:p text:style-name="P23"><text:span text:style-name="Strong_20_Emphasis"><text:span text:style-name="T6">Description</text:span></text:span></text:p>
      <text:p text:style-name="P25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“</text:span></text:span><text:span text:style-name="Strong_20_Emphasis"><text:span text:style-name="T9">question</text:span></text:span><text:span text:style-name="Strong_20_Emphasis"><text:span text:style-name="T7">” in the </text:span></text:span><text:span text:style-name="Strong_20_Emphasis"><text:span text:style-name="T14">evaluation</text:span></text:span><text:span text:style-name="Strong_20_Emphasis"><text:span text:style-name="T7">.</text:span></text:span></text:p>
      <text:p text:style-name="P23"><text:span text:style-name="Strong_20_Emphasis"><text:span text:style-name="T10">Request CURL Sample</text:span></text:span>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4">curl --request PUT \</text:p>
            <text:p text:style-name="P24"><text:s text:c="2"/>--url 'https://[maindomian]/api/evaluation/question/inactive/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1"/></text:span></text:p>
      <text:p text:style-name="P23"><text:span text:style-name="Strong_20_Emphasis"><text:span text:style-name="T10">Response Sample</text:span></text:span>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record is <text:span text:style-name="T15">in</text:span><text:span text:style-name="T12">activated</text:span> successfully.",</text:p>
            <text:p text:style-name="P24"><text:tab/>"errorCode" : 0,</text:p>
            <text:p text:style-name="P24"><text:tab/>"data" : <text:span text:style-name="T12">null</text:span>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2085_720390006 Copy 1"/><text:span text:style-name="Strong_20_Emphasis"><text:span text:style-name="T5">Fetch Specific Record</text:span></text:span><text:bookmark-end text:name="__RefHeading___Toc2085_720390006 Copy 1"/></text:h>
      <text:p text:style-name="P23"><text:span text:style-name="Strong_20_Emphasis"><text:span text:style-name="T6">Description</text:span></text:span></text:p>
      <text:p text:style-name="P25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9">question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3"><text:span text:style-name="Strong_20_Emphasis"><text:span text:style-name="T10">Request CURL Sample</text:span></text:span>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P24">curl --request GET \</text:p>
            <text:p text:style-name="P24"><text:soft-page-break/><text:s text:c="2"/>--url 'https://[maindomian]/api/evaluation/question/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1"/></text:span></text:p>
      <text:p text:style-name="P23"><text:span text:style-name="Strong_20_Emphasis"><text:span text:style-name="T10">Response Sample</text:span>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data is returned successfully.",</text:p>
            <text:p text:style-name="P24"><text:tab/>"errorCode" : 0,</text:p>
            <text:p text:style-name="P24"><text:tab/>"data" : {</text:p>
            <text:p text:style-name="P24"><text:tab/><text:tab/>"id" : 16621244611384550112, </text:p>
            <text:p text:style-name="P24"><text:tab/><text:tab/>"title" : "test",</text:p>
            <text:p text:style-name="P24"><text:tab/><text:tab/>"code" : "123",</text:p>
            <text:p text:style-name="P24"><text:tab/><text:tab/>"description" : "test",</text:p>
            <text:p text:style-name="P24"><text:tab/><text:tab/>"profileId": [{</text:p>
            <text:p text:style-name="P24"><text:tab/><text:tab/><text:tab/>"id" : 16621244611384550113,</text:p>
            <text:p text:style-name="P24"><text:tab/><text:tab/><text:tab/>"firstName": "David",</text:p>
            <text:p text:style-name="P24"><text:tab/><text:tab/><text:tab/>"lastName": "Talor"</text:p>
            <text:p text:style-name="P24"><text:tab/><text:tab/>}],</text:p>
            <text:p text:style-name="P24"><text:tab/><text:tab/>"roleFormPermissionId": [{</text:p>
            <text:p text:style-name="P24"><text:tab/><text:tab/><text:tab/>"id" : 16621244611384550114,</text:p>
            <text:p text:style-name="P24"><text:tab/><text:tab/><text:tab/>"formPermissionId": {</text:p>
            <text:p text:style-name="P24"><text:tab/><text:tab/><text:tab/><text:tab/>"id" : 16621244611384550114,</text:p>
            <text:p text:style-name="P24"><text:tab/><text:tab/><text:tab/><text:tab/>"formId": {</text:p>
            <text:p text:style-name="P24"><text:tab/><text:tab/><text:tab/><text:tab/><text:tab/>"id" : 16621244611384550115,</text:p>
            <text:p text:style-name="P24"><text:tab/><text:tab/><text:tab/><text:tab/><text:tab/>"title": "Project"</text:p>
            <text:p text:style-name="P24"><text:tab/><text:tab/><text:tab/><text:tab/>},</text:p>
            <text:p text:style-name="P24"><text:tab/><text:tab/><text:tab/><text:tab/>"permissionId": {</text:p>
            <text:p text:style-name="P24"><text:tab/><text:tab/><text:tab/><text:tab/><text:tab/>"id" : 16621244611384550116,</text:p>
            <text:p text:style-name="P24"><text:tab/><text:tab/><text:tab/><text:tab/><text:tab/>"title": "Add"</text:p>
            <text:p text:style-name="P24"><text:tab/><text:tab/><text:tab/><text:tab/>}</text:p>
            <text:p text:style-name="P24"><text:tab/><text:tab/><text:tab/>}</text:p>
            <text:p text:style-name="P24"><text:tab/><text:tab/>}],</text:p>
            <text:p text:style-name="P24"><text:tab/><text:tab/>"createdAt" : "2025-8-25 12:00:00",</text:p>
            <text:p text:style-name="P24"><text:tab/><text:tab/>"createdBy" : "John Davis" </text:p>
            <text:p text:style-name="P24"><text:tab/>}</text:p>
            <text:p text:style-name="P24">}</text:p>
          </table:table-cell>
        </table:table-row>
      </table:table>
      <text:p text:style-name="P26"/>
      <text:h text:style-name="P27" text:outline-level="1"><text:bookmark-start text:name="__RefHeading___Toc227_771010674 Copy 1 Copy 1"/><text:soft-page-break/>Question <text:span text:style-name="T17">Option</text:span><text:bookmark-end text:name="__RefHeading___Toc227_771010674 Copy 1 Copy 1"/></text:h>
      <text:h text:style-name="P28" text:outline-level="2"><text:bookmark-start text:name="__RefHeading___Toc908_3206075736 Copy 1 Copy 1 Copy 1"/><text:span text:style-name="Strong_20_Emphasis"><text:span text:style-name="T5">Delete</text:span></text:span><text:bookmark-end text:name="__RefHeading___Toc908_3206075736 Copy 1 Copy 1 Copy 1"/></text:h>
      <text:p text:style-name="P29"><text:span text:style-name="Strong_20_Emphasis"><text:span text:style-name="T6">Description</text:span></text:span></text:p>
      <text:p text:style-name="P29"><text:span text:style-name="Strong_20_Emphasis"><text:span text:style-name="T7">This API </text:span></text:span><text:span text:style-name="Strong_20_Emphasis"><text:span text:style-name="T8">logically</text:span></text:span><text:span text:style-name="Strong_20_Emphasis"><text:span text:style-name="T7"> deletes a</text:span></text:span><text:span text:style-name="Strong_20_Emphasis"><text:span text:style-name="T18">n</text:span></text:span><text:span text:style-name="Strong_20_Emphasis"><text:span text:style-name="T7"> “</text:span></text:span><text:span text:style-name="Strong_20_Emphasis"><text:span text:style-name="T18">option of the </text:span></text:span><text:span text:style-name="Strong_20_Emphasis"><text:span text:style-name="T9">question</text:span></text:span><text:span text:style-name="Strong_20_Emphasis"><text:span text:style-name="T7">” from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0">curl --request DELETE \</text:p>
            <text:p text:style-name="P30"><text:s text:c="2"/>--url 'https://[maindomian]/api/evaluation/questionOption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2">dele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79_720390006 Copy 1 Copy 1"/><text:span text:style-name="Strong_20_Emphasis"><text:span text:style-name="T5">Active</text:span></text:span><text:bookmark-end text:name="__RefHeading___Toc2079_720390006 Copy 1 Copy 1"/></text:h>
      <text:p text:style-name="P29"><text:span text:style-name="Strong_20_Emphasis"><text:span text:style-name="T6">Description</text:span></text:span></text:p>
      <text:p text:style-name="P31"><text:span text:style-name="Strong_20_Emphasis"><text:span text:style-name="T7">This API actives a</text:span></text:span><text:span text:style-name="Strong_20_Emphasis"><text:span text:style-name="T18">n</text:span></text:span><text:span text:style-name="Strong_20_Emphasis"><text:span text:style-name="T7"> “</text:span></text:span><text:span text:style-name="Strong_20_Emphasis"><text:span text:style-name="T18">option of the </text:span></text:span><text:span text:style-name="Strong_20_Emphasis"><text:span text:style-name="T9">question</text:span></text:span><text:span text:style-name="Strong_20_Emphasis"><text:span text:style-name="T7">” in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0">curl --request PUT \</text:p>
            <text:p text:style-name="P30"><text:s text:c="2"/>--url 'https://[maindomian]/api/evaluation/questionOption/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0">{</text:p>
            <text:p text:style-name="P30"><text:tab/>"statusCode" : 200,</text:p>
            <text:p text:style-name="P30"><text:soft-page-break/><text:tab/>"status" : "success",</text:p>
            <text:p text:style-name="P30"><text:tab/>"message" : "The record is <text:span text:style-name="T12">activa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3_720390006 Copy 1 Copy 1"/><text:span text:style-name="Strong_20_Emphasis"><text:span text:style-name="T5">Inactive</text:span></text:span><text:bookmark-end text:name="__RefHeading___Toc2083_720390006 Copy 1 Copy 1"/></text:h>
      <text:p text:style-name="P29"><text:span text:style-name="Strong_20_Emphasis"><text:span text:style-name="T6">Description</text:span></text:span></text:p>
      <text:p text:style-name="P31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“</text:span></text:span><text:span text:style-name="Strong_20_Emphasis"><text:span text:style-name="T18">option of the </text:span></text:span><text:span text:style-name="Strong_20_Emphasis"><text:span text:style-name="T9">question</text:span></text:span><text:span text:style-name="Strong_20_Emphasis"><text:span text:style-name="T7">” in the </text:span></text:span><text:span text:style-name="Strong_20_Emphasis"><text:span text:style-name="T14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0">curl --request PUT \</text:p>
            <text:p text:style-name="P30"><text:s text:c="2"/>--url 'https://[maindomian]/api/evaluation/questionOption/in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5">in</text:span><text:span text:style-name="T12">activa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5_720390006 Copy 1 Copy 1"/><text:span text:style-name="Strong_20_Emphasis"><text:span text:style-name="T5">Fetch Specific Record</text:span></text:span><text:bookmark-end text:name="__RefHeading___Toc2085_720390006 Copy 1 Copy 1"/></text:h>
      <text:p text:style-name="P29"><text:span text:style-name="Strong_20_Emphasis"><text:span text:style-name="T6">Description</text:span></text:span></text:p>
      <text:p text:style-name="P31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18">option of the </text:span></text:span><text:span text:style-name="Strong_20_Emphasis"><text:span text:style-name="T9">question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30">curl --request GET \</text:p>
            <text:p text:style-name="P30"><text:s text:c="2"/>--url 'https://[maindomian]/api/evaluation/questionOption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oft-page-break/><text:span text:style-name="Strong_20_Emphasis"><text:span text:style-name="T10">Response Sample</text:span>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data is returned successfully.",</text:p>
            <text:p text:style-name="P30"><text:tab/>"errorCode" : 0,</text:p>
            <text:p text:style-name="P30"><text:tab/>"data" : {</text:p>
            <text:p text:style-name="P30"><text:tab/><text:tab/>"id" : 16621244611384550112, </text:p>
            <text:p text:style-name="P30"><text:tab/><text:tab/>"title" : "test",</text:p>
            <text:p text:style-name="P30"><text:tab/><text:tab/>"code" : "123",</text:p>
            <text:p text:style-name="P30"><text:tab/><text:tab/>"description" : "test",</text:p>
            <text:p text:style-name="P30"><text:tab/><text:tab/>"profileId": [{</text:p>
            <text:p text:style-name="P30"><text:tab/><text:tab/><text:tab/>"id" : 16621244611384550113,</text:p>
            <text:p text:style-name="P30"><text:tab/><text:tab/><text:tab/>"firstName": "David",</text:p>
            <text:p text:style-name="P30"><text:tab/><text:tab/><text:tab/>"lastName": "Talor"</text:p>
            <text:p text:style-name="P30"><text:tab/><text:tab/>}],</text:p>
            <text:p text:style-name="P30"><text:tab/><text:tab/>"roleFormPermissionId": [{</text:p>
            <text:p text:style-name="P30"><text:tab/><text:tab/><text:tab/>"id" : 16621244611384550114,</text:p>
            <text:p text:style-name="P30"><text:tab/><text:tab/><text:tab/>"formPermissionId": {</text:p>
            <text:p text:style-name="P30"><text:tab/><text:tab/><text:tab/><text:tab/>"id" : 16621244611384550114,</text:p>
            <text:p text:style-name="P30"><text:tab/><text:tab/><text:tab/><text:tab/>"formId": {</text:p>
            <text:p text:style-name="P30"><text:tab/><text:tab/><text:tab/><text:tab/><text:tab/>"id" : 16621244611384550115,</text:p>
            <text:p text:style-name="P30"><text:tab/><text:tab/><text:tab/><text:tab/><text:tab/>"title": "Project"</text:p>
            <text:p text:style-name="P30"><text:tab/><text:tab/><text:tab/><text:tab/>},</text:p>
            <text:p text:style-name="P30"><text:tab/><text:tab/><text:tab/><text:tab/>"permissionId": {</text:p>
            <text:p text:style-name="P30"><text:tab/><text:tab/><text:tab/><text:tab/><text:tab/>"id" : 16621244611384550116,</text:p>
            <text:p text:style-name="P30"><text:tab/><text:tab/><text:tab/><text:tab/><text:tab/>"title": "Add"</text:p>
            <text:p text:style-name="P30"><text:tab/><text:tab/><text:tab/><text:tab/>}</text:p>
            <text:p text:style-name="P30"><text:tab/><text:tab/><text:tab/>}</text:p>
            <text:p text:style-name="P30"><text:tab/><text:tab/>}],</text:p>
            <text:p text:style-name="P30"><text:tab/><text:tab/>"createdAt" : "2025-8-25 12:00:00",</text:p>
            <text:p text:style-name="P30"><text:tab/><text:tab/>"createdBy" : "John Davis" </text:p>
            <text:p text:style-name="P30"><text:tab/>}</text:p>
            <text:p text:style-name="P30">}</text:p>
          </table:table-cell>
        </table:table-row>
      </table:table>
      <text:p text:style-name="P32"/>
      <text:h text:style-name="P27" text:outline-level="1"><text:bookmark-start text:name="__RefHeading___Toc227_771010674 Copy 1 Copy 2"/>Questionnaire<text:bookmark-end text:name="__RefHeading___Toc227_771010674 Copy 1 Copy 2"/></text:h>
      <text:h text:style-name="P28" text:outline-level="2"><text:bookmark-start text:name="__RefHeading___Toc908_3206075736 Copy 1 Copy 1 Copy 2"/><text:span text:style-name="Strong_20_Emphasis"><text:span text:style-name="T5">Delete</text:span></text:span><text:bookmark-end text:name="__RefHeading___Toc908_3206075736 Copy 1 Copy 1 Copy 2"/></text:h>
      <text:p text:style-name="P29"><text:span text:style-name="Strong_20_Emphasis"><text:span text:style-name="T6">Description</text:span></text:span></text:p>
      <text:p text:style-name="P29"><text:soft-page-break/><text:span text:style-name="Strong_20_Emphasis"><text:span text:style-name="T7">This API </text:span></text:span><text:span text:style-name="Strong_20_Emphasis"><text:span text:style-name="T8">logically</text:span></text:span><text:span text:style-name="Strong_20_Emphasis"><text:span text:style-name="T7"> deletes a “</text:span></text:span><text:span text:style-name="Strong_20_Emphasis"><text:span text:style-name="T9">question</text:span></text:span><text:span text:style-name="Strong_20_Emphasis"><text:span text:style-name="T18">naire</text:span></text:span><text:span text:style-name="Strong_20_Emphasis"><text:span text:style-name="T7">” from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30">curl --request DELETE \</text:p>
            <text:p text:style-name="P30"><text:s text:c="2"/>--url 'https://[maindomian]/api/evaluation/questionnair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2">dele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79_720390006 Copy 1 Copy 2"/><text:span text:style-name="Strong_20_Emphasis"><text:span text:style-name="T5">Active</text:span></text:span><text:bookmark-end text:name="__RefHeading___Toc2079_720390006 Copy 1 Copy 2"/></text:h>
      <text:p text:style-name="P29"><text:span text:style-name="Strong_20_Emphasis"><text:span text:style-name="T6">Description</text:span></text:span></text:p>
      <text:p text:style-name="P31"><text:span text:style-name="Strong_20_Emphasis"><text:span text:style-name="T7">This API actives a “</text:span></text:span><text:span text:style-name="Strong_20_Emphasis"><text:span text:style-name="T9">question</text:span></text:span><text:span text:style-name="Strong_20_Emphasis"><text:span text:style-name="T18">naire</text:span></text:span><text:span text:style-name="Strong_20_Emphasis"><text:span text:style-name="T7">” in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0">curl --request PUT \</text:p>
            <text:p text:style-name="P30"><text:s text:c="2"/>--url 'https://[maindomian]/api/evaluation/questionnaire/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2">activa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3_720390006 Copy 1 Copy 2"/><text:soft-page-break/><text:span text:style-name="Strong_20_Emphasis"><text:span text:style-name="T5">Inactive</text:span></text:span><text:bookmark-end text:name="__RefHeading___Toc2083_720390006 Copy 1 Copy 2"/></text:h>
      <text:p text:style-name="P29"><text:span text:style-name="Strong_20_Emphasis"><text:span text:style-name="T6">Description</text:span></text:span></text:p>
      <text:p text:style-name="P31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“</text:span></text:span><text:span text:style-name="Strong_20_Emphasis"><text:span text:style-name="T9">question</text:span></text:span><text:span text:style-name="Strong_20_Emphasis"><text:span text:style-name="T18">naire</text:span></text:span><text:span text:style-name="Strong_20_Emphasis"><text:span text:style-name="T7">” in the </text:span></text:span><text:span text:style-name="Strong_20_Emphasis"><text:span text:style-name="T14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3">curl --request PUT \</text:p>
            <text:p text:style-name="P33"><text:s text:c="2"/>--url 'https://[maindomian]/api/evaluation/questionnaire/inactive/[id]' \</text:p>
            <text:p text:style-name="P33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5">in</text:span><text:span text:style-name="T12">activa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5_720390006 Copy 1 Copy 2"/><text:span text:style-name="Strong_20_Emphasis"><text:span text:style-name="T5">Fetch Specific Record</text:span></text:span><text:bookmark-end text:name="__RefHeading___Toc2085_720390006 Copy 1 Copy 2"/></text:h>
      <text:p text:style-name="P29"><text:span text:style-name="Strong_20_Emphasis"><text:span text:style-name="T6">Description</text:span></text:span></text:p>
      <text:p text:style-name="P31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9">question</text:span></text:span><text:span text:style-name="Strong_20_Emphasis"><text:span text:style-name="T18">naire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30">curl --request GET \</text:p>
            <text:p text:style-name="P30"><text:s text:c="2"/>--url 'https://[maindomian]/api/evaluation/questionnair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data is returned successfully.",</text:p>
            <text:p text:style-name="P30"><text:tab/>"errorCode" : 0,</text:p>
            <text:p text:style-name="P30"><text:soft-page-break/><text:tab/>"data" : {</text:p>
            <text:p text:style-name="P30"><text:tab/><text:tab/>"id" : 16621244611384550112, </text:p>
            <text:p text:style-name="P30"><text:tab/><text:tab/>"title" : "test",</text:p>
            <text:p text:style-name="P30"><text:tab/><text:tab/>"code" : "123",</text:p>
            <text:p text:style-name="P30"><text:tab/><text:tab/>"description" : "test",</text:p>
            <text:p text:style-name="P30"><text:tab/><text:tab/>"profileId": [{</text:p>
            <text:p text:style-name="P30"><text:tab/><text:tab/><text:tab/>"id" : 16621244611384550113,</text:p>
            <text:p text:style-name="P30"><text:tab/><text:tab/><text:tab/>"firstName": "David",</text:p>
            <text:p text:style-name="P30"><text:tab/><text:tab/><text:tab/>"lastName": "Talor"</text:p>
            <text:p text:style-name="P30"><text:tab/><text:tab/>}],</text:p>
            <text:p text:style-name="P30"><text:tab/><text:tab/>"roleFormPermissionId": [{</text:p>
            <text:p text:style-name="P30"><text:tab/><text:tab/><text:tab/>"id" : 16621244611384550114,</text:p>
            <text:p text:style-name="P30"><text:tab/><text:tab/><text:tab/>"formPermissionId": {</text:p>
            <text:p text:style-name="P30"><text:tab/><text:tab/><text:tab/><text:tab/>"id" : 16621244611384550114,</text:p>
            <text:p text:style-name="P30"><text:tab/><text:tab/><text:tab/><text:tab/>"formId": {</text:p>
            <text:p text:style-name="P30"><text:tab/><text:tab/><text:tab/><text:tab/><text:tab/>"id" : 16621244611384550115,</text:p>
            <text:p text:style-name="P30"><text:tab/><text:tab/><text:tab/><text:tab/><text:tab/>"title": "Project"</text:p>
            <text:p text:style-name="P30"><text:tab/><text:tab/><text:tab/><text:tab/>},</text:p>
            <text:p text:style-name="P30"><text:tab/><text:tab/><text:tab/><text:tab/>"permissionId": {</text:p>
            <text:p text:style-name="P30"><text:tab/><text:tab/><text:tab/><text:tab/><text:tab/>"id" : 16621244611384550116,</text:p>
            <text:p text:style-name="P30"><text:tab/><text:tab/><text:tab/><text:tab/><text:tab/>"title": "Add"</text:p>
            <text:p text:style-name="P30"><text:tab/><text:tab/><text:tab/><text:tab/>}</text:p>
            <text:p text:style-name="P30"><text:tab/><text:tab/><text:tab/>}</text:p>
            <text:p text:style-name="P30"><text:tab/><text:tab/>}],</text:p>
            <text:p text:style-name="P30"><text:tab/><text:tab/>"createdAt" : "2025-8-25 12:00:00",</text:p>
            <text:p text:style-name="P30"><text:tab/><text:tab/>"createdBy" : "John Davis" </text:p>
            <text:p text:style-name="P30"><text:tab/>}</text:p>
            <text:p text:style-name="P30">}</text:p>
          </table:table-cell>
        </table:table-row>
      </table:table>
      <text:p text:style-name="P32"/>
      <text:h text:style-name="P27" text:outline-level="1"><text:bookmark-start text:name="__RefHeading___Toc227_771010674 Copy 1 Copy 3"/>Questionnaire Target Department<text:bookmark-end text:name="__RefHeading___Toc227_771010674 Copy 1 Copy 3"/></text:h>
      <text:h text:style-name="P28" text:outline-level="2"><text:bookmark-start text:name="__RefHeading___Toc908_3206075736 Copy 1 Copy 1 Copy 3"/><text:span text:style-name="Strong_20_Emphasis"><text:span text:style-name="T5">Delete</text:span></text:span><text:bookmark-end text:name="__RefHeading___Toc908_3206075736 Copy 1 Copy 1 Copy 3"/></text:h>
      <text:p text:style-name="P29"><text:span text:style-name="Strong_20_Emphasis"><text:span text:style-name="T6">Description</text:span></text:span></text:p>
      <text:p text:style-name="P31"><text:span text:style-name="Strong_20_Emphasis"><text:span text:style-name="T7">This API </text:span></text:span><text:span text:style-name="Strong_20_Emphasis"><text:span text:style-name="T8">logically</text:span></text:span><text:span text:style-name="Strong_20_Emphasis"><text:span text:style-name="T7"> deletes a “</text:span></text:span><text:span text:style-name="Strong_20_Emphasis"><text:span text:style-name="T18">t</text:span></text:span><text:span text:style-name="Strong_20_Emphasis"><text:span text:style-name="T9">arget </text:span></text:span><text:span text:style-name="Strong_20_Emphasis"><text:span text:style-name="T18">d</text:span></text:span><text:span text:style-name="Strong_20_Emphasis"><text:span text:style-name="T9">epartment </text:span></text:span><text:span text:style-name="Strong_20_Emphasis"><text:span text:style-name="T18">of the q</text:span></text:span><text:span text:style-name="Strong_20_Emphasis"><text:span text:style-name="T9">uestionnaire</text:span></text:span><text:span text:style-name="Strong_20_Emphasis"><text:span text:style-name="T7">” from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30">curl --request DELETE \</text:p>
            <text:p text:style-name="P30"><text:s text:c="2"/>--url <text:soft-page-break/>'https://[maindomian]/api/evaluation/questionnaireTargetDepartment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2">dele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79_720390006 Copy 1 Copy 3"/><text:span text:style-name="Strong_20_Emphasis"><text:span text:style-name="T5">Active</text:span></text:span><text:bookmark-end text:name="__RefHeading___Toc2079_720390006 Copy 1 Copy 3"/></text:h>
      <text:p text:style-name="P29"><text:span text:style-name="Strong_20_Emphasis"><text:span text:style-name="T6">Description</text:span></text:span></text:p>
      <text:p text:style-name="P31"><text:span text:style-name="Strong_20_Emphasis"><text:span text:style-name="T7">This API actives a “</text:span></text:span><text:span text:style-name="Strong_20_Emphasis"><text:span text:style-name="T18">t</text:span></text:span><text:span text:style-name="Strong_20_Emphasis"><text:span text:style-name="T9">arget </text:span></text:span><text:span text:style-name="Strong_20_Emphasis"><text:span text:style-name="T18">d</text:span></text:span><text:span text:style-name="Strong_20_Emphasis"><text:span text:style-name="T9">epartment </text:span></text:span><text:span text:style-name="Strong_20_Emphasis"><text:span text:style-name="T18">of the q</text:span></text:span><text:span text:style-name="Strong_20_Emphasis"><text:span text:style-name="T9">uestionnaire</text:span></text:span><text:span text:style-name="Strong_20_Emphasis"><text:span text:style-name="T7">” in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30">curl --request PUT \</text:p>
            <text:p text:style-name="P30"><text:s text:c="2"/>--url 'https://[maindomian]/api/evaluation/questionnaireTargetDepartment/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2">activa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3_720390006 Copy 1 Copy 3"/><text:soft-page-break/><text:span text:style-name="Strong_20_Emphasis"><text:span text:style-name="T5">Inactive</text:span></text:span><text:bookmark-end text:name="__RefHeading___Toc2083_720390006 Copy 1 Copy 3"/></text:h>
      <text:p text:style-name="P29"><text:span text:style-name="Strong_20_Emphasis"><text:span text:style-name="T6">Description</text:span></text:span></text:p>
      <text:p text:style-name="P31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“</text:span></text:span><text:span text:style-name="Strong_20_Emphasis"><text:span text:style-name="T18">t</text:span></text:span><text:span text:style-name="Strong_20_Emphasis"><text:span text:style-name="T9">arget </text:span></text:span><text:span text:style-name="Strong_20_Emphasis"><text:span text:style-name="T18">d</text:span></text:span><text:span text:style-name="Strong_20_Emphasis"><text:span text:style-name="T9">epartment </text:span></text:span><text:span text:style-name="Strong_20_Emphasis"><text:span text:style-name="T18">of the q</text:span></text:span><text:span text:style-name="Strong_20_Emphasis"><text:span text:style-name="T9">uestionnaire</text:span></text:span><text:span text:style-name="Strong_20_Emphasis"><text:span text:style-name="T7">” in the </text:span></text:span><text:span text:style-name="Strong_20_Emphasis"><text:span text:style-name="T14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P30">curl --request PUT \</text:p>
            <text:p text:style-name="P30"><text:s text:c="2"/>--url 'https://[maindomian]/api/evaluation/questionnaireTargetDepartment/in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5">in</text:span><text:span text:style-name="T12">activa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5_720390006 Copy 1 Copy 3"/><text:span text:style-name="Strong_20_Emphasis"><text:span text:style-name="T5">Fetch Specific Record</text:span></text:span><text:bookmark-end text:name="__RefHeading___Toc2085_720390006 Copy 1 Copy 3"/></text:h>
      <text:p text:style-name="P29"><text:span text:style-name="Strong_20_Emphasis"><text:span text:style-name="T6">Description</text:span></text:span></text:p>
      <text:p text:style-name="P31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18">t</text:span></text:span><text:span text:style-name="Strong_20_Emphasis"><text:span text:style-name="T9">arget </text:span></text:span><text:span text:style-name="Strong_20_Emphasis"><text:span text:style-name="T18">d</text:span></text:span><text:span text:style-name="Strong_20_Emphasis"><text:span text:style-name="T9">epartment </text:span></text:span><text:span text:style-name="Strong_20_Emphasis"><text:span text:style-name="T18">of the q</text:span></text:span><text:span text:style-name="Strong_20_Emphasis"><text:span text:style-name="T9">uestionnaire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30">curl --request GET \</text:p>
            <text:p text:style-name="P30"><text:s text:c="2"/>--url 'https://[maindomian]/api/evaluation/questionnaireTargetDepartment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30">{</text:p>
            <text:p text:style-name="P30"><text:tab/>"statusCode" : 200,</text:p>
            <text:p text:style-name="P30"><text:soft-page-break/><text:tab/>"status" : "success",</text:p>
            <text:p text:style-name="P30"><text:tab/>"message" : "The data is returned successfully.",</text:p>
            <text:p text:style-name="P30"><text:tab/>"errorCode" : 0,</text:p>
            <text:p text:style-name="P30"><text:tab/>"data" : {</text:p>
            <text:p text:style-name="P30"><text:tab/><text:tab/>"id" : 16621244611384550112, </text:p>
            <text:p text:style-name="P30"><text:tab/><text:tab/>"title" : "test",</text:p>
            <text:p text:style-name="P30"><text:tab/><text:tab/>"code" : "123",</text:p>
            <text:p text:style-name="P30"><text:tab/><text:tab/>"description" : "test",</text:p>
            <text:p text:style-name="P30"><text:tab/><text:tab/>"profileId": [{</text:p>
            <text:p text:style-name="P30"><text:tab/><text:tab/><text:tab/>"id" : 16621244611384550113,</text:p>
            <text:p text:style-name="P30"><text:tab/><text:tab/><text:tab/>"firstName": "David",</text:p>
            <text:p text:style-name="P30"><text:tab/><text:tab/><text:tab/>"lastName": "Talor"</text:p>
            <text:p text:style-name="P30"><text:tab/><text:tab/>}],</text:p>
            <text:p text:style-name="P30"><text:tab/><text:tab/>"roleFormPermissionId": [{</text:p>
            <text:p text:style-name="P30"><text:tab/><text:tab/><text:tab/>"id" : 16621244611384550114,</text:p>
            <text:p text:style-name="P30"><text:tab/><text:tab/><text:tab/>"formPermissionId": {</text:p>
            <text:p text:style-name="P30"><text:tab/><text:tab/><text:tab/><text:tab/>"id" : 16621244611384550114,</text:p>
            <text:p text:style-name="P30"><text:tab/><text:tab/><text:tab/><text:tab/>"formId": {</text:p>
            <text:p text:style-name="P30"><text:tab/><text:tab/><text:tab/><text:tab/><text:tab/>"id" : 16621244611384550115,</text:p>
            <text:p text:style-name="P30"><text:tab/><text:tab/><text:tab/><text:tab/><text:tab/>"title": "Project"</text:p>
            <text:p text:style-name="P30"><text:tab/><text:tab/><text:tab/><text:tab/>},</text:p>
            <text:p text:style-name="P30"><text:tab/><text:tab/><text:tab/><text:tab/>"permissionId": {</text:p>
            <text:p text:style-name="P30"><text:tab/><text:tab/><text:tab/><text:tab/><text:tab/>"id" : 16621244611384550116,</text:p>
            <text:p text:style-name="P30"><text:tab/><text:tab/><text:tab/><text:tab/><text:tab/>"title": "Add"</text:p>
            <text:p text:style-name="P30"><text:tab/><text:tab/><text:tab/><text:tab/>}</text:p>
            <text:p text:style-name="P30"><text:tab/><text:tab/><text:tab/>}</text:p>
            <text:p text:style-name="P30"><text:tab/><text:tab/>}],</text:p>
            <text:p text:style-name="P30"><text:tab/><text:tab/>"createdAt" : "2025-8-25 12:00:00",</text:p>
            <text:p text:style-name="P30"><text:tab/><text:tab/>"createdBy" : "John Davis" </text:p>
            <text:p text:style-name="P30"><text:tab/>}</text:p>
            <text:p text:style-name="P30">}</text:p>
          </table:table-cell>
        </table:table-row>
      </table:table>
      <text:p text:style-name="P32"/>
      <text:h text:style-name="P27" text:outline-level="1"><text:bookmark-start text:name="__RefHeading___Toc227_771010674 Copy 1 Copy 4"/>Questionnaire Item<text:bookmark-end text:name="__RefHeading___Toc227_771010674 Copy 1 Copy 4"/></text:h>
      <text:h text:style-name="P28" text:outline-level="2"><text:bookmark-start text:name="__RefHeading___Toc908_3206075736 Copy 1 Copy 1 Copy 4"/><text:span text:style-name="Strong_20_Emphasis"><text:span text:style-name="T5">Delete</text:span></text:span><text:bookmark-end text:name="__RefHeading___Toc908_3206075736 Copy 1 Copy 1 Copy 4"/></text:h>
      <text:p text:style-name="P29"><text:span text:style-name="Strong_20_Emphasis"><text:span text:style-name="T6">Description</text:span></text:span></text:p>
      <text:p text:style-name="P29"><text:span text:style-name="Strong_20_Emphasis"><text:span text:style-name="T7">This API </text:span></text:span><text:span text:style-name="Strong_20_Emphasis"><text:span text:style-name="T8">logically</text:span></text:span><text:span text:style-name="Strong_20_Emphasis"><text:span text:style-name="T7"> deletes a “</text:span></text:span><text:span text:style-name="Strong_20_Emphasis"><text:span text:style-name="T19">question of the </text:span></text:span><text:span text:style-name="Strong_20_Emphasis"><text:span text:style-name="T9">question</text:span></text:span><text:span text:style-name="Strong_20_Emphasis"><text:span text:style-name="T19">naire</text:span></text:span><text:span text:style-name="Strong_20_Emphasis"><text:span text:style-name="T7">” from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33" table:style-name="Table33">
        <table:table-column table:style-name="Table33.A"/>
        <text:soft-page-break/>
        <table:table-row>
          <table:table-cell table:style-name="Table33.A1" office:value-type="string">
            <text:p text:style-name="P30">curl --request DELETE \</text:p>
            <text:p text:style-name="P30"><text:s text:c="2"/>--url 'https://[maindomian]/api/evaluation/questionnaireItem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2">dele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79_720390006 Copy 1 Copy 4"/><text:span text:style-name="Strong_20_Emphasis"><text:span text:style-name="T5">Active</text:span></text:span><text:bookmark-end text:name="__RefHeading___Toc2079_720390006 Copy 1 Copy 4"/></text:h>
      <text:p text:style-name="P29"><text:span text:style-name="Strong_20_Emphasis"><text:span text:style-name="T6">Description</text:span></text:span></text:p>
      <text:p text:style-name="P34"><text:span text:style-name="Strong_20_Emphasis"><text:span text:style-name="T7">This API actives a “</text:span></text:span><text:span text:style-name="Strong_20_Emphasis"><text:span text:style-name="T19">question of the </text:span></text:span><text:span text:style-name="Strong_20_Emphasis"><text:span text:style-name="T9">question</text:span></text:span><text:span text:style-name="Strong_20_Emphasis"><text:span text:style-name="T19">naire</text:span></text:span><text:span text:style-name="Strong_20_Emphasis"><text:span text:style-name="T7">” in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P30">curl --request PUT \</text:p>
            <text:p text:style-name="P30"><text:s text:c="2"/>--url 'https://[maindomian]/api/evaluation/questionnaireItem/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2">activa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3_720390006 Copy 1 Copy 4"/><text:span text:style-name="Strong_20_Emphasis"><text:span text:style-name="T5">Inactive</text:span></text:span><text:bookmark-end text:name="__RefHeading___Toc2083_720390006 Copy 1 Copy 4"/></text:h>
      <text:p text:style-name="P29"><text:span text:style-name="Strong_20_Emphasis"><text:span text:style-name="T6">Description</text:span></text:span></text:p>
      <text:p text:style-name="P34"><text:soft-page-break/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“</text:span></text:span><text:span text:style-name="Strong_20_Emphasis"><text:span text:style-name="T19">question of the </text:span></text:span><text:span text:style-name="Strong_20_Emphasis"><text:span text:style-name="T9">question</text:span></text:span><text:span text:style-name="Strong_20_Emphasis"><text:span text:style-name="T19">naire</text:span></text:span><text:span text:style-name="Strong_20_Emphasis"><text:span text:style-name="T7">” in the </text:span></text:span><text:span text:style-name="Strong_20_Emphasis"><text:span text:style-name="T14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30">curl --request PUT \</text:p>
            <text:p text:style-name="P30"><text:s text:c="2"/>--url 'https://[maindomian]/api/evaluation/questionnaireItem/in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5">in</text:span><text:span text:style-name="T12">activa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5_720390006 Copy 1 Copy 4"/><text:span text:style-name="Strong_20_Emphasis"><text:span text:style-name="T5">Fetch Specific Record</text:span></text:span><text:bookmark-end text:name="__RefHeading___Toc2085_720390006 Copy 1 Copy 4"/></text:h>
      <text:p text:style-name="P29"><text:span text:style-name="Strong_20_Emphasis"><text:span text:style-name="T6">Description</text:span></text:span></text:p>
      <text:p text:style-name="P34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19">question of the </text:span></text:span><text:span text:style-name="Strong_20_Emphasis"><text:span text:style-name="T9">question</text:span></text:span><text:span text:style-name="Strong_20_Emphasis"><text:span text:style-name="T19">naire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P30">curl --request GET \</text:p>
            <text:p text:style-name="P30"><text:s text:c="2"/>--url 'https://[maindomian]/api/evaluation/questionnaireItem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data is returned successfully.",</text:p>
            <text:p text:style-name="P30"><text:tab/>"errorCode" : 0,</text:p>
            <text:p text:style-name="P30"><text:tab/>"data" : {</text:p>
            <text:p text:style-name="P30"><text:tab/><text:tab/>"id" : 16621244611384550112, </text:p>
            <text:p text:style-name="P30"><text:soft-page-break/><text:tab/><text:tab/>"title" : "test",</text:p>
            <text:p text:style-name="P30"><text:tab/><text:tab/>"code" : "123",</text:p>
            <text:p text:style-name="P30"><text:tab/><text:tab/>"description" : "test",</text:p>
            <text:p text:style-name="P30"><text:tab/><text:tab/>"profileId": [{</text:p>
            <text:p text:style-name="P30"><text:tab/><text:tab/><text:tab/>"id" : 16621244611384550113,</text:p>
            <text:p text:style-name="P30"><text:tab/><text:tab/><text:tab/>"firstName": "David",</text:p>
            <text:p text:style-name="P30"><text:tab/><text:tab/><text:tab/>"lastName": "Talor"</text:p>
            <text:p text:style-name="P30"><text:tab/><text:tab/>}],</text:p>
            <text:p text:style-name="P30"><text:tab/><text:tab/>"roleFormPermissionId": [{</text:p>
            <text:p text:style-name="P30"><text:tab/><text:tab/><text:tab/>"id" : 16621244611384550114,</text:p>
            <text:p text:style-name="P30"><text:tab/><text:tab/><text:tab/>"formPermissionId": {</text:p>
            <text:p text:style-name="P30"><text:tab/><text:tab/><text:tab/><text:tab/>"id" : 16621244611384550114,</text:p>
            <text:p text:style-name="P30"><text:tab/><text:tab/><text:tab/><text:tab/>"formId": {</text:p>
            <text:p text:style-name="P30"><text:tab/><text:tab/><text:tab/><text:tab/><text:tab/>"id" : 16621244611384550115,</text:p>
            <text:p text:style-name="P30"><text:tab/><text:tab/><text:tab/><text:tab/><text:tab/>"title": "Project"</text:p>
            <text:p text:style-name="P30"><text:tab/><text:tab/><text:tab/><text:tab/>},</text:p>
            <text:p text:style-name="P30"><text:tab/><text:tab/><text:tab/><text:tab/>"permissionId": {</text:p>
            <text:p text:style-name="P30"><text:tab/><text:tab/><text:tab/><text:tab/><text:tab/>"id" : 16621244611384550116,</text:p>
            <text:p text:style-name="P30"><text:tab/><text:tab/><text:tab/><text:tab/><text:tab/>"title": "Add"</text:p>
            <text:p text:style-name="P30"><text:tab/><text:tab/><text:tab/><text:tab/>}</text:p>
            <text:p text:style-name="P30"><text:tab/><text:tab/><text:tab/>}</text:p>
            <text:p text:style-name="P30"><text:tab/><text:tab/>}],</text:p>
            <text:p text:style-name="P30"><text:tab/><text:tab/>"createdAt" : "2025-8-25 12:00:00",</text:p>
            <text:p text:style-name="P30"><text:tab/><text:tab/>"createdBy" : "John Davis" </text:p>
            <text:p text:style-name="P30"><text:tab/>}</text:p>
            <text:p text:style-name="P30">}</text:p>
          </table:table-cell>
        </table:table-row>
      </table:table>
      <text:p text:style-name="P32"/>
      <text:h text:style-name="P27" text:outline-level="1"><text:bookmark-start text:name="__RefHeading___Toc227_771010674 Copy 1 Copy 5"/>Questionnaire Result<text:bookmark-end text:name="__RefHeading___Toc227_771010674 Copy 1 Copy 5"/></text:h>
      <text:h text:style-name="P28" text:outline-level="2"><text:bookmark-start text:name="__RefHeading___Toc908_3206075736 Copy 1 Copy 1 Copy 5"/><text:span text:style-name="Strong_20_Emphasis"><text:span text:style-name="T5">Delete</text:span></text:span><text:bookmark-end text:name="__RefHeading___Toc908_3206075736 Copy 1 Copy 1 Copy 5"/></text:h>
      <text:p text:style-name="P29"><text:span text:style-name="Strong_20_Emphasis"><text:span text:style-name="T6">Description</text:span></text:span></text:p>
      <text:p text:style-name="P29"><text:span text:style-name="Strong_20_Emphasis"><text:span text:style-name="T7">This API </text:span></text:span><text:span text:style-name="Strong_20_Emphasis"><text:span text:style-name="T8">logically</text:span></text:span><text:span text:style-name="Strong_20_Emphasis"><text:span text:style-name="T7"> deletes a “</text:span></text:span><text:span text:style-name="Strong_20_Emphasis"><text:span text:style-name="T20">result of the </text:span></text:span><text:span text:style-name="Strong_20_Emphasis"><text:span text:style-name="T9">question</text:span></text:span><text:span text:style-name="Strong_20_Emphasis"><text:span text:style-name="T20">naire</text:span></text:span><text:span text:style-name="Strong_20_Emphasis"><text:span text:style-name="T7">” from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P30">curl --request DELETE \</text:p>
            <text:p text:style-name="P30"><text:s text:c="2"/>--url 'https://[maindomian]/api/evaluation/questionnaireResult/[id]' \</text:p>
            <text:p text:style-name="P30"><text:s text:c="2"/>--header 'Authorization: Bearer [token]'</text:p>
          </table:table-cell>
        </table:table-row>
      </table:table>
      <text:p text:style-name="P29"><text:soft-page-break/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42" table:style-name="Table42">
        <table:table-column table:style-name="Table42.A"/>
        <table:table-row>
          <table:table-cell table:style-name="Table42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2">dele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79_720390006 Copy 1 Copy 5"/><text:span text:style-name="Strong_20_Emphasis"><text:span text:style-name="T5">Active</text:span></text:span><text:bookmark-end text:name="__RefHeading___Toc2079_720390006 Copy 1 Copy 5"/></text:h>
      <text:p text:style-name="P29"><text:span text:style-name="Strong_20_Emphasis"><text:span text:style-name="T6">Description</text:span></text:span></text:p>
      <text:p text:style-name="P35"><text:span text:style-name="Strong_20_Emphasis"><text:span text:style-name="T7">This API actives a “</text:span></text:span><text:span text:style-name="Strong_20_Emphasis"><text:span text:style-name="T20">result of the </text:span></text:span><text:span text:style-name="Strong_20_Emphasis"><text:span text:style-name="T9">question</text:span></text:span><text:span text:style-name="Strong_20_Emphasis"><text:span text:style-name="T20">naire</text:span></text:span><text:span text:style-name="Strong_20_Emphasis"><text:span text:style-name="T7">” in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P30">curl --request PUT \</text:p>
            <text:p text:style-name="P30"><text:s text:c="2"/>--url 'https://[maindomian]/api/evaluation/questionnaireResult/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2">activa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3_720390006 Copy 1 Copy 5"/><text:span text:style-name="Strong_20_Emphasis"><text:span text:style-name="T5">Inactive</text:span></text:span><text:bookmark-end text:name="__RefHeading___Toc2083_720390006 Copy 1 Copy 5"/></text:h>
      <text:p text:style-name="P29"><text:span text:style-name="Strong_20_Emphasis"><text:span text:style-name="T6">Description</text:span></text:span></text:p>
      <text:p text:style-name="P35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“</text:span></text:span><text:span text:style-name="Strong_20_Emphasis"><text:span text:style-name="T20">result of the </text:span></text:span><text:span text:style-name="Strong_20_Emphasis"><text:span text:style-name="T9">question</text:span></text:span><text:span text:style-name="Strong_20_Emphasis"><text:span text:style-name="T20">naire</text:span></text:span><text:span text:style-name="Strong_20_Emphasis"><text:span text:style-name="T7">” in the </text:span></text:span><text:span text:style-name="Strong_20_Emphasis"><text:span text:style-name="T14">evaluation</text:span></text:span><text:span text:style-name="Strong_20_Emphasis"><text:span text:style-name="T7">.</text:span></text:span></text:p>
      <text:p text:style-name="P29"><text:soft-page-break/><text:span text:style-name="Strong_20_Emphasis"><text:span text:style-name="T10">Request CURL Sample</text:span></text:span>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30">curl --request PUT \</text:p>
            <text:p text:style-name="P30"><text:s text:c="2"/>--url 'https://[maindomian]/api/evaluation/questionnaireResult/in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46" table:style-name="Table46">
        <table:table-column table:style-name="Table46.A"/>
        <table:table-row>
          <table:table-cell table:style-name="Table46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5">in</text:span><text:span text:style-name="T12">activa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5_720390006 Copy 1 Copy 5"/><text:span text:style-name="Strong_20_Emphasis"><text:span text:style-name="T5">Fetch Specific Record</text:span></text:span><text:bookmark-end text:name="__RefHeading___Toc2085_720390006 Copy 1 Copy 5"/></text:h>
      <text:p text:style-name="P29"><text:span text:style-name="Strong_20_Emphasis"><text:span text:style-name="T6">Description</text:span></text:span></text:p>
      <text:p text:style-name="P29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20">result of the </text:span></text:span><text:span text:style-name="Strong_20_Emphasis"><text:span text:style-name="T9">question</text:span></text:span><text:span text:style-name="Strong_20_Emphasis"><text:span text:style-name="T20">naire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47" table:style-name="Table47">
        <table:table-column table:style-name="Table47.A"/>
        <table:table-row>
          <table:table-cell table:style-name="Table47.A1" office:value-type="string">
            <text:p text:style-name="P30">curl --request GET \</text:p>
            <text:p text:style-name="P30"><text:s text:c="2"/>--url 'https://[maindomian]/api/evaluation/questionnaireResult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48" table:style-name="Table48">
        <table:table-column table:style-name="Table48.A"/>
        <table:table-row>
          <table:table-cell table:style-name="Table48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data is returned successfully.",</text:p>
            <text:p text:style-name="P30"><text:tab/>"errorCode" : 0,</text:p>
            <text:p text:style-name="P30"><text:tab/>"data" : {</text:p>
            <text:p text:style-name="P30"><text:tab/><text:tab/>"id" : 16621244611384550112, </text:p>
            <text:p text:style-name="P30"><text:tab/><text:tab/>"title" : "test",</text:p>
            <text:p text:style-name="P30"><text:soft-page-break/><text:tab/><text:tab/>"code" : "123",</text:p>
            <text:p text:style-name="P30"><text:tab/><text:tab/>"description" : "test",</text:p>
            <text:p text:style-name="P30"><text:tab/><text:tab/>"profileId": [{</text:p>
            <text:p text:style-name="P30"><text:tab/><text:tab/><text:tab/>"id" : 16621244611384550113,</text:p>
            <text:p text:style-name="P30"><text:tab/><text:tab/><text:tab/>"firstName": "David",</text:p>
            <text:p text:style-name="P30"><text:tab/><text:tab/><text:tab/>"lastName": "Talor"</text:p>
            <text:p text:style-name="P30"><text:tab/><text:tab/>}],</text:p>
            <text:p text:style-name="P30"><text:tab/><text:tab/>"roleFormPermissionId": [{</text:p>
            <text:p text:style-name="P30"><text:tab/><text:tab/><text:tab/>"id" : 16621244611384550114,</text:p>
            <text:p text:style-name="P30"><text:tab/><text:tab/><text:tab/>"formPermissionId": {</text:p>
            <text:p text:style-name="P30"><text:tab/><text:tab/><text:tab/><text:tab/>"id" : 16621244611384550114,</text:p>
            <text:p text:style-name="P30"><text:tab/><text:tab/><text:tab/><text:tab/>"formId": {</text:p>
            <text:p text:style-name="P30"><text:tab/><text:tab/><text:tab/><text:tab/><text:tab/>"id" : 16621244611384550115,</text:p>
            <text:p text:style-name="P30"><text:tab/><text:tab/><text:tab/><text:tab/><text:tab/>"title": "Project"</text:p>
            <text:p text:style-name="P30"><text:tab/><text:tab/><text:tab/><text:tab/>},</text:p>
            <text:p text:style-name="P30"><text:tab/><text:tab/><text:tab/><text:tab/>"permissionId": {</text:p>
            <text:p text:style-name="P30"><text:tab/><text:tab/><text:tab/><text:tab/><text:tab/>"id" : 16621244611384550116,</text:p>
            <text:p text:style-name="P30"><text:tab/><text:tab/><text:tab/><text:tab/><text:tab/>"title": "Add"</text:p>
            <text:p text:style-name="P30"><text:tab/><text:tab/><text:tab/><text:tab/>}</text:p>
            <text:p text:style-name="P30"><text:tab/><text:tab/><text:tab/>}</text:p>
            <text:p text:style-name="P30"><text:tab/><text:tab/>}],</text:p>
            <text:p text:style-name="P30"><text:tab/><text:tab/>"createdAt" : "2025-8-25 12:00:00",</text:p>
            <text:p text:style-name="P30"><text:tab/><text:tab/>"createdBy" : "John Davis" </text:p>
            <text:p text:style-name="P30"><text:tab/>}</text:p>
            <text:p text:style-name="P30">}</text:p>
          </table:table-cell>
        </table:table-row>
      </table:table>
      <text:p text:style-name="P32"/>
      <text:h text:style-name="P27" text:outline-level="1"><text:bookmark-start text:name="__RefHeading___Toc227_771010674 Copy 1 Copy 6"/>Questionnaire Result Detail<text:bookmark-end text:name="__RefHeading___Toc227_771010674 Copy 1 Copy 6"/></text:h>
      <text:h text:style-name="P28" text:outline-level="2"><text:bookmark-start text:name="__RefHeading___Toc908_3206075736 Copy 1 Copy 1 Copy 6"/><text:span text:style-name="Strong_20_Emphasis"><text:span text:style-name="T5">Delete</text:span></text:span><text:bookmark-end text:name="__RefHeading___Toc908_3206075736 Copy 1 Copy 1 Copy 6"/></text:h>
      <text:p text:style-name="P29"><text:span text:style-name="Strong_20_Emphasis"><text:span text:style-name="T6">Description</text:span></text:span></text:p>
      <text:p text:style-name="P29"><text:span text:style-name="Strong_20_Emphasis"><text:span text:style-name="T7">This API </text:span></text:span><text:span text:style-name="Strong_20_Emphasis"><text:span text:style-name="T8">logically</text:span></text:span><text:span text:style-name="Strong_20_Emphasis"><text:span text:style-name="T7"> deletes a “</text:span></text:span><text:span text:style-name="Strong_20_Emphasis"><text:span text:style-name="T20">single answer of the </text:span></text:span><text:span text:style-name="Strong_20_Emphasis"><text:span text:style-name="T9">question</text:span></text:span><text:span text:style-name="Strong_20_Emphasis"><text:span text:style-name="T20">naire result</text:span></text:span><text:span text:style-name="Strong_20_Emphasis"><text:span text:style-name="T7">” from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49" table:style-name="Table49">
        <table:table-column table:style-name="Table49.A"/>
        <table:table-row>
          <table:table-cell table:style-name="Table49.A1" office:value-type="string">
            <text:p text:style-name="P30">curl --request DELETE \</text:p>
            <text:p text:style-name="P30"><text:s text:c="2"/>--url 'https://[maindomian]/api/evaluation/questionnaireResultDetail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oft-page-break/><text:span text:style-name="Strong_20_Emphasis"><text:span text:style-name="T10">Response Sample</text:span></text:span></text:p>
      <table:table table:name="Table50" table:style-name="Table50">
        <table:table-column table:style-name="Table50.A"/>
        <table:table-row>
          <table:table-cell table:style-name="Table50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2">dele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79_720390006 Copy 1 Copy 6"/><text:span text:style-name="Strong_20_Emphasis"><text:span text:style-name="T5">Active</text:span></text:span><text:bookmark-end text:name="__RefHeading___Toc2079_720390006 Copy 1 Copy 6"/></text:h>
      <text:p text:style-name="P29"><text:span text:style-name="Strong_20_Emphasis"><text:span text:style-name="T6">Description</text:span></text:span></text:p>
      <text:p text:style-name="P35"><text:span text:style-name="Strong_20_Emphasis"><text:span text:style-name="T7">This API actives a “</text:span></text:span><text:span text:style-name="Strong_20_Emphasis"><text:span text:style-name="T20">single answer of the </text:span></text:span><text:span text:style-name="Strong_20_Emphasis"><text:span text:style-name="T9">question</text:span></text:span><text:span text:style-name="Strong_20_Emphasis"><text:span text:style-name="T20">naire result</text:span></text:span><text:span text:style-name="Strong_20_Emphasis"><text:span text:style-name="T7">” in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51" table:style-name="Table51">
        <table:table-column table:style-name="Table51.A"/>
        <table:table-row>
          <table:table-cell table:style-name="Table51.A1" office:value-type="string">
            <text:p text:style-name="P30">curl --request PUT \</text:p>
            <text:p text:style-name="P30"><text:s text:c="2"/>--url 'https://[maindomian]/api/evaluation/questionnaireResultDetail/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52" table:style-name="Table52">
        <table:table-column table:style-name="Table52.A"/>
        <table:table-row>
          <table:table-cell table:style-name="Table52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2">activa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3_720390006 Copy 1 Copy 6"/><text:span text:style-name="Strong_20_Emphasis"><text:span text:style-name="T5">Inactive</text:span></text:span><text:bookmark-end text:name="__RefHeading___Toc2083_720390006 Copy 1 Copy 6"/></text:h>
      <text:p text:style-name="P29"><text:span text:style-name="Strong_20_Emphasis"><text:span text:style-name="T6">Description</text:span></text:span></text:p>
      <text:p text:style-name="P35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“</text:span></text:span><text:span text:style-name="Strong_20_Emphasis"><text:span text:style-name="T20">single answer of the </text:span></text:span><text:span text:style-name="Strong_20_Emphasis"><text:span text:style-name="T9">question</text:span></text:span><text:span text:style-name="Strong_20_Emphasis"><text:span text:style-name="T20">naire result</text:span></text:span><text:span text:style-name="Strong_20_Emphasis"><text:span text:style-name="T7">” in the </text:span></text:span><text:span text:style-name="Strong_20_Emphasis"><text:span text:style-name="T14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53" table:style-name="Table53">
        <table:table-column table:style-name="Table53.A"/>
        <text:soft-page-break/>
        <table:table-row>
          <table:table-cell table:style-name="Table53.A1" office:value-type="string">
            <text:p text:style-name="P30">curl --request PUT \</text:p>
            <text:p text:style-name="P30"><text:s text:c="2"/>--url 'https://[maindomian]/api/evaluation/questionnaireResultDetail/in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5">in</text:span><text:span text:style-name="T12">activa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5_720390006 Copy 1 Copy 6"/><text:span text:style-name="Strong_20_Emphasis"><text:span text:style-name="T5">Fetch Specific Record</text:span></text:span><text:bookmark-end text:name="__RefHeading___Toc2085_720390006 Copy 1 Copy 6"/></text:h>
      <text:p text:style-name="P29"><text:span text:style-name="Strong_20_Emphasis"><text:span text:style-name="T6">Description</text:span></text:span></text:p>
      <text:p text:style-name="P35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20">single answer of the </text:span></text:span><text:span text:style-name="Strong_20_Emphasis"><text:span text:style-name="T9">question</text:span></text:span><text:span text:style-name="Strong_20_Emphasis"><text:span text:style-name="T20">naire result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55" table:style-name="Table55">
        <table:table-column table:style-name="Table55.A"/>
        <table:table-row>
          <table:table-cell table:style-name="Table55.A1" office:value-type="string">
            <text:p text:style-name="P30">curl --request GET \</text:p>
            <text:p text:style-name="P30"><text:s text:c="2"/>--url 'https://[maindomian]/api/evaluation/questionnaireResultDetail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56" table:style-name="Table56">
        <table:table-column table:style-name="Table56.A"/>
        <table:table-row>
          <table:table-cell table:style-name="Table56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data is returned successfully.",</text:p>
            <text:p text:style-name="P30"><text:tab/>"errorCode" : 0,</text:p>
            <text:p text:style-name="P30"><text:tab/>"data" : {</text:p>
            <text:p text:style-name="P30"><text:tab/><text:tab/>"id" : 16621244611384550112, </text:p>
            <text:p text:style-name="P30"><text:tab/><text:tab/>"title" : "test",</text:p>
            <text:p text:style-name="P30"><text:tab/><text:tab/>"code" : "123",</text:p>
            <text:p text:style-name="P30"><text:tab/><text:tab/>"description" : "test",</text:p>
            <text:p text:style-name="P30"><text:soft-page-break/><text:tab/><text:tab/>"profileId": [{</text:p>
            <text:p text:style-name="P30"><text:tab/><text:tab/><text:tab/>"id" : 16621244611384550113,</text:p>
            <text:p text:style-name="P30"><text:tab/><text:tab/><text:tab/>"firstName": "David",</text:p>
            <text:p text:style-name="P30"><text:tab/><text:tab/><text:tab/>"lastName": "Talor"</text:p>
            <text:p text:style-name="P30"><text:tab/><text:tab/>}],</text:p>
            <text:p text:style-name="P30"><text:tab/><text:tab/>"roleFormPermissionId": [{</text:p>
            <text:p text:style-name="P30"><text:tab/><text:tab/><text:tab/>"id" : 16621244611384550114,</text:p>
            <text:p text:style-name="P30"><text:tab/><text:tab/><text:tab/>"formPermissionId": {</text:p>
            <text:p text:style-name="P30"><text:tab/><text:tab/><text:tab/><text:tab/>"id" : 16621244611384550114,</text:p>
            <text:p text:style-name="P30"><text:tab/><text:tab/><text:tab/><text:tab/>"formId": {</text:p>
            <text:p text:style-name="P30"><text:tab/><text:tab/><text:tab/><text:tab/><text:tab/>"id" : 16621244611384550115,</text:p>
            <text:p text:style-name="P30"><text:tab/><text:tab/><text:tab/><text:tab/><text:tab/>"title": "Project"</text:p>
            <text:p text:style-name="P30"><text:tab/><text:tab/><text:tab/><text:tab/>},</text:p>
            <text:p text:style-name="P30"><text:tab/><text:tab/><text:tab/><text:tab/>"permissionId": {</text:p>
            <text:p text:style-name="P30"><text:tab/><text:tab/><text:tab/><text:tab/><text:tab/>"id" : 16621244611384550116,</text:p>
            <text:p text:style-name="P30"><text:tab/><text:tab/><text:tab/><text:tab/><text:tab/>"title": "Add"</text:p>
            <text:p text:style-name="P30"><text:tab/><text:tab/><text:tab/><text:tab/>}</text:p>
            <text:p text:style-name="P30"><text:tab/><text:tab/><text:tab/>}</text:p>
            <text:p text:style-name="P30"><text:tab/><text:tab/>}],</text:p>
            <text:p text:style-name="P30"><text:tab/><text:tab/>"createdAt" : "2025-8-25 12:00:00",</text:p>
            <text:p text:style-name="P30"><text:tab/><text:tab/>"createdBy" : "John Davis" </text:p>
            <text:p text:style-name="P30"><text:tab/>}</text:p>
            <text:p text:style-name="P30">}</text:p>
          </table:table-cell>
        </table:table-row>
      </table:table>
      <text:p text:style-name="P32"/>
      <text:h text:style-name="P27" text:outline-level="1"><text:bookmark-start text:name="__RefHeading___Toc227_771010674 Copy 1 Copy 7"/>Staff Satisfaction Evaluation<text:bookmark-end text:name="__RefHeading___Toc227_771010674 Copy 1 Copy 7"/></text:h>
      <text:h text:style-name="P28" text:outline-level="2"><text:bookmark-start text:name="__RefHeading___Toc908_3206075736 Copy 1 Copy 1 Copy 7"/><text:span text:style-name="Strong_20_Emphasis"><text:span text:style-name="T5">Delete</text:span></text:span><text:bookmark-end text:name="__RefHeading___Toc908_3206075736 Copy 1 Copy 1 Copy 7"/></text:h>
      <text:p text:style-name="P29"><text:span text:style-name="Strong_20_Emphasis"><text:span text:style-name="T6">Description</text:span></text:span></text:p>
      <text:p text:style-name="P29"><text:span text:style-name="Strong_20_Emphasis"><text:span text:style-name="T7">This API </text:span></text:span><text:span text:style-name="Strong_20_Emphasis"><text:span text:style-name="T8">logically</text:span></text:span><text:span text:style-name="Strong_20_Emphasis"><text:span text:style-name="T7"> deletes a</text:span></text:span><text:span text:style-name="Strong_20_Emphasis"><text:span text:style-name="T21">n</text:span></text:span><text:span text:style-name="Strong_20_Emphasis"><text:span text:style-name="T7"> “</text:span></text:span><text:span text:style-name="Strong_20_Emphasis"><text:span text:style-name="T21">evaluation </text:span></text:span><text:span text:style-name="Strong_20_Emphasis"><text:span text:style-name="T21">result of staff satisfaction</text:span></text:span><text:span text:style-name="Strong_20_Emphasis"><text:span text:style-name="T7">” from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57" table:style-name="Table57">
        <table:table-column table:style-name="Table57.A"/>
        <table:table-row>
          <table:table-cell table:style-name="Table57.A1" office:value-type="string">
            <text:p text:style-name="P30">curl --request DELETE \</text:p>
            <text:p text:style-name="P30"><text:s text:c="2"/>--url 'https://[maindomian]/api/evaluation/staffSatisfactionEvaluation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oft-page-break/><text:span text:style-name="Strong_20_Emphasis"><text:span text:style-name="T10">Response Sample</text:span></text:span></text:p>
      <table:table table:name="Table58" table:style-name="Table58">
        <table:table-column table:style-name="Table58.A"/>
        <table:table-row>
          <table:table-cell table:style-name="Table58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2">dele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79_720390006 Copy 1 Copy 7"/><text:span text:style-name="Strong_20_Emphasis"><text:span text:style-name="T5">Active</text:span></text:span><text:bookmark-end text:name="__RefHeading___Toc2079_720390006 Copy 1 Copy 7"/></text:h>
      <text:p text:style-name="P29"><text:span text:style-name="Strong_20_Emphasis"><text:span text:style-name="T6">Description</text:span></text:span></text:p>
      <text:p text:style-name="P36"><text:span text:style-name="Strong_20_Emphasis"><text:span text:style-name="T7">This API actives a</text:span></text:span><text:span text:style-name="Strong_20_Emphasis"><text:span text:style-name="T21">n</text:span></text:span><text:span text:style-name="Strong_20_Emphasis"><text:span text:style-name="T7"> “</text:span></text:span><text:span text:style-name="Strong_20_Emphasis"><text:span text:style-name="T21">evaluation result of staff satisfaction</text:span></text:span><text:span text:style-name="Strong_20_Emphasis"><text:span text:style-name="T7">” in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59" table:style-name="Table59">
        <table:table-column table:style-name="Table59.A"/>
        <table:table-row>
          <table:table-cell table:style-name="Table59.A1" office:value-type="string">
            <text:p text:style-name="P30">curl --request PUT \</text:p>
            <text:p text:style-name="P30"><text:s text:c="2"/>--url 'https://[maindomian]/api/evaluation/staffSatisfactionEvaluation/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60" table:style-name="Table60">
        <table:table-column table:style-name="Table60.A"/>
        <table:table-row>
          <table:table-cell table:style-name="Table60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2">activa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3_720390006 Copy 1 Copy 7"/><text:span text:style-name="Strong_20_Emphasis"><text:span text:style-name="T5">Inactive</text:span></text:span><text:bookmark-end text:name="__RefHeading___Toc2083_720390006 Copy 1 Copy 7"/></text:h>
      <text:p text:style-name="P29"><text:span text:style-name="Strong_20_Emphasis"><text:span text:style-name="T6">Description</text:span></text:span></text:p>
      <text:p text:style-name="P36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“</text:span></text:span><text:span text:style-name="Strong_20_Emphasis"><text:span text:style-name="T21">evaluation result of staff satisfaction</text:span></text:span><text:span text:style-name="Strong_20_Emphasis"><text:span text:style-name="T7">” in the </text:span></text:span><text:span text:style-name="Strong_20_Emphasis"><text:span text:style-name="T14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61" table:style-name="Table61">
        <table:table-column table:style-name="Table61.A"/>
        <text:soft-page-break/>
        <table:table-row>
          <table:table-cell table:style-name="Table61.A1" office:value-type="string">
            <text:p text:style-name="P30">curl --request PUT \</text:p>
            <text:p text:style-name="P30"><text:s text:c="2"/>--url 'https://[maindomian]/api/evaluation/staffSatisfactionEvaluation/in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62" table:style-name="Table62">
        <table:table-column table:style-name="Table62.A"/>
        <table:table-row>
          <table:table-cell table:style-name="Table62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5">in</text:span><text:span text:style-name="T12">activa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5_720390006 Copy 1 Copy 7"/><text:span text:style-name="Strong_20_Emphasis"><text:span text:style-name="T5">Fetch Specific Record</text:span></text:span><text:bookmark-end text:name="__RefHeading___Toc2085_720390006 Copy 1 Copy 7"/></text:h>
      <text:p text:style-name="P29"><text:span text:style-name="Strong_20_Emphasis"><text:span text:style-name="T6">Description</text:span></text:span></text:p>
      <text:p text:style-name="P36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21">evaluation result of staff satisfaction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63" table:style-name="Table63">
        <table:table-column table:style-name="Table63.A"/>
        <table:table-row>
          <table:table-cell table:style-name="Table63.A1" office:value-type="string">
            <text:p text:style-name="P30">curl --request GET \</text:p>
            <text:p text:style-name="P30"><text:s text:c="2"/>--url 'https://[maindomian]/api/evaluation/staffSatisfactionEvaluation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64" table:style-name="Table64">
        <table:table-column table:style-name="Table64.A"/>
        <table:table-row>
          <table:table-cell table:style-name="Table64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data is returned successfully.",</text:p>
            <text:p text:style-name="P30"><text:tab/>"errorCode" : 0,</text:p>
            <text:p text:style-name="P30"><text:tab/>"data" : {</text:p>
            <text:p text:style-name="P30"><text:tab/><text:tab/>"id" : 16621244611384550112, </text:p>
            <text:p text:style-name="P30"><text:tab/><text:tab/>"title" : "test",</text:p>
            <text:p text:style-name="P30"><text:tab/><text:tab/>"code" : "123",</text:p>
            <text:p text:style-name="P30"><text:soft-page-break/><text:tab/><text:tab/>"description" : "test",</text:p>
            <text:p text:style-name="P30"><text:tab/><text:tab/>"profileId": [{</text:p>
            <text:p text:style-name="P30"><text:tab/><text:tab/><text:tab/>"id" : 16621244611384550113,</text:p>
            <text:p text:style-name="P30"><text:tab/><text:tab/><text:tab/>"firstName": "David",</text:p>
            <text:p text:style-name="P30"><text:tab/><text:tab/><text:tab/>"lastName": "Talor"</text:p>
            <text:p text:style-name="P30"><text:tab/><text:tab/>}],</text:p>
            <text:p text:style-name="P30"><text:tab/><text:tab/>"roleFormPermissionId": [{</text:p>
            <text:p text:style-name="P30"><text:tab/><text:tab/><text:tab/>"id" : 16621244611384550114,</text:p>
            <text:p text:style-name="P30"><text:tab/><text:tab/><text:tab/>"formPermissionId": {</text:p>
            <text:p text:style-name="P30"><text:tab/><text:tab/><text:tab/><text:tab/>"id" : 16621244611384550114,</text:p>
            <text:p text:style-name="P30"><text:tab/><text:tab/><text:tab/><text:tab/>"formId": {</text:p>
            <text:p text:style-name="P30"><text:tab/><text:tab/><text:tab/><text:tab/><text:tab/>"id" : 16621244611384550115,</text:p>
            <text:p text:style-name="P30"><text:tab/><text:tab/><text:tab/><text:tab/><text:tab/>"title": "Project"</text:p>
            <text:p text:style-name="P30"><text:tab/><text:tab/><text:tab/><text:tab/>},</text:p>
            <text:p text:style-name="P30"><text:tab/><text:tab/><text:tab/><text:tab/>"permissionId": {</text:p>
            <text:p text:style-name="P30"><text:tab/><text:tab/><text:tab/><text:tab/><text:tab/>"id" : 16621244611384550116,</text:p>
            <text:p text:style-name="P30"><text:tab/><text:tab/><text:tab/><text:tab/><text:tab/>"title": "Add"</text:p>
            <text:p text:style-name="P30"><text:tab/><text:tab/><text:tab/><text:tab/>}</text:p>
            <text:p text:style-name="P30"><text:tab/><text:tab/><text:tab/>}</text:p>
            <text:p text:style-name="P30"><text:tab/><text:tab/>}],</text:p>
            <text:p text:style-name="P30"><text:tab/><text:tab/>"createdAt" : "2025-8-25 12:00:00",</text:p>
            <text:p text:style-name="P30"><text:tab/><text:tab/>"createdBy" : "John Davis" </text:p>
            <text:p text:style-name="P30"><text:tab/>}</text:p>
            <text:p text:style-name="P30">}</text:p>
          </table:table-cell>
        </table:table-row>
      </table:table>
      <text:p text:style-name="P32"/>
      <text:h text:style-name="P27" text:outline-level="1"><text:bookmark-start text:name="__RefHeading___Toc227_771010674 Copy 1 Copy 8"/>Project Productivity Evaluation<text:bookmark-end text:name="__RefHeading___Toc227_771010674 Copy 1 Copy 8"/></text:h>
      <text:h text:style-name="P28" text:outline-level="2"><text:bookmark-start text:name="__RefHeading___Toc908_3206075736 Copy 1 Copy 1 Copy 8"/><text:span text:style-name="Strong_20_Emphasis"><text:span text:style-name="T5">Delete</text:span></text:span><text:bookmark-end text:name="__RefHeading___Toc908_3206075736 Copy 1 Copy 1 Copy 8"/></text:h>
      <text:p text:style-name="P29"><text:span text:style-name="Strong_20_Emphasis"><text:span text:style-name="T6">Description</text:span></text:span></text:p>
      <text:p text:style-name="P29"><text:span text:style-name="Strong_20_Emphasis"><text:span text:style-name="T7">This API </text:span></text:span><text:span text:style-name="Strong_20_Emphasis"><text:span text:style-name="T8">logically</text:span></text:span><text:span text:style-name="Strong_20_Emphasis"><text:span text:style-name="T7"> deletes a</text:span></text:span><text:span text:style-name="Strong_20_Emphasis"><text:span text:style-name="T22">n</text:span></text:span><text:span text:style-name="Strong_20_Emphasis"><text:span text:style-name="T7"> “</text:span></text:span><text:span text:style-name="Strong_20_Emphasis"><text:span text:style-name="T22">evaluation result of the project productivity</text:span></text:span><text:span text:style-name="Strong_20_Emphasis"><text:span text:style-name="T7">” from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65" table:style-name="Table65">
        <table:table-column table:style-name="Table65.A"/>
        <table:table-row>
          <table:table-cell table:style-name="Table65.A1" office:value-type="string">
            <text:p text:style-name="P30">curl --request DELETE \</text:p>
            <text:p text:style-name="P30"><text:s text:c="2"/>--url 'https://[maindomian]/api/evaluation/projectProductivityEvaluation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oft-page-break/><text:span text:style-name="Strong_20_Emphasis"><text:span text:style-name="T10">Response Sample</text:span></text:span></text:p>
      <table:table table:name="Table66" table:style-name="Table66">
        <table:table-column table:style-name="Table66.A"/>
        <table:table-row>
          <table:table-cell table:style-name="Table66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2">dele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79_720390006 Copy 1 Copy 8"/><text:span text:style-name="Strong_20_Emphasis"><text:span text:style-name="T5">Active</text:span></text:span><text:bookmark-end text:name="__RefHeading___Toc2079_720390006 Copy 1 Copy 8"/></text:h>
      <text:p text:style-name="P29"><text:span text:style-name="Strong_20_Emphasis"><text:span text:style-name="T6">Description</text:span></text:span></text:p>
      <text:p text:style-name="P37"><text:span text:style-name="Strong_20_Emphasis"><text:span text:style-name="T7">This API actives a</text:span></text:span><text:span text:style-name="Strong_20_Emphasis"><text:span text:style-name="T22">n</text:span></text:span><text:span text:style-name="Strong_20_Emphasis"><text:span text:style-name="T7"> “</text:span></text:span><text:span text:style-name="Strong_20_Emphasis"><text:span text:style-name="T22">evaluation result of the project productivity</text:span></text:span><text:span text:style-name="Strong_20_Emphasis"><text:span text:style-name="T7">” in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67" table:style-name="Table67">
        <table:table-column table:style-name="Table67.A"/>
        <table:table-row>
          <table:table-cell table:style-name="Table67.A1" office:value-type="string">
            <text:p text:style-name="P30">curl --request PUT \</text:p>
            <text:p text:style-name="P30"><text:s text:c="2"/>--url 'https://[maindomian]/api/evaluation/projectProductivityEvaluation/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68" table:style-name="Table68">
        <table:table-column table:style-name="Table68.A"/>
        <table:table-row>
          <table:table-cell table:style-name="Table68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2">activa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3_720390006 Copy 1 Copy 8"/><text:span text:style-name="Strong_20_Emphasis"><text:span text:style-name="T5">Inactive</text:span></text:span><text:bookmark-end text:name="__RefHeading___Toc2083_720390006 Copy 1 Copy 8"/></text:h>
      <text:p text:style-name="P29"><text:span text:style-name="Strong_20_Emphasis"><text:span text:style-name="T6">Description</text:span></text:span></text:p>
      <text:p text:style-name="P37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“</text:span></text:span><text:span text:style-name="Strong_20_Emphasis"><text:span text:style-name="T22">evaluation result of the project productivity</text:span></text:span><text:span text:style-name="Strong_20_Emphasis"><text:span text:style-name="T7">” in the </text:span></text:span><text:span text:style-name="Strong_20_Emphasis"><text:span text:style-name="T14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69" table:style-name="Table69">
        <table:table-column table:style-name="Table69.A"/>
        <text:soft-page-break/>
        <table:table-row>
          <table:table-cell table:style-name="Table69.A1" office:value-type="string">
            <text:p text:style-name="P30">curl --request PUT \</text:p>
            <text:p text:style-name="P30"><text:s text:c="2"/>--url 'https://[maindomian]/api/evaluation/projectProductivityEvaluation/in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70" table:style-name="Table70">
        <table:table-column table:style-name="Table70.A"/>
        <table:table-row>
          <table:table-cell table:style-name="Table70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5">in</text:span><text:span text:style-name="T12">activa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5_720390006 Copy 1 Copy 8"/><text:span text:style-name="Strong_20_Emphasis"><text:span text:style-name="T5">Fetch Specific Record</text:span></text:span><text:bookmark-end text:name="__RefHeading___Toc2085_720390006 Copy 1 Copy 8"/></text:h>
      <text:p text:style-name="P29"><text:span text:style-name="Strong_20_Emphasis"><text:span text:style-name="T6">Description</text:span></text:span></text:p>
      <text:p text:style-name="P37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22">evaluation result of the project productivity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71" table:style-name="Table71">
        <table:table-column table:style-name="Table71.A"/>
        <table:table-row>
          <table:table-cell table:style-name="Table71.A1" office:value-type="string">
            <text:p text:style-name="P30">curl --request GET \</text:p>
            <text:p text:style-name="P30"><text:s text:c="2"/>--url 'https://[maindomian]/api/evaluation/projectProductivityEvaluation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72" table:style-name="Table72">
        <table:table-column table:style-name="Table72.A"/>
        <table:table-row>
          <table:table-cell table:style-name="Table72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data is returned successfully.",</text:p>
            <text:p text:style-name="P30"><text:tab/>"errorCode" : 0,</text:p>
            <text:p text:style-name="P30"><text:tab/>"data" : {</text:p>
            <text:p text:style-name="P30"><text:tab/><text:tab/>"id" : 16621244611384550112, </text:p>
            <text:p text:style-name="P30"><text:tab/><text:tab/>"title" : "test",</text:p>
            <text:p text:style-name="P30"><text:tab/><text:tab/>"code" : "123",</text:p>
            <text:p text:style-name="P30"><text:soft-page-break/><text:tab/><text:tab/>"description" : "test",</text:p>
            <text:p text:style-name="P30"><text:tab/><text:tab/>"profileId": [{</text:p>
            <text:p text:style-name="P30"><text:tab/><text:tab/><text:tab/>"id" : 16621244611384550113,</text:p>
            <text:p text:style-name="P30"><text:tab/><text:tab/><text:tab/>"firstName": "David",</text:p>
            <text:p text:style-name="P30"><text:tab/><text:tab/><text:tab/>"lastName": "Talor"</text:p>
            <text:p text:style-name="P30"><text:tab/><text:tab/>}],</text:p>
            <text:p text:style-name="P30"><text:tab/><text:tab/>"roleFormPermissionId": [{</text:p>
            <text:p text:style-name="P30"><text:tab/><text:tab/><text:tab/>"id" : 16621244611384550114,</text:p>
            <text:p text:style-name="P30"><text:tab/><text:tab/><text:tab/>"formPermissionId": {</text:p>
            <text:p text:style-name="P30"><text:tab/><text:tab/><text:tab/><text:tab/>"id" : 16621244611384550114,</text:p>
            <text:p text:style-name="P30"><text:tab/><text:tab/><text:tab/><text:tab/>"formId": {</text:p>
            <text:p text:style-name="P30"><text:tab/><text:tab/><text:tab/><text:tab/><text:tab/>"id" : 16621244611384550115,</text:p>
            <text:p text:style-name="P30"><text:tab/><text:tab/><text:tab/><text:tab/><text:tab/>"title": "Project"</text:p>
            <text:p text:style-name="P30"><text:tab/><text:tab/><text:tab/><text:tab/>},</text:p>
            <text:p text:style-name="P30"><text:tab/><text:tab/><text:tab/><text:tab/>"permissionId": {</text:p>
            <text:p text:style-name="P30"><text:tab/><text:tab/><text:tab/><text:tab/><text:tab/>"id" : 16621244611384550116,</text:p>
            <text:p text:style-name="P30"><text:tab/><text:tab/><text:tab/><text:tab/><text:tab/>"title": "Add"</text:p>
            <text:p text:style-name="P30"><text:tab/><text:tab/><text:tab/><text:tab/>}</text:p>
            <text:p text:style-name="P30"><text:tab/><text:tab/><text:tab/>}</text:p>
            <text:p text:style-name="P30"><text:tab/><text:tab/>}],</text:p>
            <text:p text:style-name="P30"><text:tab/><text:tab/>"createdAt" : "2025-8-25 12:00:00",</text:p>
            <text:p text:style-name="P30"><text:tab/><text:tab/>"createdBy" : "John Davis" </text:p>
            <text:p text:style-name="P30"><text:tab/>}</text:p>
            <text:p text:style-name="P30">}</text:p>
          </table:table-cell>
        </table:table-row>
      </table:table>
      <text:p text:style-name="P32"/>
      <text:h text:style-name="P27" text:outline-level="1"><text:bookmark-start text:name="__RefHeading___Toc227_771010674 Copy 1 Copy 9"/>Customer Satisfaction Evaluation<text:bookmark-end text:name="__RefHeading___Toc227_771010674 Copy 1 Copy 9"/></text:h>
      <text:h text:style-name="P28" text:outline-level="2"><text:bookmark-start text:name="__RefHeading___Toc908_3206075736 Copy 1 Copy 1 Copy 9"/><text:span text:style-name="Strong_20_Emphasis"><text:span text:style-name="T5">Delete</text:span></text:span><text:bookmark-end text:name="__RefHeading___Toc908_3206075736 Copy 1 Copy 1 Copy 9"/></text:h>
      <text:p text:style-name="P29"><text:span text:style-name="Strong_20_Emphasis"><text:span text:style-name="T6">Description</text:span></text:span></text:p>
      <text:p text:style-name="P38"><text:span text:style-name="Strong_20_Emphasis"><text:span text:style-name="T7">This API </text:span></text:span><text:span text:style-name="Strong_20_Emphasis"><text:span text:style-name="T8">logically</text:span></text:span><text:span text:style-name="Strong_20_Emphasis"><text:span text:style-name="T7"> deletes a</text:span></text:span><text:span text:style-name="Strong_20_Emphasis"><text:span text:style-name="T23">n</text:span></text:span><text:span text:style-name="Strong_20_Emphasis"><text:span text:style-name="T7"> “</text:span></text:span><text:span text:style-name="Strong_20_Emphasis"><text:span text:style-name="T21">evaluation result of </text:span></text:span><text:span text:style-name="Strong_20_Emphasis"><text:span text:style-name="T23">customer</text:span></text:span><text:span text:style-name="Strong_20_Emphasis"><text:span text:style-name="T21"> satisfaction</text:span></text:span><text:span text:style-name="Strong_20_Emphasis"><text:span text:style-name="T7">” from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P30">curl --request DELETE \</text:p>
            <text:p text:style-name="P30"><text:s text:c="2"/>--url 'https://[maindomian]/api/evaluation/customerSatisfactionEvaluation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oft-page-break/><text:span text:style-name="Strong_20_Emphasis"><text:span text:style-name="T10">Response Sample</text:span></text:span></text:p>
      <table:table table:name="Table74" table:style-name="Table74">
        <table:table-column table:style-name="Table74.A"/>
        <table:table-row>
          <table:table-cell table:style-name="Table74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2">dele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79_720390006 Copy 1 Copy 9"/><text:span text:style-name="Strong_20_Emphasis"><text:span text:style-name="T5">Active</text:span></text:span><text:bookmark-end text:name="__RefHeading___Toc2079_720390006 Copy 1 Copy 9"/></text:h>
      <text:p text:style-name="P29"><text:span text:style-name="Strong_20_Emphasis"><text:span text:style-name="T6">Description</text:span></text:span></text:p>
      <text:p text:style-name="P38"><text:span text:style-name="Strong_20_Emphasis"><text:span text:style-name="T7">This API actives a</text:span></text:span><text:span text:style-name="Strong_20_Emphasis"><text:span text:style-name="T23">n</text:span></text:span><text:span text:style-name="Strong_20_Emphasis"><text:span text:style-name="T7"> “</text:span></text:span><text:span text:style-name="Strong_20_Emphasis"><text:span text:style-name="T21">evaluation result of </text:span></text:span><text:span text:style-name="Strong_20_Emphasis"><text:span text:style-name="T23">customer</text:span></text:span><text:span text:style-name="Strong_20_Emphasis"><text:span text:style-name="T21"> satisfaction</text:span></text:span><text:span text:style-name="Strong_20_Emphasis"><text:span text:style-name="T7">” in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75" table:style-name="Table75">
        <table:table-column table:style-name="Table75.A"/>
        <table:table-row>
          <table:table-cell table:style-name="Table75.A1" office:value-type="string">
            <text:p text:style-name="P30">curl --request PUT \</text:p>
            <text:p text:style-name="P30"><text:s text:c="2"/>--url 'https://[maindomian]/api/evaluation/customerSatisfactionEvaluation/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76" table:style-name="Table76">
        <table:table-column table:style-name="Table76.A"/>
        <table:table-row>
          <table:table-cell table:style-name="Table76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2">activa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3_720390006 Copy 1 Copy 9"/><text:span text:style-name="Strong_20_Emphasis"><text:span text:style-name="T5">Inactive</text:span></text:span><text:bookmark-end text:name="__RefHeading___Toc2083_720390006 Copy 1 Copy 9"/></text:h>
      <text:p text:style-name="P29"><text:span text:style-name="Strong_20_Emphasis"><text:span text:style-name="T6">Description</text:span></text:span></text:p>
      <text:p text:style-name="P38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“</text:span></text:span><text:span text:style-name="Strong_20_Emphasis"><text:span text:style-name="T21">evaluation result of </text:span></text:span><text:span text:style-name="Strong_20_Emphasis"><text:span text:style-name="T23">customer</text:span></text:span><text:span text:style-name="Strong_20_Emphasis"><text:span text:style-name="T21"> satisfaction</text:span></text:span><text:span text:style-name="Strong_20_Emphasis"><text:span text:style-name="T7">” in the </text:span></text:span><text:span text:style-name="Strong_20_Emphasis"><text:span text:style-name="T14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77" table:style-name="Table77">
        <table:table-column table:style-name="Table77.A"/>
        <text:soft-page-break/>
        <table:table-row>
          <table:table-cell table:style-name="Table77.A1" office:value-type="string">
            <text:p text:style-name="P30">curl --request PUT \</text:p>
            <text:p text:style-name="P30"><text:s text:c="2"/>--url 'https://[maindomian]/api/evaluation/customerSatisfactionEvaluation/in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78" table:style-name="Table78">
        <table:table-column table:style-name="Table78.A"/>
        <table:table-row>
          <table:table-cell table:style-name="Table78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5">in</text:span><text:span text:style-name="T12">activa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5_720390006 Copy 1 Copy 9"/><text:span text:style-name="Strong_20_Emphasis"><text:span text:style-name="T5">Fetch Specific Record</text:span></text:span><text:bookmark-end text:name="__RefHeading___Toc2085_720390006 Copy 1 Copy 9"/></text:h>
      <text:p text:style-name="P29"><text:span text:style-name="Strong_20_Emphasis"><text:span text:style-name="T6">Description</text:span></text:span></text:p>
      <text:p text:style-name="P38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21">evaluation result of </text:span></text:span><text:span text:style-name="Strong_20_Emphasis"><text:span text:style-name="T23">customer</text:span></text:span><text:span text:style-name="Strong_20_Emphasis"><text:span text:style-name="T21"> satisfaction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79" table:style-name="Table79">
        <table:table-column table:style-name="Table79.A"/>
        <table:table-row>
          <table:table-cell table:style-name="Table79.A1" office:value-type="string">
            <text:p text:style-name="P30">curl --request GET \</text:p>
            <text:p text:style-name="P30"><text:s text:c="2"/>--url 'https://[maindomian]/api/evaluation/customerSatisfactionEvaluation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80" table:style-name="Table80">
        <table:table-column table:style-name="Table80.A"/>
        <table:table-row>
          <table:table-cell table:style-name="Table80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data is returned successfully.",</text:p>
            <text:p text:style-name="P30"><text:tab/>"errorCode" : 0,</text:p>
            <text:p text:style-name="P30"><text:tab/>"data" : {</text:p>
            <text:p text:style-name="P30"><text:tab/><text:tab/>"id" : 16621244611384550112, </text:p>
            <text:p text:style-name="P30"><text:tab/><text:tab/>"title" : "test",</text:p>
            <text:p text:style-name="P30"><text:tab/><text:tab/>"code" : "123",</text:p>
            <text:p text:style-name="P30"><text:soft-page-break/><text:tab/><text:tab/>"description" : "test",</text:p>
            <text:p text:style-name="P30"><text:tab/><text:tab/>"profileId": [{</text:p>
            <text:p text:style-name="P30"><text:tab/><text:tab/><text:tab/>"id" : 16621244611384550113,</text:p>
            <text:p text:style-name="P30"><text:tab/><text:tab/><text:tab/>"firstName": "David",</text:p>
            <text:p text:style-name="P30"><text:tab/><text:tab/><text:tab/>"lastName": "Talor"</text:p>
            <text:p text:style-name="P30"><text:tab/><text:tab/>}],</text:p>
            <text:p text:style-name="P30"><text:tab/><text:tab/>"roleFormPermissionId": [{</text:p>
            <text:p text:style-name="P30"><text:tab/><text:tab/><text:tab/>"id" : 16621244611384550114,</text:p>
            <text:p text:style-name="P30"><text:tab/><text:tab/><text:tab/>"formPermissionId": {</text:p>
            <text:p text:style-name="P30"><text:tab/><text:tab/><text:tab/><text:tab/>"id" : 16621244611384550114,</text:p>
            <text:p text:style-name="P30"><text:tab/><text:tab/><text:tab/><text:tab/>"formId": {</text:p>
            <text:p text:style-name="P30"><text:tab/><text:tab/><text:tab/><text:tab/><text:tab/>"id" : 16621244611384550115,</text:p>
            <text:p text:style-name="P30"><text:tab/><text:tab/><text:tab/><text:tab/><text:tab/>"title": "Project"</text:p>
            <text:p text:style-name="P30"><text:tab/><text:tab/><text:tab/><text:tab/>},</text:p>
            <text:p text:style-name="P30"><text:tab/><text:tab/><text:tab/><text:tab/>"permissionId": {</text:p>
            <text:p text:style-name="P30"><text:tab/><text:tab/><text:tab/><text:tab/><text:tab/>"id" : 16621244611384550116,</text:p>
            <text:p text:style-name="P30"><text:tab/><text:tab/><text:tab/><text:tab/><text:tab/>"title": "Add"</text:p>
            <text:p text:style-name="P30"><text:tab/><text:tab/><text:tab/><text:tab/>}</text:p>
            <text:p text:style-name="P30"><text:tab/><text:tab/><text:tab/>}</text:p>
            <text:p text:style-name="P30"><text:tab/><text:tab/>}],</text:p>
            <text:p text:style-name="P30"><text:tab/><text:tab/>"createdAt" : "2025-8-25 12:00:00",</text:p>
            <text:p text:style-name="P30"><text:tab/><text:tab/>"createdBy" : "John Davis" </text:p>
            <text:p text:style-name="P30"><text:tab/>}</text:p>
            <text:p text:style-name="P30">}</text:p>
          </table:table-cell>
        </table:table-row>
      </table:table>
      <text:p text:style-name="P32"/>
      <text:h text:style-name="P27" text:outline-level="1"><text:bookmark-start text:name="__RefHeading___Toc227_771010674 Copy 1 Copy 10"/>Customer Feedback<text:bookmark-end text:name="__RefHeading___Toc227_771010674 Copy 1 Copy 10"/></text:h>
      <text:h text:style-name="P28" text:outline-level="2"><text:bookmark-start text:name="__RefHeading___Toc908_3206075736 Copy 1 Copy 1 Copy 10"/><text:span text:style-name="Strong_20_Emphasis"><text:span text:style-name="T5">Delete</text:span></text:span><text:bookmark-end text:name="__RefHeading___Toc908_3206075736 Copy 1 Copy 1 Copy 10"/></text:h>
      <text:p text:style-name="P29"><text:span text:style-name="Strong_20_Emphasis"><text:span text:style-name="T6">Description</text:span></text:span></text:p>
      <text:p text:style-name="P29"><text:span text:style-name="Strong_20_Emphasis"><text:span text:style-name="T7">This API </text:span></text:span><text:span text:style-name="Strong_20_Emphasis"><text:span text:style-name="T8">logically</text:span></text:span><text:span text:style-name="Strong_20_Emphasis"><text:span text:style-name="T7"> deletes a “</text:span></text:span><text:span text:style-name="Strong_20_Emphasis"><text:span text:style-name="T23">customer feedback</text:span></text:span><text:span text:style-name="Strong_20_Emphasis"><text:span text:style-name="T7">” from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84" table:style-name="Table84">
        <table:table-column table:style-name="Table84.A"/>
        <table:table-row>
          <table:table-cell table:style-name="Table84.A1" office:value-type="string">
            <text:p text:style-name="P30">curl --request DELETE \</text:p>
            <text:p text:style-name="P30"><text:s text:c="2"/>--url 'https://[maindomian]/api/evaluation/customerFeedback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85" table:style-name="Table85">
        <table:table-column table:style-name="Table85.A"/>
        <text:soft-page-break/>
        <table:table-row>
          <table:table-cell table:style-name="Table85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2">dele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79_720390006 Copy 1 Copy 10"/><text:span text:style-name="Strong_20_Emphasis"><text:span text:style-name="T5">Active</text:span></text:span><text:bookmark-end text:name="__RefHeading___Toc2079_720390006 Copy 1 Copy 10"/></text:h>
      <text:p text:style-name="P29"><text:span text:style-name="Strong_20_Emphasis"><text:span text:style-name="T6">Description</text:span></text:span></text:p>
      <text:p text:style-name="P38"><text:span text:style-name="Strong_20_Emphasis"><text:span text:style-name="T7">This API actives a “</text:span></text:span><text:span text:style-name="Strong_20_Emphasis"><text:span text:style-name="T23">customer feedback</text:span></text:span><text:span text:style-name="Strong_20_Emphasis"><text:span text:style-name="T7">” in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86" table:style-name="Table86">
        <table:table-column table:style-name="Table86.A"/>
        <table:table-row>
          <table:table-cell table:style-name="Table86.A1" office:value-type="string">
            <text:p text:style-name="P30">curl --request PUT \</text:p>
            <text:p text:style-name="P30"><text:s text:c="2"/>--url 'https://[maindomian]/api/evaluation/customerFeedback/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87" table:style-name="Table87">
        <table:table-column table:style-name="Table87.A"/>
        <table:table-row>
          <table:table-cell table:style-name="Table87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2">activa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3_720390006 Copy 1 Copy 10"/><text:span text:style-name="Strong_20_Emphasis"><text:span text:style-name="T5">Inactive</text:span></text:span><text:bookmark-end text:name="__RefHeading___Toc2083_720390006 Copy 1 Copy 10"/></text:h>
      <text:p text:style-name="P29"><text:span text:style-name="Strong_20_Emphasis"><text:span text:style-name="T6">Description</text:span></text:span></text:p>
      <text:p text:style-name="P38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“</text:span></text:span><text:span text:style-name="Strong_20_Emphasis"><text:span text:style-name="T23">customer feedback</text:span></text:span><text:span text:style-name="Strong_20_Emphasis"><text:span text:style-name="T7">” in the </text:span></text:span><text:span text:style-name="Strong_20_Emphasis"><text:span text:style-name="T14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88" table:style-name="Table88">
        <table:table-column table:style-name="Table88.A"/>
        <table:table-row>
          <table:table-cell table:style-name="Table88.A1" office:value-type="string">
            <text:p text:style-name="P30">curl --request PUT \</text:p>
            <text:p text:style-name="P30"><text:s text:c="2"/>--url <text:soft-page-break/>'https://[maindomian]/api/evaluation/customerFeedback/in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89" table:style-name="Table89">
        <table:table-column table:style-name="Table89.A"/>
        <table:table-row>
          <table:table-cell table:style-name="Table89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5">in</text:span><text:span text:style-name="T12">activa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5_720390006 Copy 1 Copy 10"/><text:span text:style-name="Strong_20_Emphasis"><text:span text:style-name="T5">Fetch Specific Record</text:span></text:span><text:bookmark-end text:name="__RefHeading___Toc2085_720390006 Copy 1 Copy 10"/></text:h>
      <text:p text:style-name="P29"><text:span text:style-name="Strong_20_Emphasis"><text:span text:style-name="T6">Description</text:span></text:span></text:p>
      <text:p text:style-name="P38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23">customer feedback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9">evaluation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90" table:style-name="Table90">
        <table:table-column table:style-name="Table90.A"/>
        <table:table-row>
          <table:table-cell table:style-name="Table90.A1" office:value-type="string">
            <text:p text:style-name="P30">curl --request GET \</text:p>
            <text:p text:style-name="P30"><text:s text:c="2"/>--url 'https://[maindomian]/api/evaluation/customerFeedback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91" table:style-name="Table91">
        <table:table-column table:style-name="Table91.A"/>
        <table:table-row>
          <table:table-cell table:style-name="Table91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data is returned successfully.",</text:p>
            <text:p text:style-name="P30"><text:tab/>"errorCode" : 0,</text:p>
            <text:p text:style-name="P30"><text:tab/>"data" : {</text:p>
            <text:p text:style-name="P30"><text:tab/><text:tab/>"id" : 16621244611384550112, </text:p>
            <text:p text:style-name="P30"><text:tab/><text:tab/>"title" : "test",</text:p>
            <text:p text:style-name="P30"><text:tab/><text:tab/>"code" : "123",</text:p>
            <text:p text:style-name="P30"><text:tab/><text:tab/>"description" : "test",</text:p>
            <text:p text:style-name="P30"><text:tab/><text:tab/>"profileId": [{</text:p>
            <text:p text:style-name="P30"><text:tab/><text:tab/><text:tab/>"id" : 16621244611384550113,</text:p>
            <text:p text:style-name="P30"><text:tab/><text:tab/><text:tab/>"firstName": "David",</text:p>
            <text:p text:style-name="P30"><text:tab/><text:tab/><text:tab/>"lastName": "Talor"</text:p>
            <text:p text:style-name="P30"><text:soft-page-break/><text:tab/><text:tab/>}],</text:p>
            <text:p text:style-name="P30"><text:tab/><text:tab/>"roleFormPermissionId": [{</text:p>
            <text:p text:style-name="P30"><text:tab/><text:tab/><text:tab/>"id" : 16621244611384550114,</text:p>
            <text:p text:style-name="P30"><text:tab/><text:tab/><text:tab/>"formPermissionId": {</text:p>
            <text:p text:style-name="P30"><text:tab/><text:tab/><text:tab/><text:tab/>"id" : 16621244611384550114,</text:p>
            <text:p text:style-name="P30"><text:tab/><text:tab/><text:tab/><text:tab/>"formId": {</text:p>
            <text:p text:style-name="P30"><text:tab/><text:tab/><text:tab/><text:tab/><text:tab/>"id" : 16621244611384550115,</text:p>
            <text:p text:style-name="P30"><text:tab/><text:tab/><text:tab/><text:tab/><text:tab/>"title": "Project"</text:p>
            <text:p text:style-name="P30"><text:tab/><text:tab/><text:tab/><text:tab/>},</text:p>
            <text:p text:style-name="P30"><text:tab/><text:tab/><text:tab/><text:tab/>"permissionId": {</text:p>
            <text:p text:style-name="P30"><text:tab/><text:tab/><text:tab/><text:tab/><text:tab/>"id" : 16621244611384550116,</text:p>
            <text:p text:style-name="P30"><text:tab/><text:tab/><text:tab/><text:tab/><text:tab/>"title": "Add"</text:p>
            <text:p text:style-name="P30"><text:tab/><text:tab/><text:tab/><text:tab/>}</text:p>
            <text:p text:style-name="P30"><text:tab/><text:tab/><text:tab/>}</text:p>
            <text:p text:style-name="P30"><text:tab/><text:tab/>}],</text:p>
            <text:p text:style-name="P30"><text:tab/><text:tab/>"createdAt" : "2025-8-25 12:00:00",</text:p>
            <text:p text:style-name="P30"><text:tab/><text:tab/>"createdBy" : "John Davis" </text:p>
            <text:p text:style-name="P30"><text:tab/>}</text:p>
            <text:p text:style-name="P30">}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scadia Code Light" svg:font-family="'Cascadia Code Light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9" number:language="en" number:country="US" number:transliteration-format="1" number:transliteration-language="en" number:transliteration-country="US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number:date-style style:name="N10130" number:language="en" number:country="US" number:transliteration-format="1" number:transliteration-language="en" number:transliteration-country="US" number:transliteration-style="short">
      <number:day-of-week number:style="long"/>
      <number:text>, </number:text>
      <number:day/>
      <number:text> </number:text>
      <number:month number:style="long" number:textual="true"/>
      <number:year number:style="long"/>
    </number:date-style>
    <number:date-style style:name="N20105" number:language="fa" number:country="IR" number:transliteration-format="۱" number:transliteration-language="fa" number:transliteration-country="IR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a92af" officeooo:paragraph-rsid="00b7d508"/>
    </style:style>
    <style:style style:name="MP2" style:family="paragraph" style:parent-style-name="Footer">
      <style:paragraph-properties fo:text-align="start" style:justify-single-word="false" style:writing-mode="lr-tb"/>
      <style:text-properties officeooo:rsid="00180ac0" officeooo:paragraph-rsid="00180ac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1.0&#10;&#10;" text:name="DocumentVersion"/>
        </text:user-field-decls>
        <text:p text:style-name="MP1"><text:subject>API Specification for Evaluation</text:subject><text:tab/><text:tab/>Document Version: <text:user-field-get text:name="DocumentVersion">1.0

</text:user-field-get></text:p>
      </style:header>
      <style:header-first>
        <text:p text:style-name="Header_20_left"/>
      </style:header-first>
      <style:footer>
        <text:p text:style-name="MP2"><text:title>Horizon Research Project</text:title><text:tab/><text:tab/>Page <text:page-number text:select-page="current">37</text:page-number><text:s/>of <text:page-count>37</text:page-count></text:p>
      </style:footer>
      <style:footer-first>
        <text:p text:style-name="MP2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0-09-26T00:27:57.311000000</meta:creation-date>
    <dc:date>2026-06-05T17:22:11.985649000</dc:date>
    <meta:editing-duration>P25DT10H53M33S</meta:editing-duration>
    <meta:editing-cycles>1189</meta:editing-cycles>
    <meta:generator>LibreOffice/25.2.7.2$Windows_X86_64 LibreOffice_project/5cbfd1ab6520636bb5f7b99185aa69bd7456825d</meta:generator>
    <dc:subject>API Specification for Evaluation</dc:subject>
    <dc:title>Horizon Research Project</dc:title>
    <meta:document-statistic meta:table-count="91" meta:image-count="1" meta:object-count="0" meta:page-count="37" meta:paragraph-count="1092" meta:word-count="3551" meta:character-count="26414" meta:non-whitespace-character-count="22854"/>
  </office:meta>
</office:document-meta>
</file>